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A0000008D201C26D5D559DF1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  <style:font-face style:name="Roboto1" svg:font-family="Roboto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solid" svg:stroke-width="0.12cm" svg:stroke-color="#000000" draw:stroke-linejoin="miter" svg:stroke-linecap="butt" draw:fill="none" fo:padding-top="0.06cm" fo:padding-bottom="0.06cm" fo:padding-left="0.06cm" fo:padding-right="0.06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2.871cm" fo:min-width="17.49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305cm" fo:min-width="16.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957cm" fo:min-width="18.41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588cm" fo:min-width="8.01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9" style:family="graphic" style:parent-style-name="standard">
      <style:graphic-properties draw:stroke="none" draw:fill="solid" draw:fill-color="#04272d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font-size="30pt" style:font-size-asian="30pt" style:font-size-complex="30pt"/>
    </style:style>
    <style:style style:name="P4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paragraph-properties fo:text-align="start" style:writing-mode="lr-tb"/>
      <style:text-properties fo:font-size="13pt" style:font-size-asian="13pt" style:font-size-complex="13pt"/>
    </style:style>
    <style:style style:name="P7" style:family="paragraph">
      <loext:graphic-properties draw:fill="solid" draw:fill-color="#04272d"/>
    </style:style>
    <style:style style:name="T1" style:family="text">
      <style:text-properties fo:color="#000000" loext:opacity="100%" style:font-name="Roboto1" fo:font-size="30pt" fo:font-weight="350" style:font-size-asian="30pt" style:font-weight-asian="350" style:font-name-complex="Roboto1" style:font-size-complex="30pt" style:font-weight-complex="350"/>
    </style:style>
    <style:style style:name="T2" style:family="text">
      <style:text-properties fo:color="#000000" loext:opacity="100%" style:font-name="Roboto1" fo:font-size="16pt" fo:font-weight="900" style:font-size-asian="16pt" style:font-weight-asian="900" style:font-name-complex="Roboto1" style:font-size-complex="16pt" style:font-weight-complex="900"/>
    </style:style>
    <style:style style:name="T3" style:family="text">
      <style:text-properties fo:color="#000000" loext:opacity="100%" style:font-name="Roboto1" fo:font-size="13pt" fo:font-weight="350" style:font-size-asian="13pt" style:font-weight-asian="350" style:font-name-complex="Roboto1" style:font-size-complex="13pt" style:font-weight-complex="35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5.499cm" svg:height="1.192cm" svg:x="2.35cm" svg:y="1.907cm">
          <draw:image xlink:href="Pictures/100000010000028A0000008D201C26D5D559DF15.png" xlink:type="simple" xlink:show="embed" xlink:actuate="onLoad" draw:mime-type="image/png">
            <text:p/>
          </draw:image>
        </draw:frame>
        <draw:line draw:style-name="gr2" draw:text-style-name="P1" draw:layer="layout" svg:x1="2.233cm" svg:y1="7.599cm" svg:x2="10.131cm" svg:y2="7.599cm">
          <text:p/>
        </draw:line>
        <draw:frame draw:style-name="gr3" draw:text-style-name="P3" draw:layer="layout" svg:width="17.494cm" svg:height="2.871cm" svg:x="2.178cm" svg:y="5.827cm">
          <draw:text-box>
            <text:p text:style-name="P2"><text:span text:style-name="T1">CMTAT ACE Specification</text:span></text:p>
          </draw:text-box>
        </draw:frame>
        <draw:frame draw:style-name="gr4" draw:text-style-name="P4" draw:layer="layout" svg:width="16.3cm" svg:height="1.305cm" svg:x="2.35cm" svg:y="8.1cm">
          <draw:text-box>
            <text:p text:style-name="P2"><text:span text:style-name="T2">CMTAT Functional Specifications to integrate </text:span></text:p>
            <text:p text:style-name="P2"><text:span text:style-name="T2">Chainlink ACE (Automated Compliance Engine)</text:span></text:p>
          </draw:text-box>
        </draw:frame>
        <draw:polygon draw:style-name="gr5" draw:text-style-name="P5" draw:layer="layout" svg:width="20.999cm" svg:height="17.253cm" svg:x="0cm" svg:y="12.447cm" svg:viewBox="0 0 21000 17254" draw:points="0,17254 21000,17254 21000,0 0,0">
          <text:p/>
        </draw:polygon>
        <draw:frame draw:style-name="gr6" draw:text-style-name="P4" draw:layer="layout" svg:width="18.413cm" svg:height="1.957cm" svg:x="6.715cm" svg:y="9.207cm">
          <draw:text-box>
            <text:p text:style-name="P2"><text:span text:style-name="T2"><text:line-break/></text:span><text:span text:style-name="T2"/></text:p>
          </draw:text-box>
        </draw:frame>
        <draw:frame draw:style-name="gr7" draw:text-style-name="P6" draw:layer="layout" svg:width="8.016cm" svg:height="1.588cm" svg:x="2.27cm" svg:y="9.842cm">
          <draw:text-box>
            <text:p text:style-name="P2"><text:span text:style-name="T3">CMTAT Chainlink ACE: v0.1.0</text:span><text:span text:style-name="T3"><text:line-break/></text:span><text:span text:style-name="T3">First published: May 2026</text:span></text:p>
          </draw:text-box>
        </draw:frame>
        <draw:line draw:style-name="gr8" draw:text-style-name="P1" draw:layer="layout" svg:x1="0.017cm" svg:y1="15.901cm" svg:x2="13.8cm" svg:y2="15.85cm">
          <text:p/>
        </draw:line>
        <draw:path draw:style-name="gr9" draw:text-style-name="P7" draw:layer="layout" svg:width="3.198cm" svg:height="3.198cm" svg:x="8.623cm" svg:y="19.383cm" svg:viewBox="0 0 3199 3199" svg:d="M1742 1709c-10 10-20 21-30 32-2 2-3 9-1 11 9 12 19 23 29 33 2 2 9 2 12 0 14-12 31-21 35-42-13-14-22-32-45-34zM1701 1444c11 18 26 30 41 42 2 2 9 1 12-1 14-12 32-21 39-43-17-14-29-34-50-47-16 17-32 31-42 49zM1444 1793c19-7 28-23 40-35 4-5 5-14 1-18-14-13-23-31-43-38-15 13-29 26-45 40 12 23 32 35 47 51zM1449 1392c-18 19-33 34-48 49-4 3-4 13 0 17 15 12 25 28 46 37 17-16 34-31 50-50-13-19-28-33-48-53zM1747 1993c-21 14-36 32-55 48 14 23 34 39 49 58 6-2 10-3 13-5 16-17 31-35 48-53-20-17-35-34-55-48zM2101 1743c-14-12-27-26-40-38-6-6-12-13-22-10-13 13-26 27-39 41-6 6-6 16 1 23 13 14 26 27 38 41 4-1 6-1 7-2 16-14 32-28 48-42 2-3 4-7 7-13zM1501 2046c-1-4-1-6-2-8-15-15-30-30-46-45-2-2-9-3-11-1-18 16-35 32-54 48 19 20 37 39 55 56 3 3 8 2 12 2 2-1 4-3 5-4 14-16 28-33 41-48zM1987 1448c17 17 33 34 49 50 3 3 8 2 13 3 17-15 34-30 52-46 1-1 0-4 0-8-3-13-17-17-26-26-9-11-20-22-31-35-5 4-11 7-15 11-5 5-8 11-12 16-6 6-13 12-18 18-4 5-7 10-12 17zM1983 2045c4 4 7 9 11 14 6 6 12 12 18 18 4 5 8 10 12 16 5 6 10 13 21 13 6-7 12-16 19-24 8-8 16-15 23-22s19-10 19-23c-17-16-34-32-51-47-4-4-10-5-12-6-20 20-38 38-60 61zM1679 1154c14 12 24 21 34 29 11 10 17 25 34 30 20-18 41-37 62-56-2-12-12-17-19-25-8-7-15-15-23-23-7-8-13-16-20-24-17 8-21 23-32 34-11 10-21 21-36 35zM1088 1744c3 13 14 16 21 23 8 8 16 15 23 22 8 8 13 18 27 21 8-10 18-21 28-32 9-12 25-18 28-36-19-19-38-39-56-58-13 0-19 10-26 17-7 8-16 15-23 22-8 7-19 10-22 21zM1382 1155c20 19 37 36 55 52 4 3 11 5 16 7 21-21 41-40 60-58-4-16-18-21-26-31-9-11-19-23-29-34-2-3-8-2-11-3-21 22-42 44-65 67zM1160 1380c-18 4-23 22-34 31-13 12-25 23-38 34-1 2-1 10 1 12 21 19 42 37 63 55 1 1 4 1 6 1 19-19 39-39 58-59 1-1 0-4 0-7-4-15-20-21-29-32-9-12-18-24-27-35zM1079 2039c15 12 28 23 42 34 15 12 20 32 37 41 23-25 44-49 66-73-22-23-44-46-67-69-17 5-24 23-37 34-13 10-26 21-41 33zM2041 1225c26-25 49-47 74-70-14-12-28-22-39-34-12-12-22-26-33-40-13 1-17 11-23 20-8 10-17 19-25 29-8 8-18 12-22 23 5 16 21 20 31 31 11 13 23 25 37 41zM2335 1675c-17 7-22 23-32 33-13 11-25 23-38 34 2 5 3 10 6 12 19 17 38 35 52 57 5 7 16 6 22-2 15-21 34-38 56-52 5-3 7-10 9-14-25-22-48-43-75-68zM2411 1457c-1-6-1-12-4-13-27-18-49-41-69-67-2-2-10-2-11 0-18 25-38 47-61 67-2 1-2 9 0 11 22 20 44 40 62 64 2 2 10 2 11 0 22-24 44-47 72-62zM1447 2260c-20 28-43 47-68 65-2 1-1 7-2 12 13 11 25 23 39 33 15 12 17 36 41 39 17-25 36-48 61-66 5-4 5-13 1-17-22-20-45-41-72-66zM1742 2263c-18 20-36 42-59 58-13 8-13 16 0 25 25 18 42 43 60 70 12-15 22-29 34-42 11-12 25-23 37-35 2-2 2-10 0-12-26-18-44-45-72-64zM1229 1156c-1-14-15-18-24-27-8-9-17-19-25-28s-9-24-25-25c-12 15-23 31-36 44s-29 24-45 37c16 12 30 22 43 33 14 13 26 28 39 41 25-26 49-50 73-75zM2258 2041c13 12 26 24 38 35 14 12 20 32 37 43 13-16 25-31 38-44 14-13 29-24 44-35-2-4-3-6-4-7-27-18-51-39-71-64-2-2-8-2-10-2-24 25-48 49-72 74zM2042 2257c-16 5-20 19-29 28-8 8-16 15-23 23-8 9-24 10-25 29 11 10 24 21 36 33 11 13 20 28 31 41 2 2 7 2 11 3 12-15 24-30 35-46 12-15 35-19 43-40-14-10-28-19-40-30-14-13-27-28-39-41zM772 1741c11 10 15 15 20 18 24 13 42 31 57 52 14 19 17 19 32-2 13-17 27-34 45-46 7-5 13-11 16-22-25-19-50-39-66-68-5-8-17-9-22-1-19 30-45 52-82 69zM1744 772c-34 49-34 48-76 83-2 2-2 8-3 13 13 10 27 19 39 31 14 13 26 29 38 43 2-1 5 0 6-2 23-25 45-51 75-69 4-3 3-13-2-17-13-11-28-20-39-33-13-14-23-30-38-49zM1532 869c-7-23-24-26-34-37-15-18-29-36-44-54-24 9-26 38-46 51-13 9-25 18-36 28-3 2-3 7-5 13 30 16 56 39 77 67 2 2 7 1 13 2 19-28 44-51 75-70zM2250 1157c28 21 55 42 73 72 4 8 15 7 21-1 17-26 39-46 66-61 4-2 6-8 9-12-17-13-34-23-47-36-15-15-27-33-41-50-13 17-23 34-36 48s-29 25-45 40zM858 1531c6-2 12-2 14-5 18-27 40-49 67-68 5-4 3-13-2-17-3-3-6-6-10-8-21-15-37-37-51-58-5-8-15-7-21 0-8 10-15 22-24 31-16 15-34 27-51 40-2 2-1 10 0 11 32 19 60 42 78 74zM775 2041c15 11 33 20 47 33 14 14 24 30 37 45 2 3 10 4 11 2 14-16 27-34 41-50 9-9 20-16 31-24 5-4 5-12 0-16-27-18-51-40-68-69-4-5-13-6-17-1-20 29-45 52-76 69-3 2-4 7-6 11zM1158 2244c-6 8-10 13-14 18-15 24-36 42-61 56-4 2-8 4-10 8-1 2-1 8 1 10 15 13 32 23 45 36 15 15 27 33 41 51 5-7 11-14 15-21 12-21 28-38 47-52 5-4 11-8 14-13 2-3 2-10-1-11-31-21-55-47-77-82zM2041 772c-2 0-5 0-6 1-21 33-44 63-78 84-4 3-2 14 3 17 29 15 51 38 69 66 2 3 10 7 10 6 27-27 50-58 85-76 1-1 1-9-1-11-14-13-31-23-44-37-15-15-26-33-38-50zM770 1159c4 2 6 6 10 8 32 16 57 38 75 68 1 2 3 4 5 4 4 1 11 1 12 0 20-35 51-57 80-82-2-3-4-7-7-9-30-19-54-43-69-75-4-8-16-7-20 2-18 34-44 58-78 74-3 2-5 6-8 10zM2428 2329c-19-13-37-23-53-37s-29-31-44-49c-11 12-16 23-25 33-10 11-21 21-32 31-8 9-24 10-26 25 2 4 4 9 7 11 30 18 52 44 68 76 1 2 6 3 9 5 13-18 25-37 40-51 16-17 37-29 56-44zM1542 2625c-9-17-31-21-43-35-15-16-29-32-44-50-5 2-12 3-15 8-18 28-41 49-71 65-12 5-11 14 3 22 29 16 52 39 67 69 2 4 4 8 8 10 2 2 9 2 11 1 11-16 20-34 33-48 15-15 33-27 51-42zM1157 955c4-4 9-7 11-10 18-30 41-55 73-71 1-1 4-3 4-4 0-4 1-11-1-12-36-21-61-53-81-89-1-2-3-3-6-5-8 13-14 27-23 39-11 13-24 24-36 36-10 11-29 11-34 33 42 14 68 47 93 83zM2532 2043c39 19 65 47 82 83 1 1 3 4 5 4 3 1 10 2 11 1 20-42 54-70 95-91-3-4-4-9-8-11-36-16-64-41-83-77 0-2-2-4-4-4-4 0-9-1-11 2-12 15-23 30-34 46-13 17-37 23-53 47zM2725 1743c-58-34-58-34-98-91-20 11-23 36-40 50-16 13-34 27-50 41 2 3 3 8 6 10 33 19 56 47 76 79 1 2 7 2 11 3 28-35 5-31 95-92zM2628 1356c-4 2-9 3-11 6-18 33-42 61-75 80-3 2-4 8-6 12 17 13 34 27 51 40 16 14 20 39 40 50 14-18 25-36 40-51 16-14 36-24 54-36 1-1-1-7-2-11-1-2-3-3-5-4-53-34-53-34-86-86zM1836 2626c-11-20-35-24-49-40s-27-33-41-49c-4 2-8 3-10 6-18 30-41 54-73 71-4 2-6 8-9 13 46 32 46 32 91 96 38-60 38-60 91-97zM2040 2533c-20 10-24 35-41 48-18 14-36 29-55 44 7 5 12 9 17 13 29 17 50 40 63 71 2 3 4 8 8 10 2 2 7 2 11 3 32-58 32-58 92-96-11-21-35-23-49-39-15-17-30-35-46-54zM871 2428c8-13 14-26 23-38 10-12 21-22 31-33s29-11 33-28c-47-34-47-34-81-80-6-8-17-9-21-1-21 34-49 60-87 74-2 1-4 5-5 8 1 2 2 4 4 5 40 19 72 47 91 87 2 3 7 4 12 6zM2327 765c-32 53-32 53-81 89-2 1-4 3-4 5-1 4-2 10 0 11 15 12 33 21 47 35 15 15 26 34 40 52 5-4 11-6 14-11 19-33 46-57 81-71 2-1 5-3 5-4 0-4 0-9-2-11-17-12-37-22-52-37-17-17-29-38-43-56-1-2-3-2-5-2zM1159 2731c14-23 25-41 37-59 14-20 37-30 55-44 2-1 0-10-2-11-39-21-66-54-90-90-3 2-7 4-8 7-19 36-46 63-84 79-9 4-10 15-1 18 40 17 67 47 84 86 2 4 5 7 9 14zM2728 1155c-62-34-65-37-100-98-5 3-13 5-15 9-15 38-42 64-78 84-3 1-4 5-6 9 5 4 10 9 15 12 30 16 52 39 67 69 2 4 5 8 8 10s10 2 11 1c20-40 51-68 92-87 3-1 4-6 6-9zM1849 571c-5-3-10-7-15-10-36-18-62-44-78-82-3-7-5-16-14-19-33 67-33 67-102 112 15 10 30 18 44 28 11 9 22 20 32 31 11 11 14 30 29 38 40-56 40-56 104-98zM758 868c61 32 61 32 99 87 6 8 15 7 20-2 17-34 42-60 76-76 4-2 7-5 11-8-1-9-7-14-15-19-34-17-57-44-71-80-2-3-5-6-7-10-20 6-19 27-29 40-12 15-26 29-42 41-13 10-33 9-42 27zM2328 2733c48-75 48-75 105-106 0-2 0-4 0-6-3-3-5-8-8-9-38-16-65-42-84-77-3-5-9-7-13-11-34 53-34 53-90 91-3 2-4 7-6 11 60 38 63 41 96 107zM672 1745c-58-41-58-41-97-102-54 71-54 71-112 98 3 9 11 13 18 16 39 15 65 42 83 78 2 5 7 9 10 13 15-21 27-42 43-59s36-30 55-44zM1346 570c9 16 29 17 41 28 12 10 23 20 34 30 13 11 14 32 35 37 8-12 16-25 26-36 11-13 25-24 38-35 11-9 28-9 35-27-47-18-80-51-97-101-7 5-14 7-16 11-17 43-48 71-90 88-2 1-3 3-6 5zM673 2040c-4-5-7-11-12-14-36-18-61-46-78-82-2-5-7-8-11-12-36 62-36 62-100 98-4 2-5 7-8 10 66 33 71 38 109 106 15-11 17-29 27-42 9-12 18-24 29-34 13-11 28-19 44-30zM464 1456c15 7 32 13 46 23s25 23 37 36c11 11 13 30 27 40 40-61 40-61 97-102-7-18-28-19-39-32-10-11-21-22-31-34-11-13-13-32-28-43-37 63-37 63-103 101-3 2-4 7-6 11zM680 1157c-12-9-24-15-34-21-23-14-39-33-52-57-4-7-6-16-11-23-2-5-7-8-11-12-29 65-40 79-114 112 23 14 45 26 65 41 24 17 35 44 49 70 15-11 17-30 28-42 11-13 22-27 35-38s28-19 45-30zM2521 2327c5 5 8 12 13 14 39 19 65 49 80 89 1 2 3 4 4 5 4 0 11 1 11-1 19-49 55-81 103-100 2-1 3-6 5-9-64-28-71-34-108-95-11 0-15 6-19 14-15 33-39 56-71 73-6 3-11 6-18 10zM870 2736c40-79 33-66 100-112-2-9-10-13-18-17-18-8-33-20-47-34-15-15-20-37-36-51-22 9-23 36-40 49-12 9-23 19-35 28-9 5-19 8-29 14-3 1-6 6-7 9s3 8 6 9c45 16 76 45 93 91 2 5 8 9 13 14zM2149 571c-69-37-75-43-108-110-20 6-18 28-28 41-11 16-23 31-39 42-14 10-28 18-44 27 7 5 12 10 17 12 35 16 61 40 78 74 2 4 4 8 8 10 3 2 9 3 10 1 14-19 24-42 43-56s39-26 63-41zM1334 2915c10 5 20 10 29 15 36 15 60 41 75 77 2 6 5 12 9 17 2 2 8 3 10 1 4-2 5-7 7-11 14-40 41-70 81-87 8-3 14-8 23-13-62-34-69-30-105-92-7-13-16-12-23 3-20 41-52 68-96 82-3 1-5 4-10 8zM1582 282c-23-10-37-15-50-23-49-28-73-71-71-129 2-70 58-126 129-130 99-5 155 83 146 153-7 48-32 84-75 108-7 4-16 6-24 10-5 3-10 7-15 12 86 38 76 37 122 113 12-10 15-26 23-39 56-95 193-94 247 0 5 10 9 20 14 30 2 3 6 7 9 7 3 1 8-3 9-6 6-11 10-24 17-35 31-47 76-69 133-65 54 5 93 34 116 82 28 60 11 130-41 170-16 11-34 19-51 29 1 3 2 7 5 9 66 38 66 37 103 102 12-6 15-19 22-30 25-42 63-64 110-74 10-2 22-2 32 0 53 14 96 41 117 94 2 6 5 12 8 18 1 1 3 2 5 3 5 1 8-1 10-5 4-10 7-21 13-30 24-46 64-70 114-76 31-3 61 7 86 25 95 67 77 194-15 241-22 11-46 27-74 19-42-11-82-28-106-69-8-12-14-26-21-40 0-1-3-2-5-2s-5 0-6 1c-3 6-7 11-9 17-14 36-38 62-74 79-8 4-16 7-19 18 5 3 10 6 16 9 36 16 62 41 78 76 3 8 8 15 18 16 8-13 14-27 23-39 37-50 95-70 155-55 56 15 101 68 105 128 4 51-18 93-58 124-14 10-30 17-47 27 4 4 7 9 11 12 7 4 15 7 23 12 24 15 44 35 57 60 6 11 7 25 20 32 9-15 16-30 26-45 25-38 64-56 108-64 4-1 9-1 13 0 65 9 112 45 129 104 16 57-4 116-50 152-23 17-50 25-77 32-4 2-9 2-13 1-34-9-67-19-92-45-10-12-19-25-27-38-6-9-10-19-15-29-17 5-14 21-21 30-9 11-17 25-27 37-8 10-19 17-30 25-10 7-25 8-30 23 66 41 66 41 105 112 9-16 16-32 26-46 31-45 74-65 128-61 55 4 95 31 116 81 43 101-26 187-106 197-60 8-107-13-140-63-9-12-15-26-22-40-15 6-13 21-20 30-8 10-14 22-22 32-9 9-19 18-30 25s-23 13-34 19c1 4 2 9 4 10 45 22 77 56 95 102 1 2 3 3 6 5 8-13 14-27 22-40 26-41 66-61 112-70 6-1 13-1 19 0 23 6 46 13 66 27 45 31 65 74 62 128-4 55-33 93-81 117-12 6-25 9-37 14-15 5-29 5-44-1-8-3-16-6-24-9-35-12-60-34-78-66-6-11-8-24-21-31-13 22-20 48-41 65-19 17-41 31-62 47 70 45 70 45 102 113 8 2 9-5 12-10 7-13 13-28 21-40 34-46 81-65 137-56 54 9 92 40 108 92 22 69-5 137-70 170-63 31-140 10-178-49-10-16-18-34-27-52-36 79-46 89-119 120 3 9 12 11 19 15 11 6 24 11 34 18 43 32 66 76 60 130-6 53-35 92-85 115-13 6-28 11-42 15-8 2-18 3-26 1-16-5-33-11-49-18-24-11-43-28-58-50-7-13-14-27-21-40-3 1-6 1-7 2-3 2-7 5-9 9-16 43-47 72-90 89-3 1-6 6-8 10-2 3 1 7 6 9 6 3 12 5 17 8 50 25 73 68 82 119 0 2 1 4 0 7-6 49-24 92-69 119-64 41-146 26-190-36-12-16-20-33-31-52-8 16-14 30-22 42-51 86-173 101-241 11-9-11-15-26-23-38-1-2-7 0-11 1-2 1-4 3-4 5-20 47-56 76-103 92-2 0-3 2-4 4 9 10 21 13 33 19 36 19 61 48 72 88 2 9 5 17 7 25 2 6 3 13 2 19-7 23-12 47-25 67-29 46-72 69-125 67-54-2-95-28-120-77-32-63-13-136 45-178 15-12 36-14 49-31-64-34-60-21-113-102-8-2-9 5-11 10-20 41-50 70-93 86-4 1-7 4-12 7 7 6 14 10 22 15 11 6 23 11 33 20 43 36 64 82 51 138-12 55-46 91-101 108-56 17-123-9-154-58-9-14-15-31-23-46 0-1-3-2-4-2-2 0-6 0-6 2-7 13-13 27-21 40-23 37-56 59-99 66-60 9-119-21-146-75-33-65-12-142 51-182 14-9 30-16 49-25-16-8-29-13-40-20-13-7-26-16-37-26-9-9-16-20-24-31s-9-28-24-36c-7 13-13 27-22 40-58 91-187 90-243-3-8-13-13-27-20-40-4 2-9 3-11 6-8 13-13 27-22 39-33 46-78 69-134 61s-93-41-114-95c-24-61 10-132 54-159 15-9 31-16 48-24-3-5-6-10-10-13-5-4-12-5-18-8-50-23-75-64-87-115-2-8-2-17 0-25 8-47 29-86 70-113 13-8 29-10 37-26-25-12-52-23-69-46-16-20-28-42-43-64-8 14-14 28-22 41-60 93-195 87-246-11-33-63-12-143 49-183 7-5 15-9 23-13 7-3 17-2 20-13-5-4-10-9-15-12-13-7-27-13-39-22-75-59-72-174 7-229 8-6 19-10 28-16 7-4 14-9 23-14-76-39-84-47-116-122-4 2-9 4-10 7-7 14-11 29-19 41-32 51-79 72-139 65-42-5-96-41-113-103-20-75 36-170 130-171 58-1 100 25 128 75 5 9 7 20 12 30 1 3 5 7 9 8 2 0 6-3 8-6 5-12 8-25 14-36 11-25 29-43 52-56 13-8 27-14 41-21-2-3-4-8-7-10-11-7-23-12-35-18-89-55-92-192 8-248 13-7 27-13 41-19-4-12-14-10-21-13-8-4-16-7-23-12-49-29-73-73-69-130 3-55 30-93 79-118 47-24 128-20 173 45 11 15 19 33 28 50 65-105 75-87 116-113-4-11-14-15-24-19-44-21-69-57-81-104-5-17-5-34 0-51 16-60 53-98 113-114 19-5 38-5 57 1 46 13 82 39 101 84 3 8 8 15 19 15 12-25 23-51 47-68 20-16 43-28 66-42-17-8-33-15-47-24-91-58-84-192 9-242 53-29 138-23 184 46 41 64 27 147-35 191-15 11-34 18-52 28 4 4 8 10 13 12 42 16 73 45 93 86 1 3 5 5 8 8 43-60 43-60 110-106-11-6-23-12-34-19-43-24-63-64-73-110-2-8-1-17 0-26 5-26 15-50 31-71 54-75 167-77 225-4 10 13 17 29 27 43 2 3 7 4 11 6 39-70 49-79 126-107z">
          <text:p/>
        </draw:path>
        <draw:path draw:style-name="gr9" draw:text-style-name="P7" draw:layer="layout" svg:width="0.279cm" svg:height="0.281cm" svg:x="8.915cm" svg:y="21.714cm" svg:viewBox="0 0 280 282" svg:d="M0 141c3-57 30-100 80-125 12-6 24-10 37-14 9-2 18-3 26-2 71 8 124 54 135 121 11 69-33 135-100 155-68 20-144-16-169-85-2-6-5-12-6-18-1-11-2-22-3-32z">
          <text:p/>
        </draw:path>
        <draw:path draw:style-name="gr9" draw:text-style-name="P7" draw:layer="layout" svg:width="0.279cm" svg:height="0.282cm" svg:x="10.667cm" svg:y="22.298cm" svg:viewBox="0 0 280 283" svg:d="M0 138c1-50 26-91 77-120 46-27 91-23 134 4 48 31 73 75 68 131-4 56-34 99-86 119-101 38-192-35-193-134z">
          <text:p/>
        </draw:path>
        <draw:path draw:style-name="gr9" draw:text-style-name="P7" draw:layer="layout" svg:width="0.28cm" svg:height="0.278cm" svg:x="10.955cm" svg:y="19.673cm" svg:viewBox="0 0 281 279" svg:d="M143 0c67-2 125 51 135 108 14 73-19 133-82 160-59 26-130 5-167-49-14-19-23-41-28-65-1-8-2-17 0-27 6-32 18-62 42-85 27-28 60-42 100-42z">
          <text:p/>
        </draw:path>
        <draw:path draw:style-name="gr9" draw:text-style-name="P7" draw:layer="layout" svg:width="0.276cm" svg:height="0.278cm" svg:x="8.916cm" svg:y="19.966cm" svg:viewBox="0 0 277 279" svg:d="M277 141c-1 73-64 139-137 138-37 0-71-15-98-42-28-28-42-60-42-99 1-76 62-138 138-138 92 1 141 76 139 141z">
          <text:p/>
        </draw:path>
        <draw:path draw:style-name="gr9" draw:text-style-name="P7" draw:layer="layout" svg:width="0.282cm" svg:height="0.277cm" svg:x="8.623cm" svg:y="21.134cm" svg:viewBox="0 0 283 278" svg:d="M0 144c2-58 26-106 85-132 78-36 159 14 183 76 4 13 9 25 12 37 2 6 4 14 2 19-9 29-15 59-37 83-36 41-80 59-134 47-56-11-91-47-106-102-3-11-4-21-5-28z">
          <text:p/>
        </draw:path>
        <draw:path draw:style-name="gr9" draw:text-style-name="P7" draw:layer="layout" svg:width="0.277cm" svg:height="0.278cm" svg:x="9.499cm" svg:y="22.3cm" svg:viewBox="0 0 278 279" svg:d="M278 140c1 65-53 137-135 139-84 1-143-69-143-139 1-73 58-137 136-140 69-4 141 54 142 140z">
          <text:p/>
        </draw:path>
        <draw:path draw:style-name="gr9" draw:text-style-name="P7" draw:layer="layout" svg:width="0.278cm" svg:height="0.277cm" svg:x="11.54cm" svg:y="20.258cm" svg:viewBox="0 0 279 278" svg:d="M279 140c2 73-61 137-136 138-86 1-143-70-143-138 1-77 66-141 144-140 66 1 137 60 135 140z">
          <text:p/>
        </draw:path>
        <draw:path draw:style-name="gr9" draw:text-style-name="P7" draw:layer="layout" svg:width="0.28cm" svg:height="0.276cm" svg:x="9.208cm" svg:y="19.674cm" svg:viewBox="0 0 281 277" svg:d="M132 277c-49-1-92-27-117-78-24-49-20-97 12-141 34-46 81-65 138-55 45 8 78 35 99 76 1 2 2 4 3 6 23 45 14 88-12 128-25 40-67 64-123 64z">
          <text:p/>
        </draw:path>
        <draw:path draw:style-name="gr9" draw:text-style-name="P7" draw:layer="layout" svg:width="0.277cm" svg:height="0.276cm" svg:x="11.252cm" svg:y="22.01cm" svg:viewBox="0 0 278 277" svg:d="M278 135c-2 84-66 142-141 142-60 0-135-46-137-137-2-79 61-141 139-140 87 1 137 70 139 135z">
          <text:p/>
        </draw:path>
        <draw:path draw:style-name="gr9" draw:text-style-name="P7" draw:layer="layout" svg:width="0.275cm" svg:height="0.278cm" svg:x="9.792cm" svg:y="19.385cm" svg:viewBox="0 0 276 279" svg:d="M125 0c83-3 149 51 151 132 2 56-24 100-75 127-15 8-32 13-49 18-8 2-17 3-25 1-20-7-41-14-60-24-47-28-70-73-67-126 4-55 33-97 86-119 16-7 33-8 39-9z">
          <text:p/>
        </draw:path>
        <draw:path draw:style-name="gr9" draw:text-style-name="P7" draw:layer="layout" svg:width="0.276cm" svg:height="0.281cm" svg:x="10.375cm" svg:y="19.383cm" svg:viewBox="0 0 277 282" svg:d="M277 140c-1 54-26 96-78 122-53 28-82 26-133-7-44-27-66-69-66-119 0-47 27-103 88-126 42-17 107-17 155 37 22 25 33 56 34 93z">
          <text:p/>
        </draw:path>
        <draw:path draw:style-name="gr9" draw:text-style-name="P7" draw:layer="layout" svg:width="0.279cm" svg:height="0.276cm" svg:x="8.624cm" svg:y="20.55cm" svg:viewBox="0 0 280 277" svg:d="M136 277c-77-5-128-57-135-126-7-73 43-127 95-145 67-23 147 18 170 81 5 12 9 25 12 37 2 6 3 13 2 19-8 27-14 54-32 78-28 37-66 54-112 56z">
          <text:p/>
        </draw:path>
        <draw:path draw:style-name="gr9" draw:text-style-name="P7" draw:layer="layout" svg:width="0.275cm" svg:height="0.276cm" svg:x="11.542cm" svg:y="21.717cm" svg:viewBox="0 0 276 277" svg:d="M276 139c3 64-50 137-136 138-90 0-138-74-140-135-2-73 67-143 140-142 75 2 136 65 136 139z">
          <text:p/>
        </draw:path>
        <draw:path draw:style-name="gr9" draw:text-style-name="P7" draw:layer="layout" svg:width="0.274cm" svg:height="0.275cm" svg:x="10.959cm" svg:y="22.302cm" svg:viewBox="0 0 275 276" svg:d="M275 139c3 73-60 136-135 137-77 0-138-60-140-134-2-70 51-142 141-142 75 0 136 64 134 139z">
          <text:p/>
        </draw:path>
        <draw:path draw:style-name="gr9" draw:text-style-name="P7" draw:layer="layout" svg:width="0.274cm" svg:height="0.277cm" svg:x="10.67cm" svg:y="19.385cm" svg:viewBox="0 0 275 278" svg:d="M0 138c-3-74 59-135 128-138 81-4 139 55 146 126 5 53-27 109-76 133-13 6-28 11-42 15-13 5-26 4-38 0-12-3-22-7-32-10-44-16-87-65-86-126z">
          <text:p/>
        </draw:path>
        <draw:path draw:style-name="gr9" draw:text-style-name="P7" draw:layer="layout" svg:width="0.273cm" svg:height="0.273cm" svg:x="8.917cm" svg:y="22.012cm" svg:viewBox="0 0 274 274" svg:d="M274 136c0 75-63 138-138 138-74-1-135-65-136-139 0-66 55-136 138-135 81 0 138 69 136 136z">
          <text:p/>
        </draw:path>
        <draw:path draw:style-name="gr9" draw:text-style-name="P7" draw:layer="layout" svg:width="0.274cm" svg:height="0.273cm" svg:x="8.625cm" svg:y="21.428cm" svg:viewBox="0 0 275 274" svg:d="M136 0c74-2 138 55 139 140 2 74-66 134-139 134-57 0-135-45-136-137 0-87 74-139 136-137z">
          <text:p/>
        </draw:path>
        <draw:path draw:style-name="gr9" draw:text-style-name="P7" draw:layer="layout" svg:width="0.273cm" svg:height="0.273cm" svg:x="11.254cm" svg:y="19.675cm" svg:viewBox="0 0 274 274" svg:d="M137 274c-66 2-137-53-137-136 0-84 71-138 136-138 75 0 137 63 138 137s-62 136-137 137z">
          <text:p/>
        </draw:path>
        <draw:path draw:style-name="gr9" draw:text-style-name="P7" draw:layer="layout" svg:width="0.271cm" svg:height="0.273cm" svg:x="11.838cm" svg:y="20.844cm" svg:viewBox="0 0 272 274" svg:d="M0 139c-2-89 73-139 132-139 76 0 138 58 140 133 2 74-60 139-134 141-63 2-137-49-138-135z">
          <text:p/>
        </draw:path>
        <draw:path draw:style-name="gr9" draw:text-style-name="P7" draw:layer="layout" svg:width="0.273cm" svg:height="0.272cm" svg:x="11.544cm" svg:y="19.969cm" svg:viewBox="0 0 274 273" svg:d="M138 0c88 0 137 75 136 136-2 74-63 137-137 137-73 0-138-65-137-138 0-62 49-136 138-135z">
          <text:p/>
        </draw:path>
        <draw:path draw:style-name="gr9" draw:text-style-name="P7" draw:layer="layout" svg:width="0.271cm" svg:height="0.27cm" svg:x="10.378cm" svg:y="22.598cm" svg:viewBox="0 0 272 271" svg:d="M139 0c68-2 134 58 133 137-2 68-56 137-138 134-84-3-136-67-134-139 2-84 72-136 139-132z">
          <text:p/>
        </draw:path>
        <draw:path draw:style-name="gr9" draw:text-style-name="P7" draw:layer="layout" svg:width="0.271cm" svg:height="0.272cm" svg:x="9.211cm" svg:y="22.303cm" svg:viewBox="0 0 272 273" svg:d="M134 273c-64 2-136-52-134-138 2-83 70-137 139-135 76 3 135 60 133 141-1 86-74 136-138 132z">
          <text:p/>
        </draw:path>
        <draw:path draw:style-name="gr9" draw:text-style-name="P7" draw:layer="layout" svg:width="0.273cm" svg:height="0.273cm" svg:x="9.501cm" svg:y="19.386cm" svg:viewBox="0 0 274 274" svg:d="M137 0c62-2 119 40 135 110 13 62-24 129-86 152-12 5-24 8-37 11-6 1-13 2-19 1-26-5-51-12-72-27-47-34-69-96-52-151 20-62 74-98 131-96z">
          <text:p/>
        </draw:path>
        <draw:path draw:style-name="gr9" draw:text-style-name="P7" draw:layer="layout" svg:width="0.271cm" svg:height="0.271cm" svg:x="10.086cm" svg:y="22.597cm" svg:viewBox="0 0 272 272" svg:d="M0 136c-3-69 57-137 137-136 74 1 136 62 135 138-1 68-50 135-137 134-90 0-138-74-135-136z">
          <text:p/>
        </draw:path>
        <draw:path draw:style-name="gr9" draw:text-style-name="P7" draw:layer="layout" svg:width="0.272cm" svg:height="0.273cm" svg:x="8.626cm" svg:y="20.26cm" svg:viewBox="0 0 273 274" svg:d="M132 274c-58 1-134-50-132-140 2-85 75-135 139-134 75 2 136 68 134 141-3 76-64 134-141 133z">
          <text:p/>
        </draw:path>
        <draw:path draw:style-name="gr9" draw:text-style-name="P7" draw:layer="layout" svg:width="0.27cm" svg:height="0.269cm" svg:x="8.919cm" svg:y="19.677cm" svg:viewBox="0 0 271 270" svg:d="M271 133c1 74-60 137-134 137-75 0-138-62-137-135 0-72 60-134 132-135 85-1 137 67 139 133z">
          <text:p/>
        </draw:path>
        <draw:path draw:style-name="gr9" draw:text-style-name="P7" draw:layer="layout" svg:width="0.268cm" svg:height="0.268cm" svg:x="10.672cm" svg:y="22.599cm" svg:viewBox="0 0 269 269" svg:d="M136 0c59-2 132 44 133 133 2 74-54 135-137 136-75 0-134-63-132-139 1-69 62-133 136-130z">
          <text:p/>
        </draw:path>
        <draw:path draw:style-name="gr9" draw:text-style-name="P7" draw:layer="layout" svg:width="0.27cm" svg:height="0.27cm" svg:x="10.962cm" svg:y="19.386cm" svg:viewBox="0 0 271 271" svg:d="M271 135c0 75-62 140-137 136-86-4-135-66-134-137 2-89 74-133 132-134 79-1 140 65 139 135z">
          <text:p/>
        </draw:path>
        <draw:path draw:style-name="gr9" draw:text-style-name="P7" draw:layer="layout" svg:width="0.269cm" svg:height="0.27cm" svg:x="9.795cm" svg:y="22.598cm" svg:viewBox="0 0 270 271" svg:d="M270 132c3 73-55 138-134 139-77 0-136-60-136-137 1-83 70-133 131-134 74-2 140 58 139 132z">
          <text:p/>
        </draw:path>
        <draw:path draw:style-name="gr9" draw:text-style-name="P7" draw:layer="layout" svg:width="0.269cm" svg:height="0.269cm" svg:x="11.255cm" svg:y="22.305cm" svg:viewBox="0 0 270 270" svg:d="M138 270c-74 3-135-59-138-128-2-67 46-139 132-142 76-1 137 55 138 137 1 72-59 132-132 133z">
          <text:p/>
        </draw:path>
        <draw:path draw:style-name="gr9" draw:text-style-name="P7" draw:layer="layout" svg:width="0.269cm" svg:height="0.268cm" svg:x="11.546cm" svg:y="22.014cm" svg:viewBox="0 0 270 269" svg:d="M135 0c70-3 134 57 135 132 2 75-61 139-136 137-86-3-133-67-134-132-2-81 65-140 135-137z">
          <text:p/>
        </draw:path>
        <draw:path draw:style-name="gr9" draw:text-style-name="P7" draw:layer="layout" svg:width="0.266cm" svg:height="0.268cm" svg:x="8.338cm" svg:y="20.846cm" svg:viewBox="0 0 267 269" svg:d="M131 0c80 1 134 64 136 131 2 75-61 140-134 138-68-2-133-48-133-133-1-89 69-133 131-136z">
          <text:p/>
        </draw:path>
        <draw:path draw:style-name="gr9" draw:text-style-name="P7" draw:layer="layout" svg:width="0.268cm" svg:height="0.268cm" svg:x="8.627cm" svg:y="21.722cm" svg:viewBox="0 0 269 269" svg:d="M138 269c-74 4-138-58-138-133 0-70 53-136 136-136 77 0 131 59 133 131 3 85-67 140-131 138z">
          <text:p/>
        </draw:path>
        <draw:path draw:style-name="gr9" draw:text-style-name="P7" draw:layer="layout" svg:width="0.27cm" svg:height="0.269cm" svg:x="11.838cm" svg:y="21.138cm" svg:viewBox="0 0 271 270" svg:d="M136 270c-77 2-137-63-136-136 1-69 54-132 131-134s140 57 140 133c1 79-61 139-135 137z">
          <text:p/>
        </draw:path>
        <draw:path draw:style-name="gr9" draw:text-style-name="P7" draw:layer="layout" svg:width="0.268cm" svg:height="0.269cm" svg:x="11.839cm" svg:y="21.429cm" svg:viewBox="0 0 269 270" svg:d="M269 134c1 80-63 138-136 136-80-2-132-67-133-134 0-82 70-137 138-136 56 1 131 47 131 134z">
          <text:p/>
        </draw:path>
        <draw:path draw:style-name="gr9" draw:text-style-name="P7" draw:layer="layout" svg:width="0.268cm" svg:height="0.267cm" svg:x="9.503cm" svg:y="22.599cm" svg:viewBox="0 0 269 268" svg:d="M136 0c57-2 131 44 133 132 2 71-53 136-136 136-73 0-132-60-133-133 0-81 69-138 136-135z">
          <text:p/>
        </draw:path>
        <draw:path draw:style-name="gr9" draw:text-style-name="P7" draw:layer="layout" svg:width="0.266cm" svg:height="0.268cm" svg:x="11.84cm" svg:y="20.263cm" svg:viewBox="0 0 267 269" svg:d="M267 133c1 88-74 138-136 136-72-2-131-62-131-135 0-70 56-136 136-134 75 2 132 61 131 133z">
          <text:p/>
        </draw:path>
        <draw:path draw:style-name="gr9" draw:text-style-name="P7" draw:layer="layout" svg:width="0.266cm" svg:height="0.267cm" svg:x="9.213cm" svg:y="19.387cm" svg:viewBox="0 0 267 268" svg:d="M267 136c1 68-53 132-133 132-82 0-135-68-134-137 1-71 63-134 140-131 57 2 130 51 127 136z">
          <text:p/>
        </draw:path>
        <draw:path draw:style-name="gr9" draw:text-style-name="P7" draw:layer="layout" svg:width="0.266cm" svg:height="0.266cm" svg:x="8.628cm" svg:y="19.971cm" svg:viewBox="0 0 267 267" svg:d="M137 0c65-1 131 57 130 135 0 72-59 132-132 132-77 1-137-64-135-137 2-68 62-133 137-130z">
          <text:p/>
        </draw:path>
        <draw:path draw:style-name="gr9" draw:text-style-name="P7" draw:layer="layout" svg:width="0.266cm" svg:height="0.266cm" svg:x="8.921cm" svg:y="22.307cm" svg:viewBox="0 0 267 267" svg:d="M131 0c84 2 135 65 136 131 2 82-66 134-129 136-75 2-140-59-138-133 1-70 50-130 131-134z">
          <text:p/>
        </draw:path>
        <draw:path draw:style-name="gr9" draw:text-style-name="P7" draw:layer="layout" svg:width="0.266cm" svg:height="0.266cm" svg:x="10.088cm" svg:y="19.095cm" svg:viewBox="0 0 267 267" svg:d="M128 267c-72-2-130-64-128-137 1-72 63-133 134-130 80 3 132 61 133 133 2 76-62 137-139 134z">
          <text:p/>
        </draw:path>
        <draw:path draw:style-name="gr9" draw:text-style-name="P7" draw:layer="layout" svg:width="0.267cm" svg:height="0.267cm" svg:x="11.547cm" svg:y="19.678cm" svg:viewBox="0 0 268 268" svg:d="M268 133c-2 71-52 132-131 135-73 3-140-63-137-137 4-78 61-129 135-131 71-1 132 62 133 133z">
          <text:p/>
        </draw:path>
        <draw:path draw:style-name="gr9" draw:text-style-name="P7" draw:layer="layout" svg:width="0.27cm" svg:height="0.269cm" svg:x="11.838cm" svg:y="20.553cm" svg:viewBox="0 0 271 270" svg:d="M139 270c-79 3-138-63-139-134 0-72 57-136 136-136 74 1 132 57 135 130 2 80-61 141-132 140z">
          <text:p/>
        </draw:path>
        <draw:path draw:style-name="gr9" draw:text-style-name="P7" draw:layer="layout" svg:width="0.265cm" svg:height="0.267cm" svg:x="10.381cm" svg:y="19.095cm" svg:viewBox="0 0 266 268" svg:d="M266 136c-1 73-61 131-133 132-57 0-132-44-133-134 0-77 60-136 138-134 73 2 129 62 128 136z">
          <text:p/>
        </draw:path>
        <draw:path draw:style-name="gr9" draw:text-style-name="P7" draw:layer="layout" svg:width="0.267cm" svg:height="0.265cm" svg:x="8.337cm" svg:y="21.14cm" svg:viewBox="0 0 268 266" svg:d="M137 266c-69 4-138-51-137-134 2-81 68-132 135-132 80 1 133 68 133 133 0 71-59 135-131 133z">
          <text:p/>
        </draw:path>
        <draw:path draw:style-name="gr9" draw:text-style-name="P7" draw:layer="layout" svg:width="0.266cm" svg:height="0.265cm" svg:x="8.338cm" svg:y="20.555cm" svg:viewBox="0 0 267 266" svg:d="M137 266c-67 4-138-49-137-135 1-81 68-131 133-131 77 0 133 64 134 131 0 75-61 136-130 135z">
          <text:p/>
        </draw:path>
        <draw:path draw:style-name="gr9" draw:text-style-name="P7" draw:layer="layout" svg:width="0.266cm" svg:height="0.265cm" svg:x="10.964cm" svg:y="22.6cm" svg:viewBox="0 0 267 266" svg:d="M132 0c64-3 132 49 135 129 3 59-44 137-134 137-73-1-131-57-133-133-1-72 60-132 132-133z">
          <text:p/>
        </draw:path>
        <draw:path draw:style-name="gr9" draw:text-style-name="P7" draw:layer="layout" svg:width="0.264cm" svg:height="0.265cm" svg:x="9.798cm" svg:y="19.096cm" svg:viewBox="0 0 265 266" svg:d="M265 131c3 75-61 133-128 135-67 3-138-52-137-134 0-67 51-132 132-132 86-1 135 70 133 131z">
          <text:p/>
        </draw:path>
        <draw:path draw:style-name="gr9" draw:text-style-name="P7" draw:layer="layout" svg:width="0.264cm" svg:height="0.264cm" svg:x="11.841cm" svg:y="21.725cm" svg:viewBox="0 0 265 265" svg:d="M133 0c76-1 132 63 132 132 1 78-66 136-137 133-66-2-130-59-128-135 0-63 53-132 133-130z">
          <text:p/>
        </draw:path>
        <draw:path draw:style-name="gr9" draw:text-style-name="P7" draw:layer="layout" svg:width="0.264cm" svg:height="0.264cm" svg:x="11.257cm" svg:y="19.388cm" svg:viewBox="0 0 265 265" svg:d="M265 133c2 72-58 132-132 132-84 1-133-71-133-131 1-72 59-133 132-134 60-1 134 49 133 133z">
          <text:p/>
        </draw:path>
        <draw:path draw:style-name="gr9" draw:text-style-name="P7" draw:layer="layout" svg:width="0.264cm" svg:height="0.264cm" svg:x="8.629cm" svg:y="22.015cm" svg:viewBox="0 0 265 265" svg:d="M131 265c-80 0-132-69-131-133 1-71 62-133 134-132 64 0 132 55 131 135 0 66-56 132-134 130z">
          <text:p/>
        </draw:path>
        <draw:path draw:style-name="gr9" draw:text-style-name="P7" draw:layer="layout" svg:width="0.263cm" svg:height="0.262cm" svg:x="11.841cm" svg:y="19.973cm" svg:viewBox="0 0 264 263" svg:d="M131 0c70-3 133 58 133 130 1 73-60 133-129 133-78 1-134-64-135-129 0-75 62-135 131-134z">
          <text:p/>
        </draw:path>
        <draw:path draw:style-name="gr9" draw:text-style-name="P7" draw:layer="layout" svg:width="0.262cm" svg:height="0.262cm" svg:x="9.215cm" svg:y="22.601cm" svg:viewBox="0 0 263 263" svg:d="M263 130c4 70-55 132-128 133-84 2-134-68-135-128-1-69 55-134 130-135 71-2 134 57 133 130z">
          <text:p/>
        </draw:path>
        <draw:path draw:style-name="gr9" draw:text-style-name="P7" draw:layer="layout" svg:width="0.264cm" svg:height="0.265cm" svg:x="8.339cm" svg:y="21.431cm" svg:viewBox="0 0 265 266" svg:d="M265 132c1 72-58 132-132 134-72 1-133-57-133-130 0-91 72-135 130-136 70 0 132 55 135 132z">
          <text:p/>
        </draw:path>
        <draw:path draw:style-name="gr9" draw:text-style-name="P7" draw:layer="layout" svg:width="0.264cm" svg:height="0.264cm" svg:x="10.674cm" svg:y="19.097cm" svg:viewBox="0 0 265 265" svg:d="M265 129c1 73-58 135-131 136-66 1-132-52-134-132-2-57 43-132 130-133 74-1 133 55 135 129z">
          <text:p/>
        </draw:path>
        <draw:path draw:style-name="gr9" draw:text-style-name="P7" draw:layer="layout" svg:width="0.262cm" svg:height="0.262cm" svg:x="8.34cm" svg:y="20.266cm" svg:viewBox="0 0 263 263" svg:d="M0 132c-1-73 57-133 132-132 84 2 129 67 131 129 3 70-58 135-131 134-71 0-132-53-132-131z">
          <text:p/>
        </draw:path>
        <draw:path draw:style-name="gr9" draw:text-style-name="P7" draw:layer="layout" svg:width="0.263cm" svg:height="0.262cm" svg:x="11.549cm" svg:y="22.31cm" svg:viewBox="0 0 264 263" svg:d="M133 0c76-1 131 60 131 133 0 72-64 132-135 130s-129-60-129-131c0-75 58-133 133-132z">
          <text:p/>
        </draw:path>
        <draw:path draw:style-name="gr9" draw:text-style-name="P7" draw:layer="layout" svg:width="0.261cm" svg:height="0.261cm" svg:x="12.135cm" svg:y="20.85cm" svg:viewBox="0 0 262 262" svg:d="M132 262c-77-2-133-58-132-133 1-80 64-132 135-129 76 2 126 57 127 128 3 70-48 131-130 134z">
          <text:p/>
        </draw:path>
        <draw:path draw:style-name="gr9" draw:text-style-name="P7" draw:layer="layout" svg:width="0.263cm" svg:height="0.262cm" svg:x="9.506cm" svg:y="19.098cm" svg:viewBox="0 0 264 263" svg:d="M131 0c73-1 132 56 133 131 0 73-62 134-134 132-69-1-129-59-130-130-1-72 55-133 131-133z">
          <text:p/>
        </draw:path>
        <draw:path draw:style-name="gr9" draw:text-style-name="P7" draw:layer="layout" svg:width="0.262cm" svg:height="0.262cm" svg:x="12.135cm" svg:y="21.142cm" svg:viewBox="0 0 263 263" svg:d="M133 263c-56 3-132-42-133-131-1-72 57-128 127-132 61-2 131 42 136 128 5 71-58 134-130 135z">
          <text:p/>
        </draw:path>
        <draw:path draw:style-name="gr9" draw:text-style-name="P7" draw:layer="layout" svg:width="0.26cm" svg:height="0.26cm" svg:x="11.259cm" svg:y="22.602cm" svg:viewBox="0 0 261 261" svg:d="M261 131c3 70-58 132-132 130-73-1-132-63-129-134 3-74 63-126 130-127 71-1 133 58 131 131z">
          <text:p/>
        </draw:path>
        <draw:path draw:style-name="gr9" draw:text-style-name="P7" draw:layer="layout" svg:width="0.261cm" svg:height="0.262cm" svg:x="10.09cm" svg:y="22.893cm" svg:viewBox="0 0 262 263" svg:d="M262 131c0 76-61 132-133 132-72-1-133-66-129-136 3-66 51-126 130-127 75-1 133 59 132 131z">
          <text:p/>
        </draw:path>
        <draw:path draw:style-name="gr9" draw:text-style-name="P7" draw:layer="layout" svg:width="0.26cm" svg:height="0.26cm" svg:x="11.843cm" svg:y="22.017cm" svg:viewBox="0 0 261 261" svg:d="M261 127c3 69-56 134-130 134-77 1-132-66-131-131 0-69 56-129 126-130 79-2 136 64 135 127z">
          <text:p/>
        </draw:path>
        <draw:path draw:style-name="gr9" draw:text-style-name="P7" draw:layer="layout" svg:width="0.262cm" svg:height="0.262cm" svg:x="8.923cm" svg:y="19.389cm" svg:viewBox="0 0 263 263" svg:d="M134 263c-68 3-133-51-134-130 0-72 60-133 133-133 69 1 129 59 130 129 1 78-61 135-129 134z">
          <text:p/>
        </draw:path>
        <draw:path draw:style-name="gr9" draw:text-style-name="P7" draw:layer="layout" svg:width="0.26cm" svg:height="0.261cm" svg:x="10.968cm" svg:y="19.098cm" svg:viewBox="0 0 261 262" svg:d="M0 133c-3-74 60-131 125-133 77-1 135 58 136 130 0 80-63 133-133 132-72-1-129-59-128-129z">
          <text:p/>
        </draw:path>
        <draw:path draw:style-name="gr9" draw:text-style-name="P7" draw:layer="layout" svg:width="0.261cm" svg:height="0.26cm" svg:x="12.136cm" svg:y="20.558cm" svg:viewBox="0 0 262 261" svg:d="M133 0c70 1 128 59 129 130 0 73-62 132-135 131-71-1-127-59-127-130 0-86 72-135 133-131z">
          <text:p/>
        </draw:path>
        <draw:path draw:style-name="gr9" draw:text-style-name="P7" draw:layer="layout" svg:width="0.26cm" svg:height="0.26cm" svg:x="9.8cm" svg:y="22.894cm" svg:viewBox="0 0 261 261" svg:d="M0 129c-2-57 45-128 129-129 73-1 133 58 132 133 0 69-60 129-130 128-88-1-134-73-131-132z">
          <text:p/>
        </draw:path>
        <draw:path draw:style-name="gr9" draw:text-style-name="P7" draw:layer="layout" svg:width="0.261cm" svg:height="0.262cm" svg:x="8.631cm" svg:y="19.681cm" svg:viewBox="0 0 262 263" svg:d="M262 134c1 60-48 130-134 129-71-1-128-60-128-130-1-73 57-133 132-133 83 1 133 73 130 134z">
          <text:p/>
        </draw:path>
        <draw:path draw:style-name="gr9" draw:text-style-name="P7" draw:layer="layout" svg:width="0.261cm" svg:height="0.262cm" svg:x="10.384cm" svg:y="22.893cm" svg:viewBox="0 0 262 263" svg:d="M0 133c-4-67 51-132 129-133 74 0 133 59 133 131-1 69-58 130-128 132-80 1-136-64-134-130z">
          <text:p/>
        </draw:path>
        <draw:path draw:style-name="gr9" draw:text-style-name="P7" draw:layer="layout" svg:width="0.26cm" svg:height="0.26cm" svg:x="8.341cm" svg:y="21.727cm" svg:viewBox="0 0 261 261" svg:d="M131 0c66-2 130 53 130 132 0 69-59 128-128 129-63 2-133-49-133-131-1-76 64-133 131-130z">
          <text:p/>
        </draw:path>
        <draw:path draw:style-name="gr9" draw:text-style-name="P7" draw:layer="layout" svg:width="0.258cm" svg:height="0.258cm" svg:x="8.342cm" svg:y="19.975cm" svg:viewBox="0 0 259 259" svg:d="M128 259c-62 2-128-52-128-128 0-73 60-130 127-131 72-2 135 62 132 133-2 71-60 127-131 126z">
          <text:p/>
        </draw:path>
        <draw:path draw:style-name="gr9" draw:text-style-name="P7" draw:layer="layout" svg:width="0.258cm" svg:height="0.259cm" svg:x="8.632cm" svg:y="22.311cm" svg:viewBox="0 0 259 260" svg:d="M259 129c1 70-56 129-126 131-69 2-131-57-133-126-2-68 55-134 131-134 74 1 130 65 128 129z">
          <text:p/>
        </draw:path>
        <draw:path draw:style-name="gr9" draw:text-style-name="P7" draw:layer="layout" svg:width="0.259cm" svg:height="0.258cm" svg:x="9.217cm" svg:y="19.1cm" svg:viewBox="0 0 260 259" svg:d="M260 133c-2 70-64 128-133 126-70-2-128-62-127-131 1-66 55-131 135-128 71 2 128 64 125 133z">
          <text:p/>
        </draw:path>
        <draw:path draw:style-name="gr9" draw:text-style-name="P7" draw:layer="layout" svg:width="0.259cm" svg:height="0.258cm" svg:x="10.676cm" svg:y="22.895cm" svg:viewBox="0 0 260 259" svg:d="M129 0c77-3 129 62 131 124 2 69-47 134-127 135s-133-59-133-131c1-75 60-128 129-128z">
          <text:p/>
        </draw:path>
        <draw:path draw:style-name="gr9" draw:text-style-name="P7" draw:layer="layout" svg:width="0.258cm" svg:height="0.258cm" svg:x="12.137cm" svg:y="21.434cm" svg:viewBox="0 0 259 259" svg:d="M129 259c-68 2-128-53-129-126-1-77 56-133 131-133 70 1 126 51 128 128s-60 134-130 131z">
          <text:p/>
        </draw:path>
        <draw:path draw:style-name="gr9" draw:text-style-name="P7" draw:layer="layout" svg:width="0.257cm" svg:height="0.258cm" svg:x="11.552cm" svg:y="19.391cm" svg:viewBox="0 0 258 259" svg:d="M132 259c-66 4-130-51-132-124-2-78 59-135 130-135 65 0 127 50 128 129 1 86-71 132-126 130z">
          <text:p/>
        </draw:path>
        <draw:path draw:style-name="gr9" draw:text-style-name="P7" draw:layer="layout" svg:width="0.258cm" svg:height="0.256cm" svg:x="11.844cm" svg:y="19.684cm" svg:viewBox="0 0 259 257" svg:d="M259 125c1 72-54 130-126 132-90 2-134-71-133-130 0-65 53-127 128-127 81-1 131 67 131 125z">
          <text:p/>
        </draw:path>
        <draw:path draw:style-name="gr9" draw:text-style-name="P7" draw:layer="layout" svg:width="0.256cm" svg:height="0.255cm" svg:x="8.633cm" svg:y="19.393cm" svg:viewBox="0 0 257 256" svg:d="M131 256c-54 3-126-38-131-124-3-69 56-130 125-132 70-3 131 55 132 126 2 69-55 129-126 130z">
          <text:p/>
        </draw:path>
        <draw:path draw:style-name="gr9" draw:text-style-name="P7" draw:layer="layout" svg:width="0.257cm" svg:height="0.258cm" svg:x="12.137cm" svg:y="20.268cm" svg:viewBox="0 0 258 259" svg:d="M0 130c-2-73 59-129 127-130 73-1 133 56 131 131-1 74-55 128-129 128-77-1-129-61-129-129z">
          <text:p/>
        </draw:path>
        <draw:path draw:style-name="gr9" draw:text-style-name="P7" draw:layer="layout" svg:width="0.255cm" svg:height="0.255cm" svg:x="8.05cm" svg:y="20.56cm" svg:viewBox="0 0 256 256" svg:d="M256 131c1 57-48 127-131 125-67-1-125-53-125-131 0-70 62-128 131-125 79 3 128 70 125 131z">
          <text:p/>
        </draw:path>
        <draw:path draw:style-name="gr9" draw:text-style-name="P7" draw:layer="layout" svg:width="0.257cm" svg:height="0.257cm" svg:x="9.509cm" svg:y="22.895cm" svg:viewBox="0 0 258 258" svg:d="M133 0c67 0 126 58 125 131-1 67-51 127-128 127-80 0-132-61-130-133s61-127 133-125z">
          <text:p/>
        </draw:path>
        <draw:path draw:style-name="gr9" draw:text-style-name="P7" draw:layer="layout" svg:width="0.257cm" svg:height="0.256cm" svg:x="8.049cm" svg:y="21.145cm" svg:viewBox="0 0 258 257" svg:d="M258 126c3 56-42 128-126 131-68 3-130-57-132-127-2-68 58-129 128-130 70-2 129 56 130 126z">
          <text:p/>
        </draw:path>
        <draw:path draw:style-name="gr9" draw:text-style-name="P7" draw:layer="layout" svg:width="0.256cm" svg:height="0.257cm" svg:x="8.926cm" svg:y="22.604cm" svg:viewBox="0 0 257 258" svg:d="M126 258c-60 2-127-50-126-130 0-69 52-128 127-128 72-1 132 54 130 132-2 81-71 129-131 126z">
          <text:p/>
        </draw:path>
        <draw:path draw:style-name="gr9" draw:text-style-name="P7" draw:layer="layout" svg:width="0.256cm" svg:height="0.254cm" svg:x="10.386cm" svg:y="18.81cm" svg:viewBox="0 0 257 255" svg:d="M127 255c-72 2-129-61-127-128 1-71 58-129 129-127 78 1 128 60 128 129-2 82-70 129-130 126z">
          <text:p/>
        </draw:path>
        <draw:path draw:style-name="gr9" draw:text-style-name="P7" draw:layer="layout" svg:width="0.257cm" svg:height="0.255cm" svg:x="8.049cm" svg:y="20.853cm" svg:viewBox="0 0 258 256" svg:d="M258 129c2 60-50 128-130 127-70-1-129-56-128-130 2-72 58-127 132-126 80 1 129 70 126 129z">
          <text:p/>
        </draw:path>
        <draw:path draw:style-name="gr9" draw:text-style-name="P7" draw:layer="layout" svg:width="0.256cm" svg:height="0.255cm" svg:x="11.262cm" svg:y="19.101cm" svg:viewBox="0 0 257 256" svg:d="M129 0c71-2 129 60 128 128-2 71-59 130-129 128-81-3-129-61-128-130 1-84 70-129 129-126z">
          <text:p/>
        </draw:path>
        <draw:path draw:style-name="gr9" draw:text-style-name="P7" draw:layer="layout" svg:width="0.255cm" svg:height="0.255cm" svg:x="12.138cm" svg:y="21.729cm" svg:viewBox="0 0 256 256" svg:d="M130 0c71 1 126 58 126 131-1 72-59 127-131 125-76-2-126-62-125-130 1-77 68-129 130-126z">
          <text:p/>
        </draw:path>
        <draw:path draw:style-name="gr9" draw:text-style-name="P7" draw:layer="layout" svg:width="0.256cm" svg:height="0.256cm" svg:x="10.093cm" svg:y="18.809cm" svg:viewBox="0 0 257 257" svg:d="M257 130c2 67-59 128-130 127-60 0-128-47-127-129 1-73 55-128 129-128 83 1 130 71 128 130z">
          <text:p/>
        </draw:path>
        <draw:path draw:style-name="gr9" draw:text-style-name="P7" draw:layer="layout" svg:width="0.255cm" svg:height="0.256cm" svg:x="8.343cm" svg:y="22.019cm" svg:viewBox="0 0 256 257" svg:d="M131 257c-69 3-130-55-131-124-2-61 42-129 124-133 65-2 128 45 132 126 4 69-54 130-125 131z">
          <text:p/>
        </draw:path>
        <draw:path draw:style-name="gr9" draw:text-style-name="P7" draw:layer="layout" svg:width="0.255cm" svg:height="0.254cm" svg:x="9.802cm" svg:y="18.811cm" svg:viewBox="0 0 256 255" svg:d="M119 254c-61-1-125-58-119-135 4-63 56-124 137-119 83 5 121 76 119 129-3 77-66 131-137 125z">
          <text:p/>
        </draw:path>
        <draw:path draw:style-name="gr9" draw:text-style-name="P7" draw:layer="layout" svg:width="0.256cm" svg:height="0.254cm" svg:x="10.969cm" svg:y="22.897cm" svg:viewBox="0 0 257 255" svg:d="M131 0c62-2 127 48 126 129-1 75-59 126-130 126-79-1-128-68-127-129 1-65 55-129 131-126z">
          <text:p/>
        </draw:path>
        <draw:path draw:style-name="gr9" draw:text-style-name="P7" draw:layer="layout" svg:width="0.255cm" svg:height="0.252cm" svg:x="9.219cm" svg:y="22.897cm" svg:viewBox="0 0 256 253" svg:d="M128 253c-73 1-130-58-128-129 3-79 68-123 126-124 72-1 129 57 130 126 1 62-49 129-128 127z">
          <text:p/>
        </draw:path>
        <draw:path draw:style-name="gr9" draw:text-style-name="P7" draw:layer="layout" svg:width="0.253cm" svg:height="0.254cm" svg:x="11.554cm" svg:y="22.606cm" svg:viewBox="0 0 254 255" svg:d="M254 129c0 79-70 128-130 126s-126-52-124-133c1-54 43-122 126-122 79-1 130 61 128 129z">
          <text:p/>
        </draw:path>
        <draw:path draw:style-name="gr9" draw:text-style-name="P7" draw:layer="layout" svg:width="0.253cm" svg:height="0.255cm" svg:x="12.139cm" svg:y="19.977cm" svg:viewBox="0 0 254 256" svg:d="M254 127c1 82-69 130-127 129-67-1-128-56-127-132 1-57 44-122 126-124 71-2 129 55 128 127z">
          <text:p/>
        </draw:path>
        <draw:path draw:style-name="gr9" draw:text-style-name="P7" draw:layer="layout" svg:width="0.254cm" svg:height="0.251cm" svg:x="8.051cm" svg:y="20.271cm" svg:viewBox="0 0 255 252" svg:d="M130 252c-68 3-127-48-130-125-2-67 54-124 121-127 78-4 131 59 134 121 3 60-46 131-125 131z">
          <text:p/>
        </draw:path>
        <draw:path draw:style-name="gr9" draw:text-style-name="P7" draw:layer="layout" svg:width="0.255cm" svg:height="0.254cm" svg:x="11.846cm" svg:y="22.313cm" svg:viewBox="0 0 256 255" svg:d="M256 129c-1 70-61 128-132 126-79-3-124-65-124-125 0-87 71-130 127-130 62 0 128 50 129 129z">
          <text:p/>
        </draw:path>
        <draw:path draw:style-name="gr9" draw:text-style-name="P7" draw:layer="layout" svg:width="0.254cm" svg:height="0.252cm" svg:x="8.051cm" svg:y="21.438cm" svg:viewBox="0 0 255 253" svg:d="M130 253c-58 4-129-40-130-125-1-74 55-129 127-128 69 0 126 54 128 122 3 71-57 132-125 131z">
          <text:p/>
        </draw:path>
        <draw:path draw:style-name="gr9" draw:text-style-name="P7" draw:layer="layout" svg:width="0.253cm" svg:height="0.253cm" svg:x="10.68cm" svg:y="18.811cm" svg:viewBox="0 0 254 254" svg:d="M254 126c2 69-58 128-128 128-57 0-128-46-126-129 1-69 55-124 125-125 71-1 129 55 129 126z">
          <text:p/>
        </draw:path>
        <draw:path draw:style-name="gr9" draw:text-style-name="P7" draw:layer="layout" svg:width="0.252cm" svg:height="0.252cm" svg:x="8.052cm" svg:y="21.73cm" svg:viewBox="0 0 253 253" svg:d="M253 128c-1 67-56 125-125 125-75 0-128-57-128-128 1-69 57-125 125-125 75 0 129 62 128 128z">
          <text:p/>
        </draw:path>
        <draw:path draw:style-name="gr9" draw:text-style-name="P7" draw:layer="layout" svg:width="0.251cm" svg:height="0.25cm" svg:x="12.431cm" svg:y="20.855cm" svg:viewBox="0 0 252 251" svg:d="M123 251c-55 2-122-43-123-124-1-73 58-128 128-127 58 1 124 46 124 126 1 81-68 129-129 125z">
          <text:p/>
        </draw:path>
        <draw:path draw:style-name="gr9" draw:text-style-name="P7" draw:layer="layout" svg:width="0.251cm" svg:height="0.252cm" svg:x="10.096cm" svg:y="23.19cm" svg:viewBox="0 0 252 253" svg:d="M0 125c0-65 50-123 125-125 70-2 128 58 127 129-1 68-58 124-125 124-64 0-129-50-127-128z">
          <text:p/>
        </draw:path>
        <draw:path draw:style-name="gr9" draw:text-style-name="P7" draw:layer="layout" svg:width="0.252cm" svg:height="0.253cm" svg:x="8.928cm" svg:y="19.101cm" svg:viewBox="0 0 253 254" svg:d="M253 126c2 68-52 129-127 128-80 0-125-68-126-123-2-77 63-129 124-131 62-1 130 50 129 126z">
          <text:p/>
        </draw:path>
        <draw:path draw:style-name="gr9" draw:text-style-name="P7" draw:layer="layout" svg:width="0.252cm" svg:height="0.251cm" svg:x="8.344cm" svg:y="19.686cm" svg:viewBox="0 0 253 252" svg:d="M126 252c-76 1-128-65-126-128 1-62 55-127 132-124 67 2 121 57 121 126 1 73-58 129-127 126z">
          <text:p/>
        </draw:path>
        <draw:path draw:style-name="gr9" draw:text-style-name="P7" draw:layer="layout" svg:width="0.251cm" svg:height="0.252cm" svg:x="12.431cm" svg:y="21.147cm" svg:viewBox="0 0 252 253" svg:d="M127 253c-71-3-123-51-127-122-3-62 42-129 124-131 66-1 129 48 128 129-1 72-54 119-125 124z">
          <text:p/>
        </draw:path>
        <draw:path draw:style-name="gr9" draw:text-style-name="P7" draw:layer="layout" svg:width="0.252cm" svg:height="0.253cm" svg:x="12.431cm" svg:y="20.561cm" svg:viewBox="0 0 253 254" svg:d="M129 254c-67-2-122-46-129-121-6-67 53-130 123-133 65-2 126 52 129 120 3 63-40 127-123 134z">
          <text:p/>
        </draw:path>
        <draw:path draw:style-name="gr9" draw:text-style-name="P7" draw:layer="layout" svg:width="0.252cm" svg:height="0.253cm" svg:x="9.511cm" svg:y="18.811cm" svg:viewBox="0 0 253 254" svg:d="M253 124c3 74-60 130-126 130-62 0-127-52-127-129 1-65 54-123 123-125 80-2 133 65 130 124z">
          <text:p/>
        </draw:path>
        <draw:path draw:style-name="gr9" draw:text-style-name="P7" draw:layer="layout" svg:width="0.252cm" svg:height="0.251cm" svg:x="11.264cm" svg:y="22.898cm" svg:viewBox="0 0 253 252" svg:d="M126 0c68-2 129 57 127 129-2 61-53 123-128 123-61 0-123-49-125-124-1-84 70-131 126-128z">
          <text:p/>
        </draw:path>
        <draw:path draw:style-name="gr9" draw:text-style-name="P7" draw:layer="layout" svg:width="0.251cm" svg:height="0.251cm" svg:x="10.971cm" svg:y="18.812cm" svg:viewBox="0 0 252 252" svg:d="M129 0c65-1 123 55 123 126 0 80-70 128-129 126-70-3-125-61-123-132 2-54 49-122 129-120z">
          <text:p/>
        </draw:path>
        <draw:path draw:style-name="gr9" draw:text-style-name="P7" draw:layer="layout" svg:width="0.25cm" svg:height="0.252cm" svg:x="9.805cm" svg:y="23.19cm" svg:viewBox="0 0 251 253" svg:d="M128 0c72 5 123 56 123 125 1 85-67 129-127 128-78-3-128-64-124-131 3-68 53-119 128-122z">
          <text:p/>
        </draw:path>
        <draw:path draw:style-name="gr9" draw:text-style-name="P7" draw:layer="layout" svg:width="0.251cm" svg:height="0.252cm" svg:x="12.14cm" svg:y="22.022cm" svg:viewBox="0 0 252 253" svg:d="M0 124c-2-54 43-122 123-124 78-1 130 63 129 127-1 73-62 125-124 126-71 1-130-59-128-129z">
          <text:p/>
        </draw:path>
        <draw:path draw:style-name="gr9" draw:text-style-name="P7" draw:layer="layout" svg:width="0.25cm" svg:height="0.251cm" svg:x="10.388cm" svg:y="23.191cm" svg:viewBox="0 0 251 252" svg:d="M251 124c1 83-66 129-127 128-80-2-123-66-124-124-2-69 57-130 126-128 73 2 124 56 125 124z">
          <text:p/>
        </draw:path>
        <draw:path draw:style-name="gr9" draw:text-style-name="P7" draw:layer="layout" svg:width="0.251cm" svg:height="0.25cm" svg:x="8.636cm" svg:y="22.608cm" svg:viewBox="0 0 252 251" svg:d="M252 122c0 72-53 125-119 129-69 5-132-51-133-122-1-68 49-126 120-129 78-3 128 56 132 122z">
          <text:p/>
        </draw:path>
        <draw:path draw:style-name="gr9" draw:text-style-name="P7" draw:layer="layout" svg:width="0.25cm" svg:height="0.249cm" svg:x="12.432cm" svg:y="21.44cm" svg:viewBox="0 0 251 250" svg:d="M251 127c-2 68-60 123-127 123-59 0-128-48-124-131 3-73 61-121 128-119 61 1 122 49 123 127z">
          <text:p/>
        </draw:path>
        <draw:path draw:style-name="gr9" draw:text-style-name="P7" draw:layer="layout" svg:width="0.251cm" svg:height="0.251cm" svg:x="11.848cm" svg:y="19.396cm" svg:viewBox="0 0 252 252" svg:d="M128 0c77 2 123 62 124 124 1 69-59 129-128 128-68-2-125-59-124-126 0-73 55-127 128-126z">
          <text:p/>
        </draw:path>
        <draw:path draw:style-name="gr9" draw:text-style-name="P7" draw:layer="layout" svg:width="0.249cm" svg:height="0.248cm" svg:x="12.141cm" svg:y="19.687cm" svg:viewBox="0 0 250 249" svg:d="M124 249c-71 2-124-60-124-122 0-71 57-128 128-127 62 1 123 55 122 128-1 62-55 124-126 121z">
          <text:p/>
        </draw:path>
        <draw:path draw:style-name="gr9" draw:text-style-name="P7" draw:layer="layout" svg:width="0.249cm" svg:height="0.251cm" svg:x="10.682cm" svg:y="23.191cm" svg:viewBox="0 0 250 252" svg:d="M0 123c-1-60 47-122 124-123 69-1 126 56 126 124 1 71-60 132-129 128-72-5-123-61-121-129z">
          <text:p/>
        </draw:path>
        <draw:path draw:style-name="gr9" draw:text-style-name="P7" draw:layer="layout" svg:width="0.25cm" svg:height="0.251cm" svg:x="11.555cm" svg:y="19.102cm" svg:viewBox="0 0 251 252" svg:d="M251 131c2 57-49 121-125 121-77-1-129-68-126-129 4-68 60-122 127-123 61 0 128 53 124 131z">
          <text:p/>
        </draw:path>
        <draw:path draw:style-name="gr9" draw:text-style-name="P7" draw:layer="layout" svg:width="0.249cm" svg:height="0.249cm" svg:x="8.929cm" svg:y="22.899cm" svg:viewBox="0 0 250 250" svg:d="M250 127c2 64-56 123-124 123-72 0-126-61-126-123 0-71 57-128 129-127 61 0 123 55 121 127z">
          <text:p/>
        </draw:path>
        <draw:path draw:style-name="gr9" draw:text-style-name="P7" draw:layer="layout" svg:width="0.25cm" svg:height="0.251cm" svg:x="8.345cm" svg:y="22.314cm" svg:viewBox="0 0 251 252" svg:d="M251 128c2 67-55 123-122 124-83 0-131-70-129-126 1-71 60-127 130-126 53 1 122 46 121 128z">
          <text:p/>
        </draw:path>
        <draw:path draw:style-name="gr9" draw:text-style-name="P7" draw:layer="layout" svg:width="0.249cm" svg:height="0.248cm" svg:x="9.222cm" svg:y="18.814cm" svg:viewBox="0 0 250 249" svg:d="M126 0c61-2 121 45 124 122 3 69-58 129-128 127-68-2-124-59-122-127 2-78 65-125 126-122z">
          <text:p/>
        </draw:path>
        <draw:path draw:style-name="gr9" draw:text-style-name="P7" draw:layer="layout" svg:width="0.249cm" svg:height="0.249cm" svg:x="8.054cm" svg:y="19.98cm" svg:viewBox="0 0 250 250" svg:d="M0 127c-2-67 49-125 121-127 85-2 130 66 129 125-1 62-46 124-124 125-68 1-125-53-126-123z">
          <text:p/>
        </draw:path>
        <draw:path draw:style-name="gr9" draw:text-style-name="P7" draw:layer="layout" svg:width="0.248cm" svg:height="0.247cm" svg:x="12.432cm" svg:y="20.273cm" svg:viewBox="0 0 249 248" svg:d="M129 248c-60 4-124-40-129-120-4-67 54-127 122-128 68-2 126 52 127 121 2 83-67 129-120 127z">
          <text:p/>
        </draw:path>
        <draw:path draw:style-name="gr9" draw:text-style-name="P7" draw:layer="layout" svg:width="0.247cm" svg:height="0.247cm" svg:x="11.557cm" svg:y="22.9cm" svg:viewBox="0 0 248 248" svg:d="M248 125c1 65-56 123-125 123-67-1-123-56-123-124 0-69 57-125 124-124 72 1 125 60 124 125z">
          <text:p/>
        </draw:path>
        <draw:path draw:style-name="gr9" draw:text-style-name="P7" draw:layer="layout" svg:width="0.247cm" svg:height="0.247cm" svg:x="8.638cm" svg:y="19.104cm" svg:viewBox="0 0 248 248" svg:d="M123 248c-61 2-124-49-123-125 2-81 69-124 126-123s122 43 122 125c0 77-63 126-125 123z">
          <text:p/>
        </draw:path>
        <draw:path draw:style-name="gr9" draw:text-style-name="P7" draw:layer="layout" svg:width="0.247cm" svg:height="0.246cm" svg:x="12.142cm" svg:y="22.316cm" svg:viewBox="0 0 248 247" svg:d="M124 247c-74 2-125-64-124-124 1-67 58-125 125-123 81 2 123 69 123 125 0 59-51 125-124 122z">
          <text:p/>
        </draw:path>
        <draw:path draw:style-name="gr9" draw:text-style-name="P7" draw:layer="layout" svg:width="0.248cm" svg:height="0.249cm" svg:x="9.514cm" svg:y="23.192cm" svg:viewBox="0 0 249 250" svg:d="M0 124c-3-55 43-123 123-124 69 0 126 56 126 124s-58 126-125 126c-68 0-124-57-124-126z">
          <text:p/>
        </draw:path>
        <draw:path draw:style-name="gr9" draw:text-style-name="P7" draw:layer="layout" svg:width="0.247cm" svg:height="0.248cm" svg:x="11.85cm" svg:y="22.609cm" svg:viewBox="0 0 248 249" svg:d="M248 123c-3 76-58 124-124 126-58 1-123-44-124-124-1-73 58-124 122-125 66 0 123 48 126 123z">
          <text:p/>
        </draw:path>
        <draw:path draw:style-name="gr9" draw:text-style-name="P7" draw:layer="layout" svg:width="0.247cm" svg:height="0.247cm" svg:x="8.346cm" svg:y="19.398cm" svg:viewBox="0 0 248 248" svg:d="M248 124c2 63-50 123-125 124-67 0-124-60-123-126 1-61 50-123 126-122 70 0 126 60 122 124z">
          <text:p/>
        </draw:path>
        <draw:path draw:style-name="gr9" draw:text-style-name="P7" draw:layer="layout" svg:width="0.245cm" svg:height="0.246cm" svg:x="12.434cm" svg:y="21.733cm" svg:viewBox="0 0 246 247" svg:d="M123 247c-65 1-124-49-123-124 0-75 56-123 123-123s123 50 123 123c1 70-57 126-123 124z">
          <text:p/>
        </draw:path>
        <draw:path draw:style-name="gr9" draw:text-style-name="P7" draw:layer="layout" svg:width="0.247cm" svg:height="0.247cm" svg:x="8.055cm" svg:y="22.024cm" svg:viewBox="0 0 248 248" svg:d="M0 126c-3-72 57-125 121-126 69 0 125 51 127 121 1 66-47 125-123 127-64 2-125-49-125-122z">
          <text:p/>
        </draw:path>
        <draw:path draw:style-name="gr9" draw:text-style-name="P7" draw:layer="layout" svg:width="0.247cm" svg:height="0.246cm" svg:x="10.098cm" svg:y="18.521cm" svg:viewBox="0 0 248 247" svg:d="M125 247c-75 2-125-64-125-123 0-58 43-123 123-124 80 0 124 63 125 123 0 62-50 125-123 124z">
          <text:p/>
        </draw:path>
        <draw:path draw:style-name="gr9" draw:text-style-name="P7" draw:layer="layout" svg:width="0.247cm" svg:height="0.247cm" svg:x="11.267cm" svg:y="18.814cm" svg:viewBox="0 0 248 248" svg:d="M123 0c61-2 123 47 125 125 1 66-59 123-126 123-57 0-122-46-122-124-1-73 62-127 123-124z">
          <text:p/>
        </draw:path>
        <draw:path draw:style-name="gr9" draw:text-style-name="P7" draw:layer="layout" svg:width="0.247cm" svg:height="0.245cm" svg:x="10.973cm" svg:y="23.194cm" svg:viewBox="0 0 248 246" svg:d="M248 121c2 57-42 124-123 125-80 0-124-64-125-123-1-58 45-123 123-123 76-1 127 64 125 121z">
          <text:p/>
        </draw:path>
        <draw:path draw:style-name="gr9" draw:text-style-name="P7" draw:layer="layout" svg:width="0.245cm" svg:height="0.244cm" svg:x="7.764cm" svg:y="21.151cm" svg:viewBox="0 0 246 245" svg:d="M246 124c1 61-51 123-127 121-69-2-118-57-119-122-1-64 47-123 123-123 75-1 126 60 123 124z">
          <text:p/>
        </draw:path>
        <draw:path draw:style-name="gr9" draw:text-style-name="P7" draw:layer="layout" svg:width="0.245cm" svg:height="0.244cm" svg:x="7.764cm" svg:y="20.566cm" svg:viewBox="0 0 246 245" svg:d="M246 122c2 64-51 124-124 123-74-1-124-60-122-125 2-64 48-119 120-120 78-2 128 61 126 122z">
          <text:p/>
        </draw:path>
        <draw:path draw:style-name="gr9" draw:text-style-name="P7" draw:layer="layout" svg:width="0.245cm" svg:height="0.245cm" svg:x="8.931cm" svg:y="18.815cm" svg:viewBox="0 0 246 246" svg:d="M246 119c1 69-53 127-121 127-66 1-126-56-125-124 1-75 64-120 119-122 71-2 127 57 127 119z">
          <text:p/>
        </draw:path>
        <draw:path draw:style-name="gr9" draw:text-style-name="P7" draw:layer="layout" svg:width="0.245cm" svg:height="0.244cm" svg:x="10.391cm" svg:y="18.522cm" svg:viewBox="0 0 246 245" svg:d="M124 245c-66 3-125-49-124-123s57-124 126-122c75 1 118 61 120 120 2 70-57 128-122 125z">
          <text:p/>
        </draw:path>
        <draw:path draw:style-name="gr9" draw:text-style-name="P7" draw:layer="layout" svg:width="0.244cm" svg:height="0.245cm" svg:x="9.808cm" svg:y="18.522cm" svg:viewBox="0 0 245 246" svg:d="M245 120c3 72-58 126-121 126-65 0-125-50-124-124 0-67 47-119 119-122 66-3 125 47 126 120z">
          <text:p/>
        </draw:path>
        <draw:path draw:style-name="gr9" draw:text-style-name="P7" draw:layer="layout" svg:width="0.246cm" svg:height="0.247cm" svg:x="7.763cm" svg:y="20.857cm" svg:viewBox="0 0 247 248" svg:d="M247 121c3 80-66 127-121 127-67 0-124-53-126-122-2-66 54-124 121-126 61-2 127 49 126 121z">
          <text:p/>
        </draw:path>
        <draw:path draw:style-name="gr9" draw:text-style-name="P7" draw:layer="layout" svg:width="0.244cm" svg:height="0.244cm" svg:x="7.764cm" svg:y="21.442cm" svg:viewBox="0 0 245 245" svg:d="M245 120c3 69-52 125-122 125-63 1-122-47-123-125 0-65 54-118 120-120 66-3 127 53 125 120z">
          <text:p/>
        </draw:path>
        <draw:path draw:style-name="gr9" draw:text-style-name="P7" draw:layer="layout" svg:width="0.245cm" svg:height="0.244cm" svg:x="10.684cm" svg:y="18.522cm" svg:viewBox="0 0 246 245" svg:d="M125 245c-74 4-126-61-125-121 1-69 55-126 123-124 81 3 124 65 123 125-2 71-58 120-121 120z">
          <text:p/>
        </draw:path>
        <draw:path draw:style-name="gr9" draw:text-style-name="P7" draw:layer="layout" svg:width="0.245cm" svg:height="0.245cm" svg:x="8.056cm" svg:y="19.689cm" svg:viewBox="0 0 246 246" svg:d="M0 121c0-71 62-123 127-121 64 2 118 58 119 123 1 67-56 122-124 123-58 1-125-48-122-125z">
          <text:p/>
        </draw:path>
        <draw:path draw:style-name="gr9" draw:text-style-name="P7" draw:layer="layout" svg:width="0.243cm" svg:height="0.244cm" svg:x="7.765cm" svg:y="20.275cm" svg:viewBox="0 0 244 245" svg:d="M244 123c2 68-57 120-118 122-69 1-126-54-126-122 0-67 58-126 126-123 72 3 120 63 118 123z">
          <text:p/>
        </draw:path>
        <draw:path draw:style-name="gr9" draw:text-style-name="P7" draw:layer="layout" svg:width="0.243cm" svg:height="0.243cm" svg:x="12.144cm" svg:y="19.4cm" svg:viewBox="0 0 244 244" svg:d="M122 0c68-2 121 56 122 119 2 68-54 125-123 125-67 0-125-60-121-126 4-74 63-120 122-118z">
          <text:p/>
        </draw:path>
        <draw:path draw:style-name="gr9" draw:text-style-name="P7" draw:layer="layout" svg:width="0.244cm" svg:height="0.243cm" svg:x="8.348cm" svg:y="22.611cm" svg:viewBox="0 0 245 244" svg:d="M122 0c71-2 122 61 123 118 2 57-38 125-121 126-78 1-125-60-124-124 2-75 64-121 122-120z">
          <text:p/>
        </draw:path>
        <draw:path draw:style-name="gr9" draw:text-style-name="P7" draw:layer="layout" svg:width="0.243cm" svg:height="0.243cm" svg:x="12.435cm" svg:y="19.983cm" svg:viewBox="0 0 244 244" svg:d="M244 119c3 67-48 124-120 125s-124-52-124-122c-1-67 51-120 118-122 72-3 126 54 126 119z">
          <text:p/>
        </draw:path>
        <draw:path draw:style-name="gr9" draw:text-style-name="P7" draw:layer="layout" svg:width="0.243cm" svg:height="0.244cm" svg:x="9.225cm" svg:y="23.194cm" svg:viewBox="0 0 244 245" svg:d="M0 123c-2-67 55-124 123-123 63 1 119 49 121 120 3 68-51 124-121 125-73 1-124-57-123-122z">
          <text:p/>
        </draw:path>
        <draw:path draw:style-name="gr9" draw:text-style-name="P7" draw:layer="layout" svg:width="0.243cm" svg:height="0.243cm" svg:x="11.559cm" svg:y="18.816cm" svg:viewBox="0 0 244 244" svg:d="M244 124c-2 66-58 120-122 120-66 0-124-59-122-126 2-68 60-121 128-118 64 3 118 59 116 124z">
          <text:p/>
        </draw:path>
        <draw:path draw:style-name="gr9" draw:text-style-name="P7" draw:layer="layout" svg:width="0.243cm" svg:height="0.242cm" svg:x="12.728cm" svg:y="20.859cm" svg:viewBox="0 0 244 243" svg:d="M244 119c-1 55-38 119-118 124-57 4-120-38-126-114-5-68 53-128 120-129 64-1 121 53 124 119z">
          <text:p/>
        </draw:path>
        <draw:path draw:style-name="gr9" draw:text-style-name="P7" draw:layer="layout" svg:width="0.243cm" svg:height="0.242cm" svg:x="9.516cm" svg:y="18.523cm" svg:viewBox="0 0 244 243" svg:d="M123 243c-70 2-122-57-123-118-2-68 53-125 122-125 68 0 125 58 122 125-3 69-59 120-121 118z">
          <text:p/>
        </draw:path>
        <draw:path draw:style-name="gr9" draw:text-style-name="P7" draw:layer="layout" svg:width="0.242cm" svg:height="0.243cm" svg:x="8.057cm" svg:y="22.318cm" svg:viewBox="0 0 243 244" svg:d="M121 0c63 3 118 45 122 119 3 67-52 124-120 125-66 0-120-52-123-117-2-58 41-122 121-127z">
          <text:p/>
        </draw:path>
        <draw:path draw:style-name="gr9" draw:text-style-name="P7" draw:layer="layout" svg:width="0.242cm" svg:height="0.242cm" svg:x="10.1cm" svg:y="23.486cm" svg:viewBox="0 0 243 243" svg:d="M122 243c-65 1-120-53-122-118-1-67 51-123 117-125 67-3 128 55 126 123-3 76-60 117-121 120z">
          <text:p/>
        </draw:path>
        <draw:path draw:style-name="gr9" draw:text-style-name="P7" draw:layer="layout" svg:width="0.242cm" svg:height="0.244cm" svg:x="11.852cm" svg:y="19.106cm" svg:viewBox="0 0 243 245" svg:d="M122 245c-60 3-121-50-122-119-2-69 50-125 120-126 65-1 124 48 123 124 0 76-66 123-121 121z">
          <text:p/>
        </draw:path>
        <draw:path draw:style-name="gr9" draw:text-style-name="P7" draw:layer="layout" svg:width="0.242cm" svg:height="0.241cm" svg:x="10.976cm" svg:y="18.524cm" svg:viewBox="0 0 243 242" svg:d="M123 242c-56 3-120-40-123-117-2-66 48-125 124-125 66 0 118 55 119 122 1 63-55 122-120 120z">
          <text:p/>
        </draw:path>
        <draw:path draw:style-name="gr9" draw:text-style-name="P7" draw:layer="layout" svg:width="0.241cm" svg:height="0.24cm" svg:x="8.35cm" svg:y="19.108cm" svg:viewBox="0 0 242 241" svg:d="M120 241c-65 0-120-54-120-120 1-63 45-117 118-121 68-3 125 55 124 122-1 65-56 120-122 119z">
          <text:p/>
        </draw:path>
        <draw:path draw:style-name="gr9" draw:text-style-name="P7" draw:layer="layout" svg:width="0.24cm" svg:height="0.242cm" svg:x="10.394cm" svg:y="23.486cm" svg:viewBox="0 0 241 243" svg:d="M241 124c1 54-42 118-121 119-58 1-120-44-120-120-1-84 72-126 124-123 72 4 119 64 117 124z">
          <text:p/>
        </draw:path>
        <draw:path draw:style-name="gr9" draw:text-style-name="P7" draw:layer="layout" svg:width="0.241cm" svg:height="0.244cm" svg:x="8.641cm" svg:y="22.902cm" svg:viewBox="0 0 242 245" svg:d="M0 124c-2-74 58-126 122-124 61 1 119 47 120 121 1 82-69 125-124 124-55-2-119-48-118-121z">
          <text:p/>
        </draw:path>
        <draw:path draw:style-name="gr9" draw:text-style-name="P7" draw:layer="layout" svg:width="0.242cm" svg:height="0.242cm" svg:x="11.269cm" svg:y="23.195cm" svg:viewBox="0 0 243 243" svg:d="M0 120c-2-61 52-120 120-120 65 0 124 49 123 124-2 70-55 118-121 119-74 1-126-62-122-123z">
          <text:p/>
        </draw:path>
        <draw:path draw:style-name="gr9" draw:text-style-name="P7" draw:layer="layout" svg:width="0.241cm" svg:height="0.243cm" svg:x="12.436cm" svg:y="22.026cm" svg:viewBox="0 0 242 244" svg:d="M242 119c3 66-48 125-122 125-69-1-118-53-120-119-2-79 64-125 121-125 60 0 122 51 121 119z">
          <text:p/>
        </draw:path>
        <draw:path draw:style-name="gr9" draw:text-style-name="P7" draw:layer="layout" svg:width="0.242cm" svg:height="0.241cm" svg:x="7.766cm" svg:y="21.736cm" svg:viewBox="0 0 243 242" svg:d="M121 242c-56 2-120-42-121-120-1-67 52-121 119-122 80-1 125 65 124 124-1 61-55 121-122 118z">
          <text:p/>
        </draw:path>
        <draw:path draw:style-name="gr9" draw:text-style-name="P7" draw:layer="layout" svg:width="0.241cm" svg:height="0.24cm" svg:x="12.145cm" svg:y="22.612cm" svg:viewBox="0 0 242 241" svg:d="M122 0c54-1 118 42 120 119 2 55-41 120-117 122-77 2-125-60-125-123 0-65 57-118 122-118z">
          <text:p/>
        </draw:path>
        <draw:path draw:style-name="gr9" draw:text-style-name="P7" draw:layer="layout" svg:width="0.242cm" svg:height="0.24cm" svg:x="12.728cm" svg:y="21.153cm" svg:viewBox="0 0 243 241" svg:d="M122 241c-70 2-120-57-122-119-2-58 46-123 124-122 68 1 120 57 119 121-1 68-57 121-121 120z">
          <text:p/>
        </draw:path>
        <draw:path draw:style-name="gr9" draw:text-style-name="P7" draw:layer="layout" svg:width="0.24cm" svg:height="0.239cm" svg:x="8.934cm" svg:y="23.196cm" svg:viewBox="0 0 241 240" svg:d="M120 240c-69 1-120-53-120-119 0-74 60-123 125-121 59 2 118 51 116 124 0 59-48 118-121 116z">
          <text:p/>
        </draw:path>
        <draw:path draw:style-name="gr9" draw:text-style-name="P7" draw:layer="layout" svg:width="0.239cm" svg:height="0.241cm" svg:x="11.853cm" svg:y="22.903cm" svg:viewBox="0 0 240 242" svg:d="M240 124c1 70-60 119-121 118-63 0-121-53-119-126 2-56 48-119 124-116 72 3 118 60 116 124z">
          <text:p/>
        </draw:path>
        <draw:path draw:style-name="gr9" draw:text-style-name="P7" draw:layer="layout" svg:width="0.24cm" svg:height="0.239cm" svg:x="12.729cm" svg:y="20.568cm" svg:viewBox="0 0 241 240" svg:d="M122 240c-67 2-120-52-122-117-2-61 48-124 124-123 64 1 118 53 117 121 0 73-58 120-119 119z">
          <text:p/>
        </draw:path>
        <draw:path draw:style-name="gr9" draw:text-style-name="P7" draw:layer="layout" svg:width="0.239cm" svg:height="0.241cm" svg:x="12.437cm" svg:y="19.691cm" svg:viewBox="0 0 240 242" svg:d="M240 121c2 66-53 120-117 121-60 2-124-47-123-123 2-66 52-120 122-119 75 2 120 63 118 121z">
          <text:p/>
        </draw:path>
        <draw:path draw:style-name="gr9" draw:text-style-name="P7" draw:layer="layout" svg:width="0.238cm" svg:height="0.241cm" svg:x="9.811cm" svg:y="23.486cm" svg:viewBox="0 0 239 242" svg:d="M239 118c4 67-49 125-121 124-67-1-119-53-118-121 0-70 56-120 119-121 69 0 121 57 120 118z">
          <text:p/>
        </draw:path>
        <draw:path draw:style-name="gr9" draw:text-style-name="P7" draw:layer="layout" svg:width="0.24cm" svg:height="0.241cm" svg:x="10.686cm" svg:y="23.486cm" svg:viewBox="0 0 241 242" svg:d="M241 118c-1 70-49 120-118 124-64 4-122-52-123-118-1-65 52-121 117-124 64-2 122 52 124 118z">
          <text:p/>
        </draw:path>
        <draw:path draw:style-name="gr9" draw:text-style-name="P7" draw:layer="layout" svg:width="0.24cm" svg:height="0.24cm" svg:x="12.729cm" svg:y="20.277cm" svg:viewBox="0 0 241 241" svg:d="M112 240c-66-7-119-67-111-130 9-80 74-115 129-110 67 6 118 66 111 128-8 67-67 118-129 112z">
          <text:p/>
        </draw:path>
        <draw:path draw:style-name="gr9" draw:text-style-name="P7" draw:layer="layout" svg:width="0.239cm" svg:height="0.239cm" svg:x="9.518cm" svg:y="23.487cm" svg:viewBox="0 0 240 240" svg:d="M240 118c-1 62-42 120-117 122-67 3-120-47-123-116-4-63 51-122 116-124 65-3 122 52 124 118z">
          <text:p/>
        </draw:path>
        <draw:path draw:style-name="gr9" draw:text-style-name="P7" draw:layer="layout" svg:width="0.241cm" svg:height="0.239cm" svg:x="12.729cm" svg:y="21.444cm" svg:viewBox="0 0 242 240" svg:d="M242 117c-2 58-40 121-118 123s-123-58-124-118c-1-77 61-121 119-122 65-2 120 52 123 117z">
          <text:p/>
        </draw:path>
        <draw:path draw:style-name="gr9" draw:text-style-name="P7" draw:layer="layout" svg:width="0.238cm" svg:height="0.238cm" svg:x="8.642cm" svg:y="18.817cm" svg:viewBox="0 0 239 239" svg:d="M0 112c3-66 63-117 128-112 61 5 114 57 110 128-3 49-42 112-121 111-74-1-122-63-117-127z">
          <text:p/>
        </draw:path>
        <draw:path draw:style-name="gr9" draw:text-style-name="P7" draw:layer="layout" svg:width="0.238cm" svg:height="0.237cm" svg:x="11.561cm" svg:y="23.197cm" svg:viewBox="0 0 239 238" svg:d="M120 0c54-1 120 41 119 122 0 69-58 118-123 116-53-1-112-40-116-117-2-65 54-121 120-121z">
          <text:p/>
        </draw:path>
        <draw:path draw:style-name="gr9" draw:text-style-name="P7" draw:layer="layout" svg:width="0.239cm" svg:height="0.238cm" svg:x="7.768cm" svg:y="19.985cm" svg:viewBox="0 0 240 239" svg:d="M116 239c-61 1-117-51-116-122 1-70 61-119 122-117 65 2 118 55 118 122 0 55-49 120-124 117z">
          <text:p/>
        </draw:path>
        <draw:path draw:style-name="gr9" draw:text-style-name="P7" draw:layer="layout" svg:width="0.239cm" svg:height="0.239cm" svg:x="9.227cm" svg:y="18.526cm" svg:viewBox="0 0 240 240" svg:d="M121 0c68-1 119 56 119 120-1 71-62 120-122 120-60-1-119-54-118-122 0-58 48-120 121-118z">
          <text:p/>
        </draw:path>
        <draw:path draw:style-name="gr9" draw:text-style-name="P7" draw:layer="layout" svg:width="0.237cm" svg:height="0.237cm" svg:x="10.979cm" svg:y="23.489cm" svg:viewBox="0 0 238 238" svg:d="M238 117c1 64-56 122-120 121-67-2-116-52-118-116-2-68 48-121 116-122 76-2 120 58 122 117z">
          <text:p/>
        </draw:path>
        <draw:path draw:style-name="gr9" draw:text-style-name="P7" draw:layer="layout" svg:width="0.237cm" svg:height="0.237cm" svg:x="12.438cm" svg:y="22.322cm" svg:viewBox="0 0 238 238" svg:d="M238 119c2 60-49 119-120 119-64 0-116-54-118-115-2-63 46-122 117-123 77-1 123 63 121 119z">
          <text:p/>
        </draw:path>
        <draw:path draw:style-name="gr9" draw:text-style-name="P7" draw:layer="layout" svg:width="0.238cm" svg:height="0.238cm" svg:x="8.058cm" svg:y="19.401cm" svg:viewBox="0 0 239 239" svg:d="M123 239c-78 3-122-64-123-117 0-65 52-120 117-122 58-2 121 45 122 117 2 67-50 122-116 122z">
          <text:p/>
        </draw:path>
        <draw:path draw:style-name="gr9" draw:text-style-name="P7" draw:layer="layout" svg:width="0.237cm" svg:height="0.236cm" svg:x="12.148cm" svg:y="19.111cm" svg:viewBox="0 0 238 237" svg:d="M238 120c-3 67-60 120-124 117-60-3-118-50-114-126 3-68 59-115 127-111 65 3 110 58 111 120z">
          <text:p/>
        </draw:path>
        <draw:path draw:style-name="gr9" draw:text-style-name="P7" draw:layer="layout" svg:width="0.237cm" svg:height="0.237cm" svg:x="11.271cm" svg:y="18.527cm" svg:viewBox="0 0 238 238" svg:d="M116 0c67-4 122 52 122 117 0 73-64 122-121 121-63-2-115-54-117-117-3-59 47-122 116-121z">
          <text:p/>
        </draw:path>
        <draw:path draw:style-name="gr9" draw:text-style-name="P7" draw:layer="layout" svg:width="0.237cm" svg:height="0.237cm" svg:x="7.769cm" svg:y="22.028cm" svg:viewBox="0 0 238 238" svg:d="M115 238c-64 0-117-54-115-122s62-116 118-116c66 1 120 56 120 122 0 52-44 119-123 116z">
          <text:p/>
        </draw:path>
        <draw:path draw:style-name="gr9" draw:text-style-name="P7" draw:layer="layout" svg:width="0.235cm" svg:height="0.235cm" svg:x="11.855cm" svg:y="18.819cm" svg:viewBox="0 0 236 236" svg:d="M236 119c3 57-45 119-120 117-73-1-117-65-116-117 1-66 57-123 122-119 75 4 117 65 114 119z">
          <text:p/>
        </draw:path>
        <draw:path draw:style-name="gr9" draw:text-style-name="P7" draw:layer="layout" svg:width="0.235cm" svg:height="0.236cm" svg:x="7.476cm" svg:y="21.155cm" svg:viewBox="0 0 236 237" svg:d="M236 117c3 76-64 121-119 120-63-2-117-53-117-116 0-76 61-119 113-121 63-3 124 47 123 117z">
          <text:p/>
        </draw:path>
        <draw:path draw:style-name="gr9" draw:text-style-name="P7" draw:layer="layout" svg:width="0.235cm" svg:height="0.235cm" svg:x="9.813cm" svg:y="18.234cm" svg:viewBox="0 0 236 236" svg:d="M0 116c1-63 52-115 115-116 66-2 121 54 121 119 0 52-44 116-117 117-74 1-122-63-119-120z">
          <text:p/>
        </draw:path>
        <draw:path draw:style-name="gr9" draw:text-style-name="P7" draw:layer="layout" svg:width="0.237cm" svg:height="0.236cm" svg:x="12.731cm" svg:y="21.739cm" svg:viewBox="0 0 238 237" svg:d="M238 117c2 64-54 120-120 120-62 0-116-50-118-113-3-70 51-123 115-124 61-2 119 42 123 117z">
          <text:p/>
        </draw:path>
        <draw:path draw:style-name="gr9" draw:text-style-name="P7" draw:layer="layout" svg:width="0.236cm" svg:height="0.236cm" svg:x="8.059cm" svg:y="22.614cm" svg:viewBox="0 0 237 237" svg:d="M237 120c2 63-52 119-121 117-66-2-116-59-116-119 1-66 59-120 124-118 57 2 115 51 113 120z">
          <text:p/>
        </draw:path>
        <draw:path draw:style-name="gr9" draw:text-style-name="P7" draw:layer="layout" svg:width="0.236cm" svg:height="0.238cm" svg:x="8.353cm" svg:y="22.905cm" svg:viewBox="0 0 237 239" svg:d="M116 239c-65-5-118-54-116-125 2-67 58-117 124-114 64 3 115 57 113 119-1 62-48 117-121 120z">
          <text:p/>
        </draw:path>
        <draw:path draw:style-name="gr9" draw:text-style-name="P7" draw:layer="layout" svg:width="0.236cm" svg:height="0.235cm" svg:x="8.936cm" svg:y="18.528cm" svg:viewBox="0 0 237 236" svg:d="M116 0c64-3 119 46 121 116 2 65-54 120-120 120-62-1-116-51-117-115-1-76 58-123 116-121z">
          <text:p/>
        </draw:path>
        <draw:path draw:style-name="gr9" draw:text-style-name="P7" draw:layer="layout" svg:width="0.235cm" svg:height="0.236cm" svg:x="7.476cm" svg:y="20.862cm" svg:viewBox="0 0 236 237" svg:d="M236 118c2 67-50 120-119 119-75-2-115-60-117-116-2-64 56-124 120-121 67 3 116 53 116 118z">
          <text:p/>
        </draw:path>
        <draw:path draw:style-name="gr9" draw:text-style-name="P7" draw:layer="layout" svg:width="0.235cm" svg:height="0.236cm" svg:x="7.77cm" svg:y="19.694cm" svg:viewBox="0 0 236 237" svg:d="M0 118c-2-61 47-119 121-118 64 1 115 54 115 118 1 63-51 118-115 119-68 1-122-51-121-119z">
          <text:p/>
        </draw:path>
        <draw:path draw:style-name="gr9" draw:text-style-name="P7" draw:layer="layout" svg:width="0.235cm" svg:height="0.235cm" svg:x="7.476cm" svg:y="20.57cm" svg:viewBox="0 0 236 236" svg:d="M236 118c1 74-64 121-121 118-63-2-115-56-115-118 0-63 52-115 115-118 60-2 123 46 121 118z">
          <text:p/>
        </draw:path>
        <draw:path draw:style-name="gr9" draw:text-style-name="P7" draw:layer="layout" svg:width="0.234cm" svg:height="0.235cm" svg:x="9.229cm" svg:y="23.489cm" svg:viewBox="0 0 235 236" svg:d="M235 120c0 65-51 115-116 116s-120-53-119-120c1-63 55-117 117-116 80 2 122 66 118 120z">
          <text:p/>
        </draw:path>
        <draw:path draw:style-name="gr9" draw:text-style-name="P7" draw:layer="layout" svg:width="0.235cm" svg:height="0.234cm" svg:x="12.439cm" svg:y="19.403cm" svg:viewBox="0 0 236 235" svg:d="M116 235c-65 2-118-57-116-122 2-56 49-113 119-113 64 0 116 53 117 116 2 58-47 122-120 119z">
          <text:p/>
        </draw:path>
        <draw:path draw:style-name="gr9" draw:text-style-name="P7" draw:layer="layout" svg:width="0.236cm" svg:height="0.236cm" svg:x="10.396cm" svg:y="18.233cm" svg:viewBox="0 0 237 237" svg:d="M122 0c65 3 118 60 115 125-3 53-47 114-121 112-69-1-119-58-116-124 3-62 55-113 122-113z">
          <text:p/>
        </draw:path>
        <draw:path draw:style-name="gr9" draw:text-style-name="P7" draw:layer="layout" svg:width="0.236cm" svg:height="0.236cm" svg:x="10.102cm" svg:y="18.233cm" svg:viewBox="0 0 237 237" svg:d="M119 237c-69 0-116-55-119-115-2-64 55-123 119-122 62 1 120 49 118 122-1 62-51 116-118 115z">
          <text:p/>
        </draw:path>
        <draw:path draw:style-name="gr9" draw:text-style-name="P7" draw:layer="layout" svg:width="0.234cm" svg:height="0.234cm" svg:x="12.732cm" svg:y="19.987cm" svg:viewBox="0 0 235 235" svg:d="M119 235c-57 2-119-42-119-119-1-63 54-116 117-116 66-1 120 54 118 120-2 75-63 117-116 115z">
          <text:p/>
        </draw:path>
        <draw:path draw:style-name="gr9" draw:text-style-name="P7" draw:layer="layout" svg:width="0.234cm" svg:height="0.233cm" svg:x="7.771cm" svg:y="22.324cm" svg:viewBox="0 0 235 234" svg:d="M0 116c-2-60 51-116 117-116 63 0 116 51 118 115 1 58-44 121-121 119-75-2-116-64-114-118z">
          <text:p/>
        </draw:path>
        <draw:path draw:style-name="gr9" draw:text-style-name="P7" draw:layer="layout" svg:width="0.232cm" svg:height="0.233cm" svg:x="11.857cm" svg:y="23.199cm" svg:viewBox="0 0 233 234" svg:d="M119 0c73 3 115 64 114 118-1 66-55 118-121 116-63-2-115-57-112-120 3-71 61-114 119-114z">
          <text:p/>
        </draw:path>
        <draw:path draw:style-name="gr9" draw:text-style-name="P7" draw:layer="layout" svg:width="0.233cm" svg:height="0.233cm" svg:x="10.689cm" svg:y="18.235cm" svg:viewBox="0 0 234 234" svg:d="M234 119c0 65-50 114-115 115-71 1-121-56-119-118 1-65 47-114 115-116 64-2 121 48 119 119z">
          <text:p/>
        </draw:path>
        <draw:path draw:style-name="gr9" draw:text-style-name="P7" draw:layer="layout" svg:width="0.234cm" svg:height="0.235cm" svg:x="8.644cm" svg:y="23.198cm" svg:viewBox="0 0 235 236" svg:d="M235 121c2 58-51 119-123 115-63-3-113-56-112-120s53-115 117-116c61-1 121 52 118 121z">
          <text:p/>
        </draw:path>
        <draw:path draw:style-name="gr9" draw:text-style-name="P7" draw:layer="layout" svg:width="0.233cm" svg:height="0.233cm" svg:x="7.477cm" svg:y="21.447cm" svg:viewBox="0 0 234 234" svg:d="M234 116c3 65-50 116-110 118-71 2-123-50-124-114-1-68 49-121 119-120 67 0 116 53 115 116z">
          <text:p/>
        </draw:path>
        <draw:path draw:style-name="gr9" draw:text-style-name="P7" draw:layer="layout" svg:width="0.233cm" svg:height="0.232cm" svg:x="8.061cm" svg:y="19.113cm" svg:viewBox="0 0 234 233" svg:d="M115 0c70-3 118 58 119 111 1 57-40 120-118 122-62 1-116-54-116-117 1-67 55-117 115-116z">
          <text:p/>
        </draw:path>
        <draw:path draw:style-name="gr9" draw:text-style-name="P7" draw:layer="layout" svg:width="0.233cm" svg:height="0.234cm" svg:x="11.565cm" svg:y="18.528cm" svg:viewBox="0 0 234 235" svg:d="M125 1c64 4 113 61 108 124s-61 114-124 110c-61-5-115-57-109-130 5-57 57-111 125-104z">
          <text:p/>
        </draw:path>
        <draw:path draw:style-name="gr9" draw:text-style-name="P7" draw:layer="layout" svg:width="0.233cm" svg:height="0.232cm" svg:x="11.272cm" svg:y="23.491cm" svg:viewBox="0 0 234 233" svg:d="M234 119c2 53-42 114-116 114-71 0-116-58-118-115-1-65 57-122 122-118 75 3 115 65 112 119z">
          <text:p/>
        </draw:path>
        <draw:path draw:style-name="gr9" draw:text-style-name="P7" draw:layer="layout" svg:width="0.232cm" svg:height="0.233cm" svg:x="12.733cm" svg:y="22.03cm" svg:viewBox="0 0 233 234" svg:d="M117 234c-54 3-114-38-117-114-4-64 54-122 118-120 62 2 115 50 115 118 0 70-58 118-116 116z">
          <text:p/>
        </draw:path>
        <draw:path draw:style-name="gr9" draw:text-style-name="P7" draw:layer="layout" svg:width="0.232cm" svg:height="0.233cm" svg:x="12.15cm" svg:y="22.908cm" svg:viewBox="0 0 233 234" svg:d="M116 234c-68-4-116-53-116-118-1-66 53-118 121-116 63 2 114 52 112 118-2 68-52 113-117 116z">
          <text:p/>
        </draw:path>
        <draw:path draw:style-name="gr9" draw:text-style-name="P7" draw:layer="layout" svg:width="0.233cm" svg:height="0.232cm" svg:x="12.44cm" svg:y="22.616cm" svg:viewBox="0 0 234 233" svg:d="M114 233c-63 1-115-56-114-117 2-62 53-116 116-116 64-1 121 57 118 122-2 62-57 114-120 111z">
          <text:p/>
        </draw:path>
        <draw:path draw:style-name="gr9" draw:text-style-name="P7" draw:layer="layout" svg:width="0.232cm" svg:height="0.231cm" svg:x="9.814cm" svg:y="23.784cm" svg:viewBox="0 0 233 232" svg:d="M116 232c-77-3-117-67-116-118 2-63 55-114 118-114 52 0 114 41 115 117 0 63-55 116-117 115z">
          <text:p/>
        </draw:path>
        <draw:path draw:style-name="gr9" draw:text-style-name="P7" draw:layer="layout" svg:width="0.232cm" svg:height="0.232cm" svg:x="7.478cm" svg:y="20.281cm" svg:viewBox="0 0 233 233" svg:d="M233 117c1 59-43 116-115 116-68 1-116-48-118-113-3-61 45-121 119-120 67 1 116 57 114 117z">
          <text:p/>
        </draw:path>
        <draw:path draw:style-name="gr9" draw:text-style-name="P7" draw:layer="layout" svg:width="0.231cm" svg:height="0.232cm" svg:x="8.646cm" svg:y="18.529cm" svg:viewBox="0 0 232 233" svg:d="M232 119c-1 62-56 115-118 114-62-2-117-57-114-118 3-76 66-116 119-115 63 2 114 54 113 119z">
          <text:p/>
        </draw:path>
        <draw:path draw:style-name="gr9" draw:text-style-name="P7" draw:layer="layout" svg:width="0.231cm" svg:height="0.231cm" svg:x="10.398cm" svg:y="23.784cm" svg:viewBox="0 0 232 232" svg:d="M117 0c62 0 116 54 115 116 0 63-54 118-116 116-72-1-117-61-116-117 2-63 53-115 117-115z">
          <text:p/>
        </draw:path>
        <draw:path draw:style-name="gr9" draw:text-style-name="P7" draw:layer="layout" svg:width="0.231cm" svg:height="0.231cm" svg:x="13.025cm" svg:y="20.572cm" svg:viewBox="0 0 232 232" svg:d="M232 118c-1 63-55 116-117 114-71-2-116-61-115-117 2-64 54-115 118-115 62 1 115 55 114 118z">
          <text:p/>
        </draw:path>
        <draw:path draw:style-name="gr9" draw:text-style-name="P7" draw:layer="layout" svg:width="0.231cm" svg:height="0.232cm" svg:x="13.025cm" svg:y="21.157cm" svg:viewBox="0 0 232 233" svg:d="M232 114c2 61-51 118-114 119-68 0-117-58-118-115-1-62 51-116 114-118 63-1 116 51 118 114z">
          <text:p/>
        </draw:path>
        <draw:path draw:style-name="gr9" draw:text-style-name="P7" draw:layer="layout" svg:width="0.231cm" svg:height="0.23cm" svg:x="10.982cm" svg:y="18.237cm" svg:viewBox="0 0 232 231" svg:d="M112 231c-61 1-114-54-112-118 1-55 45-116 118-113 72 2 115 57 114 119-2 70-60 114-120 112z">
          <text:p/>
        </draw:path>
        <draw:path draw:style-name="gr9" draw:text-style-name="P7" draw:layer="layout" svg:width="0.232cm" svg:height="0.233cm" svg:x="9.521cm" svg:y="18.235cm" svg:viewBox="0 0 233 234" svg:d="M0 119c1-65 45-115 113-119 61-3 117 44 120 111 3 73-54 120-108 123-67 3-121-45-125-115z">
          <text:p/>
        </draw:path>
        <draw:path draw:style-name="gr9" draw:text-style-name="P7" draw:layer="layout" svg:width="0.231cm" svg:height="0.232cm" svg:x="7.478cm" svg:y="21.741cm" svg:viewBox="0 0 232 233" svg:d="M232 114c3 62-47 115-113 119-61 3-117-51-119-114s50-117 113-119c61-2 120 49 119 114z">
          <text:p/>
        </draw:path>
        <draw:path draw:style-name="gr9" draw:text-style-name="P7" draw:layer="layout" svg:width="0.232cm" svg:height="0.231cm" svg:x="8.355cm" svg:y="18.821cm" svg:viewBox="0 0 233 232" svg:d="M119 232c-68 3-118-53-119-111-2-65 48-122 118-121 69 1 114 54 115 117 0 70-56 116-114 115z">
          <text:p/>
        </draw:path>
        <draw:path draw:style-name="gr9" draw:text-style-name="P7" draw:layer="layout" svg:width="0.231cm" svg:height="0.231cm" svg:x="7.772cm" svg:y="19.405cm" svg:viewBox="0 0 232 232" svg:d="M111 232c-57 0-114-53-111-119 2-63 57-116 119-113 63 3 117 60 113 120-6 78-68 115-121 112z">
          <text:p/>
        </draw:path>
        <draw:path draw:style-name="gr9" draw:text-style-name="P7" draw:layer="layout" svg:width="0.23cm" svg:height="0.232cm" svg:x="7.479cm" svg:y="19.988cm" svg:viewBox="0 0 231 233" svg:d="M231 115c2 67-58 118-115 118-63 0-115-52-116-116-1-62 52-117 114-117 67 1 119 56 117 115z">
          <text:p/>
        </draw:path>
        <draw:path draw:style-name="gr9" draw:text-style-name="P7" draw:layer="layout" svg:width="0.231cm" svg:height="0.228cm" svg:x="13.025cm" svg:y="20.866cm" svg:viewBox="0 0 232 229" svg:d="M113 229c-68 1-114-60-113-117 0-49 41-113 117-112 67 1 116 55 115 116-2 64-54 116-119 113z">
          <text:p/>
        </draw:path>
        <draw:path draw:style-name="gr9" draw:text-style-name="P7" draw:layer="layout" svg:width="0.23cm" svg:height="0.231cm" svg:x="10.105cm" svg:y="23.784cm" svg:viewBox="0 0 231 232" svg:d="M231 117c2 63-52 116-116 115-63 0-116-54-115-118 1-63 54-115 117-114 59 0 117 50 114 117z">
          <text:p/>
        </draw:path>
        <draw:path draw:style-name="gr9" draw:text-style-name="P7" draw:layer="layout" svg:width="0.231cm" svg:height="0.229cm" svg:x="9.231cm" svg:y="18.237cm" svg:viewBox="0 0 232 230" svg:d="M118 230c-64 3-116-50-118-113-2-62 50-116 113-117 64-2 117 50 119 113 2 59-48 119-114 117z">
          <text:p/>
        </draw:path>
        <draw:path draw:style-name="gr9" draw:text-style-name="P7" draw:layer="layout" svg:width="0.229cm" svg:height="0.229cm" svg:x="11.859cm" svg:y="18.53cm" svg:viewBox="0 0 230 230" svg:d="M230 117c-1 62-57 117-119 113-75-5-109-61-111-113-2-62 51-116 115-117 54 0 113 44 115 117z">
          <text:p/>
        </draw:path>
        <draw:path draw:style-name="gr9" draw:text-style-name="P7" draw:layer="layout" svg:width="0.229cm" svg:height="0.231cm" svg:x="10.691cm" svg:y="23.784cm" svg:viewBox="0 0 230 232" svg:d="M230 115c3 61-48 116-115 117-63 1-116-54-115-117 2-61 51-113 112-115s119 51 118 115z">
          <text:p/>
        </draw:path>
        <draw:path draw:style-name="gr9" draw:text-style-name="P7" draw:layer="layout" svg:width="0.23cm" svg:height="0.229cm" svg:x="13.025cm" svg:y="21.449cm" svg:viewBox="0 0 231 230" svg:d="M114 230c-64 2-116-57-114-117 2-62 51-112 113-113 71 0 118 53 118 115 0 73-60 118-117 115z">
          <text:p/>
        </draw:path>
        <draw:path draw:style-name="gr9" draw:text-style-name="P7" draw:layer="layout" svg:width="0.23cm" svg:height="0.23cm" svg:x="12.734cm" svg:y="19.697cm" svg:viewBox="0 0 231 231" svg:d="M231 116c1 61-49 115-117 115-64 0-115-54-114-118 1-67 54-114 116-113 63 0 117 51 115 116z">
          <text:p/>
        </draw:path>
        <draw:path draw:style-name="gr9" draw:text-style-name="P7" draw:layer="layout" svg:width="0.228cm" svg:height="0.228cm" svg:x="12.152cm" svg:y="18.823cm" svg:viewBox="0 0 229 229" svg:d="M112 229c-56 2-115-49-112-119 1-52 41-110 114-110 67-1 115 52 115 115-1 70-59 118-117 114z">
          <text:p/>
        </draw:path>
        <draw:path draw:style-name="gr9" draw:text-style-name="P7" draw:layer="layout" svg:width="0.228cm" svg:height="0.23cm" svg:x="8.356cm" svg:y="23.201cm" svg:viewBox="0 0 229 231" svg:d="M116 0c61 3 114 49 113 119-1 64-55 114-119 112-58-3-113-53-110-121 3-51 44-108 116-110z">
          <text:p/>
        </draw:path>
        <draw:path draw:style-name="gr9" draw:text-style-name="P7" draw:layer="layout" svg:width="0.227cm" svg:height="0.228cm" svg:x="12.736cm" svg:y="22.326cm" svg:viewBox="0 0 228 229" svg:d="M228 115c1 58-45 115-117 114-65-2-110-54-111-113-1-72 60-116 114-116 58-1 116 48 114 115z">
          <text:p/>
        </draw:path>
        <draw:path draw:style-name="gr9" draw:text-style-name="P7" draw:layer="layout" svg:width="0.228cm" svg:height="0.229cm" svg:x="7.48cm" svg:y="22.033cm" svg:viewBox="0 0 229 230" svg:d="M229 115c2 63-56 117-117 115s-111-52-112-113c0-67 49-115 114-117 63-2 116 51 115 115z">
          <text:p/>
        </draw:path>
        <draw:path draw:style-name="gr9" draw:text-style-name="P7" draw:layer="layout" svg:width="0.23cm" svg:height="0.228cm" svg:x="12.442cm" svg:y="19.114cm" svg:viewBox="0 0 231 229" svg:d="M231 113c-1 55-39 115-116 116-61 1-113-49-115-110-2-66 54-118 113-119 55-1 113 40 118 113z">
          <text:p/>
        </draw:path>
        <draw:path draw:style-name="gr9" draw:text-style-name="P7" draw:layer="layout" svg:width="0.23cm" svg:height="0.227cm" svg:x="8.063cm" svg:y="22.91cm" svg:viewBox="0 0 231 228" svg:d="M114 0c69-3 117 57 117 113 0 51-39 116-117 115-62 0-112-47-114-111-2-68 53-119 114-117z">
          <text:p/>
        </draw:path>
        <draw:path draw:style-name="gr9" draw:text-style-name="P7" draw:layer="layout" svg:width="0.229cm" svg:height="0.227cm" svg:x="13.025cm" svg:y="20.283cm" svg:viewBox="0 0 230 228" svg:d="M117 0c57-1 115 46 113 117-1 66-52 110-112 111-77 1-118-64-118-114 0-56 48-116 117-114z">
          <text:p/>
        </draw:path>
        <draw:path draw:style-name="gr9" draw:text-style-name="P7" draw:layer="layout" svg:width="0.229cm" svg:height="0.228cm" svg:x="11.275cm" svg:y="18.238cm" svg:viewBox="0 0 230 229" svg:d="M112 229c-61-1-112-51-112-112 0-64 48-116 116-117 64 0 114 53 114 117 0 57-50 115-118 112z">
          <text:p/>
        </draw:path>
        <draw:path draw:style-name="gr9" draw:text-style-name="P7" draw:layer="layout" svg:width="0.23cm" svg:height="0.23cm" svg:x="8.939cm" svg:y="23.492cm" svg:viewBox="0 0 231 231" svg:d="M117 231c-66 2-116-52-117-114-1-63 47-116 113-117 65-1 117 49 118 113 1 67-51 118-114 118z">
          <text:p/>
        </draw:path>
        <draw:path draw:style-name="gr9" draw:text-style-name="P7" draw:layer="layout" svg:width="0.228cm" svg:height="0.228cm" svg:x="7.773cm" svg:y="22.618cm" svg:viewBox="0 0 229 229" svg:d="M115 0c69 4 114 53 114 118 0 61-51 110-111 111-65 1-117-49-118-112-1-64 51-117 115-117z">
          <text:p/>
        </draw:path>
        <draw:path draw:style-name="gr9" draw:text-style-name="P7" draw:layer="layout" svg:width="0.227cm" svg:height="0.229cm" svg:x="9.524cm" svg:y="23.785cm" svg:viewBox="0 0 228 230" svg:d="M228 117c0 65-56 116-118 113-61-2-110-51-110-115 0-71 60-116 115-115 58 0 116 49 113 117z">
          <text:p/>
        </draw:path>
        <draw:path draw:style-name="gr9" draw:text-style-name="P7" draw:layer="layout" svg:width="0.226cm" svg:height="0.226cm" svg:x="9.234cm" svg:y="23.786cm" svg:viewBox="0 0 227 227" svg:d="M227 114c-2 60-46 116-118 113-68-2-110-53-109-114 0-68 50-110 109-113 61-2 115 43 118 114z">
          <text:p/>
        </draw:path>
        <draw:path draw:style-name="gr9" draw:text-style-name="P7" draw:layer="layout" svg:width="0.226cm" svg:height="0.227cm" svg:x="10.984cm" svg:y="23.786cm" svg:viewBox="0 0 227 228" svg:d="M0 115c-2-56 43-116 115-115 57 0 111 45 112 112 0 70-55 117-116 116-61 0-111-52-111-113z">
          <text:p/>
        </draw:path>
        <draw:path draw:style-name="gr9" draw:text-style-name="P7" draw:layer="layout" svg:width="0.226cm" svg:height="0.227cm" svg:x="13.027cm" svg:y="19.991cm" svg:viewBox="0 0 227 228" svg:d="M115 228c-62 1-116-52-115-115 0-60 50-113 111-113 57 0 111 39 116 109 4 62-48 118-112 119z">
          <text:p/>
        </draw:path>
        <draw:path draw:style-name="gr9" draw:text-style-name="P7" draw:layer="layout" svg:width="0.226cm" svg:height="0.225cm" svg:x="9.817cm" svg:y="17.948cm" svg:viewBox="0 0 227 226" svg:d="M0 115c-1-60 49-112 110-115s120 53 117 115c-4 69-53 112-114 111-73 0-110-56-113-111z">
          <text:p/>
        </draw:path>
        <draw:path draw:style-name="gr9" draw:text-style-name="P7" draw:layer="layout" svg:width="0.228cm" svg:height="0.227cm" svg:x="13.026cm" svg:y="21.743cm" svg:viewBox="0 0 229 228" svg:d="M229 114c-3 63-46 110-111 114-63 3-118-51-118-115 1-61 52-112 112-113 63-2 116 50 117 114z">
          <text:p/>
        </draw:path>
        <draw:path draw:style-name="gr9" draw:text-style-name="P7" draw:layer="layout" svg:width="0.227cm" svg:height="0.226cm" svg:x="11.567cm" svg:y="23.494cm" svg:viewBox="0 0 228 227" svg:d="M110 227c-59 1-113-51-110-119 3-61 51-108 113-108 66 0 115 49 115 114 0 66-54 117-118 113z">
          <text:p/>
        </draw:path>
        <draw:path draw:style-name="gr9" draw:text-style-name="P7" draw:layer="layout" svg:width="0.225cm" svg:height="0.226cm" svg:x="7.189cm" svg:y="21.16cm" svg:viewBox="0 0 226 227" svg:d="M226 112c0 63-45 111-109 115-60 3-114-48-117-108-3-63 50-120 113-119 56 1 111 41 113 112z">
          <text:p/>
        </draw:path>
        <draw:path draw:style-name="gr9" draw:text-style-name="P7" draw:layer="layout" svg:width="0.224cm" svg:height="0.226cm" svg:x="10.401cm" svg:y="17.948cm" svg:viewBox="0 0 225 227" svg:d="M225 115c-1 66-51 111-112 112-60 1-113-51-113-112-1-63 55-119 117-115 60 4 108 48 108 115z">
          <text:p/>
        </draw:path>
        <draw:path draw:style-name="gr9" draw:text-style-name="P7" draw:layer="layout" svg:width="0.224cm" svg:height="0.225cm" svg:x="7.189cm" svg:y="20.575cm" svg:viewBox="0 0 225 226" svg:d="M0 114c0-60 50-114 112-114 57 0 115 44 113 117-1 66-54 110-113 109-62 0-112-52-112-112z">
          <text:p/>
        </draw:path>
        <draw:path draw:style-name="gr9" draw:text-style-name="P7" draw:layer="layout" svg:width="0.225cm" svg:height="0.225cm" svg:x="8.941cm" svg:y="18.24cm" svg:viewBox="0 0 226 226" svg:d="M226 112c2 68-58 115-115 114-55-1-110-48-111-112-1-56 45-115 115-114 64 1 113 53 111 112z">
          <text:p/>
        </draw:path>
        <draw:path draw:style-name="gr9" draw:text-style-name="P7" draw:layer="layout" svg:width="0.225cm" svg:height="0.226cm" svg:x="10.109cm" svg:y="17.948cm" svg:viewBox="0 0 226 227" svg:d="M0 111c1-64 53-112 113-111 76 1 115 66 113 117-2 60-52 112-113 110-64-1-115-49-113-116z">
          <text:p/>
        </draw:path>
        <draw:path draw:style-name="gr9" draw:text-style-name="P7" draw:layer="layout" svg:width="0.226cm" svg:height="0.225cm" svg:x="7.482cm" svg:y="19.699cm" svg:viewBox="0 0 227 226" svg:d="M115 226c-63 2-113-48-115-109-2-75 62-117 112-117 64-1 115 54 115 115-1 51-43 112-112 111z">
          <text:p/>
        </draw:path>
        <draw:path draw:style-name="gr9" draw:text-style-name="P7" draw:layer="layout" svg:width="0.226cm" svg:height="0.224cm" svg:x="12.443cm" svg:y="22.911cm" svg:viewBox="0 0 227 225" svg:d="M116 225c-68 3-117-53-116-113 3-73 62-112 113-112 54-1 115 40 114 115 0 67-54 112-111 110z">
          <text:p/>
        </draw:path>
        <draw:path draw:style-name="gr9" draw:text-style-name="P7" draw:layer="layout" svg:width="0.225cm" svg:height="0.226cm" svg:x="12.153cm" svg:y="23.203cm" svg:viewBox="0 0 226 227" svg:d="M226 115c0 61-51 112-111 112-67 1-117-56-115-116 2-61 51-112 113-111 68 1 115 54 113 115z">
          <text:p/>
        </draw:path>
        <draw:path draw:style-name="gr9" draw:text-style-name="P7" draw:layer="layout" svg:width="0.226cm" svg:height="0.225cm" svg:x="7.188cm" svg:y="20.868cm" svg:viewBox="0 0 227 226" svg:d="M114 0c55-2 112 41 113 110 2 75-60 116-114 116-60 0-111-50-113-110-1-56 45-118 114-116z">
          <text:p/>
        </draw:path>
        <draw:path draw:style-name="gr9" draw:text-style-name="P7" draw:layer="layout" svg:width="0.224cm" svg:height="0.225cm" svg:x="8.358cm" svg:y="18.532cm" svg:viewBox="0 0 225 226" svg:d="M225 112c2 61-45 112-109 114-62 1-114-48-116-110-2-59 47-116 114-116 54 0 112 44 111 112z">
          <text:p/>
        </draw:path>
        <draw:path draw:style-name="gr9" draw:text-style-name="P7" draw:layer="layout" svg:width="0.226cm" svg:height="0.225cm" svg:x="8.065cm" svg:y="18.825cm" svg:viewBox="0 0 227 226" svg:d="M117 0c71 1 111 63 110 114-1 64-57 114-118 112-60-2-110-52-109-113 1-66 52-116 117-113z">
          <text:p/>
        </draw:path>
        <draw:path draw:style-name="gr9" draw:text-style-name="P7" draw:layer="layout" svg:width="0.225cm" svg:height="0.226cm" svg:x="12.737cm" svg:y="19.408cm" svg:viewBox="0 0 226 227" svg:d="M226 115c1 64-58 114-118 112-52-2-108-47-108-114 0-57 46-115 116-113 73 3 112 65 110 115z">
          <text:p/>
        </draw:path>
        <draw:path draw:style-name="gr9" draw:text-style-name="P7" draw:layer="layout" svg:width="0.227cm" svg:height="0.225cm" svg:x="8.648cm" svg:y="23.495cm" svg:viewBox="0 0 228 226" svg:d="M117 0c59-1 110 48 111 111 0 67-55 116-116 115-48-1-111-37-112-113 0-68 56-116 117-113z">
          <text:p/>
        </draw:path>
        <draw:path draw:style-name="gr9" draw:text-style-name="P7" draw:layer="layout" svg:width="0.223cm" svg:height="0.225cm" svg:x="11.279cm" svg:y="23.787cm" svg:viewBox="0 0 224 226" svg:d="M224 116c-2 60-55 112-114 110-66-3-114-53-110-119 3-69 61-109 115-107 61 3 111 56 109 116z">
          <text:p/>
        </draw:path>
        <draw:path draw:style-name="gr9" draw:text-style-name="P7" draw:layer="layout" svg:width="0.225cm" svg:height="0.223cm" svg:x="7.774cm" svg:y="19.116cm" svg:viewBox="0 0 226 224" svg:d="M105 224c-66-2-108-64-105-118 4-61 56-108 117-106 64 2 113 57 108 121-4 60-55 108-120 103z">
          <text:p/>
        </draw:path>
        <draw:path draw:style-name="gr9" draw:text-style-name="P7" draw:layer="layout" svg:width="0.223cm" svg:height="0.224cm" svg:x="10.695cm" svg:y="17.949cm" svg:viewBox="0 0 224 225" svg:d="M0 113c-1-62 47-111 110-113 63-3 116 53 114 117-2 60-54 111-115 108-66-3-111-54-109-112z">
          <text:p/>
        </draw:path>
        <draw:path draw:style-name="gr9" draw:text-style-name="P7" draw:layer="layout" svg:width="0.223cm" svg:height="0.223cm" svg:x="11.569cm" svg:y="18.241cm" svg:viewBox="0 0 224 224" svg:d="M224 111c1 67-56 113-111 113-60 1-115-50-113-116 1-49 43-109 113-108 64 0 113 54 111 111z">
          <text:p/>
        </draw:path>
        <draw:path draw:style-name="gr9" draw:text-style-name="P7" draw:layer="layout" svg:width="0.223cm" svg:height="0.224cm" svg:x="9.526cm" svg:y="17.949cm" svg:viewBox="0 0 224 225" svg:d="M0 107c2-58 52-109 110-107 78 4 116 66 113 119-3 61-58 111-118 105-69-5-110-61-105-117z">
          <text:p/>
        </draw:path>
        <draw:path draw:style-name="gr9" draw:text-style-name="P7" draw:layer="layout" svg:width="0.224cm" svg:height="0.223cm" svg:x="7.189cm" svg:y="21.453cm" svg:viewBox="0 0 225 224" svg:d="M112 0c59-3 112 45 113 109 1 62-46 113-107 115-56 2-117-42-118-112 0-58 47-113 112-112z">
          <text:p/>
        </draw:path>
        <draw:path draw:style-name="gr9" draw:text-style-name="P7" draw:layer="layout" svg:width="0.224cm" svg:height="0.224cm" svg:x="11.861cm" svg:y="23.496cm" svg:viewBox="0 0 225 225" svg:d="M120 1c55 1 110 52 105 119-5 70-64 107-118 105-60-3-110-56-107-115 4-70 61-115 120-109z">
          <text:p/>
        </draw:path>
        <draw:path draw:style-name="gr9" draw:text-style-name="P7" draw:layer="layout" svg:width="0.223cm" svg:height="0.224cm" svg:x="13.028cm" svg:y="22.036cm" svg:viewBox="0 0 224 225" svg:d="M224 110c1 75-59 114-108 115-57 1-116-44-116-115 0-51 42-110 113-110 62 0 110 48 111 110z">
          <text:p/>
        </draw:path>
        <draw:path draw:style-name="gr9" draw:text-style-name="P7" draw:layer="layout" svg:width="0.224cm" svg:height="0.223cm" svg:x="7.483cm" svg:y="22.328cm" svg:viewBox="0 0 225 224" svg:d="M113 224c-65 2-112-52-113-108-1-76 63-118 113-116 61 1 111 51 112 113 0 48-40 111-112 111z">
          <text:p/>
        </draw:path>
        <draw:path draw:style-name="gr9" draw:text-style-name="P7" draw:layer="layout" svg:width="0.221cm" svg:height="0.222cm" svg:x="8.943cm" svg:y="23.788cm" svg:viewBox="0 0 222 223" svg:d="M222 115c-1 61-52 110-113 108-61-1-110-52-109-113 1-62 55-113 115-110 72 4 110 63 107 115z">
          <text:p/>
        </draw:path>
        <draw:path draw:style-name="gr9" draw:text-style-name="P7" draw:layer="layout" svg:width="0.223cm" svg:height="0.222cm" svg:x="12.738cm" svg:y="22.622cm" svg:viewBox="0 0 224 223" svg:d="M0 113c-3-55 43-113 110-113 63 0 112 47 114 109 1 53-40 112-110 114-63 2-115-51-114-110z">
          <text:p/>
        </draw:path>
        <draw:path draw:style-name="gr9" draw:text-style-name="P7" draw:layer="layout" svg:width="0.221cm" svg:height="0.222cm" svg:x="10.986cm" svg:y="17.95cm" svg:viewBox="0 0 222 223" svg:d="M222 116c1 53-44 108-115 107-61-2-110-55-107-115 2-61 56-112 115-108 67 4 110 57 107 116z">
          <text:p/>
        </draw:path>
        <draw:path draw:style-name="gr9" draw:text-style-name="P7" draw:layer="layout" svg:width="0.221cm" svg:height="0.222cm" svg:x="7.191cm" svg:y="21.745cm" svg:viewBox="0 0 222 223" svg:d="M222 113c1 60-49 110-112 110-66-1-111-54-110-111 1-64 49-111 111-112 59 0 112 48 111 113z">
          <text:p/>
        </draw:path>
        <draw:path draw:style-name="gr9" draw:text-style-name="P7" draw:layer="layout" svg:width="0.222cm" svg:height="0.223cm" svg:x="7.19cm" svg:y="20.285cm" svg:viewBox="0 0 223 224" svg:d="M114 224c-59 2-114-47-114-110 0-73 62-114 112-114 61 0 111 50 111 112 1 70-58 114-109 112z">
          <text:p/>
        </draw:path>
        <draw:path draw:style-name="gr9" draw:text-style-name="P7" draw:layer="layout" svg:width="0.222cm" svg:height="0.222cm" svg:x="12.445cm" svg:y="18.827cm" svg:viewBox="0 0 223 223" svg:d="M114 0c52-2 110 41 109 113 0 61-52 111-112 110-61-2-113-54-111-114 3-68 58-112 114-109z">
          <text:p/>
        </draw:path>
        <draw:path draw:style-name="gr9" draw:text-style-name="P7" draw:layer="layout" svg:width="0.221cm" svg:height="0.221cm" svg:x="13.029cm" svg:y="19.701cm" svg:viewBox="0 0 222 222" svg:d="M109 222c-55 1-109-45-109-112 0-61 52-111 113-110 62 0 109 50 109 113 0 67-58 112-113 109z">
          <text:p/>
        </draw:path>
        <draw:path draw:style-name="gr9" draw:text-style-name="P7" draw:layer="layout" svg:width="0.222cm" svg:height="0.222cm" svg:x="7.484cm" svg:y="19.41cm" svg:viewBox="0 0 223 223" svg:d="M0 109c-2-54 45-109 112-109 72 1 112 63 111 112-2 57-44 111-114 111-61 0-111-51-109-114z">
          <text:p/>
        </draw:path>
        <draw:path draw:style-name="gr9" draw:text-style-name="P7" draw:layer="layout" svg:width="0.22cm" svg:height="0.221cm" svg:x="7.776cm" svg:y="22.913cm" svg:viewBox="0 0 221 222" svg:d="M221 113c1 64-56 112-114 109s-107-53-107-111c-1-61 52-112 113-111 61 0 110 51 108 113z">
          <text:p/>
        </draw:path>
        <draw:path draw:style-name="gr9" draw:text-style-name="P7" draw:layer="layout" svg:width="0.22cm" svg:height="0.22cm" svg:x="8.36cm" svg:y="23.497cm" svg:viewBox="0 0 221 221" svg:d="M221 114c-2 62-55 110-116 107-58-3-107-54-105-112 2-70 61-110 114-109 51 1 111 45 107 114z">
          <text:p/>
        </draw:path>
        <draw:path draw:style-name="gr9" draw:text-style-name="P7" draw:layer="layout" svg:width="0.221cm" svg:height="0.221cm" svg:x="13.323cm" svg:y="20.87cm" svg:viewBox="0 0 222 222" svg:d="M0 107c2-62 53-109 115-107 58 3 107 53 107 111-1 61-54 111-114 111-52-1-111-46-108-115z">
          <text:p/>
        </draw:path>
        <draw:path draw:style-name="gr9" draw:text-style-name="P7" draw:layer="layout" svg:width="0.221cm" svg:height="0.221cm" svg:x="8.068cm" svg:y="23.206cm" svg:viewBox="0 0 222 222" svg:d="M0 113c-3-62 46-113 108-113 70-1 111 53 114 108 3 60-50 114-110 114-61 1-112-46-112-109z">
          <text:p/>
        </draw:path>
        <draw:path draw:style-name="gr9" draw:text-style-name="P7" draw:layer="layout" svg:width="0.221cm" svg:height="0.219cm" svg:x="12.739cm" svg:y="19.118cm" svg:viewBox="0 0 222 220" svg:d="M112 220c-67 3-112-56-112-109 0-52 42-111 112-111 58-1 107 50 110 108 2 55-44 113-110 112z">
          <text:p/>
        </draw:path>
        <draw:path draw:style-name="gr9" draw:text-style-name="P7" draw:layer="layout" svg:width="0.22cm" svg:height="0.221cm" svg:x="8.652cm" svg:y="18.242cm" svg:viewBox="0 0 221 222" svg:d="M221 107c3 60-48 114-109 115-59 1-109-46-112-106-4-62 44-113 106-116 57-2 111 39 115 107z">
          <text:p/>
        </draw:path>
        <draw:path draw:style-name="gr9" draw:text-style-name="P7" draw:layer="layout" svg:width="0.221cm" svg:height="0.221cm" svg:x="12.155cm" svg:y="18.533cm" svg:viewBox="0 0 222 222" svg:d="M113 222c-74 2-114-62-113-109 1-62 52-114 113-113 59 1 107 50 109 109 3 54-41 114-109 113z">
          <text:p/>
        </draw:path>
        <draw:path draw:style-name="gr9" draw:text-style-name="P7" draw:layer="layout" svg:width="0.22cm" svg:height="0.221cm" svg:x="10.403cm" svg:y="24.082cm" svg:viewBox="0 0 221 222" svg:d="M221 111c1 72-64 112-112 111-61-2-113-55-109-114 2-59 50-106 109-108 51-2 113 42 112 111z">
          <text:p/>
        </draw:path>
        <draw:path draw:style-name="gr9" draw:text-style-name="P7" draw:layer="layout" svg:width="0.219cm" svg:height="0.221cm" svg:x="10.112cm" svg:y="24.082cm" svg:viewBox="0 0 220 222" svg:d="M0 110c-2-64 56-112 113-110 58 2 107 51 107 109 1 70-58 112-109 113-54 0-114-45-111-112z">
          <text:p/>
        </draw:path>
        <draw:path draw:style-name="gr9" draw:text-style-name="P7" draw:layer="layout" svg:width="0.219cm" svg:height="0.22cm" svg:x="9.82cm" svg:y="24.082cm" svg:viewBox="0 0 220 221" svg:d="M220 111c0 62-50 112-112 110-58-1-106-48-108-107-2-60 48-113 109-114 62-1 111 49 111 111z">
          <text:p/>
        </draw:path>
        <draw:path draw:style-name="gr9" draw:text-style-name="P7" draw:layer="layout" svg:width="0.219cm" svg:height="0.219cm" svg:x="10.697cm" svg:y="24.083cm" svg:viewBox="0 0 220 220" svg:d="M108 0c51-2 112 39 112 111 0 60-51 108-110 109-54 1-112-45-110-113 2-59 49-107 108-107z">
          <text:p/>
        </draw:path>
        <draw:path draw:style-name="gr9" draw:text-style-name="P7" draw:layer="layout" svg:width="0.221cm" svg:height="0.22cm" svg:x="13.03cm" svg:y="22.329cm" svg:viewBox="0 0 222 221" svg:d="M109 221c-57 1-111-48-109-114 2-59 52-106 110-107 56 0 112 46 112 111 0 63-54 113-113 110z">
          <text:p/>
        </draw:path>
        <draw:path draw:style-name="gr9" draw:text-style-name="P7" draw:layer="layout" svg:width="0.219cm" svg:height="0.219cm" svg:x="13.324cm" svg:y="20.287cm" svg:viewBox="0 0 220 220" svg:d="M108 220c-59-1-107-49-108-107-2-63 51-113 111-113 58 1 107 50 109 109 1 60-51 111-112 111z">
          <text:p/>
        </draw:path>
        <draw:path draw:style-name="gr9" draw:text-style-name="P7" draw:layer="layout" svg:width="0.22cm" svg:height="0.219cm" svg:x="13.323cm" svg:y="21.455cm" svg:viewBox="0 0 221 220" svg:d="M112 0c52-1 107 41 109 108 2 61-52 114-113 112-62-2-110-54-108-116 2-54 50-107 112-104z">
          <text:p/>
        </draw:path>
        <draw:path draw:style-name="gr9" draw:text-style-name="P7" draw:layer="layout" svg:width="0.22cm" svg:height="0.219cm" svg:x="13.323cm" svg:y="21.163cm" svg:viewBox="0 0 221 220" svg:d="M0 108c-1-52 43-110 114-108 59 2 107 51 107 110 0 49-37 110-112 110-67 0-112-57-109-112z">
          <text:p/>
        </draw:path>
        <draw:path draw:style-name="gr9" draw:text-style-name="P7" draw:layer="layout" svg:width="0.22cm" svg:height="0.219cm" svg:x="7.191cm" svg:y="19.995cm" svg:viewBox="0 0 221 220" svg:d="M221 111c1 59-46 110-113 109-60 0-112-55-108-114 5-61 51-105 110-106 65-1 113 53 111 111z">
          <text:p/>
        </draw:path>
        <draw:path draw:style-name="gr9" draw:text-style-name="P7" draw:layer="layout" svg:width="0.22cm" svg:height="0.219cm" svg:x="13.323cm" svg:y="20.578cm" svg:viewBox="0 0 221 220" svg:d="M221 108c3 60-49 111-110 112-60 1-108-45-111-103s39-115 106-117c73-2 112 55 115 108z">
          <text:p/>
        </draw:path>
        <draw:path draw:style-name="gr9" draw:text-style-name="P7" draw:layer="layout" svg:width="0.219cm" svg:height="0.218cm" svg:x="11.571cm" svg:y="23.79cm" svg:viewBox="0 0 220 219" svg:d="M220 111c0 62-51 110-115 108-59-2-106-52-105-111 0-58 48-106 107-108 63-1 114 49 113 111z">
          <text:p/>
        </draw:path>
        <draw:path draw:style-name="gr9" draw:text-style-name="P7" draw:layer="layout" svg:width="0.217cm" svg:height="0.219cm" svg:x="7.778cm" svg:y="18.828cm" svg:viewBox="0 0 218 220" svg:d="M218 110c2 63-51 112-112 110-52-2-105-38-106-109 0-74 62-112 112-111 51 1 108 46 106 110z">
          <text:p/>
        </draw:path>
        <draw:path draw:style-name="gr9" draw:text-style-name="P7" draw:layer="layout" svg:width="0.219cm" svg:height="0.218cm" svg:x="7.485cm" svg:y="22.624cm" svg:viewBox="0 0 220 219" svg:d="M109 0c64-3 113 52 111 110-2 56-39 107-108 109-70 2-113-55-112-112 0-53 46-109 109-107z">
          <text:p/>
        </draw:path>
        <draw:path draw:style-name="gr9" draw:text-style-name="P7" draw:layer="layout" svg:width="0.217cm" svg:height="0.219cm" svg:x="7.193cm" svg:y="19.702cm" svg:viewBox="0 0 218 220" svg:d="M218 111c1 65-57 109-107 109-59-1-109-47-111-106-2-61 51-115 112-114 59 2 108 52 106 111z">
          <text:p/>
        </draw:path>
        <draw:path draw:style-name="gr9" draw:text-style-name="P7" draw:layer="layout" svg:width="0.22cm" svg:height="0.218cm" svg:x="9.237cm" svg:y="17.952cm" svg:viewBox="0 0 221 219" svg:d="M221 113c-4 63-52 108-115 106-60-1-109-51-106-115 3-56 48-105 112-104 65 1 108 51 109 113z">
          <text:p/>
        </draw:path>
        <draw:path draw:style-name="gr9" draw:text-style-name="P7" draw:layer="layout" svg:width="0.218cm" svg:height="0.218cm" svg:x="11.281cm" svg:y="17.952cm" svg:viewBox="0 0 219 219" svg:d="M0 110c-2-56 43-108 105-110 68-1 114 48 114 109 1 63-48 111-113 110-61-1-108-54-106-109z">
          <text:p/>
        </draw:path>
        <draw:path draw:style-name="gr9" draw:text-style-name="P7" draw:layer="layout" svg:width="0.218cm" svg:height="0.219cm" svg:x="11.864cm" svg:y="18.243cm" svg:viewBox="0 0 219 220" svg:d="M219 109c1 61-50 113-110 111-52-1-108-41-109-108 0-61 46-109 105-112 55-3 112 38 114 109z">
          <text:p/>
        </draw:path>
        <draw:path draw:style-name="gr9" draw:text-style-name="P7" draw:layer="layout" svg:width="0.217cm" svg:height="0.218cm" svg:x="10.988cm" svg:y="24.083cm" svg:viewBox="0 0 218 219" svg:d="M112 219c-59 2-113-49-112-109 0-57 49-108 106-110 58-1 109 46 112 104 4 58-43 112-106 115z">
          <text:p/>
        </draw:path>
        <draw:path draw:style-name="gr9" draw:text-style-name="P7" draw:layer="layout" svg:width="0.219cm" svg:height="0.218cm" svg:x="7.192cm" svg:y="22.038cm" svg:viewBox="0 0 220 219" svg:d="M219 114c0 54-45 105-111 105-60 1-113-55-108-114 5-64 54-109 119-105 50 2 104 48 100 114z">
          <text:p/>
        </draw:path>
        <draw:path draw:style-name="gr9" draw:text-style-name="P7" draw:layer="layout" svg:width="0.217cm" svg:height="0.216cm" svg:x="7.486cm" svg:y="19.12cm" svg:viewBox="0 0 218 217" svg:d="M107 217c-59 0-107-50-107-108 0-59 48-110 106-109 68 0 112 50 112 111-1 59-52 106-111 106z">
          <text:p/>
        </draw:path>
        <draw:path draw:style-name="gr9" draw:text-style-name="P7" draw:layer="layout" svg:width="0.218cm" svg:height="0.216cm" svg:x="13.324cm" svg:y="21.748cm" svg:viewBox="0 0 219 217" svg:d="M111 217c-65 3-110-55-111-106-1-49 37-111 112-111 59 0 108 50 107 109-2 63-53 109-108 108z">
          <text:p/>
        </draw:path>
        <draw:path draw:style-name="gr9" draw:text-style-name="P7" draw:layer="layout" svg:width="0.218cm" svg:height="0.218cm" svg:x="12.74cm" svg:y="22.914cm" svg:viewBox="0 0 219 219" svg:d="M107 219c-57-1-107-52-107-109s48-111 113-110c58 1 107 52 106 109-1 68-58 113-112 110z">
          <text:p/>
        </draw:path>
        <draw:path draw:style-name="gr9" draw:text-style-name="P7" draw:layer="layout" svg:width="0.219cm" svg:height="0.219cm" svg:x="9.528cm" svg:y="24.083cm" svg:viewBox="0 0 220 220" svg:d="M100 219c-67-8-106-66-99-122 7-58 60-102 118-97s105 58 101 115c-4 62-61 110-120 104z">
          <text:p/>
        </draw:path>
        <draw:path draw:style-name="gr9" draw:text-style-name="P7" draw:layer="layout" svg:width="0.218cm" svg:height="0.216cm" svg:x="8.945cm" svg:y="17.953cm" svg:viewBox="0 0 219 217" svg:d="M107 217c-65-1-108-57-107-111 0-59 49-106 110-106 62 0 112 51 109 113-2 49-43 106-112 104z">
          <text:p/>
        </draw:path>
        <draw:path draw:style-name="gr9" draw:text-style-name="P7" draw:layer="layout" svg:width="0.218cm" svg:height="0.218cm" svg:x="12.157cm" svg:y="23.498cm" svg:viewBox="0 0 219 219" svg:d="M219 109c1 56-47 111-111 110-61-2-108-49-108-108-1-70 58-112 112-111 57 1 106 51 107 109z">
          <text:p/>
        </draw:path>
        <draw:path draw:style-name="gr9" draw:text-style-name="P7" draw:layer="layout" svg:width="0.217cm" svg:height="0.217cm" svg:x="8.07cm" svg:y="18.536cm" svg:viewBox="0 0 218 218" svg:d="M0 110c-2-57 44-113 112-110 69 3 105 54 106 109 0 64-52 110-112 109-57-1-109-50-106-108z">
          <text:p/>
        </draw:path>
        <draw:path draw:style-name="gr9" draw:text-style-name="P7" draw:layer="layout" svg:width="0.216cm" svg:height="0.217cm" svg:x="8.362cm" svg:y="18.244cm" svg:viewBox="0 0 217 218" svg:d="M108 0c59 0 109 49 109 107 1 59-45 108-105 111-59 3-113-51-112-110s50-108 108-108z">
          <text:p/>
        </draw:path>
        <draw:path draw:style-name="gr9" draw:text-style-name="P7" draw:layer="layout" svg:width="0.216cm" svg:height="0.216cm" svg:x="6.903cm" svg:y="20.872cm" svg:viewBox="0 0 217 217" svg:d="M217 106c-1 52-35 107-106 111-50 3-106-36-111-103-4-60 47-114 107-114 59 0 109 49 110 106z">
          <text:p/>
        </draw:path>
        <draw:path draw:style-name="gr9" draw:text-style-name="P7" draw:layer="layout" svg:width="0.216cm" svg:height="0.214cm" svg:x="11.573cm" svg:y="17.954cm" svg:viewBox="0 0 217 215" svg:d="M107 215c-60 1-107-49-107-107 0-56 44-108 108-108 72 0 109 63 109 108-1 53-45 108-110 107z">
          <text:p/>
        </draw:path>
        <draw:path draw:style-name="gr9" draw:text-style-name="P7" draw:layer="layout" svg:width="0.216cm" svg:height="0.214cm" svg:x="6.903cm" svg:y="21.166cm" svg:viewBox="0 0 217 215" svg:d="M106 215c-62 0-107-54-106-109 0-46 38-107 110-106 65 1 108 55 107 110-2 60-50 107-111 105z">
          <text:p/>
        </draw:path>
        <draw:path draw:style-name="gr9" draw:text-style-name="P7" draw:layer="layout" svg:width="0.216cm" svg:height="0.217cm" svg:x="13.032cm" svg:y="19.412cm" svg:viewBox="0 0 217 218" svg:d="M217 109c2 52-39 108-107 109-66 0-112-50-110-113 2-68 60-105 111-105 54 1 108 48 106 109z">
          <text:p/>
        </draw:path>
        <draw:path draw:style-name="gr9" draw:text-style-name="P7" draw:layer="layout" svg:width="0.215cm" svg:height="0.217cm" svg:x="10.406cm" svg:y="17.66cm" svg:viewBox="0 0 216 218" svg:d="M105 0c59 0 109 48 111 104 2 52-36 108-103 114-59 5-112-47-113-109 0-58 47-107 105-109z">
          <text:p/>
        </draw:path>
        <draw:path draw:style-name="gr9" draw:text-style-name="P7" draw:layer="layout" svg:width="0.215cm" svg:height="0.215cm" svg:x="10.699cm" svg:y="17.661cm" svg:viewBox="0 0 216 216" svg:d="M0 108c-1-50 39-107 108-108 59-1 108 50 108 109-1 58-51 108-110 107-57 0-106-50-106-108z">
          <text:p/>
        </draw:path>
        <draw:path draw:style-name="gr9" draw:text-style-name="P7" draw:layer="layout" svg:width="0.216cm" svg:height="0.214cm" svg:x="12.741cm" svg:y="18.83cm" svg:viewBox="0 0 217 215" svg:d="M110 0c58 0 110 51 107 108-3 61-45 106-109 107-59 1-108-50-108-109 1-58 51-107 110-106z">
          <text:p/>
        </draw:path>
        <draw:path draw:style-name="gr9" draw:text-style-name="P7" draw:layer="layout" svg:width="0.216cm" svg:height="0.217cm" svg:x="10.113cm" svg:y="17.66cm" svg:viewBox="0 0 217 218" svg:d="M108 0c59 1 108 49 109 107 1 61-53 114-113 111-58-3-104-52-104-111 0-50 41-105 108-107z">
          <text:p/>
        </draw:path>
        <draw:path draw:style-name="gr9" draw:text-style-name="P7" draw:layer="layout" svg:width="0.215cm" svg:height="0.215cm" svg:x="6.903cm" svg:y="21.456cm" svg:viewBox="0 0 216 216" svg:d="M0 107c1-59 52-108 111-107 57 1 109 54 105 111-3 64-49 105-109 105s-108-51-107-109z">
          <text:p/>
        </draw:path>
        <draw:path draw:style-name="gr9" draw:text-style-name="P7" draw:layer="layout" svg:width="0.217cm" svg:height="0.216cm" svg:x="12.448cm" svg:y="23.208cm" svg:viewBox="0 0 218 217" svg:d="M218 106c2 62-48 111-109 111-60 1-107-45-109-105-2-63 49-112 109-112 59 0 109 49 109 106z">
          <text:p/>
        </draw:path>
        <draw:path draw:style-name="gr9" draw:text-style-name="P7" draw:layer="layout" svg:width="0.215cm" svg:height="0.212cm" svg:x="6.903cm" svg:y="20.582cm" svg:viewBox="0 0 216 213" svg:d="M107 0c59-3 108 42 109 105 2 61-48 107-105 108-63 1-109-48-111-104-1-55 42-110 107-109z">
          <text:p/>
        </draw:path>
        <draw:path draw:style-name="gr9" draw:text-style-name="P7" draw:layer="layout" svg:width="0.215cm" svg:height="0.214cm" svg:x="12.158cm" svg:y="18.245cm" svg:viewBox="0 0 216 215" svg:d="M216 109c-1 58-52 107-110 106s-107-53-106-110c2-58 52-106 110-105 51 1 105 41 106 109z">
          <text:p/>
        </draw:path>
        <draw:path draw:style-name="gr9" draw:text-style-name="P7" draw:layer="layout" svg:width="0.212cm" svg:height="0.215cm" svg:x="9.824cm" svg:y="17.661cm" svg:viewBox="0 0 213 216" svg:d="M213 112c0 55-48 107-110 104s-105-53-103-113c2-64 59-106 111-103 61 3 106 53 102 112z">
          <text:p/>
        </draw:path>
        <draw:path draw:style-name="gr9" draw:text-style-name="P7" draw:layer="layout" svg:width="0.215cm" svg:height="0.214cm" svg:x="13.325cm" svg:y="19.997cm" svg:viewBox="0 0 216 215" svg:d="M109 0c57-1 108 45 107 109-1 63-50 107-110 106-70-1-107-62-106-109 1-50 43-108 109-106z">
          <text:p/>
        </draw:path>
        <draw:path draw:style-name="gr9" draw:text-style-name="P7" draw:layer="layout" svg:width="0.215cm" svg:height="0.215cm" svg:x="9.53cm" svg:y="17.661cm" svg:viewBox="0 0 216 216" svg:d="M105 0c57-2 109 47 111 105 2 56-48 110-106 111-56 0-106-41-110-106-3-57 47-108 105-110z">
          <text:p/>
        </draw:path>
        <draw:path draw:style-name="gr9" draw:text-style-name="P7" draw:layer="layout" svg:width="0.214cm" svg:height="0.215cm" svg:x="6.904cm" svg:y="20.289cm" svg:viewBox="0 0 215 216" svg:d="M110 216c-57 1-109-48-110-106-2-57 47-108 106-110 57-1 109 48 109 106-1 68-51 107-105 110z">
          <text:p/>
        </draw:path>
        <draw:path draw:style-name="gr9" draw:text-style-name="P7" draw:layer="layout" svg:width="0.213cm" svg:height="0.216cm" svg:x="9.24cm" svg:y="24.084cm" svg:viewBox="0 0 214 217" svg:d="M0 108c-1-63 55-108 108-108 47 0 107 38 106 110 0 69-58 109-108 107-58-1-108-49-106-109z">
          <text:p/>
        </draw:path>
        <draw:path draw:style-name="gr9" draw:text-style-name="P7" draw:layer="layout" svg:width="0.216cm" svg:height="0.215cm" svg:x="8.653cm" svg:y="23.792cm" svg:viewBox="0 0 217 216" svg:d="M111 216c-62 3-109-49-111-105-1-61 46-109 104-111 65-3 113 48 113 107 0 60-48 110-106 109z">
          <text:p/>
        </draw:path>
        <draw:path draw:style-name="gr9" draw:text-style-name="P7" draw:layer="layout" svg:width="0.214cm" svg:height="0.215cm" svg:x="7.195cm" svg:y="22.333cm" svg:viewBox="0 0 215 216" svg:d="M105 216c-60-2-107-51-105-110 2-68 54-108 109-106 70 2 108 61 106 110-2 59-51 107-110 106z">
          <text:p/>
        </draw:path>
        <draw:path draw:style-name="gr9" draw:text-style-name="P7" draw:layer="layout" svg:width="0.213cm" svg:height="0.214cm" svg:x="8.947cm" svg:y="24.085cm" svg:viewBox="0 0 214 215" svg:d="M213 116c-7 60-62 107-118 98-58-9-100-59-95-113 5-59 58-106 114-100 60 6 106 60 99 115z">
          <text:p/>
        </draw:path>
        <draw:path draw:style-name="gr9" draw:text-style-name="P7" draw:layer="layout" svg:width="0.214cm" svg:height="0.215cm" svg:x="11.282cm" svg:y="24.084cm" svg:viewBox="0 0 215 216" svg:d="M106 0c59-1 108 47 109 107 1 66-49 109-106 109-67 1-108-54-109-105 0-56 43-108 106-111z">
          <text:p/>
        </draw:path>
        <draw:path draw:style-name="gr9" draw:text-style-name="P7" draw:layer="layout" svg:width="0.213cm" svg:height="0.215cm" svg:x="8.071cm" svg:y="23.499cm" svg:viewBox="0 0 214 216" svg:d="M214 107c0 67-50 109-106 109-67 1-108-55-108-107-1-55 43-107 105-109 60-1 108 47 109 107z">
          <text:p/>
        </draw:path>
        <draw:path draw:style-name="gr9" draw:text-style-name="P7" draw:layer="layout" svg:width="0.215cm" svg:height="0.214cm" svg:x="13.325cm" svg:y="22.04cm" svg:viewBox="0 0 216 215" svg:d="M106 215c-60-2-107-50-106-109 2-57 53-108 111-106 59 2 108 53 105 111-4 65-52 104-110 104z">
          <text:p/>
        </draw:path>
        <draw:path draw:style-name="gr9" draw:text-style-name="P7" draw:layer="layout" svg:width="0.214cm" svg:height="0.215cm" svg:x="7.487cm" svg:y="22.916cm" svg:viewBox="0 0 215 216" svg:d="M108 216c-71-3-108-60-108-108 1-59 50-109 108-108 53 2 105 37 107 109 1 58-49 107-107 107z">
          <text:p/>
        </draw:path>
        <draw:path draw:style-name="gr9" draw:text-style-name="P7" draw:layer="layout" svg:width="0.213cm" svg:height="0.213cm" svg:x="13.034cm" svg:y="22.626cm" svg:viewBox="0 0 214 214" svg:d="M104 0c59-2 109 45 110 104 1 60-44 108-104 110-61 1-109-44-110-104-2-60 44-109 104-110z">
          <text:p/>
        </draw:path>
        <draw:path draw:style-name="gr9" draw:text-style-name="P7" draw:layer="layout" svg:width="0.212cm" svg:height="0.214cm" svg:x="13.326cm" svg:y="19.705cm" svg:viewBox="0 0 213 215" svg:d="M107 215c-72-5-108-63-107-110 1-58 53-110 110-105 59 4 102 44 103 105 2 59-47 110-106 110z">
          <text:p/>
        </draw:path>
        <draw:path draw:style-name="gr9" draw:text-style-name="P7" draw:layer="layout" svg:width="0.213cm" svg:height="0.214cm" svg:x="12.45cm" svg:y="18.538cm" svg:viewBox="0 0 214 215" svg:d="M214 110c-1 59-48 104-109 105-49 0-106-42-105-109 2-61 48-106 108-106 63 1 109 54 106 110z">
          <text:p/>
        </draw:path>
        <draw:path draw:style-name="gr9" draw:text-style-name="P7" draw:layer="layout" svg:width="0.212cm" svg:height="0.213cm" svg:x="10.992cm" svg:y="17.662cm" svg:viewBox="0 0 213 214" svg:d="M213 107c-1 59-53 111-110 107-57-3-102-42-103-105-2-72 54-108 104-109 59-2 109 50 109 107z">
          <text:p/>
        </draw:path>
        <draw:path draw:style-name="gr9" draw:text-style-name="P7" draw:layer="layout" svg:width="0.214cm" svg:height="0.213cm" svg:x="11.866cm" svg:y="23.793cm" svg:viewBox="0 0 215 214" svg:d="M105 214c-55 1-106-48-105-109 1-53 46-106 109-105 56 1 107 48 106 110-1 58-52 107-110 104z">
          <text:p/>
        </draw:path>
        <draw:path draw:style-name="gr9" draw:text-style-name="P7" draw:layer="layout" svg:width="0.212cm" svg:height="0.211cm" svg:x="8.365cm" svg:y="23.794cm" svg:viewBox="0 0 213 212" svg:d="M213 103c1 59-49 109-106 109-49 1-104-35-107-100-3-68 51-111 101-112 64-2 110 50 112 103z">
          <text:p/>
        </draw:path>
        <draw:path draw:style-name="gr9" draw:text-style-name="P7" draw:layer="layout" svg:width="0.211cm" svg:height="0.211cm" svg:x="7.197cm" svg:y="19.415cm" svg:viewBox="0 0 212 212" svg:d="M212 109c-1 59-49 104-110 103-58-1-106-50-102-112 3-56 48-101 106-100 59 0 107 49 106 109z">
          <text:p/>
        </draw:path>
        <draw:path draw:style-name="gr9" draw:text-style-name="P7" draw:layer="layout" svg:width="0.214cm" svg:height="0.212cm" svg:x="7.78cm" svg:y="23.21cm" svg:viewBox="0 0 215 213" svg:d="M108 0c59 0 106 48 107 108 1 47-40 106-109 105-57 0-106-46-106-107 1-63 55-109 108-106z">
          <text:p/>
        </draw:path>
        <draw:path draw:style-name="gr9" draw:text-style-name="P7" draw:layer="layout" svg:width="0.212cm" svg:height="0.211cm" svg:x="6.905cm" svg:y="21.751cm" svg:viewBox="0 0 213 212" svg:d="M103 212c-50 1-106-43-103-110 2-59 48-105 112-102 52 3 101 44 101 108 0 59-51 106-110 104z">
          <text:p/>
        </draw:path>
        <draw:path draw:style-name="gr9" draw:text-style-name="P7" draw:layer="layout" svg:width="0.211cm" svg:height="0.21cm" svg:x="7.782cm" svg:y="18.54cm" svg:viewBox="0 0 212 211" svg:d="M107 211c-47 2-108-37-107-108 1-56 48-103 106-103 67 0 108 60 106 109-2 56-49 102-105 102z">
          <text:p/>
        </draw:path>
        <draw:path draw:style-name="gr9" draw:text-style-name="P7" draw:layer="layout" svg:width="0.21cm" svg:height="0.211cm" svg:x="12.452cm" svg:y="23.501cm" svg:viewBox="0 0 211 212" svg:d="M0 104c-1-55 48-107 110-104 69 4 101 62 101 106 1 49-37 107-106 106-66 0-108-52-105-108z">
          <text:p/>
        </draw:path>
        <draw:path draw:style-name="gr9" draw:text-style-name="P7" draw:layer="layout" svg:width="0.211cm" svg:height="0.212cm" svg:x="13.035cm" svg:y="19.123cm" svg:viewBox="0 0 212 213" svg:d="M107 0c61 1 107 49 105 109-1 55-49 103-105 104-59 0-107-48-107-108-1-59 46-106 107-105z">
          <text:p/>
        </draw:path>
        <draw:path draw:style-name="gr9" draw:text-style-name="P7" draw:layer="layout" svg:width="0.211cm" svg:height="0.21cm" svg:x="11.575cm" svg:y="24.087cm" svg:viewBox="0 0 212 211" svg:d="M0 106c3-63 45-103 103-106 53-2 108 34 109 106 0 61-45 107-108 105-61-2-101-45-104-105z">
          <text:p/>
        </draw:path>
        <draw:path draw:style-name="gr9" draw:text-style-name="P7" draw:layer="layout" svg:width="0.212cm" svg:height="0.211cm" svg:x="12.743cm" svg:y="23.21cm" svg:viewBox="0 0 213 212" svg:d="M107 212c-58 1-107-47-107-107 0-56 48-102 104-105 47-2 107 33 109 104 1 64-51 109-106 108z">
          <text:p/>
        </draw:path>
        <draw:path draw:style-name="gr9" draw:text-style-name="P7" draw:layer="layout" svg:width="0.21cm" svg:height="0.21cm" svg:x="13.621cm" svg:y="21.168cm" svg:viewBox="0 0 211 211" svg:d="M106 0c54-1 103 45 105 103 1 59-47 108-106 108-59-1-103-45-105-102-2-65 52-111 106-109z">
          <text:p/>
        </draw:path>
        <draw:path draw:style-name="gr9" draw:text-style-name="P7" draw:layer="layout" svg:width="0.21cm" svg:height="0.21cm" svg:x="11.868cm" svg:y="17.956cm" svg:viewBox="0 0 211 211" svg:d="M211 108c-1 58-47 103-105 103-60 0-107-48-106-109 1-53 48-102 105-102 56 0 109 47 106 108z">
          <text:p/>
        </draw:path>
        <draw:path draw:style-name="gr9" draw:text-style-name="P7" draw:layer="layout" svg:width="0.212cm" svg:height="0.211cm" svg:x="8.655cm" svg:y="17.956cm" svg:viewBox="0 0 213 212" svg:d="M113 0c49 0 104 46 100 114-3 51-49 99-109 98-54-1-106-48-104-110 2-51 46-107 113-102z">
          <text:p/>
        </draw:path>
        <draw:path draw:style-name="gr9" draw:text-style-name="P7" draw:layer="layout" svg:width="0.209cm" svg:height="0.209cm" svg:x="9.826cm" svg:y="24.379cm" svg:viewBox="0 0 210 210" svg:d="M210 102c1 59-48 109-106 108-57-1-103-49-104-104-1-56 45-104 99-106 68-3 111 54 111 102z">
          <text:p/>
        </draw:path>
        <draw:path draw:style-name="gr9" draw:text-style-name="P7" draw:layer="layout" svg:width="0.21cm" svg:height="0.209cm" svg:x="13.327cm" svg:y="22.336cm" svg:viewBox="0 0 211 210" svg:d="M0 103c1-48 39-105 111-103 55 1 101 47 100 105-1 60-51 109-109 105-63-4-101-55-102-107z">
          <text:p/>
        </draw:path>
        <draw:path draw:style-name="gr9" draw:text-style-name="P7" draw:layer="layout" svg:width="0.21cm" svg:height="0.21cm" svg:x="7.489cm" svg:y="18.831cm" svg:viewBox="0 0 211 211" svg:d="M102 0c56-2 105 44 108 100 4 61-41 110-102 111-66 2-104-49-108-99-5-56 44-109 102-112z">
          <text:p/>
        </draw:path>
        <draw:path draw:style-name="gr9" draw:text-style-name="P7" draw:layer="layout" svg:width="0.208cm" svg:height="0.21cm" svg:x="11.285cm" svg:y="17.663cm" svg:viewBox="0 0 209 211" svg:d="M209 105c2 51-37 102-100 105-59 3-110-47-109-106 0-57 52-110 109-104 64 4 102 53 100 105z">
          <text:p/>
        </draw:path>
        <draw:path draw:style-name="gr9" draw:text-style-name="P7" draw:layer="layout" svg:width="0.21cm" svg:height="0.21cm" svg:x="13.621cm" svg:y="20.875cm" svg:viewBox="0 0 211 211" svg:d="M211 107c-1 56-47 104-103 104-64 1-109-48-108-105 0-53 38-102 103-106 56-4 108 49 108 107z">
          <text:p/>
        </draw:path>
        <draw:path draw:style-name="gr9" draw:text-style-name="P7" draw:layer="layout" svg:width="0.209cm" svg:height="0.208cm" svg:x="13.621cm" svg:y="20.584cm" svg:viewBox="0 0 210 209" svg:d="M105 0c56-3 106 47 105 106-1 57-48 102-104 103-50 1-104-40-106-101-2-66 54-110 105-108z">
          <text:p/>
        </draw:path>
        <draw:path draw:style-name="gr9" draw:text-style-name="P7" draw:layer="layout" svg:width="0.211cm" svg:height="0.21cm" svg:x="6.905cm" svg:y="19.999cm" svg:viewBox="0 0 212 211" svg:d="M106 211c-56 1-106-46-106-108 1-57 49-103 105-103 60 0 109 50 107 108-3 66-55 104-106 103z">
          <text:p/>
        </draw:path>
        <draw:path draw:style-name="gr9" draw:text-style-name="P7" draw:layer="layout" svg:width="0.21cm" svg:height="0.21cm" svg:x="7.197cm" svg:y="22.627cm" svg:viewBox="0 0 211 211" svg:d="M104 211c-56 1-107-48-104-110 3-66 63-103 108-101 56 2 102 49 103 105 1 45-36 108-107 106z">
          <text:p/>
        </draw:path>
        <draw:path draw:style-name="gr9" draw:text-style-name="P7" draw:layer="layout" svg:width="0.21cm" svg:height="0.21cm" svg:x="10.409cm" svg:y="24.379cm" svg:viewBox="0 0 211 211" svg:d="M107 0c62-1 104 54 104 103 0 58-50 108-108 108-46-1-102-40-103-106-1-58 48-108 107-105z">
          <text:p/>
        </draw:path>
        <draw:path draw:style-name="gr9" draw:text-style-name="P7" draw:layer="layout" svg:width="0.21cm" svg:height="0.209cm" svg:x="10.115cm" svg:y="24.379cm" svg:viewBox="0 0 211 210" svg:d="M211 102c1 60-45 109-105 108-55 0-105-48-106-103-1-54 43-104 101-107 61-3 110 44 110 102z">
          <text:p/>
        </draw:path>
        <draw:path draw:style-name="gr9" draw:text-style-name="P7" draw:layer="layout" svg:width="0.209cm" svg:height="0.209cm" svg:x="6.906cm" svg:y="22.042cm" svg:viewBox="0 0 210 210" svg:d="M105 0c58 0 107 50 105 109-2 61-51 101-103 101-61 1-108-46-107-106 1-56 49-103 105-104z">
          <text:p/>
        </draw:path>
        <draw:path draw:style-name="gr9" draw:text-style-name="P7" draw:layer="layout" svg:width="0.21cm" svg:height="0.21cm" svg:x="9.241cm" svg:y="17.663cm" svg:viewBox="0 0 211 211" svg:d="M211 109c1 47-37 102-104 102-73 0-109-61-107-107 3-57 50-105 106-104 65 2 108 53 105 109z">
          <text:p/>
        </draw:path>
        <draw:path draw:style-name="gr9" draw:text-style-name="P7" draw:layer="layout" svg:width="0.209cm" svg:height="0.209cm" svg:x="10.701cm" svg:y="24.379cm" svg:viewBox="0 0 210 210" svg:d="M210 102c1 60-45 108-104 108-55 0-105-46-106-102-1-60 47-105 100-108 60-3 110 44 110 102z">
          <text:p/>
        </draw:path>
        <draw:path draw:style-name="gr9" draw:text-style-name="P7" draw:layer="layout" svg:width="0.21cm" svg:height="0.209cm" svg:x="8.072cm" svg:y="18.247cm" svg:viewBox="0 0 211 210" svg:d="M211 103c3 58-45 108-106 107-57 0-103-45-105-101-1-48 36-109 106-109 55-1 105 45 105 103z">
          <text:p/>
        </draw:path>
        <draw:path draw:style-name="gr9" draw:text-style-name="P7" draw:layer="layout" svg:width="0.209cm" svg:height="0.208cm" svg:x="13.621cm" svg:y="21.459cm" svg:viewBox="0 0 210 209" svg:d="M210 105c1 56-45 103-101 104-61 2-108-43-109-103 0-56 42-104 102-106 63-2 107 49 108 105z">
          <text:p/>
        </draw:path>
        <draw:path draw:style-name="gr9" draw:text-style-name="P7" draw:layer="layout" svg:width="0.209cm" svg:height="0.209cm" svg:x="13.036cm" svg:y="22.919cm" svg:viewBox="0 0 210 210" svg:d="M0 103c-1-52 42-102 103-103 59 0 109 48 107 108-1 55-49 103-105 102-60 0-107-47-105-107z">
          <text:p/>
        </draw:path>
        <draw:path draw:style-name="gr9" draw:text-style-name="P7" draw:layer="layout" svg:width="0.209cm" svg:height="0.209cm" svg:x="12.161cm" svg:y="23.795cm" svg:viewBox="0 0 210 210" svg:d="M108 210c-60 1-108-47-108-105 1-57 46-103 104-105 51-2 106 40 106 107 1 55-47 102-102 103z">
          <text:p/>
        </draw:path>
        <draw:path draw:style-name="gr9" draw:text-style-name="P7" draw:layer="layout" svg:width="0.208cm" svg:height="0.208cm" svg:x="13.328cm" svg:y="19.416cm" svg:viewBox="0 0 209 209" svg:d="M104 0c45-1 103 35 105 102 2 62-49 106-98 107-61 2-110-44-111-103-1-55 48-105 104-106z">
          <text:p/>
        </draw:path>
        <draw:path draw:style-name="gr9" draw:text-style-name="P7" draw:layer="layout" svg:width="0.207cm" svg:height="0.207cm" svg:x="10.994cm" svg:y="24.38cm" svg:viewBox="0 0 208 208" svg:d="M105 208c-46 1-103-36-105-102-1-64 53-105 100-106 54-2 107 39 108 104 1 56-48 104-103 104z">
          <text:p/>
        </draw:path>
        <draw:path draw:style-name="gr9" draw:text-style-name="P7" draw:layer="layout" svg:width="0.207cm" svg:height="0.207cm" svg:x="7.199cm" svg:y="19.125cm" svg:viewBox="0 0 208 208" svg:d="M208 102c1 56-46 106-102 106-64 1-104-50-106-100-3-58 45-108 103-108 59 1 103 47 105 102z">
          <text:p/>
        </draw:path>
        <draw:path draw:style-name="gr9" draw:text-style-name="P7" draw:layer="layout" svg:width="0.208cm" svg:height="0.207cm" svg:x="13.622cm" svg:y="20.294cm" svg:viewBox="0 0 209 208" svg:d="M107 0c56 1 102 47 102 104 0 56-48 105-104 104-63-1-107-51-105-108 1-49 43-102 107-100z">
          <text:p/>
        </draw:path>
        <draw:path draw:style-name="gr9" draw:text-style-name="P7" draw:layer="layout" svg:width="0.207cm" svg:height="0.207cm" svg:x="12.453cm" svg:y="18.248cm" svg:viewBox="0 0 208 208" svg:d="M208 101c3 46-34 105-99 107-59 1-105-42-109-98-3-49 33-107 104-110 54-2 103 46 104 101z">
          <text:p/>
        </draw:path>
        <draw:path draw:style-name="gr9" draw:text-style-name="P7" draw:layer="layout" svg:width="0.208cm" svg:height="0.209cm" svg:x="9.533cm" svg:y="24.379cm" svg:viewBox="0 0 209 210" svg:d="M209 102c1 57-43 105-99 108-59 2-111-47-110-105 2-66 54-104 104-105 52 0 103 40 105 102z">
          <text:p/>
        </draw:path>
        <draw:path draw:style-name="gr9" draw:text-style-name="P7" draw:layer="layout" svg:width="0.208cm" svg:height="0.208cm" svg:x="13.622cm" svg:y="21.753cm" svg:viewBox="0 0 209 209" svg:d="M209 106c-1 55-50 103-106 103-55-1-105-47-103-109 2-52 47-102 107-100 51 1 101 44 102 106z">
          <text:p/>
        </draw:path>
        <draw:path draw:style-name="gr9" draw:text-style-name="P7" draw:layer="layout" svg:width="0.207cm" svg:height="0.207cm" svg:x="8.074cm" svg:y="23.796cm" svg:viewBox="0 0 208 208" svg:d="M106 208c-56 1-105-47-106-103-1-55 47-104 103-105 58 0 103 45 105 102 1 58-48 105-102 106z">
          <text:p/>
        </draw:path>
        <draw:path draw:style-name="gr9" draw:text-style-name="P7" draw:layer="layout" svg:width="0.207cm" svg:height="0.207cm" svg:x="7.784cm" svg:y="23.503cm" svg:viewBox="0 0 208 208" svg:d="M102 0c57 0 106 47 106 104 0 45-35 103-104 104-63 0-104-51-104-103-1-51 38-103 102-105z">
          <text:p/>
        </draw:path>
        <draw:path draw:style-name="gr9" draw:text-style-name="P7" draw:layer="layout" svg:width="0.207cm" svg:height="0.207cm" svg:x="7.49cm" svg:y="23.212cm" svg:viewBox="0 0 208 208" svg:d="M104 208c-56 0-103-46-104-102s47-104 103-106c59-1 106 46 105 107-1 58-46 102-104 101z">
          <text:p/>
        </draw:path>
        <draw:path draw:style-name="gr9" draw:text-style-name="P7" draw:layer="layout" svg:width="0.207cm" svg:height="0.208cm" svg:x="8.368cm" svg:y="17.957cm" svg:viewBox="0 0 208 209" svg:d="M106 209c-45 3-104-35-106-101-3-69 57-109 104-108 56 2 103 48 104 103 0 56-47 105-102 106z">
          <text:p/>
        </draw:path>
        <draw:path draw:style-name="gr9" draw:text-style-name="P7" draw:layer="layout" svg:width="0.206cm" svg:height="0.207cm" svg:x="12.746cm" svg:y="18.542cm" svg:viewBox="0 0 207 208" svg:d="M101 0c52-3 105 39 106 99s-46 110-105 109c-56-1-103-50-102-105 1-67 55-105 101-103z">
          <text:p/>
        </draw:path>
        <draw:path draw:style-name="gr9" draw:text-style-name="P7" draw:layer="layout" svg:width="0.206cm" svg:height="0.205cm" svg:x="9.243cm" svg:y="24.381cm" svg:viewBox="0 0 207 206" svg:d="M0 100c3-60 53-102 107-100 56 1 101 48 100 104-1 57-50 104-105 102-56-1-103-50-102-106z">
          <text:p/>
        </draw:path>
        <draw:path draw:style-name="gr9" draw:text-style-name="P7" draw:layer="layout" svg:width="0.208cm" svg:height="0.208cm" svg:x="8.657cm" svg:y="24.088cm" svg:viewBox="0 0 209 209" svg:d="M104 0c57 0 104 47 105 103 1 60-47 107-107 106-57-2-102-48-102-105 1-56 48-104 104-104z">
          <text:p/>
        </draw:path>
        <draw:path draw:style-name="gr9" draw:text-style-name="P7" draw:layer="layout" svg:width="0.206cm" svg:height="0.206cm" svg:x="6.908cm" svg:y="19.709cm" svg:viewBox="0 0 207 207" svg:d="M101 0c58-2 105 43 106 102 0 59-41 104-102 105-55 1-103-37-105-101-2-60 42-105 101-106z">
          <text:p/>
        </draw:path>
        <draw:path draw:style-name="gr9" draw:text-style-name="P7" draw:layer="layout" svg:width="0.206cm" svg:height="0.205cm" svg:x="13.037cm" svg:y="18.834cm" svg:viewBox="0 0 207 206" svg:d="M105 206c-60 3-105-50-105-101 0-49 36-104 103-105 64 0 103 49 104 103 2 53-41 104-102 103z">
          <text:p/>
        </draw:path>
        <draw:path draw:style-name="gr9" draw:text-style-name="P7" draw:layer="layout" svg:width="0.204cm" svg:height="0.205cm" svg:x="13.33cm" svg:y="22.63cm" svg:viewBox="0 0 205 206" svg:d="M205 104c2 57-50 102-102 102-47 0-103-35-103-103 1-67 53-104 103-103 61 0 104 50 102 104z">
          <text:p/>
        </draw:path>
        <draw:path draw:style-name="gr9" draw:text-style-name="P7" draw:layer="layout" svg:width="0.204cm" svg:height="0.205cm" svg:x="11.287cm" svg:y="24.381cm" svg:viewBox="0 0 205 206" svg:d="M105 0c57 1 102 48 100 105-1 54-46 101-100 101-52-1-103-38-105-104-1-56 49-103 105-102z">
          <text:p/>
        </draw:path>
        <draw:path draw:style-name="gr9" draw:text-style-name="P7" draw:layer="layout" svg:width="0.206cm" svg:height="0.206cm" svg:x="13.623cm" svg:y="20.001cm" svg:viewBox="0 0 207 207" svg:d="M103 207c-57 0-102-47-103-104-1-51 43-102 104-103 54-1 103 49 103 103-1 56-48 104-104 104z">
          <text:p/>
        </draw:path>
        <draw:path draw:style-name="gr9" draw:text-style-name="P7" draw:layer="layout" svg:width="0.207cm" svg:height="0.206cm" svg:x="8.951cm" svg:y="17.665cm" svg:viewBox="0 0 208 207" svg:d="M208 105c-3 59-44 102-104 102-58 1-104-45-104-103 1-58 43-104 104-104 61 1 101 45 104 105z">
          <text:p/>
        </draw:path>
        <draw:path draw:style-name="gr9" draw:text-style-name="P7" draw:layer="layout" svg:width="0.205cm" svg:height="0.205cm" svg:x="6.616cm" svg:y="20.585cm" svg:viewBox="0 0 206 206" svg:d="M101 0c55-1 104 47 105 103 1 55-48 104-103 103-54 0-101-45-103-98-2-56 44-106 101-108z">
          <text:p/>
        </draw:path>
        <draw:path draw:style-name="gr9" draw:text-style-name="P7" draw:layer="layout" svg:width="0.204cm" svg:height="0.205cm" svg:x="9.828cm" svg:y="17.375cm" svg:viewBox="0 0 205 206" svg:d="M103 206c-57 0-104-47-103-104 0-49 40-103 106-102 53 1 99 47 99 102 1 67-56 105-102 104z">
          <text:p/>
        </draw:path>
        <draw:path draw:style-name="gr9" draw:text-style-name="P7" draw:layer="layout" svg:width="0.205cm" svg:height="0.204cm" svg:x="6.616cm" svg:y="21.171cm" svg:viewBox="0 0 206 205" svg:d="M102 0c56-1 104 47 104 103 0 54-45 101-99 102-58 2-106-45-107-100-2-57 46-105 102-105z">
          <text:p/>
        </draw:path>
        <draw:path draw:style-name="gr9" draw:text-style-name="P7" draw:layer="layout" svg:width="0.204cm" svg:height="0.205cm" svg:x="10.412cm" svg:y="17.375cm" svg:viewBox="0 0 205 206" svg:d="M0 98c2-49 41-98 104-98 56 1 102 46 101 106-1 57-51 102-107 100-57-3-101-51-98-108z">
          <text:p/>
        </draw:path>
        <draw:path draw:style-name="gr9" draw:text-style-name="P7" draw:layer="layout" svg:width="0.203cm" svg:height="0.204cm" svg:x="13.624cm" svg:y="22.045cm" svg:viewBox="0 0 204 205" svg:d="M102 205c-58 0-103-46-102-103 0-58 50-106 105-102 59 4 98 45 99 102 1 69-57 105-102 103z">
          <text:p/>
        </draw:path>
        <draw:path draw:style-name="gr9" draw:text-style-name="P7" draw:layer="layout" svg:width="0.206cm" svg:height="0.203cm" svg:x="6.615cm" svg:y="20.879cm" svg:viewBox="0 0 207 204" svg:d="M207 100c2 45-34 103-101 104-69 1-105-57-106-101-1-45 35-103 103-103 56-1 103 44 104 100z">
          <text:p/>
        </draw:path>
        <draw:path draw:style-name="gr9" draw:text-style-name="P7" draw:layer="layout" svg:width="0.205cm" svg:height="0.206cm" svg:x="10.118cm" svg:y="17.374cm" svg:viewBox="0 0 206 207" svg:d="M101 0c50 0 104 40 105 101 1 63-52 106-101 106-56 1-103-44-105-101-2-55 45-104 101-106z">
          <text:p/>
        </draw:path>
        <draw:path draw:style-name="gr9" draw:text-style-name="P7" draw:layer="layout" svg:width="0.206cm" svg:height="0.204cm" svg:x="11.87cm" svg:y="24.09cm" svg:viewBox="0 0 207 205" svg:d="M104 205c-68 1-103-58-104-102-1-43 33-102 102-103 57 0 104 45 105 101 1 46-38 104-103 104z">
          <text:p/>
        </draw:path>
        <draw:path draw:style-name="gr9" draw:text-style-name="P7" draw:layer="layout" svg:width="0.203cm" svg:height="0.204cm" svg:x="6.909cm" svg:y="22.338cm" svg:viewBox="0 0 204 205" svg:d="M204 103c1 60-47 104-103 102s-99-42-101-100 43-104 102-105c54-2 104 44 102 103z">
          <text:p/>
        </draw:path>
        <draw:path draw:style-name="gr9" draw:text-style-name="P7" draw:layer="layout" svg:width="0.203cm" svg:height="0.201cm" svg:x="8.66cm" svg:y="17.668cm" svg:viewBox="0 0 204 202" svg:d="M204 101c0 48-40 103-105 101-55-1-97-44-99-99-3-46 34-102 100-103 67-1 105 56 104 101z">
          <text:p/>
        </draw:path>
        <draw:path draw:style-name="gr9" draw:text-style-name="P7" draw:layer="layout" svg:width="0.203cm" svg:height="0.204cm" svg:x="13.039cm" svg:y="23.214cm" svg:viewBox="0 0 204 205" svg:d="M104 205c-58 1-104-46-104-102-1-46 35-103 104-103 47 1 95 35 100 100 4 54-45 104-100 105z">
          <text:p/>
        </draw:path>
        <draw:path draw:style-name="gr9" draw:text-style-name="P7" draw:layer="layout" svg:width="0.202cm" svg:height="0.203cm" svg:x="10.705cm" svg:y="17.376cm" svg:viewBox="0 0 203 204" svg:d="M0 102c-1-55 47-105 103-102 65 2 99 53 100 98 2 60-47 105-99 106-56 2-104-45-104-102z">
          <text:p/>
        </draw:path>
        <draw:path draw:style-name="gr9" draw:text-style-name="P7" draw:layer="layout" svg:width="0.203cm" svg:height="0.205cm" svg:x="12.164cm" svg:y="17.959cm" svg:viewBox="0 0 204 206" svg:d="M102 0c44-2 102 35 102 103-1 70-62 104-104 103-46-2-98-39-100-101-1-68 56-106 102-105z">
          <text:p/>
        </draw:path>
        <draw:path draw:style-name="gr9" draw:text-style-name="P7" draw:layer="layout" svg:width="0.205cm" svg:height="0.203cm" svg:x="7.199cm" svg:y="22.922cm" svg:viewBox="0 0 206 204" svg:d="M105 0c59-1 103 49 101 105-2 52-40 97-100 99-69 1-105-57-106-101 0-49 42-105 105-103z">
          <text:p/>
        </draw:path>
        <draw:path draw:style-name="gr9" draw:text-style-name="P7" draw:layer="layout" svg:width="0.204cm" svg:height="0.201cm" svg:x="6.616cm" svg:y="20.296cm" svg:viewBox="0 0 205 202" svg:d="M102 202c-67 1-103-58-102-103 1-46 40-101 106-99 53 1 98 43 99 99 1 49-37 104-103 103z">
          <text:p/>
        </draw:path>
        <draw:path draw:style-name="gr9" draw:text-style-name="P7" draw:layer="layout" svg:width="0.204cm" svg:height="0.205cm" svg:x="12.455cm" svg:y="23.798cm" svg:viewBox="0 0 205 206" svg:d="M0 96c3-55 55-101 109-96 65 6 96 59 96 104-1 55-52 104-106 101-56-3-102-54-99-109z">
          <text:p/>
        </draw:path>
        <draw:path draw:style-name="gr9" draw:text-style-name="P7" draw:layer="layout" svg:width="0.201cm" svg:height="0.204cm" svg:x="9.537cm" svg:y="17.376cm" svg:viewBox="0 0 202 205" svg:d="M202 99c3 65-53 105-100 106-43 0-103-36-102-104 0-59 45-98 97-101 49-3 105 36 105 99z">
          <text:p/>
        </draw:path>
        <draw:path draw:style-name="gr9" draw:text-style-name="P7" draw:layer="layout" svg:width="0.203cm" svg:height="0.203cm" svg:x="6.617cm" svg:y="21.755cm" svg:viewBox="0 0 204 204" svg:d="M0 103c0-62 52-104 103-103 55 2 101 46 101 100 0 51-37 103-105 104-54 0-99-48-99-101z">
          <text:p/>
        </draw:path>
        <draw:path draw:style-name="gr9" draw:text-style-name="P7" draw:layer="layout" svg:width="0.204cm" svg:height="0.202cm" svg:x="6.616cm" svg:y="21.463cm" svg:viewBox="0 0 205 203" svg:d="M104 203c-60 2-104-49-104-102 0-56 48-102 104-101 65 2 100 53 101 98 1 59-47 106-101 105z">
          <text:p/>
        </draw:path>
        <draw:path draw:style-name="gr9" draw:text-style-name="P7" draw:layer="layout" svg:width="0.202cm" svg:height="0.202cm" svg:x="12.748cm" svg:y="23.506cm" svg:viewBox="0 0 203 203" svg:d="M203 100c3 57-44 104-100 103-60-1-104-44-103-102 1-57 45-100 99-101 60-2 105 47 104 100z">
          <text:p/>
        </draw:path>
        <draw:path draw:style-name="gr9" draw:text-style-name="P7" draw:layer="layout" svg:width="0.203cm" svg:height="0.203cm" svg:x="7.493cm" svg:y="18.543cm" svg:viewBox="0 0 204 204" svg:d="M101 0c52-2 103 44 103 103 0 49-38 102-103 101-51 0-98-35-101-98-3-56 44-105 101-106z">
          <text:p/>
        </draw:path>
        <draw:path draw:style-name="gr9" draw:text-style-name="P7" draw:layer="layout" svg:width="0.201cm" svg:height="0.203cm" svg:x="10.996cm" svg:y="17.376cm" svg:viewBox="0 0 202 204" svg:d="M202 102c0 57-48 104-104 102-58-3-98-51-98-101 0-52 41-104 104-103 52 2 98 41 98 102z">
          <text:p/>
        </draw:path>
        <draw:path draw:style-name="gr9" draw:text-style-name="P7" draw:layer="layout" svg:width="0.202cm" svg:height="0.202cm" svg:x="13.332cm" svg:y="19.127cm" svg:viewBox="0 0 203 203" svg:d="M203 101c2 44-32 100-98 102-59 2-105-41-105-102-1-55 44-99 98-101 57-2 107 46 105 101z">
          <text:p/>
        </draw:path>
        <draw:path draw:style-name="gr9" draw:text-style-name="P7" draw:layer="layout" svg:width="0.203cm" svg:height="0.202cm" svg:x="7.785cm" svg:y="18.251cm" svg:viewBox="0 0 204 203" svg:d="M104 203c-59 2-104-50-104-102 1-57 48-103 105-101 60 2 98 45 99 98 2 66-51 107-100 105z">
          <text:p/>
        </draw:path>
        <draw:path draw:style-name="gr9" draw:text-style-name="P7" draw:layer="layout" svg:width="0.203cm" svg:height="0.203cm" svg:x="11.579cm" svg:y="17.667cm" svg:viewBox="0 0 204 204" svg:d="M204 101c1 58-43 103-102 103-56 0-99-42-102-97-3-58 40-106 99-107 59-2 105 42 105 101z">
          <text:p/>
        </draw:path>
        <draw:path draw:style-name="gr9" draw:text-style-name="P7" draw:layer="layout" svg:width="0.202cm" svg:height="0.203cm" svg:x="6.91cm" svg:y="19.419cm" svg:viewBox="0 0 203 204" svg:d="M102 204c-55 0-101-43-102-98-1-63 45-106 102-106 65 1 99 51 101 99 2 64-52 107-101 105z">
          <text:p/>
        </draw:path>
        <draw:path draw:style-name="gr9" draw:text-style-name="P7" draw:layer="layout" svg:width="0.202cm" svg:height="0.202cm" svg:x="8.077cm" svg:y="17.96cm" svg:viewBox="0 0 203 203" svg:d="M203 99c1 56-47 105-102 104-54 0-99-45-101-100-1-55 47-104 103-103 54 1 98 46 100 99z">
          <text:p/>
        </draw:path>
        <draw:path draw:style-name="gr9" draw:text-style-name="P7" draw:layer="layout" svg:width="0.2cm" svg:height="0.202cm" svg:x="8.954cm" svg:y="24.382cm" svg:viewBox="0 0 201 203" svg:d="M0 99c-1-59 51-98 99-99 45-1 103 37 102 103-1 53-40 99-100 100-62 1-104-50-101-104z">
          <text:p/>
        </draw:path>
        <draw:path draw:style-name="gr9" draw:text-style-name="P7" draw:layer="layout" svg:width="0.201cm" svg:height="0.199cm" svg:x="11.873cm" svg:y="17.669cm" svg:viewBox="0 0 202 200" svg:d="M202 99c-1 54-43 103-104 101-48-1-98-36-98-100-1-56 43-101 104-100 60 1 97 52 98 99z">
          <text:p/>
        </draw:path>
        <draw:path draw:style-name="gr9" draw:text-style-name="P7" draw:layer="layout" svg:width="0.202cm" svg:height="0.201cm" svg:x="13.624cm" svg:y="19.711cm" svg:viewBox="0 0 203 202" svg:d="M101 202c-55-1-100-45-101-100-1-50 42-103 104-102 44 1 97 32 99 99 2 54-40 104-102 103z">
          <text:p/>
        </draw:path>
        <draw:path draw:style-name="gr9" draw:text-style-name="P7" draw:layer="layout" svg:width="0.2cm" svg:height="0.201cm" svg:x="11.58cm" svg:y="24.382cm" svg:viewBox="0 0 201 202" svg:d="M201 103c1 49-35 98-97 99-65 2-104-50-104-101 1-60 52-100 99-101 46-1 104 36 102 103z">
          <text:p/>
        </draw:path>
        <draw:path draw:style-name="gr9" draw:text-style-name="P7" draw:layer="layout" svg:width="0.203cm" svg:height="0.202cm" svg:x="8.369cm" svg:y="24.091cm" svg:viewBox="0 0 204 203" svg:d="M204 101c-2 64-51 103-105 102s-99-49-99-102c0-50 43-103 106-101 51 2 96 40 98 101z">
          <text:p/>
        </draw:path>
        <draw:path draw:style-name="gr9" draw:text-style-name="P7" draw:layer="layout" svg:width="0.2cm" svg:height="0.198cm" svg:x="9.83cm" svg:y="24.677cm" svg:viewBox="0 0 201 199" svg:d="M97 199c-47-1-98-40-97-102 2-53 44-100 108-97 47 3 91 39 93 99 1 56-48 102-104 100z">
          <text:p/>
        </draw:path>
        <draw:path draw:style-name="gr9" draw:text-style-name="P7" draw:layer="layout" svg:width="0.201cm" svg:height="0.199cm" svg:x="7.201cm" svg:y="18.838cm" svg:viewBox="0 0 202 200" svg:d="M101 200c-57 1-103-50-101-105 2-54 47-96 103-95 56 0 98 41 99 97 1 69-57 106-101 103z">
          <text:p/>
        </draw:path>
        <draw:path draw:style-name="gr9" draw:text-style-name="P7" draw:layer="layout" svg:width="0.201cm" svg:height="0.202cm" svg:x="13.916cm" svg:y="21.172cm" svg:viewBox="0 0 202 203" svg:d="M202 100c0 54-45 100-99 103-52 2-100-43-103-97-2-55 45-106 101-106 53 1 100 47 101 100z">
          <text:p/>
        </draw:path>
        <draw:path draw:style-name="gr9" draw:text-style-name="P7" draw:layer="layout" svg:width="0.201cm" svg:height="0.202cm" svg:x="6.617cm" svg:y="20.004cm" svg:viewBox="0 0 202 203" svg:d="M93 202c-54-7-97-56-93-107 4-54 53-99 104-95 58 3 104 56 97 109-7 55-56 98-108 93z">
          <text:p/>
        </draw:path>
        <draw:path draw:style-name="gr9" draw:text-style-name="P7" draw:layer="layout" svg:width="0.2cm" svg:height="0.199cm" svg:x="13.625cm" svg:y="22.34cm" svg:viewBox="0 0 201 200" svg:d="M201 98c-1 59-42 100-96 102-56 1-102-40-105-95-3-56 43-105 101-105 54 0 99 43 100 98z">
          <text:p/>
        </draw:path>
        <draw:path draw:style-name="gr9" draw:text-style-name="P7" draw:layer="layout" svg:width="0.2cm" svg:height="0.199cm" svg:x="13.917cm" svg:y="20.881cm" svg:viewBox="0 0 201 200" svg:d="M101 200c-46 2-99-33-101-97-2-65 50-101 95-103 67-2 106 54 106 101-1 53-45 99-100 99z">
          <text:p/>
        </draw:path>
        <draw:path draw:style-name="gr9" draw:text-style-name="P7" draw:layer="layout" svg:width="0.2cm" svg:height="0.2cm" svg:x="6.911cm" svg:y="22.633cm" svg:viewBox="0 0 201 201" svg:d="M201 102c0 57-51 99-101 99-44 1-103-36-100-105 2-50 40-98 103-96 64 1 100 54 98 102z">
          <text:p/>
        </draw:path>
        <draw:path draw:style-name="gr9" draw:text-style-name="P7" draw:layer="layout" svg:width="0.202cm" svg:height="0.202cm" svg:x="9.246cm" svg:y="17.377cm" svg:viewBox="0 0 203 203" svg:d="M92 202c-54-7-97-58-91-108 7-55 56-99 108-94 57 6 101 60 93 113-8 54-58 95-110 89z">
          <text:p/>
        </draw:path>
        <draw:path draw:style-name="gr9" draw:text-style-name="P7" draw:layer="layout" svg:width="0.199cm" svg:height="0.198cm" svg:x="7.495cm" svg:y="23.508cm" svg:viewBox="0 0 200 199" svg:d="M200 96c2 55-41 100-96 103-54 3-101-39-104-94-2-59 40-104 98-105 63-2 103 51 102 96z">
          <text:p/>
        </draw:path>
        <draw:path draw:style-name="gr9" draw:text-style-name="P7" draw:layer="layout" svg:width="0.198cm" svg:height="0.198cm" svg:x="10.414cm" svg:y="24.677cm" svg:viewBox="0 0 199 199" svg:d="M199 98c0 55-45 101-99 101-46 1-98-37-100-100-2-42 34-99 99-99 54 0 99 41 100 98z">
          <text:p/>
        </draw:path>
        <draw:path draw:style-name="gr9" draw:text-style-name="P7" draw:layer="layout" svg:width="0.199cm" svg:height="0.199cm" svg:x="13.04cm" svg:y="18.545cm" svg:viewBox="0 0 200 200" svg:d="M200 98c1 55-41 100-97 102-54 1-100-42-103-96-3-55 45-104 100-104 54-1 99 44 100 98z">
          <text:p/>
        </draw:path>
        <draw:path draw:style-name="gr9" draw:text-style-name="P7" draw:layer="layout" svg:width="0.199cm" svg:height="0.199cm" svg:x="12.166cm" svg:y="24.093cm" svg:viewBox="0 0 200 200" svg:d="M200 99c2 58-49 100-97 101-56 1-104-47-103-102 1-49 43-99 101-98 54 0 100 45 99 99z">
          <text:p/>
        </draw:path>
        <draw:path draw:style-name="gr9" draw:text-style-name="P7" draw:layer="layout" svg:width="0.198cm" svg:height="0.199cm" svg:x="13.918cm" svg:y="20.588cm" svg:viewBox="0 0 199 200" svg:d="M199 100c1 52-44 100-97 100-48 1-100-32-102-95-3-68 53-105 100-105 53 0 98 47 99 100z">
          <text:p/>
        </draw:path>
        <draw:path draw:style-name="gr9" draw:text-style-name="P7" draw:layer="layout" svg:width="0.199cm" svg:height="0.2cm" svg:x="12.457cm" svg:y="17.961cm" svg:viewBox="0 0 200 201" svg:d="M98 201c-64-4-97-52-98-101-1-54 51-105 104-100 63 6 98 53 96 103-3 63-51 96-102 98z">
          <text:p/>
        </draw:path>
        <draw:path draw:style-name="gr9" draw:text-style-name="P7" draw:layer="layout" svg:width="0.199cm" svg:height="0.199cm" svg:x="7.787cm" svg:y="23.8cm" svg:viewBox="0 0 200 200" svg:d="M200 97c0 55-37 98-95 103-54 5-105-46-105-101 0-53 46-99 100-99 42-1 97 30 100 97z">
          <text:p/>
        </draw:path>
        <draw:path draw:style-name="gr9" draw:text-style-name="P7" draw:layer="layout" svg:width="0.199cm" svg:height="0.198cm" svg:x="13.917cm" svg:y="21.465cm" svg:viewBox="0 0 200 199" svg:d="M101 199c-54 1-101-43-101-99 0-59 47-99 100-100 65 0 100 56 100 98 0 55-45 101-99 101z">
          <text:p/>
        </draw:path>
        <draw:path draw:style-name="gr9" draw:text-style-name="P7" draw:layer="layout" svg:width="0.2cm" svg:height="0.198cm" svg:x="6.618cm" svg:y="22.049cm" svg:viewBox="0 0 201 199" svg:d="M103 199c-53 1-100-42-103-96-1-41 29-100 96-103 63-3 103 44 105 99 1 53-45 99-98 100z">
          <text:p/>
        </draw:path>
        <draw:path draw:style-name="gr9" draw:text-style-name="P7" draw:layer="layout" svg:width="0.199cm" svg:height="0.199cm" svg:x="13.334cm" svg:y="22.924cm" svg:viewBox="0 0 200 200" svg:d="M200 100c1 46-38 99-98 100-57 1-101-43-102-96-2-64 51-105 101-104 54 0 99 47 99 100z">
          <text:p/>
        </draw:path>
        <draw:path draw:style-name="gr9" draw:text-style-name="P7" draw:layer="layout" svg:width="0.197cm" svg:height="0.197cm" svg:x="13.918cm" svg:y="20.298cm" svg:viewBox="0 0 198 198" svg:d="M95 0c47-2 100 34 103 97 3 48-38 99-97 101-51 2-99-38-101-95-1-57 41-102 95-103z">
          <text:p/>
        </draw:path>
        <draw:path draw:style-name="gr9" draw:text-style-name="P7" draw:layer="layout" svg:width="0.198cm" svg:height="0.199cm" svg:x="12.75cm" svg:y="18.253cm" svg:viewBox="0 0 199 200" svg:d="M199 96c4 61-48 102-94 104-50 2-105-39-105-101 0-52 43-98 99-99 62-1 102 52 100 96z">
          <text:p/>
        </draw:path>
        <draw:path draw:style-name="gr9" draw:text-style-name="P7" draw:layer="layout" svg:width="0.196cm" svg:height="0.196cm" svg:x="8.08cm" svg:y="24.094cm" svg:viewBox="0 0 197 197" svg:d="M100 197c-55 1-100-43-100-99 1-54 42-95 95-98 53-2 100 38 102 95 2 60-46 103-97 102z">
          <text:p/>
        </draw:path>
        <draw:path draw:style-name="gr9" draw:text-style-name="P7" draw:layer="layout" svg:width="0.199cm" svg:height="0.199cm" svg:x="10.122cm" svg:y="24.677cm" svg:viewBox="0 0 200 200" svg:d="M200 98c0 55-43 99-97 102-49 2-105-38-103-103 1-56 44-97 101-97 64-1 101 56 99 98z">
          <text:p/>
        </draw:path>
        <draw:path draw:style-name="gr9" draw:text-style-name="P7" draw:layer="layout" svg:width="0.198cm" svg:height="0.199cm" svg:x="7.202cm" svg:y="23.217cm" svg:viewBox="0 0 199 200" svg:d="M0 96c2-53 49-99 102-96 60 2 100 48 97 105-3 54-51 99-103 95-54-4-98-51-96-104z">
          <text:p/>
        </draw:path>
        <draw:path draw:style-name="gr9" draw:text-style-name="P7" draw:layer="layout" svg:width="0.199cm" svg:height="0.2cm" svg:x="11.291cm" svg:y="17.378cm" svg:viewBox="0 0 200 201" svg:d="M200 100c0 52-44 98-98 101-55 2-103-46-102-103 2-57 44-97 100-98 54-1 99 47 100 100z">
          <text:p/>
        </draw:path>
        <draw:path draw:style-name="gr9" draw:text-style-name="P7" draw:layer="layout" svg:width="0.196cm" svg:height="0.196cm" svg:x="8.956cm" svg:y="17.38cm" svg:viewBox="0 0 197 197" svg:d="M96 0c68-1 101 55 101 97 0 49-36 99-100 100-51 2-95-44-97-95-2-55 41-101 96-102z">
          <text:p/>
        </draw:path>
        <draw:path draw:style-name="gr9" draw:text-style-name="P7" draw:layer="layout" svg:width="0.196cm" svg:height="0.197cm" svg:x="13.335cm" svg:y="18.839cm" svg:viewBox="0 0 197 198" svg:d="M102 198c-46 2-101-36-102-98-1-58 47-98 93-100 65-2 103 51 104 95 2 54-42 101-95 103z">
          <text:p/>
        </draw:path>
        <draw:path draw:style-name="gr9" draw:text-style-name="P7" draw:layer="layout" svg:width="0.197cm" svg:height="0.197cm" svg:x="6.912cm" svg:y="19.129cm" svg:viewBox="0 0 198 198" svg:d="M198 100c3 45-37 99-99 98-57 0-99-48-99-99 1-59 51-100 100-99 54 0 99 45 98 100z">
          <text:p/>
        </draw:path>
        <draw:path draw:style-name="gr9" draw:text-style-name="P7" draw:layer="layout" svg:width="0.197cm" svg:height="0.197cm" svg:x="8.663cm" svg:y="24.384cm" svg:viewBox="0 0 198 198" svg:d="M96 198c-58-1-97-47-96-101 0-54 48-100 101-97 57 3 98 45 97 101-1 51-39 98-102 97z">
          <text:p/>
        </draw:path>
        <draw:path draw:style-name="gr9" draw:text-style-name="P7" draw:layer="layout" svg:width="0.197cm" svg:height="0.196cm" svg:x="10.998cm" svg:y="24.678cm" svg:viewBox="0 0 198 197" svg:d="M100 0c52-2 99 43 98 100-2 62-56 97-95 97-56 1-102-43-103-98-1-45 36-100 100-99z">
          <text:p/>
        </draw:path>
        <draw:path draw:style-name="gr9" draw:text-style-name="P7" draw:layer="layout" svg:width="0.197cm" svg:height="0.198cm" svg:x="10.708cm" svg:y="24.677cm" svg:viewBox="0 0 198 199" svg:d="M97 199c-54-1-97-46-97-101 0-53 45-99 101-98 61 2 99 57 97 102-1 54-47 97-101 97z">
          <text:p/>
        </draw:path>
        <draw:path draw:style-name="gr9" draw:text-style-name="P7" draw:layer="layout" svg:width="0.197cm" svg:height="0.198cm" svg:x="9.539cm" svg:y="24.677cm" svg:viewBox="0 0 198 199" svg:d="M198 103c-1 54-47 96-101 96-44-1-98-40-97-102 1-48 44-98 102-97 56 2 99 52 96 103z">
          <text:p/>
        </draw:path>
        <draw:path draw:style-name="gr9" draw:text-style-name="P7" draw:layer="layout" svg:width="0.196cm" svg:height="0.197cm" svg:x="6.62cm" svg:y="19.713cm" svg:viewBox="0 0 197 198" svg:d="M197 102c-3 61-53 98-104 96-43-2-91-36-93-99-2-54 46-99 100-99 55 1 99 47 97 102z">
          <text:p/>
        </draw:path>
        <draw:path draw:style-name="gr9" draw:text-style-name="P7" draw:layer="layout" svg:width="0.195cm" svg:height="0.196cm" svg:x="11.583cm" svg:y="17.38cm" svg:viewBox="0 0 196 197" svg:d="M0 100c-1-56 44-100 99-100 53 1 95 41 97 94 2 48-31 98-95 103-52 3-101-43-101-97z">
          <text:p/>
        </draw:path>
        <draw:path draw:style-name="gr9" draw:text-style-name="P7" draw:layer="layout" svg:width="0.195cm" svg:height="0.196cm" svg:x="12.752cm" svg:y="23.801cm" svg:viewBox="0 0 196 197" svg:d="M196 100c0 54-45 98-100 97s-98-46-96-101c1-53 45-95 97-96 53-1 99 45 99 100z">
          <text:p/>
        </draw:path>
        <draw:path draw:style-name="gr9" draw:text-style-name="P7" draw:layer="layout" svg:width="0.198cm" svg:height="0.197cm" svg:x="8.371cm" svg:y="17.67cm" svg:viewBox="0 0 199 198" svg:d="M101 198c-54 2-100-44-101-98 0-52 44-100 100-100 55 1 98 43 99 99 2 62-54 101-98 99z">
          <text:p/>
        </draw:path>
        <draw:path draw:style-name="gr9" draw:text-style-name="P7" draw:layer="layout" svg:width="0.196cm" svg:height="0.195cm" svg:x="7.497cm" svg:y="18.255cm" svg:viewBox="0 0 197 196" svg:d="M197 99c-2 54-49 99-102 97-44-1-97-40-95-104 2-47 45-93 99-92 59 0 99 51 98 99z">
          <text:p/>
        </draw:path>
        <draw:path draw:style-name="gr9" draw:text-style-name="P7" draw:layer="layout" svg:width="0.197cm" svg:height="0.197cm" svg:x="13.626cm" svg:y="19.423cm" svg:viewBox="0 0 198 198" svg:d="M198 99c0 54-46 100-99 99-54-1-99-48-99-101 0-42 34-98 101-97 56 0 98 43 97 99z">
          <text:p/>
        </draw:path>
        <draw:path draw:style-name="gr9" draw:text-style-name="P7" draw:layer="layout" svg:width="0.195cm" svg:height="0.196cm" svg:x="13.042cm" svg:y="23.509cm" svg:viewBox="0 0 196 197" svg:d="M97 197c-51-1-99-43-97-102 3-61 54-97 104-95 52 3 92 45 92 98 0 64-57 102-99 99z">
          <text:p/>
        </draw:path>
        <draw:path draw:style-name="gr9" draw:text-style-name="P7" draw:layer="layout" svg:width="0.194cm" svg:height="0.195cm" svg:x="10.124cm" svg:y="17.087cm" svg:viewBox="0 0 195 196" svg:d="M99 196c-53 2-97-44-99-93-2-64 52-103 97-103 50 0 100 41 98 101-1 57-48 96-96 95z">
          <text:p/>
        </draw:path>
        <draw:path draw:style-name="gr9" draw:text-style-name="P7" draw:layer="layout" svg:width="0.194cm" svg:height="0.194cm" svg:x="12.459cm" svg:y="24.095cm" svg:viewBox="0 0 195 195" svg:d="M195 97c0 53-41 96-92 98-56 3-102-42-103-96-1-55 45-100 101-99 52 1 94 43 94 97z">
          <text:p/>
        </draw:path>
        <draw:path draw:style-name="gr9" draw:text-style-name="P7" draw:layer="layout" svg:width="0.195cm" svg:height="0.195cm" svg:x="13.627cm" svg:y="22.636cm" svg:viewBox="0 0 196 196" svg:d="M97 0c56-2 100 42 99 98 0 59-46 95-94 98-52 3-101-42-102-96-1-47 34-101 97-100z">
          <text:p/>
        </draw:path>
        <draw:path draw:style-name="gr9" draw:text-style-name="P7" draw:layer="layout" svg:width="0.196cm" svg:height="0.197cm" svg:x="13.919cm" svg:y="21.757cm" svg:viewBox="0 0 197 198" svg:d="M101 198c-57 1-100-41-101-96-1-67 53-101 99-102 53 0 99 48 98 102-1 42-33 94-96 96z">
          <text:p/>
        </draw:path>
        <draw:path draw:style-name="gr9" draw:text-style-name="P7" draw:layer="layout" svg:width="0.195cm" svg:height="0.195cm" svg:x="12.168cm" svg:y="17.671cm" svg:viewBox="0 0 196 196" svg:d="M101 196c-54 1-101-43-101-97-1-53 46-100 99-99 52 1 95 42 97 93 3 59-47 103-95 103z">
          <text:p/>
        </draw:path>
        <draw:path draw:style-name="gr9" draw:text-style-name="P7" draw:layer="layout" svg:width="0.196cm" svg:height="0.196cm" svg:x="6.913cm" svg:y="22.925cm" svg:viewBox="0 0 197 197" svg:d="M101 197c-55 3-101-47-101-98 0-54 47-99 100-99 51 1 94 43 97 94 2 55-41 102-96 103z">
          <text:p/>
        </draw:path>
        <draw:path draw:style-name="gr9" draw:text-style-name="P7" draw:layer="layout" svg:width="0.195cm" svg:height="0.195cm" svg:x="11.876cm" svg:y="24.385cm" svg:viewBox="0 0 196 196" svg:d="M100 196c-57 1-100-42-100-98 0-66 56-99 100-98 51 0 95 43 96 95 1 51-37 101-96 101z">
          <text:p/>
        </draw:path>
        <draw:path draw:style-name="gr9" draw:text-style-name="P7" draw:layer="layout" svg:width="0.195cm" svg:height="0.195cm" svg:x="13.919cm" svg:y="20.007cm" svg:viewBox="0 0 196 196" svg:d="M100 0c54 1 101 49 96 102-4 55-43 93-96 94s-100-40-100-98c0-54 43-99 100-98z">
          <text:p/>
        </draw:path>
        <draw:path draw:style-name="gr9" draw:text-style-name="P7" draw:layer="layout" svg:width="0.194cm" svg:height="0.194cm" svg:x="7.204cm" svg:y="18.547cm" svg:viewBox="0 0 195 195" svg:d="M101 195c-63 2-102-50-101-98 2-53 39-94 97-97 50-2 99 38 98 100-1 53-41 94-94 95z">
          <text:p/>
        </draw:path>
        <draw:path draw:style-name="gr9" draw:text-style-name="P7" draw:layer="layout" svg:width="0.193cm" svg:height="0.193cm" svg:x="8.373cm" svg:y="24.386cm" svg:viewBox="0 0 194 194" svg:d="M194 96c1 54-39 95-91 98-62 3-102-48-103-95-1-53 48-102 100-99 63 4 95 52 94 96z">
          <text:p/>
        </draw:path>
        <draw:path draw:style-name="gr9" draw:text-style-name="P7" draw:layer="layout" svg:width="0.193cm" svg:height="0.193cm" svg:x="6.331cm" svg:y="20.3cm" svg:viewBox="0 0 194 194" svg:d="M194 95c1 55-44 100-99 99-51 0-94-43-95-95-2-53 44-100 97-99 58 2 96 49 97 95z">
          <text:p/>
        </draw:path>
        <draw:path draw:style-name="gr9" draw:text-style-name="P7" draw:layer="layout" svg:width="0.195cm" svg:height="0.193cm" svg:x="13.336cm" svg:y="23.22cm" svg:viewBox="0 0 196 194" svg:d="M0 91c1-42 37-93 100-91 65 2 96 58 96 97-1 54-50 101-102 97-60-4-97-50-94-103z">
          <text:p/>
        </draw:path>
        <draw:path draw:style-name="gr9" draw:text-style-name="P7" draw:layer="layout" svg:width="0.194cm" svg:height="0.195cm" svg:x="6.33cm" svg:y="20.883cm" svg:viewBox="0 0 195 196" svg:d="M195 97c1 54-45 99-99 99-53-1-98-48-96-101 1-52 44-94 95-95 54-1 100 43 100 97z">
          <text:p/>
        </draw:path>
        <draw:path draw:style-name="gr9" draw:text-style-name="P7" draw:layer="layout" svg:width="0.193cm" svg:height="0.193cm" svg:x="13.628cm" svg:y="19.131cm" svg:viewBox="0 0 194 194" svg:d="M98 194c-52 2-98-40-98-99 1-52 46-95 97-95 48 0 99 38 97 101-1 52-42 93-96 93z">
          <text:p/>
        </draw:path>
        <draw:path draw:style-name="gr9" draw:text-style-name="P7" draw:layer="layout" svg:width="0.193cm" svg:height="0.194cm" svg:x="10.416cm" svg:y="17.088cm" svg:viewBox="0 0 194 195" svg:d="M194 97c2 60-52 97-93 98-55 0-101-44-101-98 0-53 47-99 101-97 41 1 94 36 93 97z">
          <text:p/>
        </draw:path>
        <draw:path draw:style-name="gr9" draw:text-style-name="P7" draw:layer="layout" svg:width="0.193cm" svg:height="0.193cm" svg:x="9.541cm" svg:y="17.088cm" svg:viewBox="0 0 194 194" svg:d="M194 99c-2 58-52 98-102 95-51-3-92-46-92-97 1-47 36-94 95-97 52-2 100 45 99 99z">
          <text:p/>
        </draw:path>
        <draw:path draw:style-name="gr9" draw:text-style-name="P7" draw:layer="layout" svg:width="0.195cm" svg:height="0.195cm" svg:x="6.62cm" svg:y="22.342cm" svg:viewBox="0 0 196 196" svg:d="M196 98c-1 60-48 99-100 98-46-1-92-35-96-96-3-52 44-100 97-100 55-1 100 44 99 98z">
          <text:p/>
        </draw:path>
        <draw:path draw:style-name="gr9" draw:text-style-name="P7" draw:layer="layout" svg:width="0.195cm" svg:height="0.195cm" svg:x="9.25cm" svg:y="24.678cm" svg:viewBox="0 0 196 196" svg:d="M94 196c-54-2-97-50-94-104 2-57 51-96 104-92 51 3 93 47 92 98-2 54-49 100-102 98z">
          <text:p/>
        </draw:path>
        <draw:path draw:style-name="gr9" draw:text-style-name="P7" draw:layer="layout" svg:width="0.193cm" svg:height="0.194cm" svg:x="11.294cm" svg:y="24.679cm" svg:viewBox="0 0 194 195" svg:d="M97 0c44-1 93 32 97 95 2 53-46 101-100 100-45-1-97-38-94-103 2-52 44-92 97-92z">
          <text:p/>
        </draw:path>
        <draw:path draw:style-name="gr9" draw:text-style-name="P7" draw:layer="layout" svg:width="0.192cm" svg:height="0.193cm" svg:x="6.915cm" svg:y="18.841cm" svg:viewBox="0 0 193 194" svg:d="M193 97c1 51-43 97-94 97-63 0-101-51-99-100 1-52 45-94 98-94 52 1 95 44 95 97z">
          <text:p/>
        </draw:path>
        <draw:path draw:style-name="gr9" draw:text-style-name="P7" draw:layer="layout" svg:width="0.193cm" svg:height="0.192cm" svg:x="8.957cm" svg:y="24.68cm" svg:viewBox="0 0 194 193" svg:d="M194 99c-1 45-38 95-98 94-58-1-95-48-96-97 0-53 46-99 101-96 52 2 95 46 93 99z">
          <text:p/>
        </draw:path>
        <draw:path draw:style-name="gr9" draw:text-style-name="P7" draw:layer="layout" svg:width="0.194cm" svg:height="0.193cm" svg:x="7.789cm" svg:y="17.964cm" svg:viewBox="0 0 195 194" svg:d="M195 99c0 53-40 94-94 95-63 2-100-49-101-97 0-52 44-96 96-97 59-1 100 44 99 99z">
          <text:p/>
        </draw:path>
        <draw:path draw:style-name="gr9" draw:text-style-name="P7" draw:layer="layout" svg:width="0.193cm" svg:height="0.192cm" svg:x="6.331cm" svg:y="21.468cm" svg:viewBox="0 0 194 193" svg:d="M194 98c-1 46-37 96-99 95-57 0-94-45-95-96-1-54 45-100 100-97 53 2 95 46 94 98z">
          <text:p/>
        </draw:path>
        <draw:path draw:style-name="gr9" draw:text-style-name="P7" draw:layer="layout" svg:width="0.193cm" svg:height="0.193cm" svg:x="10.71cm" svg:y="17.088cm" svg:viewBox="0 0 194 194" svg:d="M95 194c-52 0-94-43-95-95-1-54 43-97 94-99 48-1 100 36 100 100-1 53-46 94-99 94z">
          <text:p/>
        </draw:path>
        <draw:path draw:style-name="gr9" draw:text-style-name="P7" draw:layer="layout" svg:width="0.192cm" svg:height="0.193cm" svg:x="6.622cm" svg:y="19.425cm" svg:viewBox="0 0 193 194" svg:d="M0 99c0-63 48-97 91-99 56-3 101 39 102 94 1 62-48 100-96 100-46-1-92-32-97-95z">
          <text:p/>
        </draw:path>
        <draw:path draw:style-name="gr9" draw:text-style-name="P7" draw:layer="layout" svg:width="0.191cm" svg:height="0.193cm" svg:x="13.044cm" svg:y="18.256cm" svg:viewBox="0 0 192 194" svg:d="M192 96c2 55-42 95-92 98-53 2-102-46-100-99 1-54 45-94 97-95 47-1 97 41 95 96z">
          <text:p/>
        </draw:path>
        <draw:path draw:style-name="gr9" draw:text-style-name="P7" draw:layer="layout" svg:width="0.193cm" svg:height="0.193cm" svg:x="8.082cm" svg:y="17.672cm" svg:viewBox="0 0 194 194" svg:d="M98 194c-45 1-97-36-98-94 0-54 40-98 93-100 54-2 101 43 101 98-1 51-45 95-96 96z">
          <text:p/>
        </draw:path>
        <draw:path draw:style-name="gr9" draw:text-style-name="P7" draw:layer="layout" svg:width="0.192cm" svg:height="0.193cm" svg:x="13.921cm" svg:y="19.715cm" svg:viewBox="0 0 193 194" svg:d="M94 194c-41 1-94-36-94-97 0-59 50-96 93-97 54-1 102 47 100 100-4 52-47 94-99 94z">
          <text:p/>
        </draw:path>
        <draw:path draw:style-name="gr9" draw:text-style-name="P7" draw:layer="layout" svg:width="0.193cm" svg:height="0.192cm" svg:x="13.92cm" svg:y="22.052cm" svg:viewBox="0 0 194 193" svg:d="M94 0c56-3 99 40 100 95 2 51-41 97-93 98-50 2-100-36-101-97 0-54 45-97 94-96z">
          <text:p/>
        </draw:path>
        <draw:path draw:style-name="gr9" draw:text-style-name="P7" draw:layer="layout" svg:width="0.194cm" svg:height="0.193cm" svg:x="6.33cm" svg:y="21.176cm" svg:viewBox="0 0 195 194" svg:d="M99 194c-55 0-100-44-99-98 1-52 44-95 96-96 56 0 100 45 99 100-1 52-43 93-96 94z">
          <text:p/>
        </draw:path>
        <draw:path draw:style-name="gr9" draw:text-style-name="P7" draw:layer="layout" svg:width="0.194cm" svg:height="0.193cm" svg:x="6.33cm" svg:y="20.591cm" svg:viewBox="0 0 195 194" svg:d="M97 194c-52 0-95-42-97-93-2-55 43-101 97-101 56 0 99 45 98 101-2 52-44 93-98 93z">
          <text:p/>
        </draw:path>
        <draw:path draw:style-name="gr9" draw:text-style-name="P7" draw:layer="layout" svg:width="0.192cm" svg:height="0.192cm" svg:x="8.666cm" svg:y="17.382cm" svg:viewBox="0 0 193 193" svg:d="M193 97c-3 59-46 98-100 96-56-2-94-44-93-97 0-57 43-97 100-96 53 1 92 43 93 97z">
          <text:p/>
        </draw:path>
        <draw:path draw:style-name="gr9" draw:text-style-name="P7" draw:layer="layout" svg:width="0.192cm" svg:height="0.193cm" svg:x="9.834cm" svg:y="17.088cm" svg:viewBox="0 0 193 194" svg:d="M193 94c1 53-39 98-90 100-56 3-102-40-103-94-2-54 43-100 97-100 52 0 95 42 96 94z">
          <text:p/>
        </draw:path>
        <draw:path draw:style-name="gr9" draw:text-style-name="P7" draw:layer="layout" svg:width="0.191cm" svg:height="0.192cm" svg:x="7.206cm" svg:y="23.511cm" svg:viewBox="0 0 192 193" svg:d="M192 95c2 58-47 96-92 98-53 3-101-44-100-97 1-51 44-95 95-96 53 0 96 43 97 95z">
          <text:p/>
        </draw:path>
        <draw:path draw:style-name="gr9" draw:text-style-name="P7" draw:layer="layout" svg:width="0.192cm" svg:height="0.192cm" svg:x="11.001cm" svg:y="17.089cm" svg:viewBox="0 0 193 193" svg:d="M98 193c-51 1-96-40-98-92-1-59 45-102 97-101 55 1 96 48 96 97-1 52-43 95-95 96z">
          <text:p/>
        </draw:path>
        <draw:path draw:style-name="gr9" draw:text-style-name="P7" draw:layer="layout" svg:width="0.191cm" svg:height="0.192cm" svg:x="13.629cm" svg:y="22.927cm" svg:viewBox="0 0 192 193" svg:d="M94 193c-51-1-95-46-94-97 1-52 46-96 97-96 47 0 97 40 95 102-1 52-50 94-98 91z">
          <text:p/>
        </draw:path>
        <draw:path draw:style-name="gr9" draw:text-style-name="P7" draw:layer="layout" svg:width="0.191cm" svg:height="0.192cm" svg:x="7.791cm" svg:y="24.096cm" svg:viewBox="0 0 192 193" svg:d="M98 0c41-2 94 36 94 96 0 57-48 95-93 97-55 1-101-47-99-100 2-52 46-93 98-93z">
          <text:p/>
        </draw:path>
        <draw:path draw:style-name="gr9" draw:text-style-name="P7" draw:layer="layout" svg:width="0.192cm" svg:height="0.19cm" svg:x="13.337cm" svg:y="18.549cm" svg:viewBox="0 0 193 191" svg:d="M97 191c-58 3-97-50-97-93 0-54 44-100 98-98 52 1 96 45 95 96-2 54-43 96-96 95z">
          <text:p/>
        </draw:path>
        <draw:path draw:style-name="gr9" draw:text-style-name="P7" draw:layer="layout" svg:width="0.191cm" svg:height="0.19cm" svg:x="11.585cm" svg:y="24.681cm" svg:viewBox="0 0 192 191" svg:d="M192 92c2 52-40 97-93 99-50 3-98-41-99-93-1-55 43-97 92-98 54-2 98 40 100 92z">
          <text:p/>
        </draw:path>
        <draw:path draw:style-name="gr9" draw:text-style-name="P7" draw:layer="layout" svg:width="0.193cm" svg:height="0.191cm" svg:x="7.498cm" svg:y="23.804cm" svg:viewBox="0 0 194 192" svg:d="M98 192c-63 1-98-52-98-94 1-55 44-100 100-98 63 2 95 56 94 98-1 46-37 94-96 94z">
          <text:p/>
        </draw:path>
        <draw:path draw:style-name="gr9" draw:text-style-name="P7" draw:layer="layout" svg:width="0.191cm" svg:height="0.19cm" svg:x="12.17cm" svg:y="24.388cm" svg:viewBox="0 0 192 191" svg:d="M192 97c2 41-35 94-96 94-57 0-95-47-96-93-2-53 45-100 98-98 53 1 95 45 94 97z">
          <text:p/>
        </draw:path>
        <draw:path draw:style-name="gr9" draw:text-style-name="P7" draw:layer="layout" svg:width="0.189cm" svg:height="0.189cm" svg:x="12.755cm" svg:y="24.097cm" svg:viewBox="0 0 190 190" svg:d="M93 190c-52-3-96-50-93-100 4-51 51-95 101-90 49 4 89 47 89 95-1 51-47 97-97 95z">
          <text:p/>
        </draw:path>
        <draw:path draw:style-name="gr9" draw:text-style-name="P7" draw:layer="layout" svg:width="0.189cm" svg:height="0.19cm" svg:x="14.214cm" svg:y="20.885cm" svg:viewBox="0 0 190 191" svg:d="M190 96c0 46-35 94-95 95-51 1-96-46-95-96 0-51 44-97 96-95 54 1 95 46 94 96z">
          <text:p/>
        </draw:path>
        <draw:path draw:style-name="gr9" draw:text-style-name="P7" draw:layer="layout" svg:width="0.192cm" svg:height="0.19cm" svg:x="6.331cm" svg:y="21.761cm" svg:viewBox="0 0 193 191" svg:d="M193 93c2 45-37 97-93 98-56 2-96-41-100-90-4-53 42-101 96-101 52-1 96 42 97 93z">
          <text:p/>
        </draw:path>
        <draw:path draw:style-name="gr9" draw:text-style-name="P7" draw:layer="layout" svg:width="0.189cm" svg:height="0.191cm" svg:x="6.624cm" svg:y="22.637cm" svg:viewBox="0 0 190 192" svg:d="M190 95c1 52-36 95-92 97-54 2-99-38-98-97 0-60 50-95 95-95 49 0 96 41 95 95z">
          <text:p/>
        </draw:path>
        <draw:path draw:style-name="gr9" draw:text-style-name="P7" draw:layer="layout" svg:width="0.188cm" svg:height="0.188cm" svg:x="8.96cm" svg:y="17.091cm" svg:viewBox="0 0 189 189" svg:d="M189 97c-1 51-48 95-98 92-52-3-96-50-90-99 6-60 49-88 93-90 52-1 96 47 95 97z">
          <text:p/>
        </draw:path>
        <draw:path draw:style-name="gr9" draw:text-style-name="P7" draw:layer="layout" svg:width="0.187cm" svg:height="0.188cm" svg:x="6.333cm" svg:y="19.718cm" svg:viewBox="0 0 188 189" svg:d="M188 96c-1 51-47 95-98 93-51-3-95-50-90-99 6-61 49-89 94-90 51-2 96 46 94 96z">
          <text:p/>
        </draw:path>
        <draw:path draw:style-name="gr9" draw:text-style-name="P7" draw:layer="layout" svg:width="0.19cm" svg:height="0.189cm" svg:x="10.126cm" svg:y="24.972cm" svg:viewBox="0 0 191 190" svg:d="M96 190c-51 1-95-42-96-94 0-52 42-96 94-96 50 1 93 34 97 93 2 52-43 96-95 97z">
          <text:p/>
        </draw:path>
        <draw:path draw:style-name="gr9" draw:text-style-name="P7" draw:layer="layout" svg:width="0.19cm" svg:height="0.19cm" svg:x="13.921cm" svg:y="22.345cm" svg:viewBox="0 0 191 191" svg:d="M191 97c-1 53-45 94-97 94-45 0-95-40-94-97 1-48 37-95 97-94 53 1 93 41 94 97z">
          <text:p/>
        </draw:path>
        <draw:path draw:style-name="gr9" draw:text-style-name="P7" draw:layer="layout" svg:width="0.192cm" svg:height="0.19cm" svg:x="12.753cm" svg:y="17.966cm" svg:viewBox="0 0 193 191" svg:d="M100 191c-53 1-97-39-100-91-2-55 43-100 98-100 64 1 95 55 95 95 1 42-33 96-93 96z">
          <text:p/>
        </draw:path>
        <draw:path draw:style-name="gr9" draw:text-style-name="P7" draw:layer="layout" svg:width="0.191cm" svg:height="0.188cm" svg:x="6.915cm" svg:y="23.222cm" svg:viewBox="0 0 192 189" svg:d="M97 189c-54 0-96-43-97-95 0-40 35-94 97-94 58 0 95 48 95 94 1 40-31 95-95 95z">
          <text:p/>
        </draw:path>
        <draw:path draw:style-name="gr9" draw:text-style-name="P7" draw:layer="layout" svg:width="0.188cm" svg:height="0.189cm" svg:x="13.338cm" svg:y="23.512cm" svg:viewBox="0 0 189 190" svg:d="M0 85c5-48 51-90 98-85 64 6 93 56 90 101-3 53-53 95-102 88-53-7-91-53-86-104z">
          <text:p/>
        </draw:path>
        <draw:path draw:style-name="gr9" draw:text-style-name="P7" draw:layer="layout" svg:width="0.189cm" svg:height="0.192cm" svg:x="9.252cm" svg:y="17.089cm" svg:viewBox="0 0 190 193" svg:d="M190 97c0 53-42 95-94 96-40 0-96-34-96-96 0-58 48-96 95-97 43 0 95 35 95 97z">
          <text:p/>
        </draw:path>
        <draw:path draw:style-name="gr9" draw:text-style-name="P7" draw:layer="layout" svg:width="0.189cm" svg:height="0.189cm" svg:x="11.879cm" svg:y="17.383cm" svg:viewBox="0 0 190 190" svg:d="M95 190c-53 1-94-39-95-93-2-53 37-95 90-97 57-3 100 40 100 95-1 54-41 95-95 95z">
          <text:p/>
        </draw:path>
        <draw:path draw:style-name="gr9" draw:text-style-name="P7" draw:layer="layout" svg:width="0.187cm" svg:height="0.189cm" svg:x="6.625cm" svg:y="19.134cm" svg:viewBox="0 0 188 190" svg:d="M188 95c1 56-50 96-95 95-52-2-94-43-93-97 0-54 43-94 96-93 57 1 94 46 92 95z">
          <text:p/>
        </draw:path>
        <draw:path draw:style-name="gr9" draw:text-style-name="P7" draw:layer="layout" svg:width="0.191cm" svg:height="0.188cm" svg:x="6.332cm" svg:y="20.01cm" svg:viewBox="0 0 192 189" svg:d="M97 0c60-1 96 55 95 96-1 52-44 94-97 93-64 0-96-54-95-95 1-47 39-96 97-94z">
          <text:p/>
        </draw:path>
        <draw:path draw:style-name="gr9" draw:text-style-name="P7" draw:layer="layout" svg:width="0.188cm" svg:height="0.188cm" svg:x="14.215cm" svg:y="21.47cm" svg:viewBox="0 0 189 189" svg:d="M189 94c0 52-44 97-95 95-62-3-95-48-94-97 1-51 43-91 93-92 51-2 96 42 96 94z">
          <text:p/>
        </draw:path>
        <draw:path draw:style-name="gr9" draw:text-style-name="P7" draw:layer="layout" svg:width="0.188cm" svg:height="0.189cm" svg:x="8.667cm" svg:y="24.681cm" svg:viewBox="0 0 189 190" svg:d="M92 0c42-3 96 33 97 91 1 54-36 97-91 99-53 2-96-40-98-92-2-62 53-98 92-98z">
          <text:p/>
        </draw:path>
        <draw:path draw:style-name="gr9" draw:text-style-name="P7" draw:layer="layout" svg:width="0.188cm" svg:height="0.187cm" svg:x="13.046cm" svg:y="23.806cm" svg:viewBox="0 0 189 188" svg:d="M189 92c1 53-39 94-92 96-51 2-95-36-97-90-1-54 39-96 91-98 63-2 99 51 98 92z">
          <text:p/>
        </draw:path>
        <draw:path draw:style-name="gr9" draw:text-style-name="P7" draw:layer="layout" svg:width="0.188cm" svg:height="0.19cm" svg:x="11.295cm" svg:y="17.09cm" svg:viewBox="0 0 189 191" svg:d="M189 98c-1 52-44 94-96 93-48-1-94-42-93-97 2-51 43-95 98-94 49 2 92 41 91 98z">
          <text:p/>
        </draw:path>
        <draw:path draw:style-name="gr9" draw:text-style-name="P7" draw:layer="layout" svg:width="0.188cm" svg:height="0.189cm" svg:x="10.42cm" svg:y="24.972cm" svg:viewBox="0 0 189 190" svg:d="M96 190c-53 1-95-39-96-93-1-53 36-94 91-97 51-3 96 40 98 92 2 56-48 99-93 98z">
          <text:p/>
        </draw:path>
        <draw:path draw:style-name="gr9" draw:text-style-name="P7" draw:layer="layout" svg:width="0.188cm" svg:height="0.188cm" svg:x="10.712cm" svg:y="24.973cm" svg:viewBox="0 0 189 189" svg:d="M94 189c-51 0-95-45-94-97s45-95 97-92c54 3 89 39 92 92 3 51-42 96-95 97z">
          <text:p/>
        </draw:path>
        <draw:path draw:style-name="gr9" draw:text-style-name="P7" draw:layer="layout" svg:width="0.189cm" svg:height="0.188cm" svg:x="14.215cm" svg:y="21.179cm" svg:viewBox="0 0 190 189" svg:d="M93 0c53 0 95 41 97 94 0 43-38 95-96 95-50 0-94-38-94-94-1-52 39-95 93-95z">
          <text:p/>
        </draw:path>
        <draw:path draw:style-name="gr9" draw:text-style-name="P7" draw:layer="layout" svg:width="0.189cm" svg:height="0.187cm" svg:x="8.376cm" svg:y="17.384cm" svg:viewBox="0 0 190 188" svg:d="M190 92c2 42-33 96-94 96-54 1-95-39-96-93-1-56 44-94 93-95 59-2 98 50 97 92z">
          <text:p/>
        </draw:path>
        <draw:path draw:style-name="gr9" draw:text-style-name="P7" draw:layer="layout" svg:width="0.188cm" svg:height="0.191cm" svg:x="12.463cm" svg:y="17.673cm" svg:viewBox="0 0 189 192" svg:d="M189 97c0 60-53 96-96 95-39 0-95-34-93-98 0-52 44-95 96-94 40 0 95 35 93 97z">
          <text:p/>
        </draw:path>
        <draw:path draw:style-name="gr9" draw:text-style-name="P7" draw:layer="layout" svg:width="0.188cm" svg:height="0.188cm" svg:x="13.922cm" svg:y="19.427cm" svg:viewBox="0 0 189 189" svg:d="M95 189c-52 0-95-42-95-94s43-95 95-95 94 42 94 94c0 53-41 95-94 95z">
          <text:p/>
        </draw:path>
        <draw:path draw:style-name="gr9" draw:text-style-name="P7" draw:layer="layout" svg:width="0.19cm" svg:height="0.189cm" svg:x="6.332cm" svg:y="22.053cm" svg:viewBox="0 0 191 190" svg:d="M191 94c1 51-43 95-94 96-52 0-97-42-97-93 1-57 46-96 94-97 53-1 96 44 97 94z">
          <text:p/>
        </draw:path>
        <draw:path draw:style-name="gr9" draw:text-style-name="P7" draw:layer="layout" svg:width="0.186cm" svg:height="0.188cm" svg:x="9.837cm" svg:y="24.973cm" svg:viewBox="0 0 187 189" svg:d="M0 91c0-52 42-93 97-91 59 3 93 50 90 99s-44 90-95 90c-52-1-93-44-92-98z">
          <text:p/>
        </draw:path>
        <draw:path draw:style-name="gr9" draw:text-style-name="P7" draw:layer="layout" svg:width="0.186cm" svg:height="0.188cm" svg:x="7.209cm" svg:y="18.258cm" svg:viewBox="0 0 187 189" svg:d="M187 97c0 52-46 96-97 92-54-4-89-42-90-93-1-53 41-96 93-96 53 0 95 44 94 97z">
          <text:p/>
        </draw:path>
        <draw:path draw:style-name="gr9" draw:text-style-name="P7" draw:layer="layout" svg:width="0.187cm" svg:height="0.188cm" svg:x="14.216cm" svg:y="20.303cm" svg:viewBox="0 0 188 189" svg:d="M188 94c-2 52-43 95-96 95-51 0-95-47-92-98 3-55 43-88 92-91 51-3 96 43 96 94z">
          <text:p/>
        </draw:path>
        <draw:path draw:style-name="gr9" draw:text-style-name="P7" draw:layer="layout" svg:width="0.187cm" svg:height="0.188cm" svg:x="13.632cm" svg:y="18.843cm" svg:viewBox="0 0 188 189" svg:d="M188 96c0 52-45 96-96 93-56-3-94-45-92-98 2-51 44-91 94-91 51-1 94 43 94 96z">
          <text:p/>
        </draw:path>
        <draw:path draw:style-name="gr9" draw:text-style-name="P7" draw:layer="layout" svg:width="0.188cm" svg:height="0.186cm" svg:x="9.543cm" svg:y="24.974cm" svg:viewBox="0 0 189 187" svg:d="M98 187c-52 2-97-41-98-92s43-96 96-95c55 1 90 39 93 89 2 60-45 96-91 98z">
          <text:p/>
        </draw:path>
        <draw:path draw:style-name="gr9" draw:text-style-name="P7" draw:layer="layout" svg:width="0.187cm" svg:height="0.187cm" svg:x="8.084cm" svg:y="24.39cm" svg:viewBox="0 0 188 188" svg:d="M188 96c-1 53-43 92-97 92-45-1-94-43-91-99 3-50 44-89 95-89 53 0 94 41 93 96z">
          <text:p/>
        </draw:path>
        <draw:path draw:style-name="gr9" draw:text-style-name="P7" draw:layer="layout" svg:width="0.188cm" svg:height="0.186cm" svg:x="14.215cm" svg:y="20.595cm" svg:viewBox="0 0 189 187" svg:d="M93 0c53-1 96 40 96 92 0 50-40 92-89 95-51 3-97-32-100-91-2-54 39-96 93-96z">
          <text:p/>
        </draw:path>
        <draw:path draw:style-name="gr9" draw:text-style-name="P7" draw:layer="layout" svg:width="0.188cm" svg:height="0.186cm" svg:x="7.5cm" svg:y="17.968cm" svg:viewBox="0 0 189 187" svg:d="M98 187c-61 3-98-52-98-93-1-42 35-92 89-94 53-2 97 33 100 89 3 58-44 99-91 98z">
          <text:p/>
        </draw:path>
        <draw:path draw:style-name="gr9" draw:text-style-name="P7" draw:layer="layout" svg:width="0.187cm" svg:height="0.186cm" svg:x="12.172cm" svg:y="17.384cm" svg:viewBox="0 0 188 187" svg:d="M98 187c-56 2-97-39-98-92 0-58 46-95 95-95 44 1 89 33 93 89 4 48-35 98-90 98z">
          <text:p/>
        </draw:path>
        <draw:path draw:style-name="gr9" draw:text-style-name="P7" draw:layer="layout" svg:width="0.187cm" svg:height="0.186cm" svg:x="6.917cm" svg:y="18.552cm" svg:viewBox="0 0 188 187" svg:d="M91 187c-53-1-93-48-91-97 2-46 40-93 100-90 50 3 88 44 88 95 1 51-44 93-97 92z">
          <text:p/>
        </draw:path>
        <draw:path draw:style-name="gr9" draw:text-style-name="P7" draw:layer="layout" svg:width="0.186cm" svg:height="0.186cm" svg:x="11.88cm" svg:y="24.682cm" svg:viewBox="0 0 187 187" svg:d="M96 0c41 0 93 36 91 98-2 47-40 93-98 89-63-3-89-55-89-94 0-54 48-95 96-93z">
          <text:p/>
        </draw:path>
        <draw:path draw:style-name="gr9" draw:text-style-name="P7" draw:layer="layout" svg:width="0.186cm" svg:height="0.186cm" svg:x="11.587cm" svg:y="17.092cm" svg:viewBox="0 0 187 187" svg:d="M186 105c-10 54-60 91-108 81-51-11-85-57-77-105 9-54 58-89 108-79s85 57 77 103z">
          <text:p/>
        </draw:path>
        <draw:path draw:style-name="gr9" draw:text-style-name="P7" draw:layer="layout" svg:width="0.185cm" svg:height="0.187cm" svg:x="6.626cm" svg:y="22.93cm" svg:viewBox="0 0 186 188" svg:d="M186 91c3 53-42 96-92 97-47 1-92-38-94-88-3-59 42-101 94-100 63 2 92 51 92 91z">
          <text:p/>
        </draw:path>
        <draw:path draw:style-name="gr9" draw:text-style-name="P7" draw:layer="layout" svg:width="0.187cm" svg:height="0.185cm" svg:x="6.334cm" svg:y="22.348cm" svg:viewBox="0 0 188 186" svg:d="M93 186c-50-1-92-42-93-92 0-50 37-95 96-94 58 1 90 47 92 91 2 51-45 96-95 95z">
          <text:p/>
        </draw:path>
        <draw:path draw:style-name="gr9" draw:text-style-name="P7" draw:layer="layout" svg:width="0.185cm" svg:height="0.187cm" svg:x="7.795cm" svg:y="17.675cm" svg:viewBox="0 0 186 188" svg:d="M186 91c2 51-40 97-92 97-49 0-92-37-94-88-3-58 39-97 89-100 51-3 96 39 97 91z">
          <text:p/>
        </draw:path>
        <draw:path draw:style-name="gr9" draw:text-style-name="P7" draw:layer="layout" svg:width="0.185cm" svg:height="0.186cm" svg:x="13.923cm" svg:y="22.639cm" svg:viewBox="0 0 186 187" svg:d="M186 92c2 54-38 94-91 95-54 0-95-41-95-93 0-49 40-92 90-94 53-2 95 39 96 92z">
          <text:p/>
        </draw:path>
        <draw:path draw:style-name="gr9" draw:text-style-name="P7" draw:layer="layout" svg:width="0.184cm" svg:height="0.184cm" svg:x="13.634cm" svg:y="23.224cm" svg:viewBox="0 0 185 185" svg:d="M93 0c50 0 90 40 92 91 2 44-37 96-94 94-54-1-93-42-91-96 1-51 42-90 93-89z">
          <text:p/>
        </draw:path>
        <draw:path draw:style-name="gr9" draw:text-style-name="P7" draw:layer="layout" svg:width="0.185cm" svg:height="0.185cm" svg:x="11.005cm" svg:y="24.975cm" svg:viewBox="0 0 186 186" svg:d="M186 91c0 52-45 97-96 95-49-2-90-43-90-94 0-50 39-91 90-92 52-2 96 40 96 91z">
          <text:p/>
        </draw:path>
        <draw:path draw:style-name="gr9" draw:text-style-name="P7" draw:layer="layout" svg:width="0.185cm" svg:height="0.185cm" svg:x="12.464cm" svg:y="24.391cm" svg:viewBox="0 0 186 186" svg:d="M91 186c-40 1-93-38-91-99 2-43 40-88 95-87 54 2 93 44 91 97-2 49-46 90-95 89z">
          <text:p/>
        </draw:path>
        <draw:path draw:style-name="gr9" draw:text-style-name="P7" draw:layer="layout" svg:width="0.184cm" svg:height="0.184cm" svg:x="7.502cm" svg:y="24.1cm" svg:viewBox="0 0 185 185" svg:d="M185 95c-2 52-40 89-93 90-50 2-96-45-92-96 4-56 44-89 92-89 48-1 94 36 93 95z">
          <text:p/>
        </draw:path>
        <draw:path draw:style-name="gr9" draw:text-style-name="P7" draw:layer="layout" svg:width="0.184cm" svg:height="0.184cm" svg:x="13.924cm" svg:y="19.137cm" svg:viewBox="0 0 185 185" svg:d="M95 0c52 1 89 40 90 92 0 56-49 93-91 93-54 0-96-47-94-97 2-51 43-89 95-88z">
          <text:p/>
        </draw:path>
        <draw:path draw:style-name="gr9" draw:text-style-name="P7" draw:layer="layout" svg:width="0.183cm" svg:height="0.183cm" svg:x="9.839cm" svg:y="16.801cm" svg:viewBox="0 0 184 184" svg:d="M184 91c0 50-39 90-89 93-54 2-93-43-95-87-3-58 48-98 92-97 49 0 91 41 92 91z">
          <text:p/>
        </draw:path>
        <draw:path draw:style-name="gr9" draw:text-style-name="P7" draw:layer="layout" svg:width="0.184cm" svg:height="0.184cm" svg:x="9.254cm" svg:y="24.975cm" svg:viewBox="0 0 185 185" svg:d="M185 96c0 51-47 90-94 89-53-1-91-46-91-92 1-53 43-94 97-93 53 2 91 49 88 96z">
          <text:p/>
        </draw:path>
        <draw:path draw:style-name="gr9" draw:text-style-name="P7" draw:layer="layout" svg:width="0.184cm" svg:height="0.184cm" svg:x="7.21cm" svg:y="23.808cm" svg:viewBox="0 0 185 185" svg:d="M185 92c0 50-41 91-90 93-45 1-93-36-95-89-1-57 46-97 94-96 52 0 92 47 91 92z">
          <text:p/>
        </draw:path>
        <draw:path draw:style-name="gr9" draw:text-style-name="P7" draw:layer="layout" svg:width="0.182cm" svg:height="0.183cm" svg:x="11.298cm" svg:y="24.976cm" svg:viewBox="0 0 183 184" svg:d="M183 90c2 54-41 92-87 94-52 1-96-40-96-94-1-38 31-90 92-90 52 0 91 38 91 90z">
          <text:p/>
        </draw:path>
        <draw:path draw:style-name="gr9" draw:text-style-name="P7" draw:layer="layout" svg:width="0.185cm" svg:height="0.184cm" svg:x="14.217cm" svg:y="21.765cm" svg:viewBox="0 0 186 185" svg:d="M90 185c-52-1-93-44-90-97 2-52 42-88 94-88 57 0 91 50 92 91 1 51-43 95-96 94z">
          <text:p/>
        </draw:path>
        <draw:path draw:style-name="gr9" draw:text-style-name="P7" draw:layer="layout" svg:width="0.183cm" svg:height="0.184cm" svg:x="6.043cm" svg:y="20.888cm" svg:viewBox="0 0 184 185" svg:d="M184 93c0 50-39 90-89 92-53 1-96-42-95-94 1-51 44-93 94-91 58 3 91 49 90 93z">
          <text:p/>
        </draw:path>
        <draw:path draw:style-name="gr9" draw:text-style-name="P7" draw:layer="layout" svg:width="0.183cm" svg:height="0.183cm" svg:x="8.67cm" svg:y="17.094cm" svg:viewBox="0 0 184 184" svg:d="M184 89c1 46-31 92-89 95-54 2-96-42-95-94 0-50 41-90 91-90 51 0 92 39 93 89z">
          <text:p/>
        </draw:path>
        <draw:path draw:style-name="gr9" draw:text-style-name="P7" draw:layer="layout" svg:width="0.183cm" svg:height="0.182cm" svg:x="6.336cm" svg:y="19.429cm" svg:viewBox="0 0 184 183" svg:d="M90 0c49-2 92 38 94 88 2 52-38 93-88 95-53 3-95-37-96-91 0-50 40-91 90-92z">
          <text:p/>
        </draw:path>
        <draw:path draw:style-name="gr9" draw:text-style-name="P7" draw:layer="layout" svg:width="0.184cm" svg:height="0.184cm" svg:x="13.049cm" svg:y="17.969cm" svg:viewBox="0 0 185 185" svg:d="M91 185c-51-1-90-41-91-92-1-53 44-95 97-93 49 3 89 45 88 96-2 50-44 90-94 89z">
          <text:p/>
        </draw:path>
        <draw:path draw:style-name="gr9" draw:text-style-name="P7" draw:layer="layout" svg:width="0.183cm" svg:height="0.183cm" svg:x="14.218cm" svg:y="22.055cm" svg:viewBox="0 0 184 184" svg:d="M89 184c-52-1-89-41-89-92 1-51 41-92 92-92 53 1 94 46 92 98-3 46-41 88-95 86z">
          <text:p/>
        </draw:path>
        <draw:path draw:style-name="gr9" draw:text-style-name="P7" draw:layer="layout" svg:width="0.183cm" svg:height="0.182cm" svg:x="6.043cm" svg:y="20.597cm" svg:viewBox="0 0 184 183" svg:d="M93 183c-51 0-92-40-93-89-1-51 39-93 89-94 54-2 95 39 95 93 0 49-44 92-91 90z">
          <text:p/>
        </draw:path>
        <draw:path draw:style-name="gr9" draw:text-style-name="P7" draw:layer="layout" svg:width="0.183cm" svg:height="0.183cm" svg:x="6.627cm" svg:y="18.845cm" svg:viewBox="0 0 184 184" svg:d="M0 84c4-52 53-88 99-84 50 5 87 48 85 97-3 53-47 91-102 86-49-4-85-48-82-99z">
          <text:p/>
        </draw:path>
        <draw:path draw:style-name="gr9" draw:text-style-name="P7" draw:layer="layout" svg:width="0.183cm" svg:height="0.184cm" svg:x="14.218cm" svg:y="20.012cm" svg:viewBox="0 0 184 185" svg:d="M94 185c-47 3-92-33-94-87-3-54 38-97 91-98 41-1 91 33 93 92 2 47-40 93-90 93z">
          <text:p/>
        </draw:path>
        <draw:path draw:style-name="gr9" draw:text-style-name="P7" draw:layer="layout" svg:width="0.183cm" svg:height="0.183cm" svg:x="6.043cm" svg:y="21.181cm" svg:viewBox="0 0 184 184" svg:d="M184 89c3 54-43 94-87 95-53 2-96-39-97-92 0-48 42-91 91-92 51 0 94 43 93 89z">
          <text:p/>
        </draw:path>
        <draw:path draw:style-name="gr9" draw:text-style-name="P7" draw:layer="layout" svg:width="0.184cm" svg:height="0.184cm" svg:x="13.34cm" svg:y="18.259cm" svg:viewBox="0 0 185 185" svg:d="M185 94c0 51-39 91-91 91-50 1-93-39-94-88-1-54 41-97 95-97 50 0 90 43 90 94z">
          <text:p/>
        </draw:path>
        <draw:path draw:style-name="gr9" draw:text-style-name="P7" draw:layer="layout" svg:width="0.182cm" svg:height="0.182cm" svg:x="13.925cm" svg:y="22.933cm" svg:viewBox="0 0 183 183" svg:d="M91 0c53 0 91 39 92 91 0 48-37 90-92 92-49 1-91-43-91-92-1-50 41-91 91-91z">
          <text:p/>
        </draw:path>
        <draw:path draw:style-name="gr9" draw:text-style-name="P7" draw:layer="layout" svg:width="0.184cm" svg:height="0.184cm" svg:x="8.379cm" svg:y="24.683cm" svg:viewBox="0 0 185 185" svg:d="M94 185c-52 1-92-37-94-89-1-53 41-98 93-96 61 3 91 50 92 92 1 50-41 92-91 93z">
          <text:p/>
        </draw:path>
        <draw:path draw:style-name="gr9" draw:text-style-name="P7" draw:layer="layout" svg:width="0.183cm" svg:height="0.183cm" svg:x="10.129cm" svg:y="16.801cm" svg:viewBox="0 0 184 184" svg:d="M184 96c-2 50-43 87-94 88-46 0-90-40-90-92 1-59 51-95 97-92 49 3 88 44 87 96z">
          <text:p/>
        </draw:path>
        <draw:path draw:style-name="gr9" draw:text-style-name="P7" draw:layer="layout" svg:width="0.183cm" svg:height="0.183cm" svg:x="8.086cm" svg:y="17.386cm" svg:viewBox="0 0 184 184" svg:d="M184 96c-1 48-44 89-94 88s-91-48-90-94c1-51 47-93 99-90 49 3 86 45 85 96z">
          <text:p/>
        </draw:path>
        <draw:path draw:style-name="gr9" draw:text-style-name="P7" draw:layer="layout" svg:width="0.182cm" svg:height="0.181cm" svg:x="6.043cm" svg:y="21.473cm" svg:viewBox="0 0 183 182" svg:d="M183 89c1 52-37 92-88 93s-93-38-95-88c-1-41 29-92 90-94 57-2 94 46 93 89z">
          <text:p/>
        </draw:path>
        <draw:path draw:style-name="gr9" draw:text-style-name="P7" draw:layer="layout" svg:width="0.181cm" svg:height="0.182cm" svg:x="10.715cm" svg:y="16.801cm" svg:viewBox="0 0 182 183" svg:d="M182 94c-1 52-41 89-93 89-45 0-90-38-89-94 0-50 44-90 95-89 50 1 88 43 87 94z">
          <text:p/>
        </draw:path>
        <draw:path draw:style-name="gr9" draw:text-style-name="P7" draw:layer="layout" svg:width="0.181cm" svg:height="0.182cm" svg:x="6.337cm" svg:y="22.641cm" svg:viewBox="0 0 182 183" svg:d="M90 183c-52-1-90-40-90-92 1-51 42-92 93-91 48 0 91 44 89 93-2 54-42 91-92 90z">
          <text:p/>
        </draw:path>
        <draw:path draw:style-name="gr9" draw:text-style-name="P7" draw:layer="layout" svg:width="0.183cm" svg:height="0.183cm" svg:x="10.423cm" svg:y="16.801cm" svg:viewBox="0 0 184 184" svg:d="M184 93c0 44-40 91-92 91-46 0-95-39-92-96 2-50 44-90 94-88 49 1 90 45 90 93z">
          <text:p/>
        </draw:path>
        <draw:path draw:style-name="gr9" draw:text-style-name="P7" draw:layer="layout" svg:width="0.179cm" svg:height="0.181cm" svg:x="11.008cm" svg:y="16.802cm" svg:viewBox="0 0 180 182" svg:d="M0 84c3-49 47-88 96-84 47 4 84 39 84 90 2 59-48 95-96 92-50-4-87-45-84-98z">
          <text:p/>
        </draw:path>
        <draw:path draw:style-name="gr9" draw:text-style-name="P7" draw:layer="layout" svg:width="0.18cm" svg:height="0.181cm" svg:x="13.342cm" svg:y="23.809cm" svg:viewBox="0 0 181 182" svg:d="M93 182c-49 1-92-39-93-89-2-48 40-92 90-93s90 38 91 90c2 59-49 92-88 92z">
          <text:p/>
        </draw:path>
        <draw:path draw:style-name="gr9" draw:text-style-name="P7" draw:layer="layout" svg:width="0.181cm" svg:height="0.181cm" svg:x="14.219cm" svg:y="19.722cm" svg:viewBox="0 0 182 182" svg:d="M0 87c1-51 41-89 92-87 63 1 92 55 90 92-1 51-47 93-94 90-53-3-90-42-88-95z">
          <text:p/>
        </draw:path>
        <draw:path draw:style-name="gr9" draw:text-style-name="P7" draw:layer="layout" svg:width="0.182cm" svg:height="0.181cm" svg:x="6.044cm" svg:y="20.307cm" svg:viewBox="0 0 183 182" svg:d="M91 0c51-1 91 38 92 90 0 42-30 89-90 92-49 2-93-41-93-90-1-51 40-92 91-92z">
          <text:p/>
        </draw:path>
        <draw:path draw:style-name="gr9" draw:text-style-name="P7" draw:layer="layout" svg:width="0.181cm" svg:height="0.181cm" svg:x="7.212cm" svg:y="17.971cm" svg:viewBox="0 0 182 182" svg:d="M94 182c-51 1-92-38-94-88-2-54 44-94 88-94 49-1 92 38 94 88 1 56-46 93-88 94z">
          <text:p/>
        </draw:path>
        <draw:path draw:style-name="gr9" draw:text-style-name="P7" draw:layer="layout" svg:width="0.182cm" svg:height="0.182cm" svg:x="8.964cm" svg:y="24.976cm" svg:viewBox="0 0 183 183" svg:d="M100 1c45 3 84 42 83 94-1 49-47 91-95 88-45-3-93-38-87-102 4-45 43-86 99-80z">
          <text:p/>
        </draw:path>
        <draw:path draw:style-name="gr9" draw:text-style-name="P7" draw:layer="layout" svg:width="0.184cm" svg:height="0.183cm" svg:x="12.757cm" svg:y="17.677cm" svg:viewBox="0 0 185 184" svg:d="M185 94c-3 52-42 90-93 90-57-1-89-43-92-92-2-50 46-96 96-92 52 4 88 40 89 94z">
          <text:p/>
        </draw:path>
        <draw:path draw:style-name="gr9" draw:text-style-name="P7" draw:layer="layout" svg:width="0.183cm" svg:height="0.183cm" svg:x="6.919cm" svg:y="23.515cm" svg:viewBox="0 0 184 184" svg:d="M184 96c-3 52-41 90-93 88-56-1-89-42-91-91-2-50 46-97 96-93 53 6 88 43 88 96z">
          <text:p/>
        </draw:path>
        <draw:path draw:style-name="gr9" draw:text-style-name="P7" draw:layer="layout" svg:width="0.181cm" svg:height="0.181cm" svg:x="6.044cm" svg:y="21.766cm" svg:viewBox="0 0 182 182" svg:d="M182 93c0 46-41 91-94 89-49-1-89-45-88-94 1-44 40-90 94-88 49 2 89 43 88 93z">
          <text:p/>
        </draw:path>
        <draw:path draw:style-name="gr9" draw:text-style-name="P7" draw:layer="layout" svg:width="0.181cm" svg:height="0.18cm" svg:x="13.05cm" svg:y="24.102cm" svg:viewBox="0 0 182 181" svg:d="M92 181c-52 0-92-40-92-90 0-51 39-91 91-91 49 0 91 41 91 90 1 48-41 90-90 91z">
          <text:p/>
        </draw:path>
        <draw:path draw:style-name="gr9" draw:text-style-name="P7" draw:layer="layout" svg:width="0.182cm" svg:height="0.181cm" svg:x="11.882cm" svg:y="17.095cm" svg:viewBox="0 0 183 182" svg:d="M183 89c2 42-30 89-90 93-48 3-92-40-93-89-1-50 38-92 89-93s93 39 94 89z">
          <text:p/>
        </draw:path>
        <draw:path draw:style-name="gr9" draw:text-style-name="P7" draw:layer="layout" svg:width="0.182cm" svg:height="0.182cm" svg:x="9.546cm" svg:y="16.801cm" svg:viewBox="0 0 183 183" svg:d="M94 0c51 1 90 43 89 94-2 52-42 90-94 89-50-1-91-44-89-94s44-90 94-89z">
          <text:p/>
        </draw:path>
        <draw:path draw:style-name="gr9" draw:text-style-name="P7" draw:layer="layout" svg:width="0.182cm" svg:height="0.182cm" svg:x="7.796cm" svg:y="24.393cm" svg:viewBox="0 0 183 183" svg:d="M90 0c54-3 92 43 93 89 2 49-41 93-91 94-43 1-91-37-92-91 0-51 42-94 90-92z">
          <text:p/>
        </draw:path>
        <draw:path draw:style-name="gr9" draw:text-style-name="P7" draw:layer="layout" svg:width="0.182cm" svg:height="0.182cm" svg:x="12.175cm" svg:y="24.684cm" svg:viewBox="0 0 183 183" svg:d="M93 183c-52 1-92-38-93-89 0-60 47-92 91-94 48-2 92 42 92 91 0 50-38 92-90 92z">
          <text:p/>
        </draw:path>
        <draw:path draw:style-name="gr9" draw:text-style-name="P7" draw:layer="layout" svg:width="0.182cm" svg:height="0.182cm" svg:x="13.635cm" svg:y="18.554cm" svg:viewBox="0 0 183 183" svg:d="M91 183c-42 1-92-37-91-92 1-52 40-90 92-91 53-1 91 47 91 91 0 49-43 92-92 92z">
          <text:p/>
        </draw:path>
        <draw:path draw:style-name="gr9" draw:text-style-name="P7" draw:layer="layout" svg:width="0.181cm" svg:height="0.181cm" svg:x="14.219cm" svg:y="22.35cm" svg:viewBox="0 0 182 182" svg:d="M93 0c51 0 89 45 89 93-1 49-46 92-94 89-50-3-89-41-88-93s40-89 93-89z">
          <text:p/>
        </draw:path>
        <draw:path draw:style-name="gr9" draw:text-style-name="P7" draw:layer="layout" svg:width="0.178cm" svg:height="0.178cm" svg:x="10.425cm" svg:y="25.27cm" svg:viewBox="0 0 179 179" svg:d="M85 179c-49-2-87-43-85-95 1-38 32-83 89-84 48-2 93 43 90 91-3 55-47 91-94 88z">
          <text:p/>
        </draw:path>
        <draw:path draw:style-name="gr9" draw:text-style-name="P7" draw:layer="layout" svg:width="0.181cm" svg:height="0.181cm" svg:x="12.466cm" svg:y="17.387cm" svg:viewBox="0 0 182 182" svg:d="M90 182c-51-1-90-43-90-93 1-49 43-90 93-89 49 1 90 43 89 92s-42 90-92 90z">
          <text:p/>
        </draw:path>
        <draw:path draw:style-name="gr9" draw:text-style-name="P7" draw:layer="layout" svg:width="0.181cm" svg:height="0.181cm" svg:x="6.628cm" svg:y="23.225cm" svg:viewBox="0 0 182 182" svg:d="M93 182c-50 2-91-37-93-87s38-93 87-95c50-2 93 39 95 89 2 49-38 92-89 93z">
          <text:p/>
        </draw:path>
        <draw:path draw:style-name="gr9" draw:text-style-name="P7" draw:layer="layout" svg:width="0.18cm" svg:height="0.18cm" svg:x="9.256cm" svg:y="16.802cm" svg:viewBox="0 0 181 181" svg:d="M86 181c-49-3-90-49-86-97 5-47 48-86 94-84 50 2 89 46 87 95-2 50-45 89-95 86z">
          <text:p/>
        </draw:path>
        <draw:path draw:style-name="gr9" draw:text-style-name="P7" draw:layer="layout" svg:width="0.18cm" svg:height="0.179cm" svg:x="8.087cm" svg:y="24.686cm" svg:viewBox="0 0 181 180" svg:d="M181 88c3 45-36 92-89 92-57 0-92-49-92-92 1-46 40-87 88-88 58-2 94 44 93 88z">
          <text:p/>
        </draw:path>
        <draw:path draw:style-name="gr9" draw:text-style-name="P7" draw:layer="layout" svg:width="0.18cm" svg:height="0.179cm" svg:x="13.926cm" svg:y="18.847cm" svg:viewBox="0 0 181 180" svg:d="M181 90c2 45-37 91-91 90-57 0-91-49-90-91 1-47 40-88 87-89 59 0 94 46 94 90z">
          <text:p/>
        </draw:path>
        <draw:path draw:style-name="gr9" draw:text-style-name="P7" draw:layer="layout" svg:width="0.181cm" svg:height="0.18cm" svg:x="6.044cm" svg:y="20.014cm" svg:viewBox="0 0 182 181" svg:d="M182 90c0 50-41 91-91 91s-92-42-91-92c1-47 41-87 88-89 48-2 93 39 94 90z">
          <text:p/>
        </draw:path>
        <draw:path draw:style-name="gr9" draw:text-style-name="P7" draw:layer="layout" svg:width="0.18cm" svg:height="0.181cm" svg:x="11.591cm" svg:y="24.977cm" svg:viewBox="0 0 181 182" svg:d="M0 89c0-51 39-89 90-89 50 0 90 38 91 90 0 50-43 93-92 92-45-2-89-35-89-93z">
          <text:p/>
        </draw:path>
        <draw:path draw:style-name="gr9" draw:text-style-name="P7" draw:layer="layout" svg:width="0.179cm" svg:height="0.178cm" svg:x="8.672cm" svg:y="24.978cm" svg:viewBox="0 0 180 179" svg:d="M93 0c50-1 89 48 87 94-3 46-42 84-89 85-48 1-92-42-91-90 0-45 39-92 93-89z">
          <text:p/>
        </draw:path>
        <draw:path draw:style-name="gr9" draw:text-style-name="P7" draw:layer="layout" svg:width="0.179cm" svg:height="0.178cm" svg:x="6.045cm" svg:y="22.058cm" svg:viewBox="0 0 180 179" svg:d="M180 91c0 46-40 90-94 88-48-1-90-46-86-95 5-54 46-83 90-84 50-1 91 42 90 91z">
          <text:p/>
        </draw:path>
        <draw:path draw:style-name="gr9" draw:text-style-name="P7" draw:layer="layout" svg:width="0.179cm" svg:height="0.179cm" svg:x="6.629cm" svg:y="18.555cm" svg:viewBox="0 0 180 180" svg:d="M0 92c-2-50 42-92 91-92 45 0 90 40 89 93-1 42-32 85-87 87-59 2-93-47-93-88z">
          <text:p/>
        </draw:path>
        <draw:path draw:style-name="gr9" draw:text-style-name="P7" draw:layer="layout" svg:width="0.178cm" svg:height="0.176cm" svg:x="14.511cm" svg:y="21.476cm" svg:viewBox="0 0 179 177" svg:d="M91 177c-53 3-91-44-91-89-1-48 39-87 86-88 50-2 93 39 93 90-1 43-39 87-88 87z">
          <text:p/>
        </draw:path>
        <draw:path draw:style-name="gr9" draw:text-style-name="P7" draw:layer="layout" svg:width="0.178cm" svg:height="0.177cm" svg:x="12.468cm" svg:y="24.687cm" svg:viewBox="0 0 179 178" svg:d="M90 178c-56 2-92-49-90-91 2-49 40-86 89-87 50 0 93 44 90 92s-43 87-89 86z">
          <text:p/>
        </draw:path>
        <draw:path draw:style-name="gr9" draw:text-style-name="P7" draw:layer="layout" svg:width="0.179cm" svg:height="0.179cm" svg:x="11.3cm" svg:y="16.803cm" svg:viewBox="0 0 180 180" svg:d="M180 90c-1 51-42 90-91 90-41 0-90-34-89-94 1-47 44-86 89-86 50 0 92 42 91 90z">
          <text:p/>
        </draw:path>
        <draw:path draw:style-name="gr9" draw:text-style-name="P7" draw:layer="layout" svg:width="0.179cm" svg:height="0.176cm" svg:x="14.51cm" svg:y="20.892cm" svg:viewBox="0 0 180 177" svg:d="M180 88c0 50-39 90-90 89-51 0-92-42-90-91 2-47 40-85 89-86 50-1 91 38 91 88z">
          <text:p/>
        </draw:path>
        <draw:path draw:style-name="gr9" draw:text-style-name="P7" draw:layer="layout" svg:width="0.179cm" svg:height="0.179cm" svg:x="7.798cm" svg:y="17.388cm" svg:viewBox="0 0 180 180" svg:d="M89 180c-46 1-90-41-89-92 1-48 43-90 92-88 45 2 85 35 88 88 2 48-41 92-91 92z">
          <text:p/>
        </draw:path>
        <draw:path draw:style-name="gr9" draw:text-style-name="P7" draw:layer="layout" svg:width="0.178cm" svg:height="0.179cm" svg:x="14.22cm" svg:y="19.431cm" svg:viewBox="0 0 179 180" svg:d="M88 180c-45 1-89-39-88-91 1-43 32-85 86-89 48-4 93 40 93 89-1 60-49 92-91 91z">
          <text:p/>
        </draw:path>
        <draw:path draw:style-name="gr9" draw:text-style-name="P7" draw:layer="layout" svg:width="0.178cm" svg:height="0.179cm" svg:x="10.132cm" svg:y="25.269cm" svg:viewBox="0 0 179 180" svg:d="M90 180c-41 2-89-30-90-90-1-49 43-93 91-90 55 4 86 45 88 87 1 54-43 94-89 93z">
          <text:p/>
        </draw:path>
        <draw:path draw:style-name="gr9" draw:text-style-name="P7" draw:layer="layout" svg:width="0.178cm" svg:height="0.181cm" svg:x="12.76cm" svg:y="24.393cm" svg:viewBox="0 0 179 182" svg:d="M0 90c0-51 40-90 91-90 39 0 90 34 88 94-2 57-52 87-89 88-48 1-90-42-90-92z">
          <text:p/>
        </draw:path>
        <draw:path draw:style-name="gr9" draw:text-style-name="P7" draw:layer="layout" svg:width="0.18cm" svg:height="0.179cm" svg:x="9.84cm" svg:y="25.269cm" svg:viewBox="0 0 181 180" svg:d="M90 180c-49 2-91-43-90-91 2-49 45-92 93-89 53 4 86 43 88 88 1 48-40 93-91 92z">
          <text:p/>
        </draw:path>
        <draw:path draw:style-name="gr9" draw:text-style-name="P7" draw:layer="layout" svg:width="0.179cm" svg:height="0.18cm" svg:x="14.51cm" svg:y="21.183cm" svg:viewBox="0 0 180 181" svg:d="M180 89c1 49-40 92-89 92-50 0-92-43-91-92 1-46 40-87 87-89 49-1 92 40 93 89z">
          <text:p/>
        </draw:path>
        <draw:path draw:style-name="gr9" draw:text-style-name="P7" draw:layer="layout" svg:width="0.177cm" svg:height="0.178cm" svg:x="13.344cm" svg:y="17.972cm" svg:viewBox="0 0 178 179" svg:d="M178 87c2 56-46 93-90 92-47 0-86-39-88-88-1-49 40-92 90-91 45 1 88 38 88 87z">
          <text:p/>
        </draw:path>
        <draw:path draw:style-name="gr9" draw:text-style-name="P7" draw:layer="layout" svg:width="0.178cm" svg:height="0.179cm" svg:x="6.339cm" svg:y="19.139cm" svg:viewBox="0 0 179 180" svg:d="M179 90c-1 51-45 94-93 90-51-3-89-41-86-95 1-48 39-84 88-85 48-1 91 37 91 90z">
          <text:p/>
        </draw:path>
        <draw:path draw:style-name="gr9" draw:text-style-name="P7" draw:layer="layout" svg:width="0.178cm" svg:height="0.178cm" svg:x="13.927cm" svg:y="23.227cm" svg:viewBox="0 0 179 179" svg:d="M179 90c0 50-43 90-93 89-46-1-86-42-86-89 0-48 44-93 92-90 47 2 87 43 87 90z">
          <text:p/>
        </draw:path>
        <draw:path draw:style-name="gr9" draw:text-style-name="P7" draw:layer="layout" svg:width="0.179cm" svg:height="0.179cm" svg:x="8.381cm" svg:y="17.096cm" svg:viewBox="0 0 180 180" svg:d="M92 180c-48 1-89-35-92-82-5-57 38-96 82-98 54-2 93 34 97 85 5 48-37 93-87 95z">
          <text:p/>
        </draw:path>
        <draw:path draw:style-name="gr9" draw:text-style-name="P7" draw:layer="layout" svg:width="0.178cm" svg:height="0.179cm" svg:x="6.922cm" svg:y="18.262cm" svg:viewBox="0 0 179 180" svg:d="M179 92c-1 51-43 90-94 88-43-1-85-36-85-89 0-56 40-91 90-91 52 1 90 40 89 92z">
          <text:p/>
        </draw:path>
        <draw:path draw:style-name="gr9" draw:text-style-name="P7" draw:layer="layout" svg:width="0.179cm" svg:height="0.18cm" svg:x="14.51cm" svg:y="20.598cm" svg:viewBox="0 0 180 181" svg:d="M180 93c-1 49-45 90-93 88-47-3-86-43-87-89-1-50 41-92 91-92 49 1 90 43 89 93z">
          <text:p/>
        </draw:path>
        <draw:path draw:style-name="gr9" draw:text-style-name="P7" draw:layer="layout" svg:width="0.178cm" svg:height="0.177cm" svg:x="11.884cm" svg:y="24.978cm" svg:viewBox="0 0 179 178" svg:d="M179 87c1 50-41 92-91 91-47 0-87-40-88-88-1-44 36-87 84-90 58-2 94 45 95 87z">
          <text:p/>
        </draw:path>
        <draw:path draw:style-name="gr9" draw:text-style-name="P7" draw:layer="layout" svg:width="0.177cm" svg:height="0.176cm" svg:x="6.046cm" svg:y="22.352cm" svg:viewBox="0 0 178 177" svg:d="M87 177c-48-2-87-42-87-89 1-50 43-90 92-88 47 2 86 41 86 87 1 50-41 91-91 90z">
          <text:p/>
        </draw:path>
        <draw:path draw:style-name="gr9" draw:text-style-name="P7" draw:layer="layout" svg:width="0.18cm" svg:height="0.178cm" svg:x="13.636cm" svg:y="23.518cm" svg:viewBox="0 0 181 179" svg:d="M92 179c-52 1-92-38-92-90 0-50 39-90 92-89 47 0 86 37 89 85 3 50-39 93-89 94z">
          <text:p/>
        </draw:path>
        <draw:path draw:style-name="gr9" draw:text-style-name="P7" draw:layer="layout" svg:width="0.178cm" svg:height="0.178cm" svg:x="7.505cm" svg:y="17.679cm" svg:viewBox="0 0 179 179" svg:d="M90 0c54 1 91 43 89 91-1 50-37 87-85 88-55 2-93-37-94-88-2-45 31-89 90-91z">
          <text:p/>
        </draw:path>
        <draw:path draw:style-name="gr9" draw:text-style-name="P7" draw:layer="layout" svg:width="0.175cm" svg:height="0.178cm" svg:x="6.923cm" svg:y="23.811cm" svg:viewBox="0 0 176 179" svg:d="M85 0c47-2 89 36 91 83 4 62-47 94-86 96-46 2-87-37-90-85-2-51 36-93 85-94z">
          <text:p/>
        </draw:path>
        <draw:path draw:style-name="gr9" draw:text-style-name="P7" draw:layer="layout" svg:width="0.178cm" svg:height="0.175cm" svg:x="14.511cm" svg:y="20.309cm" svg:viewBox="0 0 179 176" svg:d="M179 87c1 48-38 87-86 89-50 3-93-37-93-86-1-45 34-88 84-90 60-2 95 47 95 87z">
          <text:p/>
        </draw:path>
        <draw:path draw:style-name="gr9" draw:text-style-name="P7" draw:layer="layout" svg:width="0.178cm" svg:height="0.175cm" svg:x="6.046cm" svg:y="19.724cm" svg:viewBox="0 0 179 176" svg:d="M179 85c1 47-36 88-84 91-51 3-94-35-95-86-2-39 30-88 83-90 52-2 94 35 96 85z">
          <text:p/>
        </draw:path>
        <draw:path draw:style-name="gr9" draw:text-style-name="P7" draw:layer="layout" svg:width="0.176cm" svg:height="0.178cm" svg:x="10.718cm" svg:y="25.27cm" svg:viewBox="0 0 177 179" svg:d="M177 92c-1 48-39 86-88 87-50 0-91-41-89-92 1-48 40-88 87-87 53 1 93 42 90 92z">
          <text:p/>
        </draw:path>
        <draw:path draw:style-name="gr9" draw:text-style-name="P7" draw:layer="layout" svg:width="0.176cm" svg:height="0.178cm" svg:x="8.966cm" svg:y="16.803cm" svg:viewBox="0 0 177 179" svg:d="M177 91c-1 51-42 91-92 88-48-2-84-41-85-89 0-51 41-87 86-90 49-3 91 41 91 91z">
          <text:p/>
        </draw:path>
        <draw:path draw:style-name="gr9" draw:text-style-name="P7" draw:layer="layout" svg:width="0.176cm" svg:height="0.178cm" svg:x="14.221cm" svg:y="22.643cm" svg:viewBox="0 0 177 179" svg:d="M91 179c-48 1-88-35-91-83-4-47 29-91 85-96 49-4 93 41 92 90 0 48-38 88-86 89z">
          <text:p/>
        </draw:path>
        <draw:path draw:style-name="gr9" draw:text-style-name="P7" draw:layer="layout" svg:width="0.176cm" svg:height="0.176cm" svg:x="14.512cm" svg:y="20.016cm" svg:viewBox="0 0 177 177" svg:d="M88 0c55 4 87 43 89 87 1 49-44 94-93 90-50-4-86-43-84-91 3-57 46-84 88-86z">
          <text:p/>
        </draw:path>
        <draw:path draw:style-name="gr9" draw:text-style-name="P7" draw:layer="layout" svg:width="0.176cm" svg:height="0.176cm" svg:x="14.512cm" svg:y="21.768cm" svg:viewBox="0 0 177 177" svg:d="M90 0c49 1 91 45 87 93-4 51-43 85-90 84s-86-35-87-87c-2-60 51-92 90-90z">
          <text:p/>
        </draw:path>
        <draw:path draw:style-name="gr9" draw:text-style-name="P7" draw:layer="layout" svg:width="0.176cm" svg:height="0.174cm" svg:x="13.637cm" svg:y="18.265cm" svg:viewBox="0 0 177 175" svg:d="M88 175c-48 1-88-42-88-88 0-50 43-90 94-87 59 3 87 52 83 90-3 58-48 88-89 85z">
          <text:p/>
        </draw:path>
        <draw:path draw:style-name="gr9" draw:text-style-name="P7" draw:layer="layout" svg:width="0.175cm" svg:height="0.176cm" svg:x="11.009cm" svg:y="25.271cm" svg:viewBox="0 0 176 177" svg:d="M176 88c1 48-36 88-85 89-48 1-88-36-91-83-2-45 31-94 88-94 50 0 87 36 88 88z">
          <text:p/>
        </draw:path>
        <draw:path draw:style-name="gr9" draw:text-style-name="P7" draw:layer="layout" svg:width="0.175cm" svg:height="0.177cm" svg:x="7.507cm" svg:y="24.395cm" svg:viewBox="0 0 176 178" svg:d="M176 89c0 48-38 87-85 89-49 2-92-41-91-91 1-48 38-86 86-87 46-2 92 38 90 89z">
          <text:p/>
        </draw:path>
        <draw:path draw:style-name="gr9" draw:text-style-name="P7" draw:layer="layout" svg:width="0.178cm" svg:height="0.175cm" svg:x="13.051cm" svg:y="17.681cm" svg:viewBox="0 0 179 176" svg:d="M88 176c-56 1-88-49-88-85 0-52 39-91 90-91s87 37 89 87c1 46-36 91-91 89z">
          <text:p/>
        </draw:path>
        <draw:path draw:style-name="gr9" draw:text-style-name="P7" draw:layer="layout" svg:width="0.178cm" svg:height="0.175cm" svg:x="7.213cm" svg:y="24.105cm" svg:viewBox="0 0 179 176" svg:d="M89 176c-51 0-90-39-89-91 1-48 40-85 88-85 58-1 92 45 91 90-3 51-42 87-90 86z">
          <text:p/>
        </draw:path>
        <draw:path draw:style-name="gr9" draw:text-style-name="P7" draw:layer="layout" svg:width="0.176cm" svg:height="0.175cm" svg:x="9.258cm" svg:y="25.272cm" svg:viewBox="0 0 177 176" svg:d="M92 176c-47 1-87-35-92-83-3-49 40-94 89-93 47 0 88 39 88 87 1 46-39 87-85 89z">
          <text:p/>
        </draw:path>
        <draw:path draw:style-name="gr9" draw:text-style-name="P7" draw:layer="layout" svg:width="0.175cm" svg:height="0.175cm" svg:x="6.34cm" svg:y="22.936cm" svg:viewBox="0 0 176 176" svg:d="M176 85c2 51-36 91-88 91-49 0-87-36-88-85-1-50 33-88 82-91 51-4 93 35 94 85z">
          <text:p/>
        </draw:path>
        <draw:path draw:style-name="gr9" draw:text-style-name="P7" draw:layer="layout" svg:width="0.175cm" svg:height="0.177cm" svg:x="9.55cm" svg:y="25.271cm" svg:viewBox="0 0 176 178" svg:d="M176 89c1 53-47 88-87 89-40 0-91-33-89-94 2-47 39-85 90-84 54 2 87 44 86 89z">
          <text:p/>
        </draw:path>
        <draw:path draw:style-name="gr9" draw:text-style-name="P7" draw:layer="layout" svg:width="0.175cm" svg:height="0.176cm" svg:x="12.178cm" svg:y="17.097cm" svg:viewBox="0 0 176 177" svg:d="M176 85c2 51-37 92-89 92-48 0-86-38-87-86-1-50 34-87 82-91 51-3 94 36 94 85z">
          <text:p/>
        </draw:path>
        <draw:path draw:style-name="gr9" draw:text-style-name="P7" draw:layer="layout" svg:width="0.175cm" svg:height="0.175cm" svg:x="8.674cm" svg:y="16.805cm" svg:viewBox="0 0 176 176" svg:d="M176 91c-2 46-44 85-89 85-49 0-91-46-87-94 4-47 47-85 91-82 47 4 87 45 85 91z">
          <text:p/>
        </draw:path>
        <draw:path draw:style-name="gr9" draw:text-style-name="P7" draw:layer="layout" svg:width="0.175cm" svg:height="0.177cm" svg:x="11.593cm" svg:y="16.804cm" svg:viewBox="0 0 176 178" svg:d="M176 85c1 50-35 89-83 93-39 3-93-30-93-89 0-47 36-87 86-89 38-2 88 28 90 85z">
          <text:p/>
        </draw:path>
        <draw:path draw:style-name="gr9" draw:text-style-name="P7" draw:layer="layout" svg:width="0.176cm" svg:height="0.174cm" svg:x="6.63cm" svg:y="23.52cm" svg:viewBox="0 0 177 175" svg:d="M87 175c-51 0-86-43-87-88 0-38 31-89 93-87 52 2 86 47 84 90-3 51-43 87-90 85z">
          <text:p/>
        </draw:path>
        <draw:path draw:style-name="gr9" draw:text-style-name="P7" draw:layer="layout" svg:width="0.173cm" svg:height="0.176cm" svg:x="12.763cm" svg:y="17.39cm" svg:viewBox="0 0 174 177" svg:d="M174 88c2 53-44 87-85 89-50 1-90-40-89-91 0-50 41-87 87-86 54 1 88 44 87 88z">
          <text:p/>
        </draw:path>
        <draw:path draw:style-name="gr9" draw:text-style-name="P7" draw:layer="layout" svg:width="0.175cm" svg:height="0.173cm" svg:x="8.091cm" svg:y="17.098cm" svg:viewBox="0 0 176 174" svg:d="M85 0c53-2 88 44 91 84 1 51-40 90-91 90-45 0-87-34-85-87 0-57 47-88 85-87z">
          <text:p/>
        </draw:path>
        <draw:path draw:style-name="gr9" draw:text-style-name="P7" draw:layer="layout" svg:width="0.172cm" svg:height="0.172cm" svg:x="11.887cm" svg:y="16.807cm" svg:viewBox="0 0 173 173" svg:d="M95 1c46 5 81 47 77 90-3 47-48 86-92 82-49-5-85-48-80-94 5-49 47-84 95-78z">
          <text:p/>
        </draw:path>
        <draw:path draw:style-name="gr9" draw:text-style-name="P7" draw:layer="layout" svg:width="0.173cm" svg:height="0.174cm" svg:x="13.93cm" svg:y="18.557cm" svg:viewBox="0 0 174 175" svg:d="M174 88c1 47-39 88-87 87-49 0-86-34-87-86-1-49 39-89 86-89s88 40 88 88z">
          <text:p/>
        </draw:path>
        <draw:path draw:style-name="gr9" draw:text-style-name="P7" draw:layer="layout" svg:width="0.174cm" svg:height="0.173cm" svg:x="7.214cm" svg:y="17.682cm" svg:viewBox="0 0 175 174" svg:d="M88 174c-51 1-87-43-88-87 0-39 33-86 87-87 45 0 88 33 88 86 1 57-47 90-87 88z">
          <text:p/>
        </draw:path>
        <draw:path draw:style-name="gr9" draw:text-style-name="P7" draw:layer="layout" svg:width="0.174cm" svg:height="0.173cm" svg:x="11.303cm" svg:y="25.273cm" svg:viewBox="0 0 175 174" svg:d="M85 0c48-2 88 36 90 84 1 47-38 88-85 90s-89-36-90-84c-1-51 36-88 85-90z">
          <text:p/>
        </draw:path>
        <draw:path draw:style-name="gr9" draw:text-style-name="P7" draw:layer="layout" svg:width="0.175cm" svg:height="0.173cm" svg:x="14.512cm" svg:y="22.061cm" svg:viewBox="0 0 176 174" svg:d="M91 174c-47 2-89-38-91-85-1-47 39-88 87-89 47-1 89 37 89 85 0 55-45 89-85 89z">
          <text:p/>
        </draw:path>
        <draw:path draw:style-name="gr9" draw:text-style-name="P7" draw:layer="layout" svg:width="0.174cm" svg:height="0.173cm" svg:x="6.048cm" svg:y="19.435cm" svg:viewBox="0 0 175 174" svg:d="M89 0c49 1 89 44 86 89-2 48-43 86-91 85-47-1-87-44-84-90 2-41 31-84 89-84z">
          <text:p/>
        </draw:path>
        <draw:path draw:style-name="gr9" draw:text-style-name="P7" draw:layer="layout" svg:width="0.174cm" svg:height="0.174cm" svg:x="6.34cm" svg:y="18.851cm" svg:viewBox="0 0 175 175" svg:d="M175 89c-1 49-40 85-88 86-46 0-89-40-87-94 2-37 34-84 91-81 48 2 85 40 84 89z">
          <text:p/>
        </draw:path>
        <draw:path draw:style-name="gr9" draw:text-style-name="P7" draw:layer="layout" svg:width="0.173cm" svg:height="0.172cm" svg:x="13.347cm" svg:y="24.106cm" svg:viewBox="0 0 174 173" svg:d="M87 0c53-1 87 46 87 87 0 45-39 87-87 86-50 0-87-37-87-86 0-50 37-87 87-87z">
          <text:p/>
        </draw:path>
        <draw:path draw:style-name="gr9" draw:text-style-name="P7" draw:layer="layout" svg:width="0.173cm" svg:height="0.174cm" svg:x="14.222cm" svg:y="19.141cm" svg:viewBox="0 0 174 175" svg:d="M174 89c0 48-38 86-86 86-50 0-88-39-88-86-1-51 40-91 91-89 47 1 84 40 83 89z">
          <text:p/>
        </draw:path>
        <draw:path draw:style-name="gr9" draw:text-style-name="P7" draw:layer="layout" svg:width="0.174cm" svg:height="0.171cm" svg:x="6.631cm" svg:y="18.267cm" svg:viewBox="0 0 175 172" svg:d="M89 0c47-1 85 35 86 86 1 47-40 87-87 86-47 0-88-40-88-87 1-40 33-86 89-85z">
          <text:p/>
        </draw:path>
        <draw:path draw:style-name="gr9" draw:text-style-name="P7" draw:layer="layout" svg:width="0.174cm" svg:height="0.174cm" svg:x="8.383cm" svg:y="24.979cm" svg:viewBox="0 0 175 175" svg:d="M175 89c0 48-37 86-85 86-49 1-88-36-90-84-1-50 40-91 90-91 48 1 85 40 85 89z">
          <text:p/>
        </draw:path>
        <draw:path draw:style-name="gr9" draw:text-style-name="P7" draw:layer="layout" svg:width="0.171cm" svg:height="0.172cm" svg:x="12.18cm" svg:y="24.98cm" svg:viewBox="0 0 172 173" svg:d="M172 85c3 47-35 87-83 88-50 0-88-35-89-83-2-51 40-89 84-90 47-1 87 36 88 85z">
          <text:p/>
        </draw:path>
        <draw:path draw:style-name="gr9" draw:text-style-name="P7" draw:layer="layout" svg:width="0.172cm" svg:height="0.173cm" svg:x="13.639cm" svg:y="23.813cm" svg:viewBox="0 0 173 174" svg:d="M173 90c-2 47-43 87-89 84-47-2-87-45-84-91 3-54 48-84 90-83 48 1 84 42 83 90z">
          <text:p/>
        </draw:path>
        <draw:path draw:style-name="gr9" draw:text-style-name="P7" draw:layer="layout" svg:width="0.171cm" svg:height="0.172cm" svg:x="8.968cm" svg:y="25.274cm" svg:viewBox="0 0 172 173" svg:d="M0 87c-1-48 38-87 86-87 48-1 85 36 86 84 2 58-48 89-84 89-42 0-88-35-88-86z">
          <text:p/>
        </draw:path>
        <draw:path draw:style-name="gr9" draw:text-style-name="P7" draw:layer="layout" svg:width="0.172cm" svg:height="0.171cm" svg:x="5.756cm" svg:y="21.479cm" svg:viewBox="0 0 173 172" svg:d="M173 85c1 53-46 88-87 87-48 0-85-40-86-87-1-39 31-86 87-85 48 0 86 37 86 85z">
          <text:p/>
        </draw:path>
        <draw:path draw:style-name="gr9" draw:text-style-name="P7" draw:layer="layout" svg:width="0.172cm" svg:height="0.174cm" svg:x="6.925cm" svg:y="17.974cm" svg:viewBox="0 0 173 175" svg:d="M173 86c2 44-30 87-84 89-46 2-88-35-89-85-1-54 43-89 85-90 45-1 89 38 88 86z">
          <text:p/>
        </draw:path>
        <draw:path draw:style-name="gr9" draw:text-style-name="P7" draw:layer="layout" svg:width="0.172cm" svg:height="0.171cm" svg:x="5.756cm" svg:y="20.895cm" svg:viewBox="0 0 173 172" svg:d="M173 84c1 49-36 87-84 88-49 1-88-36-89-83-1-49 36-87 84-89 49-2 89 38 89 84z">
          <text:p/>
        </draw:path>
        <draw:path draw:style-name="gr9" draw:text-style-name="P7" draw:layer="layout" svg:width="0.174cm" svg:height="0.172cm" svg:x="7.8cm" svg:y="24.69cm" svg:viewBox="0 0 175 173" svg:d="M86 173c-48-1-87-42-86-89 1-48 40-84 89-84 46 0 86 35 86 88 0 47-41 86-89 85z">
          <text:p/>
        </draw:path>
        <draw:path draw:style-name="gr9" draw:text-style-name="P7" draw:layer="layout" svg:width="0.172cm" svg:height="0.173cm" svg:x="7.509cm" svg:y="17.391cm" svg:viewBox="0 0 173 174" svg:d="M173 89c0 37-31 84-88 85-47 1-85-39-85-87 0-47 35-86 86-87 48 0 87 41 87 89z">
          <text:p/>
        </draw:path>
        <draw:path draw:style-name="gr9" draw:text-style-name="P7" draw:layer="layout" svg:width="0.171cm" svg:height="0.171cm" svg:x="12.764cm" svg:y="24.691cm" svg:viewBox="0 0 172 172" svg:d="M87 172c-42 1-88-35-87-87 1-47 35-83 82-85 49-2 88 34 90 83 1 48-37 88-85 89z">
          <text:p/>
        </draw:path>
        <draw:path draw:style-name="gr9" draw:text-style-name="P7" draw:layer="layout" svg:width="0.171cm" svg:height="0.172cm" svg:x="14.223cm" svg:y="22.937cm" svg:viewBox="0 0 172 173" svg:d="M172 85c1 49-35 87-83 88-50 0-88-36-89-83-2-49 36-89 84-90 49 0 87 36 88 85z">
          <text:p/>
        </draw:path>
        <draw:path draw:style-name="gr9" draw:text-style-name="P7" draw:layer="layout" svg:width="0.173cm" svg:height="0.172cm" svg:x="9.843cm" svg:y="16.515cm" svg:viewBox="0 0 174 173" svg:d="M84 173c-47-2-86-44-84-90 3-47 43-84 90-83 47 2 87 43 84 89-3 49-40 85-90 84z">
          <text:p/>
        </draw:path>
        <draw:path draw:style-name="gr9" draw:text-style-name="P7" draw:layer="layout" svg:width="0.17cm" svg:height="0.171cm" svg:x="9.553cm" svg:y="16.515cm" svg:viewBox="0 0 171 172" svg:d="M171 87c0 48-38 86-87 85-47-1-82-35-84-81-3-57 45-90 84-91 47 0 87 39 87 87z">
          <text:p/>
        </draw:path>
        <draw:path draw:style-name="gr9" draw:text-style-name="P7" draw:layer="layout" svg:width="0.171cm" svg:height="0.172cm" svg:x="10.136cm" svg:y="16.515cm" svg:viewBox="0 0 172 173" svg:d="M87 173c-50 0-87-37-87-86 0-48 37-87 85-87 47 0 86 38 87 85 1 48-37 87-85 88z">
          <text:p/>
        </draw:path>
        <draw:path draw:style-name="gr9" draw:text-style-name="P7" draw:layer="layout" svg:width="0.171cm" svg:height="0.172cm" svg:x="10.721cm" svg:y="16.515cm" svg:viewBox="0 0 172 173" svg:d="M88 0c46 1 85 42 84 89s-40 84-89 84c-46-1-85-39-83-89 1-48 40-85 88-84z">
          <text:p/>
        </draw:path>
        <draw:path draw:style-name="gr9" draw:text-style-name="P7" draw:layer="layout" svg:width="0.173cm" svg:height="0.173cm" svg:x="13.053cm" svg:y="24.396cm" svg:viewBox="0 0 174 174" svg:d="M174 89c-1 49-40 86-89 85-47-1-86-42-85-89 2-46 43-86 89-85 48 1 85 41 85 89z">
          <text:p/>
        </draw:path>
        <draw:path draw:style-name="gr9" draw:text-style-name="P7" draw:layer="layout" svg:width="0.169cm" svg:height="0.169cm" svg:x="13.349cm" svg:y="17.684cm" svg:viewBox="0 0 170 170" svg:d="M82 170c-48 0-84-40-82-89 1-45 37-80 83-81 49-1 87 40 87 85 0 46-40 86-88 85z">
          <text:p/>
        </draw:path>
        <draw:path draw:style-name="gr9" draw:text-style-name="P7" draw:layer="layout" svg:width="0.173cm" svg:height="0.171cm" svg:x="12.47cm" svg:y="17.099cm" svg:viewBox="0 0 174 172" svg:d="M87 172c-50 2-87-40-87-86 1-53 45-87 87-86 47 1 88 39 87 86-1 53-43 88-87 86z">
          <text:p/>
        </draw:path>
        <draw:path draw:style-name="gr9" draw:text-style-name="P7" draw:layer="layout" svg:width="0.172cm" svg:height="0.173cm" svg:x="6.341cm" svg:y="23.23cm" svg:viewBox="0 0 173 174" svg:d="M173 90c-1 52-47 86-89 84-50-3-85-44-84-90 1-39 32-86 90-84 51 2 85 43 83 90z">
          <text:p/>
        </draw:path>
        <draw:path draw:style-name="gr9" draw:text-style-name="P7" draw:layer="layout" svg:width="0.172cm" svg:height="0.173cm" svg:x="5.756cm" svg:y="21.186cm" svg:viewBox="0 0 173 174" svg:d="M173 88c1 44-34 86-87 86-56 0-86-47-86-86 0-43 33-87 86-88 48 0 88 39 87 88z">
          <text:p/>
        </draw:path>
        <draw:path draw:style-name="gr9" draw:text-style-name="P7" draw:layer="layout" svg:width="0.17cm" svg:height="0.171cm" svg:x="5.757cm" svg:y="20.311cm" svg:viewBox="0 0 171 172" svg:d="M84 0c44-1 88 37 87 87 0 46-35 82-81 85-56 4-90-45-90-82-1-48 36-89 84-90z">
          <text:p/>
        </draw:path>
        <draw:path draw:style-name="gr9" draw:text-style-name="P7" draw:layer="layout" svg:width="0.172cm" svg:height="0.174cm" svg:x="5.756cm" svg:y="20.601cm" svg:viewBox="0 0 173 175" svg:d="M173 92c-2 50-48 86-92 82-53-5-83-48-81-93 3-49 49-85 92-81 47 5 84 42 81 92z">
          <text:p/>
        </draw:path>
        <draw:path draw:style-name="gr9" draw:text-style-name="P7" draw:layer="layout" svg:width="0.172cm" svg:height="0.172cm" svg:x="14.514cm" svg:y="19.725cm" svg:viewBox="0 0 173 173" svg:d="M84 173c-45 0-86-38-84-88 2-57 50-86 89-85 46 2 86 43 84 90-1 45-38 85-89 83z">
          <text:p/>
        </draw:path>
        <draw:path draw:style-name="gr9" draw:text-style-name="P7" draw:layer="layout" svg:width="0.17cm" svg:height="0.17cm" svg:x="13.932cm" svg:y="23.522cm" svg:viewBox="0 0 171 171" svg:d="M83 171c-48 0-85-40-83-88 1-47 37-82 83-83 51-1 89 42 88 86 0 47-40 87-88 85z">
          <text:p/>
        </draw:path>
        <draw:path draw:style-name="gr9" draw:text-style-name="P7" draw:layer="layout" svg:width="0.172cm" svg:height="0.172cm" svg:x="10.427cm" svg:y="16.515cm" svg:viewBox="0 0 173 173" svg:d="M86 0c47 0 87 38 87 86 0 49-39 87-87 87-48-1-86-40-86-87 0-46 40-86 86-86z">
          <text:p/>
        </draw:path>
        <draw:path draw:style-name="gr9" draw:text-style-name="P7" draw:layer="layout" svg:width="0.171cm" svg:height="0.171cm" svg:x="6.049cm" svg:y="22.648cm" svg:viewBox="0 0 172 172" svg:d="M84 0c59-2 89 45 88 84 0 56-44 87-85 88-47 0-89-41-87-88 2-50 39-83 84-84z">
          <text:p/>
        </draw:path>
        <draw:path draw:style-name="gr9" draw:text-style-name="P7" draw:layer="layout" svg:width="0.17cm" svg:height="0.169cm" svg:x="6.926cm" svg:y="24.108cm" svg:viewBox="0 0 171 170" svg:d="M86 0c48 0 86 40 85 87-2 45-39 82-84 83-48 1-87-38-87-85 0-48 38-86 86-85z">
          <text:p/>
        </draw:path>
        <draw:path draw:style-name="gr9" draw:text-style-name="P7" draw:layer="layout" svg:width="0.168cm" svg:height="0.167cm" svg:x="14.808cm" svg:y="20.897cm" svg:viewBox="0 0 169 168" svg:d="M84 0c45-1 84 36 85 83 1 45-36 83-81 85-47 2-89-38-88-85 1-46 39-83 84-83z">
          <text:p/>
        </draw:path>
        <draw:path draw:style-name="gr9" draw:text-style-name="P7" draw:layer="layout" svg:width="0.17cm" svg:height="0.169cm" svg:x="14.223cm" svg:y="18.853cm" svg:viewBox="0 0 171 170" svg:d="M171 87c-1 47-42 86-89 83-45-2-81-41-82-85 0-36 30-86 88-85 44 0 86 37 83 87z">
          <text:p/>
        </draw:path>
        <draw:path draw:style-name="gr9" draw:text-style-name="P7" draw:layer="layout" svg:width="0.17cm" svg:height="0.17cm" svg:x="7.216cm" svg:y="24.397cm" svg:viewBox="0 0 171 171" svg:d="M171 88c0 46-36 82-83 83-49 1-89-38-88-85 1-44 38-83 83-86 46-2 88 39 88 88z">
          <text:p/>
        </draw:path>
        <draw:path draw:style-name="gr9" draw:text-style-name="P7" draw:layer="layout" svg:width="0.169cm" svg:height="0.169cm" svg:x="11.012cm" svg:y="16.516cm" svg:viewBox="0 0 170 170" svg:d="M83 170c-48-1-86-42-83-89 2-44 41-80 85-81 47-1 85 39 85 86 1 46-37 87-87 84z">
          <text:p/>
        </draw:path>
        <draw:path draw:style-name="gr9" draw:text-style-name="P7" draw:layer="layout" svg:width="0.169cm" svg:height="0.17cm" svg:x="8.094cm" svg:y="24.981cm" svg:viewBox="0 0 170 171" svg:d="M84 171c-48 0-85-37-84-87 0-45 36-82 81-84 46-2 88 37 89 84 1 39-29 87-86 87z">
          <text:p/>
        </draw:path>
        <draw:path draw:style-name="gr9" draw:text-style-name="P7" draw:layer="layout" svg:width="0.169cm" svg:height="0.17cm" svg:x="13.64cm" svg:y="17.976cm" svg:viewBox="0 0 170 171" svg:d="M170 87c1 46-35 84-87 84-45-1-82-38-83-83-2-45 38-89 84-88 47 1 87 35 86 87z">
          <text:p/>
        </draw:path>
        <draw:path draw:style-name="gr9" draw:text-style-name="P7" draw:layer="layout" svg:width="0.17cm" svg:height="0.169cm" svg:x="6.05cm" svg:y="19.143cm" svg:viewBox="0 0 171 170" svg:d="M86 170c-45 2-85-34-86-84 0-48 40-88 87-86 44 1 83 37 84 83s-34 87-85 87z">
          <text:p/>
        </draw:path>
        <draw:path draw:style-name="gr9" draw:text-style-name="P7" draw:layer="layout" svg:width="0.166cm" svg:height="0.167cm" svg:x="5.759cm" svg:y="19.728cm" svg:viewBox="0 0 167 168" svg:d="M84 168c-44 0-82-36-84-81-2-46 39-88 85-87 44 1 82 40 82 84 0 46-38 83-83 84z">
          <text:p/>
        </draw:path>
        <draw:path draw:style-name="gr9" draw:text-style-name="P7" draw:layer="layout" svg:width="0.168cm" svg:height="0.168cm" svg:x="7.511cm" svg:y="24.692cm" svg:viewBox="0 0 169 169" svg:d="M0 81c1-45 38-81 84-81 49 0 84 41 85 83 1 47-43 89-90 86-42-3-81-39-79-88z">
          <text:p/>
        </draw:path>
        <draw:path draw:style-name="gr9" draw:text-style-name="P7" draw:layer="layout" svg:width="0.167cm" svg:height="0.167cm" svg:x="12.766cm" svg:y="17.101cm" svg:viewBox="0 0 168 168" svg:d="M85 168c-45 1-83-35-85-80s36-88 85-88c44 1 83 40 83 85 0 44-38 82-83 83z">
          <text:p/>
        </draw:path>
        <draw:path draw:style-name="gr9" draw:text-style-name="P7" draw:layer="layout" svg:width="0.167cm" svg:height="0.167cm" svg:x="6.928cm" svg:y="17.685cm" svg:viewBox="0 0 168 168" svg:d="M83 0c45 0 84 39 85 83 0 43-37 83-83 85s-86-40-85-87c1-44 39-81 83-81z">
          <text:p/>
        </draw:path>
        <draw:path draw:style-name="gr9" draw:text-style-name="P7" draw:layer="layout" svg:width="0.169cm" svg:height="0.169cm" svg:x="11.306cm" svg:y="16.516cm" svg:viewBox="0 0 170 170" svg:d="M83 170c-46 0-82-36-83-82 0-48 40-89 86-88 44 2 83 40 84 84 0 44-35 88-87 86z">
          <text:p/>
        </draw:path>
        <draw:path draw:style-name="gr9" draw:text-style-name="P7" draw:layer="layout" svg:width="0.167cm" svg:height="0.167cm" svg:x="14.809cm" svg:y="20.313cm" svg:viewBox="0 0 168 168" svg:d="M86 168c-46 0-84-36-86-80-2-46 39-89 86-88 44 1 82 41 82 85 0 45-38 82-82 83z">
          <text:p/>
        </draw:path>
        <draw:path draw:style-name="gr9" draw:text-style-name="P7" draw:layer="layout" svg:width="0.167cm" svg:height="0.168cm" svg:x="10.138cm" svg:y="25.567cm" svg:viewBox="0 0 168 169" svg:d="M82 169c-47-1-82-37-82-83-1-48 37-83 81-86 46-2 90 42 87 89-2 43-39 82-86 80z">
          <text:p/>
        </draw:path>
        <draw:path draw:style-name="gr9" draw:text-style-name="P7" draw:layer="layout" svg:width="0.166cm" svg:height="0.167cm" svg:x="6.344cm" svg:y="23.524cm" svg:viewBox="0 0 167 168" svg:d="M82 0c44-2 83 34 85 79 3 47-37 89-83 89-45-1-84-40-84-84-1-44 37-83 82-84z">
          <text:p/>
        </draw:path>
        <draw:path draw:style-name="gr9" draw:text-style-name="P7" draw:layer="layout" svg:width="0.17cm" svg:height="0.17cm" svg:x="14.515cm" svg:y="22.354cm" svg:viewBox="0 0 171 171" svg:d="M84 171c-43 1-84-34-84-86 1-45 38-83 82-85 47-1 89 38 89 85-1 49-38 87-87 86z">
          <text:p/>
        </draw:path>
        <draw:path draw:style-name="gr9" draw:text-style-name="P7" draw:layer="layout" svg:width="0.17cm" svg:height="0.169cm" svg:x="5.757cm" svg:y="21.771cm" svg:viewBox="0 0 171 170" svg:d="M171 86c2 39-31 86-87 84-47-1-82-37-84-82-1-40 29-87 85-88 48-1 87 39 86 86z">
          <text:p/>
        </draw:path>
        <draw:path draw:style-name="gr9" draw:text-style-name="P7" draw:layer="layout" svg:width="0.169cm" svg:height="0.17cm" svg:x="11.596cm" svg:y="25.275cm" svg:viewBox="0 0 170 171" svg:d="M84 0c49 0 86 37 86 86 0 51-47 86-88 85-45-2-81-41-82-85-2-47 36-86 84-86z">
          <text:p/>
        </draw:path>
        <draw:path draw:style-name="gr9" draw:text-style-name="P7" draw:layer="layout" svg:width="0.168cm" svg:height="0.169cm" svg:x="7.802cm" svg:y="17.1cm" svg:viewBox="0 0 169 170" svg:d="M85 170c-48 1-86-41-85-88 2-45 41-81 85-82 49 0 85 39 84 88-1 47-37 82-84 82z">
          <text:p/>
        </draw:path>
        <draw:path draw:style-name="gr9" draw:text-style-name="P7" draw:layer="layout" svg:width="0.168cm" svg:height="0.168cm" svg:x="5.758cm" svg:y="20.021cm" svg:viewBox="0 0 169 169" svg:d="M0 83c-1-45 35-82 82-83 49-2 87 35 87 83 1 37-26 82-81 86-45 3-88-37-88-86z">
          <text:p/>
        </draw:path>
        <draw:path draw:style-name="gr9" draw:text-style-name="P7" draw:layer="layout" svg:width="0.168cm" svg:height="0.168cm" svg:x="6.343cm" svg:y="18.56cm" svg:viewBox="0 0 169 169" svg:d="M169 85c1 46-34 82-81 84-49 1-88-35-88-83-1-44 35-88 87-86 54 2 83 46 82 85z">
          <text:p/>
        </draw:path>
        <draw:path draw:style-name="gr9" draw:text-style-name="P7" draw:layer="layout" svg:width="0.169cm" svg:height="0.17cm" svg:x="8.385cm" svg:y="16.808cm" svg:viewBox="0 0 170 171" svg:d="M170 87c1 51-44 85-88 84-45-2-81-40-82-84-1-46 38-87 85-87 50 0 88 41 85 87z">
          <text:p/>
        </draw:path>
        <draw:path draw:style-name="gr9" draw:text-style-name="P7" draw:layer="layout" svg:width="0.166cm" svg:height="0.167cm" svg:x="14.517cm" svg:y="22.65cm" svg:viewBox="0 0 167 168" svg:d="M82 0c43-3 82 30 85 79 3 47-38 90-84 89-45-1-83-39-83-85 0-47 36-83 82-83z">
          <text:p/>
        </draw:path>
        <draw:path draw:style-name="gr9" draw:text-style-name="P7" draw:layer="layout" svg:width="0.167cm" svg:height="0.168cm" svg:x="10.429cm" svg:y="25.567cm" svg:viewBox="0 0 168 169" svg:d="M168 88c0 46-37 80-84 81-43 0-81-33-84-82-2-47 42-89 88-87 47 3 81 40 80 88z">
          <text:p/>
        </draw:path>
        <draw:path draw:style-name="gr9" draw:text-style-name="P7" draw:layer="layout" svg:width="0.167cm" svg:height="0.167cm" svg:x="13.933cm" svg:y="18.269cm" svg:viewBox="0 0 168 168" svg:d="M0 86c-2-52 43-86 80-86 48-2 88 35 88 86 1 44-39 82-85 82-44 1-82-37-83-82z">
          <text:p/>
        </draw:path>
        <draw:path draw:style-name="gr9" draw:text-style-name="P7" draw:layer="layout" svg:width="0.168cm" svg:height="0.167cm" svg:x="6.634cm" svg:y="23.816cm" svg:viewBox="0 0 169 168" svg:d="M85 168c-59 0-87-47-85-87 2-47 34-80 83-81 46-2 86 33 86 85-1 46-37 83-84 83z">
          <text:p/>
        </draw:path>
        <draw:path draw:style-name="gr9" draw:text-style-name="P7" draw:layer="layout" svg:width="0.169cm" svg:height="0.168cm" svg:x="13.055cm" svg:y="17.394cm" svg:viewBox="0 0 170 169" svg:d="M84 0c46 0 84 34 86 81 2 51-36 86-84 88-47 2-87-41-86-87 2-45 39-81 84-82z">
          <text:p/>
        </draw:path>
        <draw:path draw:style-name="gr9" draw:text-style-name="P7" draw:layer="layout" svg:width="0.168cm" svg:height="0.169cm" svg:x="14.516cm" svg:y="19.437cm" svg:viewBox="0 0 169 170" svg:d="M0 82c1-47 39-85 89-82 43 3 80 36 80 86 0 45-39 83-84 84-47 1-86-40-85-88z">
          <text:p/>
        </draw:path>
        <draw:path draw:style-name="gr9" draw:text-style-name="P7" draw:layer="layout" svg:width="0.168cm" svg:height="0.167cm" svg:x="5.758cm" svg:y="22.065cm" svg:viewBox="0 0 169 168" svg:d="M87 0c46 1 82 37 82 83 0 38-28 82-83 85-46 2-88-42-86-89 2-46 41-80 87-79z">
          <text:p/>
        </draw:path>
        <draw:path draw:style-name="gr9" draw:text-style-name="P7" draw:layer="layout" svg:width="0.167cm" svg:height="0.167cm" svg:x="11.89cm" svg:y="25.276cm" svg:viewBox="0 0 168 168" svg:d="M83 0c43-1 83 33 85 83 1 47-42 89-88 85-39-3-80-31-80-85 1-47 37-83 83-83z">
          <text:p/>
        </draw:path>
        <draw:path draw:style-name="gr9" draw:text-style-name="P7" draw:layer="layout" svg:width="0.168cm" svg:height="0.168cm" svg:x="8.678cm" svg:y="25.276cm" svg:viewBox="0 0 169 169" svg:d="M0 85c-1-46 34-83 79-85 52-2 88 35 90 83 1 47-41 88-88 86-45-1-81-39-81-84z">
          <text:p/>
        </draw:path>
        <draw:path draw:style-name="gr9" draw:text-style-name="P7" draw:layer="layout" svg:width="0.168cm" svg:height="0.169cm" svg:x="9.263cm" svg:y="16.516cm" svg:viewBox="0 0 169 170" svg:d="M83 170c-46 0-82-36-83-82-1-48 39-89 86-88 44 2 83 40 83 84 0 51-39 88-86 86z">
          <text:p/>
        </draw:path>
        <draw:path draw:style-name="gr9" draw:text-style-name="P7" draw:layer="layout" svg:width="0.167cm" svg:height="0.166cm" svg:x="12.182cm" svg:y="16.81cm" svg:viewBox="0 0 168 167" svg:d="M87 0c54 0 83 50 81 85-1 45-39 83-84 82-48 0-87-41-84-88 2-47 40-80 87-79z">
          <text:p/>
        </draw:path>
        <draw:path draw:style-name="gr9" draw:text-style-name="P7" draw:layer="layout" svg:width="0.168cm" svg:height="0.167cm" svg:x="14.224cm" svg:y="23.233cm" svg:viewBox="0 0 169 168" svg:d="M169 83c1 41-30 83-82 85-48 1-89-41-87-88 3-45 40-80 87-80 49 0 84 43 82 83z">
          <text:p/>
        </draw:path>
        <draw:path draw:style-name="gr9" draw:text-style-name="P7" draw:layer="layout" svg:width="0.167cm" svg:height="0.168cm" svg:x="9.846cm" svg:y="25.567cm" svg:viewBox="0 0 168 169" svg:d="M81 169c-39-1-81-33-81-86 1-46 41-83 86-83 47 1 84 41 82 91-2 44-41 81-87 78z">
          <text:p/>
        </draw:path>
        <draw:path draw:style-name="gr9" draw:text-style-name="P7" draw:layer="layout" svg:width="0.167cm" svg:height="0.168cm" svg:x="6.052cm" svg:y="22.939cm" svg:viewBox="0 0 168 169" svg:d="M86 169c-46 1-84-34-86-80-2-49 37-89 85-89 44 1 82 40 83 85 0 45-37 83-82 84z">
          <text:p/>
        </draw:path>
        <draw:path draw:style-name="gr9" draw:text-style-name="P7" draw:layer="layout" svg:width="0.165cm" svg:height="0.167cm" svg:x="13.642cm" svg:y="24.109cm" svg:viewBox="0 0 166 168" svg:d="M86 0c45 1 81 38 80 85 0 46-38 83-82 83-41 0-86-33-84-88 2-47 42-81 86-80z">
          <text:p/>
        </draw:path>
        <draw:path draw:style-name="gr9" draw:text-style-name="P7" draw:layer="layout" svg:width="0.168cm" svg:height="0.166cm" svg:x="14.808cm" svg:y="20.604cm" svg:viewBox="0 0 169 167" svg:d="M169 82c3 36-27 84-81 85-49 2-88-36-88-83 1-46 39-83 84-84 45 0 84 36 85 82z">
          <text:p/>
        </draw:path>
        <draw:path draw:style-name="gr9" draw:text-style-name="P7" draw:layer="layout" svg:width="0.166cm" svg:height="0.168cm" svg:x="12.473cm" svg:y="24.982cm" svg:viewBox="0 0 167 169" svg:d="M167 84c1 46-34 83-80 85-45 1-87-34-87-87 0-45 40-82 85-82 45 1 82 38 82 84z">
          <text:p/>
        </draw:path>
        <draw:path draw:style-name="gr9" draw:text-style-name="P7" draw:layer="layout" svg:width="0.166cm" svg:height="0.165cm" svg:x="13.35cm" svg:y="24.4cm" svg:viewBox="0 0 167 166" svg:d="M83 166c-46 0-82-36-83-82-1-39 29-81 82-84 46-3 88 40 85 86-2 40-33 82-84 80z">
          <text:p/>
        </draw:path>
        <draw:path draw:style-name="gr9" draw:text-style-name="P7" draw:layer="layout" svg:width="0.166cm" svg:height="0.165cm" svg:x="10.723cm" svg:y="25.569cm" svg:viewBox="0 0 167 166" svg:d="M81 166c-45 0-80-37-81-84 0-42 34-82 82-82 53-1 88 42 85 86-2 49-41 82-86 80z">
          <text:p/>
        </draw:path>
        <draw:path draw:style-name="gr9" draw:text-style-name="P7" draw:layer="layout" svg:width="0.168cm" svg:height="0.167cm" svg:x="14.808cm" svg:y="21.189cm" svg:viewBox="0 0 169 168" svg:d="M169 84c0 46-37 83-83 84-46 0-84-36-86-81-1-48 38-88 86-87 46 2 83 39 83 84z">
          <text:p/>
        </draw:path>
        <draw:path draw:style-name="gr9" draw:text-style-name="P7" draw:layer="layout" svg:width="0.166cm" svg:height="0.165cm" svg:x="5.759cm" svg:y="22.357cm" svg:viewBox="0 0 167 166" svg:d="M167 86c0 39-35 83-86 80-48-1-83-44-81-84 4-55 47-83 85-82 46 2 83 42 82 86z">
          <text:p/>
        </draw:path>
        <draw:path draw:style-name="gr9" draw:text-style-name="P7" draw:layer="layout" svg:width="0.165cm" svg:height="0.166cm" svg:x="11.598cm" svg:y="16.518cm" svg:viewBox="0 0 166 167" svg:d="M166 87c0 39-36 81-85 80-49-2-83-44-81-85 1-45 43-84 86-82 45 3 82 42 80 87z">
          <text:p/>
        </draw:path>
        <draw:path draw:style-name="gr9" draw:text-style-name="P7" draw:layer="layout" svg:width="0.166cm" svg:height="0.166cm" svg:x="14.809cm" svg:y="21.481cm" svg:viewBox="0 0 167 167" svg:d="M85 0c45 0 82 38 82 83 1 44-35 83-80 84-53 1-88-43-87-85 1-40 35-83 85-82z">
          <text:p/>
        </draw:path>
        <draw:path draw:style-name="gr9" draw:text-style-name="P7" draw:layer="layout" svg:width="0.164cm" svg:height="0.165cm" svg:x="7.805cm" svg:y="24.984cm" svg:viewBox="0 0 165 166" svg:d="M84 166c-39 2-83-28-84-81-1-48 32-83 80-85 45-2 84 34 85 82 0 46-35 83-81 84z">
          <text:p/>
        </draw:path>
        <draw:path draw:style-name="gr9" draw:text-style-name="P7" draw:layer="layout" svg:width="0.167cm" svg:height="0.166cm" svg:x="9.554cm" svg:y="25.568cm" svg:viewBox="0 0 168 167" svg:d="M85 167c-52 2-84-44-85-80-1-44 34-87 85-87 45 0 83 40 83 85s-38 82-83 82z">
          <text:p/>
        </draw:path>
        <draw:path draw:style-name="gr9" draw:text-style-name="P7" draw:layer="layout" svg:width="0.167cm" svg:height="0.166cm" svg:x="8.97cm" svg:y="16.518cm" svg:viewBox="0 0 168 167" svg:d="M168 84c0 45-37 82-82 83-51 1-84-42-86-81-1-40 31-86 87-86 44 0 81 39 81 84z">
          <text:p/>
        </draw:path>
        <draw:path draw:style-name="gr9" draw:text-style-name="P7" draw:layer="layout" svg:width="0.166cm" svg:height="0.164cm" svg:x="14.809cm" svg:y="21.774cm" svg:viewBox="0 0 167 165" svg:d="M167 85c-1 45-39 81-86 80-55-1-82-52-81-85 2-45 41-82 86-80 46 2 82 40 81 85z">
          <text:p/>
        </draw:path>
        <draw:path draw:style-name="gr9" draw:text-style-name="P7" draw:layer="layout" svg:width="0.165cm" svg:height="0.165cm" svg:x="8.388cm" svg:y="25.277cm" svg:viewBox="0 0 166 166" svg:d="M81 0c47 0 83 35 85 81 1 38-27 82-82 85-44 2-84-36-84-81-1-46 35-85 81-85z">
          <text:p/>
        </draw:path>
        <draw:path draw:style-name="gr9" draw:text-style-name="P7" draw:layer="layout" svg:width="0.165cm" svg:height="0.166cm" svg:x="13.057cm" svg:y="24.693cm" svg:viewBox="0 0 166 167" svg:d="M166 81c2 46-36 83-81 86-44 2-83-38-85-83-1-44 36-83 82-84 45-1 83 35 84 81z">
          <text:p/>
        </draw:path>
        <draw:path draw:style-name="gr9" draw:text-style-name="P7" draw:layer="layout" svg:width="0.163cm" svg:height="0.165cm" svg:x="6.053cm" svg:y="18.855cm" svg:viewBox="0 0 164 166" svg:d="M81 0c35-3 83 27 83 82 1 46-35 83-80 84-45 2-83-36-84-81 0-48 35-84 81-85z">
          <text:p/>
        </draw:path>
        <draw:path draw:style-name="gr9" draw:text-style-name="P7" draw:layer="layout" svg:width="0.165cm" svg:height="0.164cm" svg:x="14.226cm" svg:y="18.562cm" svg:viewBox="0 0 166 165" svg:d="M166 87c1 34-32 80-87 78-48-1-81-43-79-85 2-46 41-81 86-80 46 2 81 40 80 87z">
          <text:p/>
        </draw:path>
        <draw:path draw:style-name="gr9" draw:text-style-name="P7" draw:layer="layout" svg:width="0.165cm" svg:height="0.165cm" svg:x="11.014cm" svg:y="25.569cm" svg:viewBox="0 0 166 166" svg:d="M166 85c-1 46-38 82-85 81-43-1-81-36-81-85 0-45 42-84 85-81 54 3 83 46 81 85z">
          <text:p/>
        </draw:path>
        <draw:path draw:style-name="gr9" draw:text-style-name="P7" draw:layer="layout" svg:width="0.163cm" svg:height="0.165cm" svg:x="14.518cm" svg:y="19.145cm" svg:viewBox="0 0 164 166" svg:d="M85 166c-46 2-83-33-85-79-1-49 33-83 79-87 43-3 84 35 85 81 2 46-34 84-79 85z">
          <text:p/>
        </draw:path>
        <draw:path draw:style-name="gr9" draw:text-style-name="P7" draw:layer="layout" svg:width="0.165cm" svg:height="0.162cm" svg:x="14.81cm" svg:y="20.023cm" svg:viewBox="0 0 166 163" svg:d="M86 163c-46 1-85-34-86-80-1-44 38-83 84-83 43 0 78 34 82 78 2 33-25 84-80 85z">
          <text:p/>
        </draw:path>
        <draw:path draw:style-name="gr9" draw:text-style-name="P7" draw:layer="layout" svg:width="0.165cm" svg:height="0.163cm" svg:x="5.76cm" svg:y="19.439cm" svg:viewBox="0 0 166 164" svg:d="M93 1c43 4 78 48 72 91-6 45-47 77-91 72-44-6-77-43-74-84 3-44 39-85 93-79z">
          <text:p/>
        </draw:path>
        <draw:path draw:style-name="gr9" draw:text-style-name="P7" draw:layer="layout" svg:width="0.161cm" svg:height="0.163cm" svg:x="9.266cm" svg:y="25.57cm" svg:viewBox="0 0 162 164" svg:d="M162 84c-1 47-40 82-86 80-45-2-78-40-76-88 2-43 37-77 81-76 46 1 83 34 81 84z">
          <text:p/>
        </draw:path>
        <draw:path draw:style-name="gr9" draw:text-style-name="P7" draw:layer="layout" svg:width="0.161cm" svg:height="0.163cm" svg:x="8.681cm" svg:y="16.52cm" svg:viewBox="0 0 162 164" svg:d="M75 164c-46-3-78-42-75-89 2-42 39-77 83-75 49 2 81 39 79 87-2 45-40 80-87 77z">
          <text:p/>
        </draw:path>
        <draw:path draw:style-name="gr9" draw:text-style-name="P7" draw:layer="layout" svg:width="0.161cm" svg:height="0.163cm" svg:x="14.519cm" svg:y="22.942cm" svg:viewBox="0 0 162 164" svg:d="M0 83c-1-53 43-83 81-83 46 0 82 38 81 84-1 44-35 78-79 80s-82-35-83-81z">
          <text:p/>
        </draw:path>
        <draw:path draw:style-name="gr9" draw:text-style-name="P7" draw:layer="layout" svg:width="0.163cm" svg:height="0.163cm" svg:x="6.346cm" svg:y="18.271cm" svg:viewBox="0 0 164 164" svg:d="M82 0c45 0 83 40 82 83s-37 78-80 81c-43 2-85-36-84-82 0-52 42-83 82-82z">
          <text:p/>
        </draw:path>
        <draw:path draw:style-name="gr9" draw:text-style-name="P7" draw:layer="layout" svg:width="0.163cm" svg:height="0.161cm" svg:x="6.929cm" svg:y="24.403cm" svg:viewBox="0 0 164 162" svg:d="M83 162c-54 1-83-48-83-82 0-45 38-81 84-80 42 1 79 34 80 77 2 42-33 85-81 85z">
          <text:p/>
        </draw:path>
        <draw:path draw:style-name="gr9" draw:text-style-name="P7" draw:layer="layout" svg:width="0.163cm" svg:height="0.162cm" svg:x="14.811cm" svg:y="22.066cm" svg:viewBox="0 0 164 163" svg:d="M81 163c-45 0-84-39-81-83 3-51 44-82 85-80 43 3 78 38 79 81 1 45-37 82-83 82z">
          <text:p/>
        </draw:path>
        <draw:path draw:style-name="gr9" draw:text-style-name="P7" draw:layer="layout" svg:width="0.163cm" svg:height="0.163cm" svg:x="7.22cm" svg:y="17.396cm" svg:viewBox="0 0 164 164" svg:d="M84 0c46 0 81 37 80 83 0 46-36 82-82 81-54-1-83-41-82-82 0-48 39-83 84-82z">
          <text:p/>
        </draw:path>
        <draw:path draw:style-name="gr9" draw:text-style-name="P7" draw:layer="layout" svg:width="0.161cm" svg:height="0.163cm" svg:x="13.645cm" svg:y="17.687cm" svg:viewBox="0 0 162 164" svg:d="M162 82c0 49-43 83-84 82-42-1-77-37-78-80-1-45 35-83 79-84 35-1 84 28 83 82z">
          <text:p/>
        </draw:path>
        <draw:path draw:style-name="gr9" draw:text-style-name="P7" draw:layer="layout" svg:width="0.164cm" svg:height="0.163cm" svg:x="13.934cm" svg:y="23.818cm" svg:viewBox="0 0 165 164" svg:d="M82 164c-47 1-82-40-82-82s34-83 83-82c51 1 83 38 82 83 0 48-36 82-83 81z">
          <text:p/>
        </draw:path>
        <draw:path draw:style-name="gr9" draw:text-style-name="P7" draw:layer="layout" svg:width="0.164cm" svg:height="0.163cm" svg:x="8.096cm" svg:y="16.811cm" svg:viewBox="0 0 165 164" svg:d="M0 79c-1-40 35-81 85-79 45 2 82 37 80 86-3 50-41 79-86 78-46-1-82-40-79-85z">
          <text:p/>
        </draw:path>
        <draw:path draw:style-name="gr9" draw:text-style-name="P7" draw:layer="layout" svg:width="0.162cm" svg:height="0.163cm" svg:x="5.47cm" svg:y="20.899cm" svg:viewBox="0 0 163 164" svg:d="M0 84c-1-54 46-85 81-84 46 0 82 38 82 84-1 43-35 79-79 80-41 1-83-32-84-80z">
          <text:p/>
        </draw:path>
        <draw:path draw:style-name="gr9" draw:text-style-name="P7" draw:layer="layout" svg:width="0.163cm" svg:height="0.162cm" svg:x="12.184cm" svg:y="25.278cm" svg:viewBox="0 0 164 163" svg:d="M84 0c46 1 83 41 80 86-2 43-38 76-81 77-46 0-85-37-83-82 2-50 43-83 84-81z">
          <text:p/>
        </draw:path>
        <draw:path draw:style-name="gr9" draw:text-style-name="P7" draw:layer="layout" svg:width="0.162cm" svg:height="0.163cm" svg:x="7.513cm" svg:y="17.104cm" svg:viewBox="0 0 163 164" svg:d="M0 82c-1-39 31-83 83-82 49 0 80 37 80 83 0 42-36 79-78 81-44 1-84-38-85-82z">
          <text:p/>
        </draw:path>
        <draw:path draw:style-name="gr9" draw:text-style-name="P7" draw:layer="layout" svg:width="0.159cm" svg:height="0.162cm" svg:x="6.639cm" svg:y="24.111cm" svg:viewBox="0 0 160 163" svg:d="M160 82c1 43-31 77-78 81-44 3-83-36-82-82 0-54 43-79 77-81 44-3 83 36 83 82z">
          <text:p/>
        </draw:path>
        <draw:path draw:style-name="gr9" draw:text-style-name="P7" draw:layer="layout" svg:width="0.162cm" svg:height="0.16cm" svg:x="8.973cm" svg:y="25.572cm" svg:viewBox="0 0 163 161" svg:d="M84 161c-44 2-85-38-84-82 1-43 37-78 80-79 45-2 84 37 83 81-1 43-37 79-79 80z">
          <text:p/>
        </draw:path>
        <draw:path draw:style-name="gr9" draw:text-style-name="P7" draw:layer="layout" svg:width="0.162cm" svg:height="0.161cm" svg:x="12.768cm" svg:y="24.986cm" svg:viewBox="0 0 163 162" svg:d="M79 0c46-1 85 38 84 83-1 42-37 78-80 79-44 1-83-36-83-82 0-43 37-79 79-80z">
          <text:p/>
        </draw:path>
        <draw:path draw:style-name="gr9" draw:text-style-name="P7" draw:layer="layout" svg:width="0.162cm" svg:height="0.16cm" svg:x="5.761cm" svg:y="22.652cm" svg:viewBox="0 0 163 161" svg:d="M80 161c-43 0-80-36-80-79 0-49 41-83 82-82 44 1 80 36 81 78 2 45-36 84-83 83z">
          <text:p/>
        </draw:path>
        <draw:path draw:style-name="gr9" draw:text-style-name="P7" draw:layer="layout" svg:width="0.163cm" svg:height="0.161cm" svg:x="10.14cm" svg:y="16.228cm" svg:viewBox="0 0 164 162" svg:d="M73 162c-49-5-77-52-72-91 6-45 47-76 93-70 41 5 74 44 70 87-5 47-45 78-91 74z">
          <text:p/>
        </draw:path>
        <draw:path draw:style-name="gr9" draw:text-style-name="P7" draw:layer="layout" svg:width="0.163cm" svg:height="0.163cm" svg:x="6.637cm" svg:y="17.98cm" svg:viewBox="0 0 164 164" svg:d="M164 84c1 43-37 81-84 80-46-2-81-37-80-84s36-81 83-80c46 0 83 37 81 84z">
          <text:p/>
        </draw:path>
        <draw:path draw:style-name="gr9" draw:text-style-name="P7" draw:layer="layout" svg:width="0.161cm" svg:height="0.162cm" svg:x="11.309cm" svg:y="25.571cm" svg:viewBox="0 0 162 163" svg:d="M83 163c-46 1-83-36-83-83-1-38 29-81 83-80 45 1 77 31 79 78 2 46-34 84-79 85z">
          <text:p/>
        </draw:path>
        <draw:path draw:style-name="gr9" draw:text-style-name="P7" draw:layer="layout" svg:width="0.16cm" svg:height="0.159cm" svg:x="9.557cm" svg:y="16.229cm" svg:viewBox="0 0 161 160" svg:d="M77 160c-42-2-78-38-77-80 1-49 42-82 83-80 43 2 79 38 78 80 0 39-29 82-84 80z">
          <text:p/>
        </draw:path>
        <draw:path draw:style-name="gr9" draw:text-style-name="P7" draw:layer="layout" svg:width="0.16cm" svg:height="0.158cm" svg:x="6.348cm" svg:y="23.821cm" svg:viewBox="0 0 161 159" svg:d="M80 0c49-1 79 39 81 77 1 34-27 82-83 82-36 0-77-27-78-78-2-45 33-83 80-81z">
          <text:p/>
        </draw:path>
        <draw:path draw:style-name="gr9" draw:text-style-name="P7" draw:layer="layout" svg:width="0.161cm" svg:height="0.159cm" svg:x="10.725cm" svg:y="16.229cm" svg:viewBox="0 0 162 160" svg:d="M85 160c-47 2-85-34-85-79 0-44 35-80 79-81 45-2 84 35 83 81-1 42-29 77-77 79z">
          <text:p/>
        </draw:path>
        <draw:path draw:style-name="gr9" draw:text-style-name="P7" draw:layer="layout" svg:width="0.16cm" svg:height="0.16cm" svg:x="11.893cm" svg:y="16.522cm" svg:viewBox="0 0 161 161" svg:d="M161 83c-1 43-36 78-80 78-45 1-82-36-81-83 1-44 36-78 79-78 50-1 84 39 82 83z">
          <text:p/>
        </draw:path>
        <draw:path draw:style-name="gr9" draw:text-style-name="P7" draw:layer="layout" svg:width="0.16cm" svg:height="0.161cm" svg:x="5.471cm" svg:y="21.483cm" svg:viewBox="0 0 161 162" svg:d="M0 81c0-42 36-79 78-81 46-2 83 36 83 82-1 45-30 77-77 80-45 3-84-36-84-81z">
          <text:p/>
        </draw:path>
        <draw:path draw:style-name="gr9" draw:text-style-name="P7" draw:layer="layout" svg:width="0.162cm" svg:height="0.163cm" svg:x="14.811cm" svg:y="19.73cm" svg:viewBox="0 0 163 164" svg:d="M163 79c2 42-32 80-75 85-42 4-85-34-88-79-2-44 39-85 83-85 41 1 78 37 80 79z">
          <text:p/>
        </draw:path>
        <draw:path draw:style-name="gr9" draw:text-style-name="P7" draw:layer="layout" svg:width="0.159cm" svg:height="0.16cm" svg:x="5.471cm" svg:y="20.317cm" svg:viewBox="0 0 160 161" svg:d="M160 82c-1 44-37 79-79 79-44 0-82-36-81-83 1-42 37-79 79-78 42 0 82 30 81 82z">
          <text:p/>
        </draw:path>
        <draw:path draw:style-name="gr9" draw:text-style-name="P7" draw:layer="layout" svg:width="0.16cm" svg:height="0.161cm" svg:x="7.222cm" svg:y="24.695cm" svg:viewBox="0 0 161 162" svg:d="M161 85c-1 42-38 78-80 77-48-2-82-36-81-84 2-43 38-78 81-78 45 0 82 39 80 85z">
          <text:p/>
        </draw:path>
        <draw:path draw:style-name="gr9" draw:text-style-name="P7" draw:layer="layout" svg:width="0.162cm" svg:height="0.162cm" svg:x="14.228cm" svg:y="23.526cm" svg:viewBox="0 0 163 163" svg:d="M163 84c-2 37-29 76-80 79-44 2-84-39-83-83 2-44 39-81 81-80 49 0 83 41 82 84z">
          <text:p/>
        </draw:path>
        <draw:path draw:style-name="gr9" draw:text-style-name="P7" draw:layer="layout" svg:width="0.161cm" svg:height="0.16cm" svg:x="5.47cm" svg:y="21.193cm" svg:viewBox="0 0 162 161" svg:d="M162 84c-1 45-38 80-86 77-45-2-78-40-76-86 2-33 33-77 83-75 47 1 81 38 79 84z">
          <text:p/>
        </draw:path>
        <draw:path draw:style-name="gr9" draw:text-style-name="P7" draw:layer="layout" svg:width="0.161cm" svg:height="0.159cm" svg:x="13.352cm" svg:y="17.398cm" svg:viewBox="0 0 162 160" svg:d="M81 0c37-2 79 28 81 77 2 47-34 83-80 83s-84-37-82-83c2-42 38-77 81-77z">
          <text:p/>
        </draw:path>
        <draw:path draw:style-name="gr9" draw:text-style-name="P7" draw:layer="layout" svg:width="0.159cm" svg:height="0.16cm" svg:x="13.061cm" svg:y="17.105cm" svg:viewBox="0 0 160 161" svg:d="M160 77c2 43-33 83-81 84-42 1-77-34-79-78-1-49 35-81 79-83 42-1 79 35 81 77z">
          <text:p/>
        </draw:path>
        <draw:path draw:style-name="gr9" draw:text-style-name="P7" draw:layer="layout" svg:width="0.159cm" svg:height="0.159cm" svg:x="14.52cm" svg:y="18.857cm" svg:viewBox="0 0 160 160" svg:d="M160 79c2 42-31 82-82 81-43 0-77-36-78-79 0-45 38-83 82-81 43 1 77 36 78 79z">
          <text:p/>
        </draw:path>
        <draw:path draw:style-name="gr9" draw:text-style-name="P7" draw:layer="layout" svg:width="0.16cm" svg:height="0.159cm" svg:x="5.471cm" svg:y="20.608cm" svg:viewBox="0 0 161 160" svg:d="M161 77c1 44-31 80-74 83-54 4-87-42-87-77-1-44 32-80 75-83 47-2 84 31 86 77z">
          <text:p/>
        </draw:path>
        <draw:path draw:style-name="gr9" draw:text-style-name="P7" draw:layer="layout" svg:width="0.16cm" svg:height="0.159cm" svg:x="13.936cm" svg:y="17.982cm" svg:viewBox="0 0 161 160" svg:d="M78 0c47-1 83 33 83 81-1 44-35 78-79 79-46 1-82-35-82-81-1-37 31-80 78-79z">
          <text:p/>
        </draw:path>
        <draw:path draw:style-name="gr9" draw:text-style-name="P7" draw:layer="layout" svg:width="0.161cm" svg:height="0.161cm" svg:x="12.476cm" svg:y="16.812cm" svg:viewBox="0 0 162 162" svg:d="M87 0c39 1 79 37 75 89-3 35-36 78-90 72-43-4-73-39-72-84 2-42 38-81 87-77z">
          <text:p/>
        </draw:path>
        <draw:path draw:style-name="gr9" draw:text-style-name="P7" draw:layer="layout" svg:width="0.161cm" svg:height="0.161cm" svg:x="10.433cm" svg:y="16.228cm" svg:viewBox="0 0 162 162" svg:d="M88 0c45 3 78 43 74 89-3 43-41 75-84 73-46-1-80-39-78-86 3-46 41-79 88-76z">
          <text:p/>
        </draw:path>
        <draw:path draw:style-name="gr9" draw:text-style-name="P7" draw:layer="layout" svg:width="0.161cm" svg:height="0.16cm" svg:x="6.054cm" svg:y="23.236cm" svg:viewBox="0 0 162 161" svg:d="M162 78c1 47-32 82-80 83-47 2-83-38-82-80 1-45 33-79 76-81 48-3 86 34 86 78z">
          <text:p/>
        </draw:path>
        <draw:path draw:style-name="gr9" draw:text-style-name="P7" draw:layer="layout" svg:width="0.161cm" svg:height="0.159cm" svg:x="14.812cm" svg:y="22.361cm" svg:viewBox="0 0 162 160" svg:d="M78 0c45-1 84 35 84 80-1 41-37 79-79 80-44 2-84-37-83-81 1-37 26-77 78-79z">
          <text:p/>
        </draw:path>
        <draw:path draw:style-name="gr9" draw:text-style-name="P7" draw:layer="layout" svg:width="0.159cm" svg:height="0.159cm" svg:x="11.018cm" svg:y="16.229cm" svg:viewBox="0 0 160 160" svg:d="M82 160c-44 1-80-32-82-77s36-84 81-83c43 1 79 37 79 79 1 43-34 79-78 81z">
          <text:p/>
        </draw:path>
        <draw:path draw:style-name="gr9" draw:text-style-name="P7" draw:layer="layout" svg:width="0.161cm" svg:height="0.16cm" svg:x="11.6cm" svg:y="25.573cm" svg:viewBox="0 0 162 161" svg:d="M161 81c-3 46-44 83-87 79-42-4-79-42-74-84 4-49 38-79 85-76 43 3 78 40 76 81z">
          <text:p/>
        </draw:path>
        <draw:path draw:style-name="gr9" draw:text-style-name="P7" draw:layer="layout" svg:width="0.16cm" svg:height="0.16cm" svg:x="9.85cm" svg:y="16.228cm" svg:viewBox="0 0 161 161" svg:d="M161 80c1 46-34 82-82 81-44 0-77-33-79-77-1-53 46-85 81-84 44 2 79 37 80 80z">
          <text:p/>
        </draw:path>
        <draw:path draw:style-name="gr9" draw:text-style-name="P7" draw:layer="layout" svg:width="0.161cm" svg:height="0.159cm" svg:x="5.762cm" svg:y="19.149cm" svg:viewBox="0 0 162 160" svg:d="M162 81c-1 44-41 82-86 79-42-2-78-39-76-81 2-44 33-81 85-79 43 2 77 39 77 81z">
          <text:p/>
        </draw:path>
        <draw:path draw:style-name="gr9" draw:text-style-name="P7" draw:layer="layout" svg:width="0.159cm" svg:height="0.158cm" svg:x="7.808cm" svg:y="16.813cm" svg:viewBox="0 0 160 159" svg:d="M76 159c-40 0-77-35-76-81 2-44 36-78 81-78s82 40 79 86c-3 43-39 75-84 73z">
          <text:p/>
        </draw:path>
        <draw:path draw:style-name="gr9" draw:text-style-name="P7" draw:layer="layout" svg:width="0.16cm" svg:height="0.16cm" svg:x="8.391cm" svg:y="16.522cm" svg:viewBox="0 0 161 161" svg:d="M0 79c1-44 35-78 79-79 45 0 80 35 82 78 1 44-39 85-84 83-43-2-77-38-77-82z">
          <text:p/>
        </draw:path>
        <draw:path draw:style-name="gr9" draw:text-style-name="P7" draw:layer="layout" svg:width="0.157cm" svg:height="0.158cm" svg:x="7.515cm" svg:y="24.988cm" svg:viewBox="0 0 158 159" svg:d="M158 81c0 43-35 78-79 78-41 0-78-36-79-77-2-46 36-83 82-82 45 2 77 36 76 81z">
          <text:p/>
        </draw:path>
        <draw:path draw:style-name="gr9" draw:text-style-name="P7" draw:layer="layout" svg:width="0.159cm" svg:height="0.159cm" svg:x="6.055cm" svg:y="18.566cm" svg:viewBox="0 0 160 160" svg:d="M160 77c2 51-42 82-76 83-46 1-84-37-84-83 1-44 36-77 81-77 44 0 78 33 79 77z">
          <text:p/>
        </draw:path>
        <draw:path draw:style-name="gr9" draw:text-style-name="P7" draw:layer="layout" svg:width="0.158cm" svg:height="0.158cm" svg:x="14.813cm" svg:y="19.441cm" svg:viewBox="0 0 159 159" svg:d="M77 159c-44-1-76-35-77-80 0-42 37-79 78-79 45 0 84 36 81 83-2 45-34 77-82 76z">
          <text:p/>
        </draw:path>
        <draw:path draw:style-name="gr9" draw:text-style-name="P7" draw:layer="layout" svg:width="0.159cm" svg:height="0.159cm" svg:x="8.098cm" svg:y="25.279cm" svg:viewBox="0 0 160 160" svg:d="M160 82c-1 45-34 78-79 78s-80-34-81-77c-1-46 38-85 84-83 43 2 76 37 76 82z">
          <text:p/>
        </draw:path>
        <draw:path draw:style-name="gr9" draw:text-style-name="P7" draw:layer="layout" svg:width="0.159cm" svg:height="0.158cm" svg:x="5.471cm" svg:y="21.778cm" svg:viewBox="0 0 160 159" svg:d="M80 0c45 0 79 33 80 77 1 53-46 85-84 82-42-2-77-39-76-82 1-44 36-77 80-77z">
          <text:p/>
        </draw:path>
        <draw:path draw:style-name="gr9" draw:text-style-name="P7" draw:layer="layout" svg:width="0.158cm" svg:height="0.158cm" svg:x="8.682cm" svg:y="25.574cm" svg:viewBox="0 0 159 159" svg:d="M159 80c0 50-45 79-79 79-35-1-83-32-80-86 3-43 40-75 84-73 43 1 76 36 75 80z">
          <text:p/>
        </draw:path>
        <draw:path draw:style-name="gr9" draw:text-style-name="P7" draw:layer="layout" svg:width="0.158cm" svg:height="0.157cm" svg:x="13.647cm" svg:y="24.405cm" svg:viewBox="0 0 159 158" svg:d="M80 158c-43 1-78-33-80-76-2-46 35-81 74-82 47-2 84 34 85 79 0 42-36 79-79 79z">
          <text:p/>
        </draw:path>
        <draw:path draw:style-name="gr9" draw:text-style-name="P7" draw:layer="layout" svg:width="0.157cm" svg:height="0.157cm" svg:x="5.472cm" svg:y="20.025cm" svg:viewBox="0 0 158 158" svg:d="M158 80c0 44-33 78-78 78-44 1-79-33-80-76-2-45 36-82 81-82 35 0 79 31 77 80z">
          <text:p/>
        </draw:path>
        <draw:path draw:style-name="gr9" draw:text-style-name="P7" draw:layer="layout" svg:width="0.157cm" svg:height="0.157cm" svg:x="13.937cm" svg:y="24.113cm" svg:viewBox="0 0 158 158" svg:d="M158 79c0 44-34 79-78 79-42 0-80-37-80-79s38-80 80-79 78 33 78 79z">
          <text:p/>
        </draw:path>
        <draw:path draw:style-name="gr9" draw:text-style-name="P7" draw:layer="layout" svg:width="0.157cm" svg:height="0.157cm" svg:x="5.472cm" svg:y="22.068cm" svg:viewBox="0 0 158 158" svg:d="M158 81c0 44-34 77-78 77-45 0-80-35-80-78 1-42 38-80 81-80 42 1 77 37 77 81z">
          <text:p/>
        </draw:path>
        <draw:path draw:style-name="gr9" draw:text-style-name="P7" draw:layer="layout" svg:width="0.157cm" svg:height="0.157cm" svg:x="14.521cm" svg:y="23.237cm" svg:viewBox="0 0 158 158" svg:d="M158 76c1 45-32 80-75 82-45 1-81-32-83-76-1-43 33-80 77-82 43-1 79 33 81 76z">
          <text:p/>
        </draw:path>
        <draw:path draw:style-name="gr9" draw:text-style-name="P7" draw:layer="layout" svg:width="0.156cm" svg:height="0.156cm" svg:x="11.311cm" svg:y="16.23cm" svg:viewBox="0 0 157 157" svg:d="M157 79c1 44-33 78-78 78-43 1-79-33-79-76-1-43 36-81 77-81 43-1 80 34 80 79z">
          <text:p/>
        </draw:path>
        <draw:path draw:style-name="gr9" draw:text-style-name="P7" draw:layer="layout" svg:width="0.158cm" svg:height="0.158cm" svg:x="9.267cm" svg:y="16.229cm" svg:viewBox="0 0 159 159" svg:d="M159 78c1 44-31 79-74 81-54 3-86-42-85-79 2-42 36-79 79-80 43 0 79 35 80 78z">
          <text:p/>
        </draw:path>
        <draw:path draw:style-name="gr9" draw:text-style-name="P7" draw:layer="layout" svg:width="0.156cm" svg:height="0.157cm" svg:x="12.479cm" svg:y="25.28cm" svg:viewBox="0 0 157 158" svg:d="M81 158c-48 2-81-37-81-76-1-44 33-80 76-82 43-1 80 35 81 78 1 44-33 79-76 80z">
          <text:p/>
        </draw:path>
        <draw:path draw:style-name="gr9" draw:text-style-name="P7" draw:layer="layout" svg:width="0.157cm" svg:height="0.158cm" svg:x="14.231cm" svg:y="18.272cm" svg:viewBox="0 0 158 159" svg:d="M75 159c-43-1-76-36-75-80 0-43 35-79 77-79 44 0 85 42 81 84-3 43-40 77-83 75z">
          <text:p/>
        </draw:path>
        <draw:path draw:style-name="gr9" draw:text-style-name="P7" draw:layer="layout" svg:width="0.157cm" svg:height="0.157cm" svg:x="6.932cm" svg:y="17.399cm" svg:viewBox="0 0 158 158" svg:d="M79 0c43-1 78 34 79 77 0 44-34 80-77 81-42 0-80-31-81-78 0-51 42-80 79-80z">
          <text:p/>
        </draw:path>
        <draw:path draw:style-name="gr9" draw:text-style-name="P7" draw:layer="layout" svg:width="0.156cm" svg:height="0.155cm" svg:x="11.895cm" svg:y="25.575cm" svg:viewBox="0 0 157 156" svg:d="M157 77c1 43-35 78-78 79-44 0-78-36-79-77 0-44 34-79 77-79 45 0 79 33 80 77z">
          <text:p/>
        </draw:path>
        <draw:path draw:style-name="gr9" draw:text-style-name="P7" draw:layer="layout" svg:width="0.155cm" svg:height="0.155cm" svg:x="9.853cm" svg:y="25.865cm" svg:viewBox="0 0 156 156" svg:d="M156 76c1 43-34 79-77 80s-78-32-79-76c-1-43 33-79 75-80s80 33 81 76z">
          <text:p/>
        </draw:path>
        <draw:path draw:style-name="gr9" draw:text-style-name="P7" draw:layer="layout" svg:width="0.157cm" svg:height="0.156cm" svg:x="6.056cm" svg:y="23.529cm" svg:viewBox="0 0 158 157" svg:d="M158 79c-1 44-36 79-81 78-43 0-77-36-77-80 1-37 30-79 80-77 51 1 79 40 78 79z">
          <text:p/>
        </draw:path>
        <draw:path draw:style-name="gr9" draw:text-style-name="P7" draw:layer="layout" svg:width="0.157cm" svg:height="0.157cm" svg:x="5.764cm" svg:y="22.946cm" svg:viewBox="0 0 158 158" svg:d="M79 0c43 0 80 37 79 80-1 42-40 79-81 78-42-1-78-38-77-80 0-45 36-79 79-78z">
          <text:p/>
        </draw:path>
        <draw:path draw:style-name="gr9" draw:text-style-name="P7" draw:layer="layout" svg:width="0.156cm" svg:height="0.156cm" svg:x="12.771cm" svg:y="16.814cm" svg:viewBox="0 0 157 157" svg:d="M79 0c43 0 79 36 78 79 0 45-35 78-79 78-43 0-79-32-78-79 0-50 42-79 79-78z">
          <text:p/>
        </draw:path>
        <draw:path draw:style-name="gr9" draw:text-style-name="P7" draw:layer="layout" svg:width="0.155cm" svg:height="0.155cm" svg:x="10.143cm" svg:y="25.865cm" svg:viewBox="0 0 156 156" svg:d="M156 75c2 48-37 80-75 81-42 1-78-29-81-76-3-35 26-78 75-80 44-2 80 32 81 75z">
          <text:p/>
        </draw:path>
        <draw:path draw:style-name="gr9" draw:text-style-name="P7" draw:layer="layout" svg:width="0.157cm" svg:height="0.157cm" svg:x="6.64cm" svg:y="17.69cm" svg:viewBox="0 0 158 158" svg:d="M158 80c0 43-38 79-81 78s-77-36-77-79c0-41 32-79 79-79 52 1 80 45 79 80z">
          <text:p/>
        </draw:path>
        <draw:path draw:style-name="gr9" draw:text-style-name="P7" draw:layer="layout" svg:width="0.156cm" svg:height="0.157cm" svg:x="12.188cm" svg:y="16.524cm" svg:viewBox="0 0 157 158" svg:d="M0 78c-1-44 33-78 78-78 53 0 80 41 79 77-1 52-40 79-78 81-43 1-79-36-79-80z">
          <text:p/>
        </draw:path>
        <draw:path draw:style-name="gr9" draw:text-style-name="P7" draw:layer="layout" svg:width="0.155cm" svg:height="0.155cm" svg:x="10.728cm" svg:y="25.865cm" svg:viewBox="0 0 156 156" svg:d="M156 78c0 45-35 78-79 78-41 0-77-34-77-79 1-48 41-78 78-77 43 0 78 35 78 78z">
          <text:p/>
        </draw:path>
        <draw:path draw:style-name="gr9" draw:text-style-name="P7" draw:layer="layout" svg:width="0.155cm" svg:height="0.155cm" svg:x="14.232cm" svg:y="23.822cm" svg:viewBox="0 0 156 156" svg:d="M79 156c-43 1-78-34-79-77-1-48 40-79 77-79 40-1 78 30 79 76 1 47-38 80-77 80z">
          <text:p/>
        </draw:path>
        <draw:path draw:style-name="gr9" draw:text-style-name="P7" draw:layer="layout" svg:width="0.155cm" svg:height="0.154cm" svg:x="15.107cm" svg:y="21.78cm" svg:viewBox="0 0 156 155" svg:d="M156 81c-2 46-45 77-82 74-41-3-74-38-74-78 1-42 36-78 81-77 43 1 76 37 75 81z">
          <text:p/>
        </draw:path>
        <draw:path draw:style-name="gr9" draw:text-style-name="P7" draw:layer="layout" svg:width="0.156cm" svg:height="0.155cm" svg:x="10.436cm" svg:y="25.865cm" svg:viewBox="0 0 157 156" svg:d="M77 156c-38 1-77-34-77-80 1-47 44-78 80-76 42 1 78 37 77 79-1 43-37 78-80 77z">
          <text:p/>
        </draw:path>
        <draw:path draw:style-name="gr9" draw:text-style-name="P7" draw:layer="layout" svg:width="0.154cm" svg:height="0.154cm" svg:x="13.649cm" svg:y="17.4cm" svg:viewBox="0 0 155 155" svg:d="M75 155c-43 0-76-35-75-80 1-43 38-77 81-75 39 2 74 38 74 77-1 44-38 80-80 78z">
          <text:p/>
        </draw:path>
        <draw:path draw:style-name="gr9" draw:text-style-name="P7" draw:layer="layout" svg:width="0.155cm" svg:height="0.154cm" svg:x="14.522cm" svg:y="18.568cm" svg:viewBox="0 0 156 155" svg:d="M78 0c44-2 78 38 78 77-1 46-41 79-79 78-40-1-75-36-77-75-2-38 32-81 78-80z">
          <text:p/>
        </draw:path>
        <draw:path draw:style-name="gr9" draw:text-style-name="P7" draw:layer="layout" svg:width="0.156cm" svg:height="0.157cm" svg:x="13.354cm" svg:y="24.696cm" svg:viewBox="0 0 157 158" svg:d="M157 83c-1 44-36 76-81 75-43-1-78-38-76-80s41-80 81-78c35 3 77 28 76 83z">
          <text:p/>
        </draw:path>
        <draw:path draw:style-name="gr9" draw:text-style-name="P7" draw:layer="layout" svg:width="0.155cm" svg:height="0.154cm" svg:x="15.107cm" svg:y="21.486cm" svg:viewBox="0 0 156 155" svg:d="M82 155c-44 2-81-32-82-75-1-37 26-77 76-80 40-3 79 30 80 75 1 43-31 79-74 80z">
          <text:p/>
        </draw:path>
        <draw:path draw:style-name="gr9" draw:text-style-name="P7" draw:layer="layout" svg:width="0.155cm" svg:height="0.156cm" svg:x="15.107cm" svg:y="20.61cm" svg:viewBox="0 0 156 157" svg:d="M156 78c0 44-35 79-78 79-42-1-78-37-78-80s37-77 80-77c43 1 77 35 76 78z">
          <text:p/>
        </draw:path>
        <draw:path draw:style-name="gr9" draw:text-style-name="P7" draw:layer="layout" svg:width="0.155cm" svg:height="0.156cm" svg:x="15.107cm" svg:y="21.195cm" svg:viewBox="0 0 156 157" svg:d="M80 0c43 1 77 36 76 79 0 44-36 78-78 78-43-1-79-37-78-80s37-77 80-77z">
          <text:p/>
        </draw:path>
        <draw:path draw:style-name="gr9" draw:text-style-name="P7" draw:layer="layout" svg:width="0.155cm" svg:height="0.154cm" svg:x="6.641cm" svg:y="24.407cm" svg:viewBox="0 0 156 155" svg:d="M0 76c1-43 36-78 81-76 43 1 77 39 75 82-3 39-38 73-77 73-42-1-80-35-79-79z">
          <text:p/>
        </draw:path>
        <draw:path draw:style-name="gr9" draw:text-style-name="P7" draw:layer="layout" svg:width="0.154cm" svg:height="0.153cm" svg:x="8.684cm" svg:y="16.232cm" svg:viewBox="0 0 155 154" svg:d="M77 154c-40 1-74-33-77-74-2-41 36-81 78-80 46 2 76 37 77 74 1 44-33 80-78 80z">
          <text:p/>
        </draw:path>
        <draw:path draw:style-name="gr9" draw:text-style-name="P7" draw:layer="layout" svg:width="0.155cm" svg:height="0.155cm" svg:x="13.063cm" svg:y="24.99cm" svg:viewBox="0 0 156 156" svg:d="M78 0c44 0 79 34 78 78 0 41-37 78-78 78-42 0-78-35-78-78 0-45 33-78 78-78z">
          <text:p/>
        </draw:path>
        <draw:path draw:style-name="gr9" draw:text-style-name="P7" draw:layer="layout" svg:width="0.155cm" svg:height="0.154cm" svg:x="7.81cm" svg:y="25.281cm" svg:viewBox="0 0 156 155" svg:d="M78 155c-42 3-78-35-78-76 1-51 45-79 79-79 39 2 74 36 77 76 1 34-27 80-78 79z">
          <text:p/>
        </draw:path>
        <draw:path draw:style-name="gr9" draw:text-style-name="P7" draw:layer="layout" svg:width="0.155cm" svg:height="0.155cm" svg:x="6.35cm" svg:y="17.984cm" svg:viewBox="0 0 156 156" svg:d="M75 156c-43-1-76-38-75-81 2-44 37-77 82-75 42 1 77 39 74 81-2 43-38 76-81 75z">
          <text:p/>
        </draw:path>
        <draw:path draw:style-name="gr9" draw:text-style-name="P7" draw:layer="layout" svg:width="0.154cm" svg:height="0.154cm" svg:x="8.394cm" svg:y="25.575cm" svg:viewBox="0 0 155 155" svg:d="M0 75c0-42 36-77 81-75 44 3 74 37 74 78-1 50-40 78-80 77-37 0-76-28-75-80z">
          <text:p/>
        </draw:path>
        <draw:path draw:style-name="gr9" draw:text-style-name="P7" draw:layer="layout" svg:width="0.155cm" svg:height="0.155cm" svg:x="5.473cm" svg:y="19.735cm" svg:viewBox="0 0 156 156" svg:d="M79 0c44 0 77 33 77 78 1 41-30 76-77 78-41 1-79-37-79-78 0-43 36-78 79-78z">
          <text:p/>
        </draw:path>
        <draw:path draw:style-name="gr9" draw:text-style-name="P7" draw:layer="layout" svg:width="0.153cm" svg:height="0.155cm" svg:x="11.021cm" svg:y="25.865cm" svg:viewBox="0 0 154 156" svg:d="M74 156c-36 0-77-32-74-83 2-40 35-73 77-73 36 0 78 29 77 79-1 49-40 78-80 77z">
          <text:p/>
        </draw:path>
        <draw:path draw:style-name="gr9" draw:text-style-name="P7" draw:layer="layout" svg:width="0.155cm" svg:height="0.154cm" svg:x="15.107cm" svg:y="20.903cm" svg:viewBox="0 0 156 155" svg:d="M77 155c-43-1-78-36-77-80 1-42 39-77 81-75 43 1 76 36 75 79 0 44-35 77-79 76z">
          <text:p/>
        </draw:path>
        <draw:path draw:style-name="gr9" draw:text-style-name="P7" draw:layer="layout" svg:width="0.154cm" svg:height="0.154cm" svg:x="8.1cm" svg:y="16.525cm" svg:viewBox="0 0 155 155" svg:d="M155 78c1 51-44 78-79 77-41-1-79-40-76-81 3-38 32-74 76-74 45 0 79 33 79 78z">
          <text:p/>
        </draw:path>
        <draw:path draw:style-name="gr9" draw:text-style-name="P7" draw:layer="layout" svg:width="0.153cm" svg:height="0.153cm" svg:x="9.27cm" svg:y="25.866cm" svg:viewBox="0 0 154 154" svg:d="M154 78c-1 44-38 78-82 76-40-2-73-37-72-77 0-40 34-76 74-77 42-2 81 35 80 78z">
          <text:p/>
        </draw:path>
        <draw:path draw:style-name="gr9" draw:text-style-name="P7" draw:layer="layout" svg:width="0.155cm" svg:height="0.155cm" svg:x="14.815cm" svg:y="22.654cm" svg:viewBox="0 0 156 156" svg:d="M79 156c-45 1-79-33-79-76 0-44 35-80 78-80 41 0 79 37 78 79-1 47-36 78-77 77z">
          <text:p/>
        </draw:path>
        <draw:path draw:style-name="gr9" draw:text-style-name="P7" draw:layer="layout" svg:width="0.153cm" svg:height="0.154cm" svg:x="5.766cm" svg:y="18.859cm" svg:viewBox="0 0 154 155" svg:d="M79 155c-45 1-79-31-79-75s35-80 77-80c41 1 75 33 77 75 2 43-29 80-75 80z">
          <text:p/>
        </draw:path>
        <draw:path draw:style-name="gr9" draw:text-style-name="P7" draw:layer="layout" svg:width="0.151cm" svg:height="0.151cm" svg:x="6.643cm" svg:y="17.402cm" svg:viewBox="0 0 152 152" svg:d="M78 0c40 1 75 38 74 77-1 42-40 78-82 75-40-3-73-40-70-79 3-47 41-73 78-73z">
          <text:p/>
        </draw:path>
        <draw:path draw:style-name="gr9" draw:text-style-name="P7" draw:layer="layout" svg:width="0.153cm" svg:height="0.154cm" svg:x="15.108cm" svg:y="20.027cm" svg:viewBox="0 0 154 155" svg:d="M76 155c-40-1-74-34-76-75s36-80 77-80c41 1 76 34 77 74 2 45-33 81-78 81z">
          <text:p/>
        </draw:path>
        <draw:path draw:style-name="gr9" draw:text-style-name="P7" draw:layer="layout" svg:width="0.155cm" svg:height="0.153cm" svg:x="5.473cm" svg:y="22.364cm" svg:viewBox="0 0 156 154" svg:d="M80 0c44 1 77 36 76 81-1 39-33 71-77 73-41 2-79-37-79-78 1-43 37-77 80-76z">
          <text:p/>
        </draw:path>
        <draw:path draw:style-name="gr9" draw:text-style-name="P7" draw:layer="layout" svg:width="0.155cm" svg:height="0.156cm" svg:x="8.977cm" svg:y="16.23cm" svg:viewBox="0 0 156 157" svg:d="M76 157c-43-1-77-37-76-80s39-78 80-77c42 2 79 40 76 81-4 49-39 77-80 76z">
          <text:p/>
        </draw:path>
        <draw:path draw:style-name="gr9" draw:text-style-name="P7" draw:layer="layout" svg:width="0.151cm" svg:height="0.151cm" svg:x="6.059cm" svg:y="23.824cm" svg:viewBox="0 0 152 152" svg:d="M152 73c2 39-31 75-71 79s-81-35-81-77c0-39 35-74 75-75s75 33 77 73z">
          <text:p/>
        </draw:path>
        <draw:path draw:style-name="gr9" draw:text-style-name="P7" draw:layer="layout" svg:width="0.155cm" svg:height="0.155cm" svg:x="7.225cm" svg:y="17.108cm" svg:viewBox="0 0 156 156" svg:d="M0 80c-1-45 31-79 75-80 43-1 80 33 81 76 1 41-35 79-77 80-42 0-79-31-79-76z">
          <text:p/>
        </draw:path>
        <draw:path draw:style-name="gr9" draw:text-style-name="P7" draw:layer="layout" svg:width="0.152cm" svg:height="0.154cm" svg:x="9.561cm" svg:y="25.865cm" svg:viewBox="0 0 153 155" svg:d="M153 80c-1 44-36 77-80 75-41-1-72-34-73-76s35-79 77-79c43 0 77 36 76 80z">
          <text:p/>
        </draw:path>
        <draw:path draw:style-name="gr9" draw:text-style-name="P7" draw:layer="layout" svg:width="0.154cm" svg:height="0.152cm" svg:x="12.48cm" svg:y="16.526cm" svg:viewBox="0 0 155 153" svg:d="M0 74c1-43 37-76 81-74 41 2 74 37 74 77-1 40-36 76-77 76-48 0-79-40-78-79z">
          <text:p/>
        </draw:path>
        <draw:path draw:style-name="gr9" draw:text-style-name="P7" draw:layer="layout" svg:width="0.155cm" svg:height="0.153cm" svg:x="15.107cm" svg:y="20.321cm" svg:viewBox="0 0 156 154" svg:d="M80 0c44 1 77 36 76 79-2 40-34 73-75 75-43 1-80-36-81-78 0-42 36-77 80-76z">
          <text:p/>
        </draw:path>
        <draw:path draw:style-name="gr9" draw:text-style-name="P7" draw:layer="layout" svg:width="0.152cm" svg:height="0.154cm" svg:x="11.605cm" svg:y="16.231cm" svg:viewBox="0 0 153 155" svg:d="M78 155c-44 1-79-32-78-76 0-43 37-80 78-79 40 1 73 35 75 76 3 43-31 79-75 79z">
          <text:p/>
        </draw:path>
        <draw:path draw:style-name="gr9" draw:text-style-name="P7" draw:layer="layout" svg:width="0.152cm" svg:height="0.154cm" svg:x="7.518cm" svg:y="16.815cm" svg:viewBox="0 0 153 155" svg:d="M153 76c2 49-42 81-78 79-40-2-74-34-75-76-2-42 38-80 79-79 36 2 75 32 74 76z">
          <text:p/>
        </draw:path>
        <draw:path draw:style-name="gr9" draw:text-style-name="P7" draw:layer="layout" svg:width="0.153cm" svg:height="0.153cm" svg:x="6.058cm" svg:y="18.275cm" svg:viewBox="0 0 154 154" svg:d="M154 78c0 43-36 76-80 76-48-1-74-45-74-76 0-40 33-75 73-78 43-2 81 34 81 78z">
          <text:p/>
        </draw:path>
        <draw:path draw:style-name="gr9" draw:text-style-name="P7" draw:layer="layout" svg:width="0.153cm" svg:height="0.154cm" svg:x="14.816cm" svg:y="19.152cm" svg:viewBox="0 0 154 155" svg:d="M80 0c42 0 76 35 74 81-2 41-36 73-76 74-42 1-78-35-78-79 0-45 35-77 80-76z">
          <text:p/>
        </draw:path>
        <draw:path draw:style-name="gr9" draw:text-style-name="P7" draw:layer="layout" svg:width="0.153cm" svg:height="0.153cm" svg:x="5.474cm" svg:y="19.444cm" svg:viewBox="0 0 154 154" svg:d="M154 77c0 44-35 77-79 77-41-1-74-35-75-76-1-42 40-82 81-78 50 5 74 43 73 77z">
          <text:p/>
        </draw:path>
        <draw:path draw:style-name="gr9" draw:text-style-name="P7" draw:layer="layout" svg:width="0.152cm" svg:height="0.151cm" svg:x="13.356cm" svg:y="17.11cm" svg:viewBox="0 0 153 152" svg:d="M153 77c0 41-31 74-74 75s-81-34-79-76c2-43 32-78 80-76 43 1 74 35 73 77z">
          <text:p/>
        </draw:path>
        <draw:path draw:style-name="gr9" draw:text-style-name="P7" draw:layer="layout" svg:width="0.152cm" svg:height="0.15cm" svg:x="7.226cm" svg:y="24.992cm" svg:viewBox="0 0 153 151" svg:d="M76 0c50-1 78 42 77 78-2 40-37 73-77 73s-74-33-76-73c-1-43 32-78 76-78z">
          <text:p/>
        </draw:path>
        <draw:path draw:style-name="gr9" draw:text-style-name="P7" draw:layer="layout" svg:width="0.151cm" svg:height="0.153cm" svg:x="11.314cm" svg:y="25.866cm" svg:viewBox="0 0 152 154" svg:d="M152 81c-1 40-35 72-76 73-38 0-77-31-76-79 0-41 37-75 75-75 36 0 79 30 77 81z">
          <text:p/>
        </draw:path>
        <draw:path draw:style-name="gr9" draw:text-style-name="P7" draw:layer="layout" svg:width="0.15cm" svg:height="0.151cm" svg:x="13.941cm" svg:y="24.408cm" svg:viewBox="0 0 151 152" svg:d="M151 75c0 40-33 75-74 77-39 1-76-33-77-74-1-48 39-79 77-78 41 1 74 34 74 75z">
          <text:p/>
        </draw:path>
        <draw:path draw:style-name="gr9" draw:text-style-name="P7" draw:layer="layout" svg:width="0.15cm" svg:height="0.152cm" svg:x="14.234cm" svg:y="17.985cm" svg:viewBox="0 0 151 153" svg:d="M0 75c1-41 34-74 74-75 43-1 79 37 77 79-1 40-35 74-75 74-42 1-77-35-76-78z">
          <text:p/>
        </draw:path>
        <draw:path draw:style-name="gr9" draw:text-style-name="P7" draw:layer="layout" svg:width="0.15cm" svg:height="0.151cm" svg:x="10.439cm" svg:y="15.943cm" svg:viewBox="0 0 151 152" svg:d="M0 77c-1-41 31-75 72-77 37-2 79 28 79 78-1 40-38 74-77 74-40-1-74-35-74-75z">
          <text:p/>
        </draw:path>
        <draw:path draw:style-name="gr9" draw:text-style-name="P7" draw:layer="layout" svg:width="0.151cm" svg:height="0.15cm" svg:x="6.352cm" svg:y="24.117cm" svg:viewBox="0 0 152 151" svg:d="M74 151c-43-1-74-33-74-75 0-45 34-78 79-76 42 1 73 33 73 75 0 45-34 78-78 76z">
          <text:p/>
        </draw:path>
        <draw:path draw:style-name="gr9" draw:text-style-name="P7" draw:layer="layout" svg:width="0.152cm" svg:height="0.152cm" svg:x="15.109cm" svg:y="22.071cm" svg:viewBox="0 0 153 153" svg:d="M75 153c-40-1-75-34-75-74 0-42 32-79 79-79 40 1 73 36 74 76 0 43-35 78-78 77z">
          <text:p/>
        </draw:path>
        <draw:path draw:style-name="gr9" draw:text-style-name="P7" draw:layer="layout" svg:width="0.15cm" svg:height="0.15cm" svg:x="5.476cm" svg:y="22.657cm" svg:viewBox="0 0 151 151" svg:d="M78 151c-40 2-75-30-78-70-4-43 34-82 76-81 41 1 75 35 75 76s-33 74-73 75z">
          <text:p/>
        </draw:path>
        <draw:path draw:style-name="gr9" draw:text-style-name="P7" draw:layer="layout" svg:width="0.151cm" svg:height="0.154cm" svg:x="5.767cm" svg:y="23.239cm" svg:viewBox="0 0 152 155" svg:d="M76 155c-36 0-79-30-76-82 2-40 36-73 77-73 42 0 77 38 75 81-2 41-36 74-76 74z">
          <text:p/>
        </draw:path>
        <draw:path draw:style-name="gr9" draw:text-style-name="P7" draw:layer="layout" svg:width="0.153cm" svg:height="0.151cm" svg:x="13.939cm" svg:y="17.693cm" svg:viewBox="0 0 154 152" svg:d="M75 0c42-1 77 30 79 70 3 46-30 81-75 82-44 1-80-34-79-78 1-33 26-73 75-74z">
          <text:p/>
        </draw:path>
        <draw:path draw:style-name="gr9" draw:text-style-name="P7" draw:layer="layout" svg:width="0.151cm" svg:height="0.151cm" svg:x="6.935cm" svg:y="24.7cm" svg:viewBox="0 0 152 152" svg:d="M152 73c1 43-29 77-70 79-46 2-82-31-82-74 0-51 37-79 78-78 44 1 73 32 74 73z">
          <text:p/>
        </draw:path>
        <draw:path draw:style-name="gr9" draw:text-style-name="P7" draw:layer="layout" svg:width="0.152cm" svg:height="0.15cm" svg:x="9.855cm" svg:y="15.943cm" svg:viewBox="0 0 153 151" svg:d="M152 79c-3 40-39 74-78 72-43-1-79-41-74-82 4-41 41-72 81-69s73 41 71 79z">
          <text:p/>
        </draw:path>
        <draw:path draw:style-name="gr9" draw:text-style-name="P7" draw:layer="layout" svg:width="0.15cm" svg:height="0.149cm" svg:x="7.812cm" svg:y="16.527cm" svg:viewBox="0 0 151 150" svg:d="M0 72c1-40 35-72 77-72 40 0 74 33 74 73 1 43-36 79-79 77-41-2-73-37-72-78z">
          <text:p/>
        </draw:path>
        <draw:path draw:style-name="gr9" draw:text-style-name="P7" draw:layer="layout" svg:width="0.15cm" svg:height="0.152cm" svg:x="12.774cm" svg:y="25.283cm" svg:viewBox="0 0 151 153" svg:d="M151 78c0 42-33 74-75 75-41 0-75-32-76-74-1-43 36-83 78-79 43 4 74 34 73 78z">
          <text:p/>
        </draw:path>
        <draw:path draw:style-name="gr9" draw:text-style-name="P7" draw:layer="layout" svg:width="0.15cm" svg:height="0.151cm" svg:x="13.065cm" svg:y="16.817cm" svg:viewBox="0 0 151 152" svg:d="M77 0c39 3 73 31 74 76 2 42-38 79-79 76-42-3-73-38-72-78 2-43 39-74 77-74z">
          <text:p/>
        </draw:path>
        <draw:path draw:style-name="gr9" draw:text-style-name="P7" draw:layer="layout" svg:width="0.149cm" svg:height="0.15cm" svg:x="12.191cm" svg:y="25.577cm" svg:viewBox="0 0 150 151" svg:d="M0 77c-1-42 30-76 71-77 43-2 77 28 79 69 3 46-27 81-75 82-46 1-75-35-75-74z">
          <text:p/>
        </draw:path>
        <draw:path draw:style-name="gr9" draw:text-style-name="P7" draw:layer="layout" svg:width="0.151cm" svg:height="0.15cm" svg:x="11.897cm" svg:y="16.234cm" svg:viewBox="0 0 152 151" svg:d="M78 151c-40 1-75-30-78-71-4-41 34-81 76-80 41 0 75 34 76 75 0 40-33 74-74 76z">
          <text:p/>
        </draw:path>
        <draw:path draw:style-name="gr9" draw:text-style-name="P7" draw:layer="layout" svg:width="0.15cm" svg:height="0.149cm" svg:x="8.103cm" svg:y="25.577cm" svg:viewBox="0 0 151 150" svg:d="M151 75c0 41-33 75-74 75-42 1-76-32-77-73s32-78 78-77c41 1 73 35 73 75z">
          <text:p/>
        </draw:path>
        <draw:path draw:style-name="gr9" draw:text-style-name="P7" draw:layer="layout" svg:width="0.149cm" svg:height="0.151cm" svg:x="10.732cm" svg:y="15.943cm" svg:viewBox="0 0 150 152" svg:d="M150 76c0 41-34 74-74 76-39 1-74-33-76-73-2-43 33-80 76-79 37 1 75 35 74 76z">
          <text:p/>
        </draw:path>
        <draw:path draw:style-name="gr9" draw:text-style-name="P7" draw:layer="layout" svg:width="0.148cm" svg:height="0.151cm" svg:x="5.768cm" svg:y="18.569cm" svg:viewBox="0 0 149 152" svg:d="M149 77c0 45-34 75-75 75-43-1-73-34-74-75-1-48 42-79 77-77 42 3 73 36 72 77z">
          <text:p/>
        </draw:path>
        <draw:path draw:style-name="gr9" draw:text-style-name="P7" draw:layer="layout" svg:width="0.148cm" svg:height="0.15cm" svg:x="10.147cm" svg:y="15.943cm" svg:viewBox="0 0 149 151" svg:d="M149 74c2 35-22 72-71 77-41 5-79-33-78-76 0-41 33-75 74-75 40 0 74 33 75 74z">
          <text:p/>
        </draw:path>
        <draw:path draw:style-name="gr9" draw:text-style-name="P7" draw:layer="layout" svg:width="0.147cm" svg:height="0.149cm" svg:x="9.564cm" svg:y="15.943cm" svg:viewBox="0 0 148 150" svg:d="M148 73c2 37-24 75-72 77-39 2-75-28-76-73 0-41 31-75 71-77 32-1 77 26 77 73z">
          <text:p/>
        </draw:path>
        <draw:path draw:style-name="gr9" draw:text-style-name="P7" draw:layer="layout" svg:width="0.15cm" svg:height="0.149cm" svg:x="13.65cm" svg:y="24.701cm" svg:viewBox="0 0 151 150" svg:d="M74 150c-41-1-74-33-74-75 0-40 33-74 73-75 45 0 82 36 78 78-4 51-42 74-77 72z">
          <text:p/>
        </draw:path>
        <draw:path draw:style-name="gr9" draw:text-style-name="P7" draw:layer="layout" svg:width="0.15cm" svg:height="0.149cm" svg:x="14.817cm" svg:y="22.949cm" svg:viewBox="0 0 151 150" svg:d="M74 150c-42-1-74-33-74-75 1-45 37-79 82-75 41 3 71 36 69 79-2 42-35 72-77 71z">
          <text:p/>
        </draw:path>
        <draw:path draw:style-name="gr9" draw:text-style-name="P7" draw:layer="layout" svg:width="0.153cm" svg:height="0.15cm" svg:x="14.523cm" svg:y="23.532cm" svg:viewBox="0 0 154 151" svg:d="M77 151c-41 0-75-32-77-74-1-39 32-75 73-77 44-1 81 33 81 76 0 33-29 76-77 75z">
          <text:p/>
        </draw:path>
        <draw:path draw:style-name="gr9" draw:text-style-name="P7" draw:layer="layout" svg:width="0.149cm" svg:height="0.148cm" svg:x="5.184cm" svg:y="20.906cm" svg:viewBox="0 0 150 149" svg:d="M150 73c2 41-29 74-71 76-48 3-78-37-79-68-2-44 30-80 74-81 43 0 75 30 76 73z">
          <text:p/>
        </draw:path>
        <draw:path draw:style-name="gr9" draw:text-style-name="P7" draw:layer="layout" svg:width="0.148cm" svg:height="0.151cm" svg:x="8.98cm" svg:y="25.867cm" svg:viewBox="0 0 149 152" svg:d="M149 75c1 41-31 75-71 77-43 3-78-33-78-76s34-75 73-76c33-1 75 26 76 75z">
          <text:p/>
        </draw:path>
        <draw:path draw:style-name="gr9" draw:text-style-name="P7" draw:layer="layout" svg:width="0.149cm" svg:height="0.148cm" svg:x="5.477cm" svg:y="19.154cm" svg:viewBox="0 0 150 149" svg:d="M72 0c42-1 77 32 78 73 1 40-32 75-73 76-45 0-75-31-77-72-2-40 32-76 72-77z">
          <text:p/>
        </draw:path>
        <draw:path draw:style-name="gr9" draw:text-style-name="P7" draw:layer="layout" svg:width="0.147cm" svg:height="0.15cm" svg:x="11.607cm" svg:y="25.868cm" svg:viewBox="0 0 148 151" svg:d="M148 76c-1 41-34 75-75 75-34-1-74-31-73-77 0-43 34-74 74-74 39 0 75 29 74 76z">
          <text:p/>
        </draw:path>
        <draw:path draw:style-name="gr9" draw:text-style-name="P7" draw:layer="layout" svg:width="0.148cm" svg:height="0.149cm" svg:x="14.818cm" svg:y="18.863cm" svg:viewBox="0 0 149 150" svg:d="M71 150c-41-2-71-34-71-76 1-41 33-74 74-74 45 0 77 35 75 80-2 41-35 71-78 70z">
          <text:p/>
        </draw:path>
        <draw:path draw:style-name="gr9" draw:text-style-name="P7" draw:layer="layout" svg:width="0.15cm" svg:height="0.147cm" svg:x="14.525cm" svg:y="18.279cm" svg:viewBox="0 0 151 148" svg:d="M73 0c41-1 76 31 78 71 1 40-32 75-72 77-38 2-74-25-79-71-4-39 32-76 73-77z">
          <text:p/>
        </draw:path>
        <draw:path draw:style-name="gr9" draw:text-style-name="P7" draw:layer="layout" svg:width="0.149cm" svg:height="0.148cm" svg:x="5.184cm" svg:y="21.49cm" svg:viewBox="0 0 150 149" svg:d="M150 73c1 42-30 74-72 76-44 3-77-35-78-69-1-45 31-80 75-80 42 0 74 31 75 73z">
          <text:p/>
        </draw:path>
        <draw:path draw:style-name="gr9" draw:text-style-name="P7" draw:layer="layout" svg:width="0.151cm" svg:height="0.147cm" svg:x="15.109cm" svg:y="19.738cm" svg:viewBox="0 0 152 148" svg:d="M78 148c-42 1-76-30-78-71-2-39 32-76 73-77 43-2 80 31 79 75 0 40-33 73-74 73z">
          <text:p/>
        </draw:path>
        <draw:path draw:style-name="gr9" draw:text-style-name="P7" draw:layer="layout" svg:width="0.149cm" svg:height="0.151cm" svg:x="5.184cm" svg:y="21.197cm" svg:viewBox="0 0 150 152" svg:d="M150 79c-2 40-37 74-76 73-39-2-77-34-74-82 3-40 40-73 80-70 40 2 71 38 70 79z">
          <text:p/>
        </draw:path>
        <draw:path draw:style-name="gr9" draw:text-style-name="P7" draw:layer="layout" svg:width="0.149cm" svg:height="0.151cm" svg:x="5.184cm" svg:y="20.612cm" svg:viewBox="0 0 150 152" svg:d="M0 77c-1-40 31-74 72-77 42-3 79 34 78 77-1 41-35 76-74 75-38 0-76-31-76-75z">
          <text:p/>
        </draw:path>
        <draw:path draw:style-name="gr9" draw:text-style-name="P7" draw:layer="layout" svg:width="0.148cm" svg:height="0.148cm" svg:x="8.688cm" svg:y="25.869cm" svg:viewBox="0 0 149 149" svg:d="M77 0c40 2 74 39 72 77-3 40-39 75-77 72-47-4-73-39-72-78 0-40 38-74 77-71z">
          <text:p/>
        </draw:path>
        <draw:path draw:style-name="gr9" draw:text-style-name="P7" draw:layer="layout" svg:width="0.148cm" svg:height="0.148cm" svg:x="8.396cm" svg:y="16.235cm" svg:viewBox="0 0 149 149" svg:d="M149 75c-1 41-35 75-75 74-42 0-74-35-74-76 1-41 35-75 77-73s72 32 72 75z">
          <text:p/>
        </draw:path>
        <draw:path draw:style-name="gr9" draw:text-style-name="P7" draw:layer="layout" svg:width="0.148cm" svg:height="0.148cm" svg:x="6.061cm" svg:y="17.987cm" svg:viewBox="0 0 149 149" svg:d="M76 0c40 2 75 38 73 76-3 46-38 73-77 73-40 0-74-38-72-77 1-39 38-74 76-72z">
          <text:p/>
        </draw:path>
        <draw:path draw:style-name="gr9" draw:text-style-name="P7" draw:layer="layout" svg:width="0.148cm" svg:height="0.147cm" svg:x="9.273cm" svg:y="15.944cm" svg:viewBox="0 0 149 148" svg:d="M149 73c1 39-34 74-74 75s-75-32-75-72c-1-39 33-75 72-76s75 34 77 73z">
          <text:p/>
        </draw:path>
        <draw:path draw:style-name="gr9" draw:text-style-name="P7" draw:layer="layout" svg:width="0.147cm" svg:height="0.149cm" svg:x="7.521cm" svg:y="25.285cm" svg:viewBox="0 0 148 150" svg:d="M148 73c1 42-31 76-72 77s-75-32-76-74c-1-44 30-74 73-76 41-2 75 32 75 73z">
          <text:p/>
        </draw:path>
        <draw:path draw:style-name="gr9" draw:text-style-name="P7" draw:layer="layout" svg:width="0.15cm" svg:height="0.147cm" svg:x="15.11cm" svg:y="22.366cm" svg:viewBox="0 0 151 148" svg:d="M74 0c40-1 75 31 77 73 2 39-32 74-73 75s-77-30-78-71c0-38 30-76 74-77z">
          <text:p/>
        </draw:path>
        <draw:path draw:style-name="gr9" draw:text-style-name="P7" draw:layer="layout" svg:width="0.146cm" svg:height="0.147cm" svg:x="14.819cm" svg:y="23.242cm" svg:viewBox="0 0 147 148" svg:d="M147 71c1 42-30 75-70 77s-75-31-77-71c-1-38 23-74 72-77 35-3 74 24 75 71z">
          <text:p/>
        </draw:path>
        <draw:path draw:style-name="gr9" draw:text-style-name="P7" draw:layer="layout" svg:width="0.147cm" svg:height="0.149cm" svg:x="7.228cm" svg:y="16.818cm" svg:viewBox="0 0 148 150" svg:d="M148 72c1 41-31 76-71 78-40 1-76-34-77-73-2-39 32-75 73-77 39-1 74 32 75 72z">
          <text:p/>
        </draw:path>
        <draw:path draw:style-name="gr9" draw:text-style-name="P7" draw:layer="layout" svg:width="0.147cm" svg:height="0.146cm" svg:x="5.478cm" svg:y="22.95cm" svg:viewBox="0 0 148 147" svg:d="M77 147c-43 1-76-30-77-71-1-39 29-73 68-76 42-2 77 28 80 70 3 30-23 77-71 77z">
          <text:p/>
        </draw:path>
        <draw:path draw:style-name="gr9" draw:text-style-name="P7" draw:layer="layout" svg:width="0.148cm" svg:height="0.148cm" svg:x="13.359cm" svg:y="24.992cm" svg:viewBox="0 0 149 149" svg:d="M149 74c1 41-32 74-74 75s-74-30-75-72c0-43 32-76 72-77 42 0 76 32 77 74z">
          <text:p/>
        </draw:path>
        <draw:path draw:style-name="gr9" draw:text-style-name="P7" draw:layer="layout" svg:width="0.147cm" svg:height="0.149cm" svg:x="11.023cm" svg:y="15.943cm" svg:viewBox="0 0 148 150" svg:d="M0 77c-1-41 31-75 72-77 41-1 76 32 76 73 1 46-31 75-71 77-41 2-76-32-77-73z">
          <text:p/>
        </draw:path>
        <draw:path draw:style-name="gr9" draw:text-style-name="P7" draw:layer="layout" svg:width="0.148cm" svg:height="0.147cm" svg:x="5.184cm" svg:y="20.323cm" svg:viewBox="0 0 149 148" svg:d="M149 72c1 43-29 74-71 76-49 2-77-39-78-71 0-42 32-75 73-77 39-1 75 28 76 72z">
          <text:p/>
        </draw:path>
        <draw:path draw:style-name="gr9" draw:text-style-name="P7" draw:layer="layout" svg:width="0.148cm" svg:height="0.147cm" svg:x="15.111cm" svg:y="19.448cm" svg:viewBox="0 0 149 148" svg:d="M149 73c1 39-33 74-73 75-40 0-76-33-76-73 0-36 25-74 73-75 41-1 75 32 76 73z">
          <text:p/>
        </draw:path>
        <draw:path draw:style-name="gr9" draw:text-style-name="P7" draw:layer="layout" svg:width="0.147cm" svg:height="0.149cm" svg:x="5.185cm" svg:y="21.782cm" svg:viewBox="0 0 148 150" svg:d="M148 73c1 45-31 74-72 77-40 2-75-32-76-73-2-43 36-76 72-77 41-1 75 31 76 73z">
          <text:p/>
        </draw:path>
        <draw:path draw:style-name="gr9" draw:text-style-name="P7" draw:layer="layout" svg:width="0.146cm" svg:height="0.149cm" svg:x="5.185cm" svg:y="20.03cm" svg:viewBox="0 0 147 150" svg:d="M0 75c0-40 34-76 74-75 39 2 74 31 73 76 0 41-35 74-74 74-40-1-73-35-73-75z">
          <text:p/>
        </draw:path>
        <draw:path draw:style-name="gr9" draw:text-style-name="P7" draw:layer="layout" svg:width="0.148cm" svg:height="0.146cm" svg:x="12.482cm" svg:y="25.578cm" svg:viewBox="0 0 149 147" svg:d="M70 147c-40-2-74-39-70-77 4-42 39-72 79-70 40 3 73 40 69 79-3 41-37 70-78 68z">
          <text:p/>
        </draw:path>
        <draw:path draw:style-name="gr9" draw:text-style-name="P7" draw:layer="layout" svg:width="0.147cm" svg:height="0.147cm" svg:x="6.354cm" svg:y="17.695cm" svg:viewBox="0 0 148 148" svg:d="M148 78c-2 41-35 71-78 70-41-1-71-34-70-76 1-43 34-73 76-72 42 2 73 34 72 78z">
          <text:p/>
        </draw:path>
        <draw:path draw:style-name="gr9" draw:text-style-name="P7" draw:layer="layout" svg:width="0.147cm" svg:height="0.147cm" svg:x="14.235cm" svg:y="24.119cm" svg:viewBox="0 0 148 148" svg:d="M148 75c0 42-33 73-75 73-41-1-73-34-73-75-1-36 30-74 75-73 43 1 74 32 73 75z">
          <text:p/>
        </draw:path>
        <draw:path draw:style-name="gr9" draw:text-style-name="P7" draw:layer="layout" svg:width="0.145cm" svg:height="0.147cm" svg:x="12.193cm" svg:y="16.236cm" svg:viewBox="0 0 146 148" svg:d="M146 77c0 48-46 73-76 71-42-3-72-38-70-80 2-38 34-68 74-68 42 0 73 34 72 77z">
          <text:p/>
        </draw:path>
        <draw:path draw:style-name="gr9" draw:text-style-name="P7" draw:layer="layout" svg:width="0.147cm" svg:height="0.147cm" svg:x="6.937cm" svg:y="17.111cm" svg:viewBox="0 0 148 148" svg:d="M73 148c-42 0-73-32-73-74 1-42 33-74 75-74 41 1 74 33 73 76 0 41-33 73-75 72z">
          <text:p/>
        </draw:path>
        <draw:path draw:style-name="gr9" draw:text-style-name="P7" draw:layer="layout" svg:width="0.145cm" svg:height="0.146cm" svg:x="12.777cm" svg:y="16.528cm" svg:viewBox="0 0 146 147" svg:d="M146 71c2 43-30 76-72 76-40 1-72-28-74-67-3-43 27-78 69-80 41-2 76 30 77 71z">
          <text:p/>
        </draw:path>
        <draw:path draw:style-name="gr9" draw:text-style-name="P7" draw:layer="layout" svg:width="0.147cm" svg:height="0.147cm" svg:x="14.527cm" svg:y="23.826cm" svg:viewBox="0 0 148 148" svg:d="M148 77c-3 40-40 74-78 71-41-3-74-40-69-79 4-39 37-70 74-69 39 1 75 38 73 77z">
          <text:p/>
        </draw:path>
        <draw:path draw:style-name="gr9" draw:text-style-name="P7" draw:layer="layout" svg:width="0.147cm" svg:height="0.146cm" svg:x="11.9cm" svg:y="25.87cm" svg:viewBox="0 0 148 147" svg:d="M148 75c-2 40-40 75-78 72-40-2-74-39-70-78 3-39 36-69 73-69 40 0 76 36 75 75z">
          <text:p/>
        </draw:path>
        <draw:path draw:style-name="gr9" draw:text-style-name="P7" draw:layer="layout" svg:width="0.144cm" svg:height="0.144cm" svg:x="6.063cm" svg:y="24.12cm" svg:viewBox="0 0 145 145" svg:d="M76 145c-42 2-77-33-76-73 0-39 31-70 70-72 40-1 75 29 75 73-1 45-36 71-69 72z">
          <text:p/>
        </draw:path>
        <draw:path draw:style-name="gr9" draw:text-style-name="P7" draw:layer="layout" svg:width="0.146cm" svg:height="0.145cm" svg:x="6.645cm" svg:y="24.704cm" svg:viewBox="0 0 147 146" svg:d="M72 0c42-1 74 30 75 73 1 37-33 71-70 73-35 1-73-24-77-72-2-32 24-75 72-74z">
          <text:p/>
        </draw:path>
        <draw:path draw:style-name="gr9" draw:text-style-name="P7" draw:layer="layout" svg:width="0.145cm" svg:height="0.145cm" svg:x="13.652cm" svg:y="17.112cm" svg:viewBox="0 0 146 146" svg:d="M146 71c1 43-30 74-71 75-49 1-76-42-75-74 1-38 32-70 70-72 41-2 75 30 76 71z">
          <text:p/>
        </draw:path>
        <draw:path draw:style-name="gr9" draw:text-style-name="P7" draw:layer="layout" svg:width="0.146cm" svg:height="0.145cm" svg:x="15.112cm" svg:y="22.661cm" svg:viewBox="0 0 147 146" svg:d="M73 0c51-1 75 44 74 74 0 39-38 74-77 72-37-2-70-34-70-71 0-41 29-75 73-75z">
          <text:p/>
        </draw:path>
        <draw:path draw:style-name="gr9" draw:text-style-name="P7" draw:layer="layout" svg:width="0.144cm" svg:height="0.144cm" svg:x="8.398cm" svg:y="25.871cm" svg:viewBox="0 0 145 145" svg:d="M145 75c-1 45-39 71-72 70-45-1-74-37-73-76 1-38 34-69 72-69 45 1 75 34 73 75z">
          <text:p/>
        </draw:path>
        <draw:path draw:style-name="gr9" draw:text-style-name="P7" draw:layer="layout" svg:width="0.146cm" svg:height="0.146cm" svg:x="5.769cm" svg:y="23.534cm" svg:viewBox="0 0 147 147" svg:d="M147 72c1 42-31 75-74 75-41 0-73-33-73-74 1-39 31-71 70-73 43-1 76 30 77 72z">
          <text:p/>
        </draw:path>
        <draw:path draw:style-name="gr9" draw:text-style-name="P7" draw:layer="layout" svg:width="0.144cm" svg:height="0.144cm" svg:x="9.858cm" svg:y="26.163cm" svg:viewBox="0 0 145 145" svg:d="M74 145c-46 1-75-38-74-75 1-39 34-69 72-70 41 0 74 34 73 75-2 40-32 69-71 70z">
          <text:p/>
        </draw:path>
        <draw:path draw:style-name="gr9" draw:text-style-name="P7" draw:layer="layout" svg:width="0.144cm" svg:height="0.143cm" svg:x="15.113cm" svg:y="19.156cm" svg:viewBox="0 0 145 144" svg:d="M73 144c-40 2-73-28-73-74 0-38 33-70 71-70 40-1 75 32 74 74-1 39-31 71-72 70z">
          <text:p/>
        </draw:path>
        <draw:path draw:style-name="gr9" draw:text-style-name="P7" draw:layer="layout" svg:width="0.145cm" svg:height="0.144cm" svg:x="10.149cm" svg:y="26.163cm" svg:viewBox="0 0 146 145" svg:d="M72 0c42 0 75 34 74 74 0 31-29 74-77 71-39-2-68-32-69-71 0-42 32-75 72-74z">
          <text:p/>
        </draw:path>
        <draw:path draw:style-name="gr9" draw:text-style-name="P7" draw:layer="layout" svg:width="0.144cm" svg:height="0.144cm" svg:x="15.404cm" svg:y="20.616cm" svg:viewBox="0 0 145 145" svg:d="M0 70c1-38 29-70 71-70 49 0 75 38 74 75-2 38-35 71-73 70-49-2-74-39-72-75z">
          <text:p/>
        </draw:path>
        <draw:path draw:style-name="gr9" draw:text-style-name="P7" draw:layer="layout" svg:width="0.146cm" svg:height="0.146cm" svg:x="13.944cm" svg:y="17.405cm" svg:viewBox="0 0 147 147" svg:d="M0 76c-1-45 32-75 73-76 40-1 75 35 74 75-1 37-33 69-70 72-39 3-76-31-77-71z">
          <text:p/>
        </draw:path>
        <draw:path draw:style-name="gr9" draw:text-style-name="P7" draw:layer="layout" svg:width="0.143cm" svg:height="0.144cm" svg:x="13.362cm" svg:y="16.821cm" svg:viewBox="0 0 144 145" svg:d="M0 73c-1-42 32-74 74-73 38 1 70 32 70 70 0 47-37 76-74 75-35-1-71-28-70-72z">
          <text:p/>
        </draw:path>
        <draw:path draw:style-name="gr9" draw:text-style-name="P7" draw:layer="layout" svg:width="0.144cm" svg:height="0.145cm" svg:x="6.355cm" svg:y="24.41cm" svg:viewBox="0 0 145 146" svg:d="M145 75c0 41-33 73-74 71-40-1-70-32-71-70-2-42 33-75 73-76 32-1 74 28 72 75z">
          <text:p/>
        </draw:path>
        <draw:path draw:style-name="gr9" draw:text-style-name="P7" draw:layer="layout" svg:width="0.144cm" svg:height="0.144cm" svg:x="15.404cm" svg:y="21.201cm" svg:viewBox="0 0 145 145" svg:d="M145 70c1 41-32 75-74 75-38 0-69-31-71-70-1-41 29-76 72-75 45 0 71 33 73 70z">
          <text:p/>
        </draw:path>
        <draw:path draw:style-name="gr9" draw:text-style-name="P7" draw:layer="layout" svg:width="0.144cm" svg:height="0.144cm" svg:x="10.735cm" svg:y="26.163cm" svg:viewBox="0 0 145 145" svg:d="M68 145c-39-2-68-32-68-73-1-44 39-74 74-72 38 2 70 35 71 72 0 34-31 76-77 73z">
          <text:p/>
        </draw:path>
        <draw:path draw:style-name="gr9" draw:text-style-name="P7" draw:layer="layout" svg:width="0.144cm" svg:height="0.144cm" svg:x="10.441cm" svg:y="26.163cm" svg:viewBox="0 0 145 145" svg:d="M145 71c0 41-29 72-68 74-50 2-77-39-77-72 0-40 33-74 76-73 38 1 68 33 69 71z">
          <text:p/>
        </draw:path>
        <draw:path draw:style-name="gr9" draw:text-style-name="P7" draw:layer="layout" svg:width="0.144cm" svg:height="0.144cm" svg:x="14.82cm" svg:y="18.572cm" svg:viewBox="0 0 145 145" svg:d="M145 74c-1 40-32 70-71 71-42 0-75-33-74-74 1-36 29-69 71-71 33-1 76 27 74 74z">
          <text:p/>
        </draw:path>
        <draw:path draw:style-name="gr9" draw:text-style-name="P7" draw:layer="layout" svg:width="0.143cm" svg:height="0.144cm" svg:x="8.982cm" svg:y="15.945cm" svg:viewBox="0 0 144 145" svg:d="M144 75c0 39-31 70-71 70-42 1-74-33-73-74 1-36 29-69 71-71 34-2 75 28 73 75z">
          <text:p/>
        </draw:path>
        <draw:path draw:style-name="gr9" draw:text-style-name="P7" draw:layer="layout" svg:width="0.144cm" svg:height="0.144cm" svg:x="14.236cm" svg:y="17.697cm" svg:viewBox="0 0 145 145" svg:d="M72 0c39-1 71 29 73 68 3 47-38 77-72 77-38-1-70-31-73-70-2-40 31-75 72-75z">
          <text:p/>
        </draw:path>
        <draw:path draw:style-name="gr9" draw:text-style-name="P7" draw:layer="layout" svg:width="0.144cm" svg:height="0.143cm" svg:x="5.186cm" svg:y="19.74cm" svg:viewBox="0 0 145 144" svg:d="M145 72c0 39-29 70-67 72-49 3-78-39-78-70 0-41 35-75 76-74 38 1 69 32 69 72z">
          <text:p/>
        </draw:path>
        <draw:path draw:style-name="gr9" draw:text-style-name="P7" draw:layer="layout" svg:width="0.145cm" svg:height="0.146cm" svg:x="5.186cm" svg:y="22.075cm" svg:viewBox="0 0 146 147" svg:d="M72 0c42 0 74 31 74 74-1 41-35 74-75 73-38-2-70-33-71-71-2-41 30-75 72-76z">
          <text:p/>
        </draw:path>
        <draw:path draw:style-name="gr9" draw:text-style-name="P7" draw:layer="layout" svg:width="0.144cm" svg:height="0.144cm" svg:x="5.77cm" svg:y="18.281cm" svg:viewBox="0 0 145 145" svg:d="M145 69c2 46-38 76-73 76-37-1-70-33-72-71-2-37 31-75 74-74 39 1 70 30 71 69z">
          <text:p/>
        </draw:path>
        <draw:path draw:style-name="gr9" draw:text-style-name="P7" draw:layer="layout" svg:width="0.144cm" svg:height="0.145cm" svg:x="15.404cm" svg:y="20.908cm" svg:viewBox="0 0 145 146" svg:d="M145 73c1 41-32 73-74 73-41-1-72-34-71-75 1-40 31-70 70-71 42-1 75 31 75 73z">
          <text:p/>
        </draw:path>
        <draw:path draw:style-name="gr9" draw:text-style-name="P7" draw:layer="layout" svg:width="0.144cm" svg:height="0.143cm" svg:x="15.404cm" svg:y="21.493cm" svg:viewBox="0 0 145 144" svg:d="M145 71c0 41-35 75-75 73-38-1-69-33-70-71 0-42 32-74 74-73 40 0 71 33 71 71z">
          <text:p/>
        </draw:path>
        <draw:path draw:style-name="gr9" draw:text-style-name="P7" draw:layer="layout" svg:width="0.144cm" svg:height="0.143cm" svg:x="15.404cm" svg:y="20.325cm" svg:viewBox="0 0 145 144" svg:d="M145 75c1 33-31 73-78 69-39-3-68-34-67-73s33-71 71-71c40-1 75 33 74 75z">
          <text:p/>
        </draw:path>
        <draw:path draw:style-name="gr9" draw:text-style-name="P7" draw:layer="layout" svg:width="0.145cm" svg:height="0.145cm" svg:x="11.318cm" svg:y="15.945cm" svg:viewBox="0 0 146 146" svg:d="M71 146c-43-1-73-34-71-77 2-38 34-69 72-69 39-1 74 34 74 73 0 41-35 74-75 73z">
          <text:p/>
        </draw:path>
        <draw:path draw:style-name="gr9" draw:text-style-name="P7" draw:layer="layout" svg:width="0.145cm" svg:height="0.145cm" svg:x="13.067cm" svg:y="25.287cm" svg:viewBox="0 0 146 146" svg:d="M146 75c-1 40-36 74-75 71-41-2-74-39-71-77s35-69 74-69c42 0 73 33 72 75z">
          <text:p/>
        </draw:path>
        <draw:path draw:style-name="gr9" draw:text-style-name="P7" draw:layer="layout" svg:width="0.144cm" svg:height="0.144cm" svg:x="6.939cm" svg:y="24.994cm" svg:viewBox="0 0 145 145" svg:d="M145 70c2 39-31 73-67 75-43 1-76-28-78-70-2-47 40-76 72-75 38 0 72 32 73 70z">
          <text:p/>
        </draw:path>
        <draw:path draw:style-name="gr9" draw:text-style-name="P7" draw:layer="layout" svg:width="0.144cm" svg:height="0.144cm" svg:x="8.107cm" svg:y="16.238cm" svg:viewBox="0 0 145 145" svg:d="M0 73c-1-40 27-71 66-73 42-2 77 29 79 69 1 39-36 76-75 76-38-1-69-34-70-72z">
          <text:p/>
        </draw:path>
        <draw:path draw:style-name="gr9" draw:text-style-name="P7" draw:layer="layout" svg:width="0.144cm" svg:height="0.143cm" svg:x="7.523cm" svg:y="16.529cm" svg:viewBox="0 0 145 144" svg:d="M68 144c-39-1-67-32-68-72-1-48 45-74 75-72 38 3 70 35 70 72 0 41-35 74-77 72z">
          <text:p/>
        </draw:path>
        <draw:path draw:style-name="gr9" draw:text-style-name="P7" draw:layer="layout" svg:width="0.144cm" svg:height="0.144cm" svg:x="5.48cm" svg:y="18.866cm" svg:viewBox="0 0 145 145" svg:d="M0 71c0-40 30-69 70-71 48-2 75 40 75 72 0 40-36 74-76 73-38-2-69-34-69-74z">
          <text:p/>
        </draw:path>
        <draw:path draw:style-name="gr9" draw:text-style-name="P7" draw:layer="layout" svg:width="0.142cm" svg:height="0.142cm" svg:x="14.821cm" svg:y="23.536cm" svg:viewBox="0 0 143 143" svg:d="M143 71c0 39-31 71-69 72-41 1-76-33-74-75 1-38 35-69 74-68 38 0 69 32 69 71z">
          <text:p/>
        </draw:path>
        <draw:path draw:style-name="gr9" draw:text-style-name="P7" draw:layer="layout" svg:width="0.143cm" svg:height="0.142cm" svg:x="11.609cm" svg:y="15.946cm" svg:viewBox="0 0 144 143" svg:d="M144 71c1 39-29 71-69 72-40 2-72-27-75-65-2-41 27-77 71-78 41 0 72 31 73 71z">
          <text:p/>
        </draw:path>
        <draw:path draw:style-name="gr9" draw:text-style-name="P7" draw:layer="layout" svg:width="0.142cm" svg:height="0.142cm" svg:x="15.405cm" svg:y="21.785cm" svg:viewBox="0 0 143 143" svg:d="M69 143c-39-1-70-34-69-73 0-39 32-70 71-70 42-2 75 34 72 75-2 39-34 69-74 68z">
          <text:p/>
        </draw:path>
        <draw:path draw:style-name="gr9" draw:text-style-name="P7" draw:layer="layout" svg:width="0.144cm" svg:height="0.144cm" svg:x="7.814cm" svg:y="25.579cm" svg:viewBox="0 0 145 145" svg:d="M145 70c1 41-28 73-67 75-42 2-76-29-78-70-1-39 33-75 74-75 37 0 70 32 71 70z">
          <text:p/>
        </draw:path>
        <draw:path draw:style-name="gr9" draw:text-style-name="P7" draw:layer="layout" svg:width="0.142cm" svg:height="0.142cm" svg:x="11.025cm" svg:y="26.164cm" svg:viewBox="0 0 143 143" svg:d="M143 78c-2 38-36 67-75 65-38-2-70-36-68-73 2-39 35-71 73-70 41 0 73 36 70 78z">
          <text:p/>
        </draw:path>
        <draw:path draw:style-name="gr9" draw:text-style-name="P7" draw:layer="layout" svg:width="0.142cm" svg:height="0.142cm" svg:x="9.567cm" svg:y="26.164cm" svg:viewBox="0 0 143 143" svg:d="M73 143c-39 1-72-29-73-68-2-42 33-76 73-75 38 1 70 34 70 72s-32 71-70 71z">
          <text:p/>
        </draw:path>
        <draw:path draw:style-name="gr9" draw:text-style-name="P7" draw:layer="layout" svg:width="0.143cm" svg:height="0.142cm" svg:x="12.778cm" svg:y="25.58cm" svg:viewBox="0 0 144 143" svg:d="M75 143c-41 1-73-28-75-66-2-47 37-77 72-77 39 0 71 33 72 72 0 38-31 70-69 71z">
          <text:p/>
        </draw:path>
        <draw:path draw:style-name="gr9" draw:text-style-name="P7" draw:layer="layout" svg:width="0.14cm" svg:height="0.141cm" svg:x="13.947cm" svg:y="24.706cm" svg:viewBox="0 0 141 142" svg:d="M71 0c40 0 69 32 70 71 1 38-38 74-76 71s-66-35-65-74c1-40 32-69 71-68z">
          <text:p/>
        </draw:path>
        <draw:path draw:style-name="gr9" draw:text-style-name="P7" draw:layer="layout" svg:width="0.142cm" svg:height="0.142cm" svg:x="7.23cm" svg:y="25.289cm" svg:viewBox="0 0 143 143" svg:d="M72 0c41 0 71 29 71 70 1 39-29 71-69 73-38 2-76-35-74-74 1-31 26-70 72-69z">
          <text:p/>
        </draw:path>
        <draw:path draw:style-name="gr9" draw:text-style-name="P7" draw:layer="layout" svg:width="0.141cm" svg:height="0.141cm" svg:x="13.069cm" svg:y="16.53cm" svg:viewBox="0 0 142 142" svg:d="M142 74c-1 39-31 68-70 68-40 1-70-31-72-68-2-40 37-76 75-74 38 3 67 34 67 74z">
          <text:p/>
        </draw:path>
        <draw:path draw:style-name="gr9" draw:text-style-name="P7" draw:layer="layout" svg:width="0.142cm" svg:height="0.142cm" svg:x="12.485cm" svg:y="16.239cm" svg:viewBox="0 0 143 143" svg:d="M143 74c-1 38-35 70-72 69-38-1-71-34-71-71 1-40 31-75 76-72 40 2 69 34 67 74z">
          <text:p/>
        </draw:path>
        <draw:path draw:style-name="gr9" draw:text-style-name="P7" draw:layer="layout" svg:width="0.141cm" svg:height="0.141cm" svg:x="14.238cm" svg:y="24.412cm" svg:viewBox="0 0 142 142" svg:d="M142 75c-2 39-33 67-73 67-38-1-71-33-69-70 1-41 30-70 69-72 41-1 75 33 73 75z">
          <text:p/>
        </draw:path>
        <draw:path draw:style-name="gr9" draw:text-style-name="P7" draw:layer="layout" svg:width="0.142cm" svg:height="0.143cm" svg:x="5.187cm" svg:y="22.368cm" svg:viewBox="0 0 143 144" svg:d="M143 70c1 40-29 71-68 74-48 2-76-42-75-74 1-37 34-70 71-70 30 0 72 25 72 70z">
          <text:p/>
        </draw:path>
        <draw:path draw:style-name="gr9" draw:text-style-name="P7" draw:layer="layout" svg:width="0.141cm" svg:height="0.141cm" svg:x="13.654cm" svg:y="24.995cm" svg:viewBox="0 0 142 142" svg:d="M142 70c1 40-28 70-67 72-46 3-74-33-75-70 0-37 34-71 70-72 28 0 71 22 72 70z">
          <text:p/>
        </draw:path>
        <draw:path draw:style-name="gr9" draw:text-style-name="P7" draw:layer="layout" svg:width="0.142cm" svg:height="0.141cm" svg:x="5.481cm" svg:y="23.246cm" svg:viewBox="0 0 143 142" svg:d="M0 68c1-39 31-68 71-68 38 0 71 31 72 69 1 40-37 77-76 73-41-3-68-33-67-74z">
          <text:p/>
        </draw:path>
        <draw:path draw:style-name="gr9" draw:text-style-name="P7" draw:layer="layout" svg:width="0.142cm" svg:height="0.14cm" svg:x="5.771cm" svg:y="23.829cm" svg:viewBox="0 0 143 141" svg:d="M143 72c0 38-31 69-71 69-38 1-70-29-72-67-1-40 33-75 73-74 40 2 70 33 70 72z">
          <text:p/>
        </draw:path>
        <draw:path draw:style-name="gr9" draw:text-style-name="P7" draw:layer="layout" svg:width="0.141cm" svg:height="0.141cm" svg:x="5.188cm" svg:y="19.451cm" svg:viewBox="0 0 142 142" svg:d="M142 67c2 46-35 76-72 75-43-2-69-33-70-72-1-38 31-69 70-70 40-1 70 28 72 67z">
          <text:p/>
        </draw:path>
        <draw:path draw:style-name="gr9" draw:text-style-name="P7" draw:layer="layout" svg:width="0.14cm" svg:height="0.142cm" svg:x="11.32cm" svg:y="26.164cm" svg:viewBox="0 0 141 143" svg:d="M66 143c-38-2-67-34-66-74 1-38 33-70 70-69 40 1 70 29 71 70 1 43-35 75-75 73z">
          <text:p/>
        </draw:path>
        <draw:path draw:style-name="gr9" draw:text-style-name="P7" draw:layer="layout" svg:width="0.142cm" svg:height="0.14cm" svg:x="15.405cm" svg:y="22.078cm" svg:viewBox="0 0 143 141" svg:d="M0 66c2-38 33-67 74-66 38 0 69 32 69 70-1 38-29 70-70 71-43 1-75-35-73-75z">
          <text:p/>
        </draw:path>
        <draw:path draw:style-name="gr9" draw:text-style-name="P7" draw:layer="layout" svg:width="0.14cm" svg:height="0.141cm" svg:x="15.406cm" svg:y="19.741cm" svg:viewBox="0 0 141 142" svg:d="M141 72c0 38-33 70-71 70-39-1-71-34-70-71 0-39 34-72 72-71 37 1 70 34 69 72z">
          <text:p/>
        </draw:path>
        <draw:path draw:style-name="gr9" draw:text-style-name="P7" draw:layer="layout" svg:width="0.14cm" svg:height="0.142cm" svg:x="15.115cm" svg:y="22.952cm" svg:viewBox="0 0 141 143" svg:d="M69 143c-39-1-69-31-69-71 0-39 30-71 68-72 41-1 75 34 73 74s-33 69-72 69z">
          <text:p/>
        </draw:path>
        <draw:path draw:style-name="gr9" draw:text-style-name="P7" draw:layer="layout" svg:width="0.142cm" svg:height="0.14cm" svg:x="15.405cm" svg:y="20.035cm" svg:viewBox="0 0 143 141" svg:d="M0 69c1-39 31-69 71-69 39-1 71 29 72 68 1 40-34 75-74 73-39-2-69-33-69-72z">
          <text:p/>
        </draw:path>
        <draw:path draw:style-name="gr9" draw:text-style-name="P7" draw:layer="layout" svg:width="0.142cm" svg:height="0.14cm" svg:x="6.356cm" svg:y="17.408cm" svg:viewBox="0 0 143 141" svg:d="M71 0c39-1 70 29 72 67 1 41-32 75-72 74-39-1-70-33-71-70 0-38 31-70 71-71z">
          <text:p/>
        </draw:path>
        <draw:path draw:style-name="gr9" draw:text-style-name="P7" draw:layer="layout" svg:width="0.14cm" svg:height="0.139cm" svg:x="13.363cm" svg:y="25.29cm" svg:viewBox="0 0 141 140" svg:d="M0 67c-1-30 28-69 73-67 43 1 69 39 68 72-1 38-37 71-73 68-46-3-70-38-68-73z">
          <text:p/>
        </draw:path>
        <draw:path draw:style-name="gr9" draw:text-style-name="P7" draw:layer="layout" svg:width="0.14cm" svg:height="0.14cm" svg:x="10.151cm" svg:y="15.656cm" svg:viewBox="0 0 141 141" svg:d="M0 72c-1-39 29-71 69-72 38-1 70 29 72 67 2 36-30 72-67 74-33 1-73-26-74-69z">
          <text:p/>
        </draw:path>
        <draw:path draw:style-name="gr9" draw:text-style-name="P7" draw:layer="layout" svg:width="0.14cm" svg:height="0.139cm" svg:x="5.188cm" svg:y="22.663cm" svg:viewBox="0 0 141 140" svg:d="M141 71c1 35-27 69-69 69s-70-30-72-69c-1-30 26-71 71-71 40 1 70 31 70 71z">
          <text:p/>
        </draw:path>
        <draw:path draw:style-name="gr9" draw:text-style-name="P7" draw:layer="layout" svg:width="0.14cm" svg:height="0.142cm" svg:x="9.277cm" svg:y="26.164cm" svg:viewBox="0 0 141 143" svg:d="M70 143c-40 0-70-32-70-71-1-38 29-70 68-72 40-1 74 33 73 74-2 38-32 69-71 69z">
          <text:p/>
        </draw:path>
        <draw:path draw:style-name="gr9" draw:text-style-name="P7" draw:layer="layout" svg:width="0.141cm" svg:height="0.14cm" svg:x="8.983cm" svg:y="26.165cm" svg:viewBox="0 0 142 141" svg:d="M72 0c38 0 70 33 70 71s-33 71-71 70c-38 0-71-33-71-71 1-37 34-71 72-70z">
          <text:p/>
        </draw:path>
        <draw:path draw:style-name="gr9" draw:text-style-name="P7" draw:layer="layout" svg:width="0.14cm" svg:height="0.141cm" svg:x="6.648cm" svg:y="17.114cm" svg:viewBox="0 0 141 142" svg:d="M141 74c-1 39-32 69-70 68-39 0-70-30-71-69-1-40 35-75 75-73 37 2 67 35 66 74z">
          <text:p/>
        </draw:path>
        <draw:path draw:style-name="gr9" draw:text-style-name="P7" draw:layer="layout" svg:width="0.14cm" svg:height="0.141cm" svg:x="4.898cm" svg:y="20.91cm" svg:viewBox="0 0 141 142" svg:d="M0 74c-1-39 29-72 68-74 38-1 71 30 73 69 2 36-30 71-68 73-38 1-71-30-73-68z">
          <text:p/>
        </draw:path>
        <draw:path draw:style-name="gr9" draw:text-style-name="P7" draw:layer="layout" svg:width="0.14cm" svg:height="0.14cm" svg:x="7.525cm" svg:y="25.581cm" svg:viewBox="0 0 141 141" svg:d="M72 141c-39 1-71-29-72-67-1-41 30-71 69-74 35-2 71 32 72 70 0 34-27 71-69 71z">
          <text:p/>
        </draw:path>
        <draw:path draw:style-name="gr9" draw:text-style-name="P7" draw:layer="layout" svg:width="0.139cm" svg:height="0.139cm" svg:x="7.817cm" svg:y="16.24cm" svg:viewBox="0 0 140 140" svg:d="M70 0c40-1 69 29 70 68 1 42-31 71-68 72-39 1-73-32-72-70 1-40 31-71 70-70z">
          <text:p/>
        </draw:path>
        <draw:path draw:style-name="gr9" draw:text-style-name="P7" draw:layer="layout" svg:width="0.141cm" svg:height="0.14cm" svg:x="12.195cm" svg:y="25.873cm" svg:viewBox="0 0 142 141" svg:d="M69 0c39-1 71 28 73 66 3 35-21 74-71 75-37 1-71-32-71-70-1-38 31-70 69-71z">
          <text:p/>
        </draw:path>
        <draw:path draw:style-name="gr9" draw:text-style-name="P7" draw:layer="layout" svg:width="0.14cm" svg:height="0.141cm" svg:x="14.822cm" svg:y="18.282cm" svg:viewBox="0 0 141 142" svg:d="M141 67c2 38-29 72-68 75-36 2-71-31-73-69-2-37 29-71 67-73 40-1 73 29 74 67z">
          <text:p/>
        </draw:path>
        <draw:path draw:style-name="gr9" draw:text-style-name="P7" draw:layer="layout" svg:width="0.138cm" svg:height="0.138cm" svg:x="5.19cm" svg:y="19.159cm" svg:viewBox="0 0 139 139" svg:d="M139 72c-2 39-36 69-75 67-34-2-65-31-64-70 0-44 34-70 70-69 45 2 71 38 69 72z">
          <text:p/>
        </draw:path>
        <draw:path draw:style-name="gr9" draw:text-style-name="P7" draw:layer="layout" svg:width="0.14cm" svg:height="0.138cm" svg:x="6.941cm" svg:y="16.824cm" svg:viewBox="0 0 141 139" svg:d="M70 0c39 0 72 31 71 69 0 39-33 70-71 70-39 0-70-31-70-71 0-38 31-69 70-68z">
          <text:p/>
        </draw:path>
        <draw:path draw:style-name="gr9" draw:text-style-name="P7" draw:layer="layout" svg:width="0.139cm" svg:height="0.139cm" svg:x="11.611cm" svg:y="26.166cm" svg:viewBox="0 0 140 140" svg:d="M140 71c-1 38-36 70-73 69-36-2-66-32-67-68-2-37 32-73 69-72 45 1 72 39 71 71z">
          <text:p/>
        </draw:path>
        <draw:path draw:style-name="gr9" draw:text-style-name="P7" draw:layer="layout" svg:width="0.139cm" svg:height="0.14cm" svg:x="10.444cm" svg:y="15.656cm" svg:viewBox="0 0 140 141" svg:d="M73 0c29-1 68 27 67 72-2 45-42 70-72 69-39-2-71-37-68-74 3-46 39-69 73-67z">
          <text:p/>
        </draw:path>
        <draw:path draw:style-name="gr9" draw:text-style-name="P7" draw:layer="layout" svg:width="0.139cm" svg:height="0.139cm" svg:x="15.406cm" svg:y="22.37cm" svg:viewBox="0 0 140 140" svg:d="M71 140c-38 0-72-32-71-70 2-44 36-70 72-70 35 1 67 32 68 68 2 32-26 72-69 72z">
          <text:p/>
        </draw:path>
        <draw:path draw:style-name="gr9" draw:text-style-name="P7" draw:layer="layout" svg:width="0.139cm" svg:height="0.138cm" svg:x="4.899cm" svg:y="21.495cm" svg:viewBox="0 0 140 139" svg:d="M73 0c39 2 71 39 66 75-6 37-38 66-72 64-41-2-70-35-67-73 2-38 35-69 73-66z">
          <text:p/>
        </draw:path>
        <draw:path draw:style-name="gr9" draw:text-style-name="P7" draw:layer="layout" svg:width="0.139cm" svg:height="0.138cm" svg:x="10.737cm" svg:y="15.656cm" svg:viewBox="0 0 140 139" svg:d="M0 65c3-38 37-69 75-65 38 3 64 35 65 71 0 37-37 70-74 68-39-3-68-36-66-74z">
          <text:p/>
        </draw:path>
        <draw:path draw:style-name="gr9" draw:text-style-name="P7" draw:layer="layout" svg:width="0.139cm" svg:height="0.138cm" svg:x="6.358cm" svg:y="24.707cm" svg:viewBox="0 0 140 139" svg:d="M140 67c1 32-22 70-68 72-39 1-71-28-72-69-1-36 29-68 65-70 39-3 73 27 75 67z">
          <text:p/>
        </draw:path>
        <draw:path draw:style-name="gr9" draw:text-style-name="P7" draw:layer="layout" svg:width="0.137cm" svg:height="0.138cm" svg:x="5.19cm" svg:y="22.955cm" svg:viewBox="0 0 138 139" svg:d="M71 0c39 2 69 35 67 73-2 37-37 69-75 65-35-4-64-36-63-70 0-37 36-71 71-68z">
          <text:p/>
        </draw:path>
        <draw:path draw:style-name="gr9" draw:text-style-name="P7" draw:layer="layout" svg:width="0.136cm" svg:height="0.137cm" svg:x="11.029cm" svg:y="15.657cm" svg:viewBox="0 0 137 138" svg:d="M137 66c2 38-29 71-67 72-37 1-72-32-70-69 1-38 28-66 65-69s71 28 72 66z">
          <text:p/>
        </draw:path>
        <draw:path draw:style-name="gr9" draw:text-style-name="P7" draw:layer="layout" svg:width="0.138cm" svg:height="0.139cm" svg:x="4.899cm" svg:y="20.327cm" svg:viewBox="0 0 139 140" svg:d="M0 71c-2-43 36-71 70-71 37 0 71 38 69 74-3 35-33 65-68 66-38 1-71-31-71-69z">
          <text:p/>
        </draw:path>
        <draw:path draw:style-name="gr9" draw:text-style-name="P7" draw:layer="layout" svg:width="0.142cm" svg:height="0.143cm" svg:x="14.529cm" svg:y="17.99cm" svg:viewBox="0 0 143 144" svg:d="M74 143c-41 1-72-29-74-69-1-37 21-69 67-74 40-5 76 30 76 71 1 37-31 70-69 72z">
          <text:p/>
        </draw:path>
        <draw:path draw:style-name="gr9" draw:text-style-name="P7" draw:layer="layout" svg:width="0.138cm" svg:height="0.14cm" svg:x="14.531cm" svg:y="24.122cm" svg:viewBox="0 0 139 141" svg:d="M69 0c38 0 70 32 70 70 0 39-31 71-69 71-37 1-70-31-70-69-1-39 31-72 69-72z">
          <text:p/>
        </draw:path>
        <draw:path draw:style-name="gr9" draw:text-style-name="P7" draw:layer="layout" svg:width="0.138cm" svg:height="0.14cm" svg:x="6.066cm" svg:y="17.699cm" svg:viewBox="0 0 139 141" svg:d="M0 68c1-39 34-70 72-68 39 1 68 35 67 73-2 38-34 69-72 68-39-2-68-34-67-73z">
          <text:p/>
        </draw:path>
        <draw:path draw:style-name="gr9" draw:text-style-name="P7" draw:layer="layout" svg:width="0.139cm" svg:height="0.138cm" svg:x="9.568cm" svg:y="15.656cm" svg:viewBox="0 0 140 139" svg:d="M67 139c-39-2-70-37-67-74 3-38 38-69 76-65 36 3 65 36 64 71-1 37-37 70-73 68z">
          <text:p/>
        </draw:path>
        <draw:path draw:style-name="gr9" draw:text-style-name="P7" draw:layer="layout" svg:width="0.14cm" svg:height="0.14cm" svg:x="8.692cm" svg:y="15.947cm" svg:viewBox="0 0 141 141" svg:d="M66 141c-39-1-68-32-66-74 1-38 36-70 73-67 39 3 70 36 68 74-3 42-35 70-75 67z">
          <text:p/>
        </draw:path>
        <draw:path draw:style-name="gr9" draw:text-style-name="P7" draw:layer="layout" svg:width="0.139cm" svg:height="0.139cm" svg:x="5.482cm" svg:y="18.575cm" svg:viewBox="0 0 140 140" svg:d="M72 140c-40 0-71-30-72-69-1-38 28-69 69-71 38-2 71 30 71 68s-28 72-68 72z">
          <text:p/>
        </draw:path>
        <draw:path draw:style-name="gr9" draw:text-style-name="P7" draw:layer="layout" svg:width="0.138cm" svg:height="0.14cm" svg:x="15.116cm" svg:y="18.868cm" svg:viewBox="0 0 139 141" svg:d="M139 67c1 40-29 72-67 74-37 1-71-31-72-70s29-70 68-71 70 28 71 67z">
          <text:p/>
        </draw:path>
        <draw:path draw:style-name="gr9" draw:text-style-name="P7" draw:layer="layout" svg:width="0.137cm" svg:height="0.139cm" svg:x="13.948cm" svg:y="17.115cm" svg:viewBox="0 0 138 140" svg:d="M0 74c-1-40 28-72 67-74 38-1 72 32 71 71 0 36-28 66-65 69-38 3-72-27-73-66z">
          <text:p/>
        </draw:path>
        <draw:path draw:style-name="gr9" draw:text-style-name="P7" draw:layer="layout" svg:width="0.138cm" svg:height="0.137cm" svg:x="8.401cm" svg:y="15.949cm" svg:viewBox="0 0 139 138" svg:d="M139 67c2 39-28 70-68 71-44 2-71-36-71-69 0-35 29-66 65-69 40-2 73 29 74 67z">
          <text:p/>
        </draw:path>
        <draw:path draw:style-name="gr9" draw:text-style-name="P7" draw:layer="layout" svg:width="0.14cm" svg:height="0.138cm" svg:x="4.898cm" svg:y="21.204cm" svg:viewBox="0 0 141 139" svg:d="M71 139c-40 0-70-30-71-70 0-39 30-69 70-69 39 0 71 31 71 69 1 38-32 70-70 70z">
          <text:p/>
        </draw:path>
        <draw:path draw:style-name="gr9" draw:text-style-name="P7" draw:layer="layout" svg:width="0.139cm" svg:height="0.138cm" svg:x="8.109cm" svg:y="25.874cm" svg:viewBox="0 0 140 139" svg:d="M0 71c-1-40 28-69 68-71 43-1 70 32 72 69 1 38-31 70-70 70-39 2-70-29-70-68z">
          <text:p/>
        </draw:path>
        <draw:path draw:style-name="gr9" draw:text-style-name="P7" draw:layer="layout" svg:width="0.138cm" svg:height="0.136cm" svg:x="12.78cm" svg:y="16.241cm" svg:viewBox="0 0 139 137" svg:d="M70 0c43-1 70 38 69 72-1 36-33 65-68 65-39 0-72-33-71-71 2-36 34-66 70-66z">
          <text:p/>
        </draw:path>
        <draw:path draw:style-name="gr9" draw:text-style-name="P7" draw:layer="layout" svg:width="0.138cm" svg:height="0.139cm" svg:x="11.904cm" svg:y="15.948cm" svg:viewBox="0 0 139 140" svg:d="M139 73c-2 39-32 68-73 67-39-1-67-33-66-73 2-43 37-68 72-67 40 1 69 34 67 73z">
          <text:p/>
        </draw:path>
        <draw:path draw:style-name="gr9" draw:text-style-name="P7" draw:layer="layout" svg:width="0.138cm" svg:height="0.136cm" svg:x="6.942cm" svg:y="25.291cm" svg:viewBox="0 0 139 137" svg:d="M139 70c-1 38-35 69-74 67-36-2-65-33-65-68 0-29 27-71 73-69 39 2 65 38 66 70z">
          <text:p/>
        </draw:path>
        <draw:path draw:style-name="gr9" draw:text-style-name="P7" draw:layer="layout" svg:width="0.136cm" svg:height="0.138cm" svg:x="5.483cm" svg:y="23.538cm" svg:viewBox="0 0 137 139" svg:d="M0 69c0-36 29-67 65-69 38-2 72 30 72 69 0 37-29 68-66 70-31 2-71-25-71-70z">
          <text:p/>
        </draw:path>
        <draw:path draw:style-name="gr9" draw:text-style-name="P7" draw:layer="layout" svg:width="0.138cm" svg:height="0.136cm" svg:x="15.407cm" svg:y="19.453cm" svg:viewBox="0 0 139 137" svg:d="M67 0c44-2 72 36 72 69 0 36-31 66-67 68-38 1-72-31-72-69 1-37 32-67 67-68z">
          <text:p/>
        </draw:path>
        <draw:path draw:style-name="gr9" draw:text-style-name="P7" draw:layer="layout" svg:width="0.137cm" svg:height="0.138cm" svg:x="7.233cm" svg:y="16.532cm" svg:viewBox="0 0 138 139" svg:d="M138 72c-1 39-33 69-73 67-36-2-65-31-65-69-1-37 32-71 69-70s71 30 69 72z">
          <text:p/>
        </draw:path>
        <draw:path draw:style-name="gr9" draw:text-style-name="P7" draw:layer="layout" svg:width="0.139cm" svg:height="0.136cm" svg:x="5.773cm" svg:y="17.993cm" svg:viewBox="0 0 140 137" svg:d="M68 137c-38 0-70-33-68-70 2-40 34-69 73-67 38 2 66 32 67 69 0 38-32 69-72 68z">
          <text:p/>
        </draw:path>
        <draw:path draw:style-name="gr9" draw:text-style-name="P7" draw:layer="layout" svg:width="0.137cm" svg:height="0.136cm" svg:x="12.197cm" svg:y="15.95cm" svg:viewBox="0 0 138 137" svg:d="M70 137c-47 1-72-41-70-71 2-37 32-65 69-66 39 0 71 33 69 72-1 36-32 65-68 65z">
          <text:p/>
        </draw:path>
        <draw:path draw:style-name="gr9" draw:text-style-name="P7" draw:layer="layout" svg:width="0.136cm" svg:height="0.136cm" svg:x="5.774cm" svg:y="24.124cm" svg:viewBox="0 0 137 137" svg:d="M137 72c-2 34-33 66-68 65-43-1-69-34-69-70 1-36 33-67 68-67 37-1 71 36 69 72z">
          <text:p/>
        </draw:path>
        <draw:path draw:style-name="gr9" draw:text-style-name="P7" draw:layer="layout" svg:width="0.135cm" svg:height="0.134cm" svg:x="6.36cm" svg:y="17.118cm" svg:viewBox="0 0 136 135" svg:d="M135 69c-4 42-34 66-68 66-37 1-72-38-67-73 4-37 37-65 71-62 36 3 66 35 64 69z">
          <text:p/>
        </draw:path>
        <draw:path draw:style-name="gr9" draw:text-style-name="P7" draw:layer="layout" svg:width="0.134cm" svg:height="0.134cm" svg:x="15.117cm" svg:y="23.249cm" svg:viewBox="0 0 135 135" svg:d="M68 0c39 0 66 29 67 66 1 41-28 71-69 69-40 0-69-31-66-72 1-36 31-64 68-63z">
          <text:p/>
        </draw:path>
        <draw:path draw:style-name="gr9" draw:text-style-name="P7" draw:layer="layout" svg:width="0.135cm" svg:height="0.138cm" svg:x="8.694cm" svg:y="26.166cm" svg:viewBox="0 0 136 139" svg:d="M136 68c0 40-31 72-70 71-36-1-65-31-66-67-1-40 32-73 69-72 37 2 66 31 67 68z">
          <text:p/>
        </draw:path>
        <draw:path draw:style-name="gr9" draw:text-style-name="P7" draw:layer="layout" svg:width="0.135cm" svg:height="0.137cm" svg:x="14.532cm" svg:y="17.7cm" svg:viewBox="0 0 136 138" svg:d="M136 68c1 39-32 72-70 70-35-1-65-31-66-67 0-40 33-73 71-71 36 1 65 31 65 68z">
          <text:p/>
        </draw:path>
        <draw:path draw:style-name="gr9" draw:text-style-name="P7" draw:layer="layout" svg:width="0.136cm" svg:height="0.134cm" svg:x="15.408cm" svg:y="22.665cm" svg:viewBox="0 0 137 135" svg:d="M67 135c-36-1-67-30-67-66-1-37 33-70 71-69 35 1 65 30 66 67s-31 69-70 68z">
          <text:p/>
        </draw:path>
        <draw:path draw:style-name="gr9" draw:text-style-name="P7" draw:layer="layout" svg:width="0.135cm" svg:height="0.135cm" svg:x="12.489cm" svg:y="25.875cm" svg:viewBox="0 0 136 136" svg:d="M72 0c36 1 64 30 64 68 0 41-30 69-70 68-39-2-65-29-66-67 0-42 30-70 72-69z">
          <text:p/>
        </draw:path>
        <draw:path draw:style-name="gr9" draw:text-style-name="P7" draw:layer="layout" svg:width="0.138cm" svg:height="0.135cm" svg:x="14.823cm" svg:y="23.832cm" svg:viewBox="0 0 139 136" svg:d="M68 0c40-1 72 31 71 69-1 37-31 66-67 67-40 1-73-31-72-70 1-36 31-65 68-66z">
          <text:p/>
        </draw:path>
        <draw:path draw:style-name="gr9" draw:text-style-name="P7" draw:layer="layout" svg:width="0.139cm" svg:height="0.136cm" svg:x="4.899cm" svg:y="20.62cm" svg:viewBox="0 0 140 137" svg:d="M72 0c38 1 72 36 67 73-7 43-39 66-77 64-35-3-64-34-62-71 1-39 32-68 72-66z">
          <text:p/>
        </draw:path>
        <draw:path draw:style-name="gr9" draw:text-style-name="P7" draw:layer="layout" svg:width="0.136cm" svg:height="0.138cm" svg:x="6.65cm" svg:y="24.997cm" svg:viewBox="0 0 137 139" svg:d="M137 70c1 40-30 70-70 69-37 0-65-28-67-65-1-42 28-71 66-74s71 31 71 70z">
          <text:p/>
        </draw:path>
        <draw:path draw:style-name="gr9" draw:text-style-name="P7" draw:layer="layout" svg:width="0.136cm" svg:height="0.139cm" svg:x="9.862cm" svg:y="15.656cm" svg:viewBox="0 0 137 140" svg:d="M137 68c2 47-38 71-68 72-37 1-69-31-69-70 0-37 28-67 64-70 38-2 72 29 73 68z">
          <text:p/>
        </draw:path>
        <draw:path draw:style-name="gr9" draw:text-style-name="P7" draw:layer="layout" svg:width="0.137cm" svg:height="0.134cm" svg:x="4.899cm" svg:y="20.037cm" svg:viewBox="0 0 138 135" svg:d="M73 0c35 0 65 30 65 67 0 36-27 70-71 68-38-1-66-31-67-67 0-39 32-69 73-68z">
          <text:p/>
        </draw:path>
        <draw:path draw:style-name="gr9" draw:text-style-name="P7" draw:layer="layout" svg:width="0.135cm" svg:height="0.137cm" svg:x="9.279cm" svg:y="15.657cm" svg:viewBox="0 0 136 138" svg:d="M136 72c-1 39-32 65-67 66-32 1-71-26-69-71 1-37 30-67 68-67 39-1 69 31 68 72z">
          <text:p/>
        </draw:path>
        <draw:path draw:style-name="gr9" draw:text-style-name="P7" draw:layer="layout" svg:width="0.139cm" svg:height="0.136cm" svg:x="14.239cm" svg:y="17.41cm" svg:viewBox="0 0 140 137" svg:d="M73 137c-40 1-73-30-73-68 0-31 24-68 66-69 40-2 72 26 74 64 1 40-28 72-67 73z">
          <text:p/>
        </draw:path>
        <draw:path draw:style-name="gr9" draw:text-style-name="P7" draw:layer="layout" svg:width="0.135cm" svg:height="0.137cm" svg:x="13.073cm" svg:y="25.583cm" svg:viewBox="0 0 136 138" svg:d="M136 73c-1 36-32 65-69 65-39 0-69-32-67-71 1-38 31-68 67-67 44 2 72 36 69 73z">
          <text:p/>
        </draw:path>
        <draw:path draw:style-name="gr9" draw:text-style-name="P7" draw:layer="layout" svg:width="0.135cm" svg:height="0.135cm" svg:x="6.067cm" svg:y="24.416cm" svg:viewBox="0 0 136 136" svg:d="M68 0c37-1 66 26 68 63 2 41-27 72-66 73-37 0-68-27-70-65-1-40 27-71 68-71z">
          <text:p/>
        </draw:path>
        <draw:path draw:style-name="gr9" draw:text-style-name="P7" draw:layer="layout" svg:width="0.137cm" svg:height="0.135cm" svg:x="4.899cm" svg:y="21.789cm" svg:viewBox="0 0 138 136" svg:d="M70 136c-37 0-68-29-70-64-1-39 29-72 70-72 37 1 65 25 68 65 2 41-30 72-68 71z">
          <text:p/>
        </draw:path>
        <draw:path draw:style-name="gr9" draw:text-style-name="P7" draw:layer="layout" svg:width="0.135cm" svg:height="0.134cm" svg:x="13.658cm" svg:y="16.825cm" svg:viewBox="0 0 136 135" svg:d="M71 135c-41 2-72-29-71-69 1-37 28-65 66-66 37-1 68 26 70 62 3 40-26 72-65 73z">
          <text:p/>
        </draw:path>
        <draw:path draw:style-name="gr9" draw:text-style-name="P7" draw:layer="layout" svg:width="0.135cm" svg:height="0.135cm" svg:x="13.365cm" svg:y="16.534cm" svg:viewBox="0 0 136 136" svg:d="M72 0c36 2 64 33 64 69 0 38-33 69-72 67-35-2-64-33-64-67 0-38 33-71 72-69z">
          <text:p/>
        </draw:path>
        <draw:path draw:style-name="gr9" draw:text-style-name="P7" draw:layer="layout" svg:width="0.135cm" svg:height="0.134cm" svg:x="4.9cm" svg:y="22.08cm" svg:viewBox="0 0 136 135" svg:d="M71 135c-39 1-71-29-71-67 0-36 31-67 66-68 38-1 70 29 70 69 0 35-29 65-65 66z">
          <text:p/>
        </draw:path>
        <draw:path draw:style-name="gr9" draw:text-style-name="P7" draw:layer="layout" svg:width="0.133cm" svg:height="0.132cm" svg:x="5.776cm" svg:y="17.703cm" svg:viewBox="0 0 134 133" svg:d="M134 64c1 35-29 67-66 69-35 1-68-29-68-65 1-40 25-66 64-68 35-2 65 21 70 64z">
          <text:p/>
        </draw:path>
        <draw:path draw:style-name="gr9" draw:text-style-name="P7" draw:layer="layout" svg:width="0.132cm" svg:height="0.132cm" svg:x="15.703cm" svg:y="21.207cm" svg:viewBox="0 0 133 133" svg:d="M133 69c-2 36-31 65-69 64-39-1-67-33-64-73 2-36 32-62 70-60 37 2 64 32 63 69z">
          <text:p/>
        </draw:path>
        <draw:path draw:style-name="gr9" draw:text-style-name="P7" draw:layer="layout" svg:width="0.134cm" svg:height="0.134cm" svg:x="11.322cm" svg:y="15.658cm" svg:viewBox="0 0 135 135" svg:d="M135 67c0 35-20 66-63 68-44 3-72-32-72-67s30-66 65-68c38-3 70 28 70 67z">
          <text:p/>
        </draw:path>
        <draw:path draw:style-name="gr9" draw:text-style-name="P7" draw:layer="layout" svg:width="0.132cm" svg:height="0.132cm" svg:x="15.703cm" svg:y="20.622cm" svg:viewBox="0 0 133 133" svg:d="M133 69c-1 36-31 64-68 64-40-1-68-32-65-72 2-36 32-63 69-61 38 2 65 32 64 69z">
          <text:p/>
        </draw:path>
        <draw:path draw:style-name="gr9" draw:text-style-name="P7" draw:layer="layout" svg:width="0.135cm" svg:height="0.134cm" svg:x="8.987cm" svg:y="15.658cm" svg:viewBox="0 0 136 135" svg:d="M136 69c-2 36-33 67-68 66-42-2-65-28-68-66-3-37 34-72 71-69 36 3 63 32 65 69z">
          <text:p/>
        </draw:path>
        <draw:path draw:style-name="gr9" draw:text-style-name="P7" draw:layer="layout" svg:width="0.132cm" svg:height="0.132cm" svg:x="9.864cm" svg:y="26.46cm" svg:viewBox="0 0 133 133" svg:d="M133 70c-1 36-32 64-68 63-40 0-68-32-65-72 3-36 33-63 71-61 37 2 64 34 62 70z">
          <text:p/>
        </draw:path>
        <draw:path draw:style-name="gr9" draw:text-style-name="P7" draw:layer="layout" svg:width="0.134cm" svg:height="0.136cm" svg:x="11.906cm" svg:y="26.167cm" svg:viewBox="0 0 135 137" svg:d="M135 71c-1 36-31 65-66 66-37 2-69-31-69-69 0-36 29-65 65-68 37-2 70 32 70 71z">
          <text:p/>
        </draw:path>
        <draw:path draw:style-name="gr9" draw:text-style-name="P7" draw:layer="layout" svg:width="0.132cm" svg:height="0.132cm" svg:x="12.2cm" svg:y="26.17cm" svg:viewBox="0 0 133 133" svg:d="M133 65c2 34-30 67-65 68-34 1-67-30-68-65-1-37 29-69 65-68 42 0 64 28 68 65z">
          <text:p/>
        </draw:path>
        <draw:path draw:style-name="gr9" draw:text-style-name="P7" draw:layer="layout" svg:width="0.132cm" svg:height="0.132cm" svg:x="15.409cm" svg:y="22.958cm" svg:viewBox="0 0 133 133" svg:d="M67 133c-34 1-67-32-67-67s31-67 66-66c40 1 67 25 67 65 0 43-30 65-66 68z">
          <text:p/>
        </draw:path>
        <draw:path draw:style-name="gr9" draw:text-style-name="P7" draw:layer="layout" svg:width="0.133cm" svg:height="0.134cm" svg:x="4.901cm" svg:y="19.745cm" svg:viewBox="0 0 134 135" svg:d="M134 70c-1 35-32 66-68 65-35 0-66-31-66-66-1-37 29-70 70-69 37 1 65 34 64 70z">
          <text:p/>
        </draw:path>
        <draw:path draw:style-name="gr9" draw:text-style-name="P7" draw:layer="layout" svg:width="0.132cm" svg:height="0.132cm" svg:x="6.653cm" svg:y="16.826cm" svg:viewBox="0 0 133 133" svg:d="M133 66c0 37-28 66-65 67-41 1-69-27-68-68 0-36 29-65 66-65s66 30 67 66z">
          <text:p/>
        </draw:path>
        <draw:path draw:style-name="gr9" draw:text-style-name="P7" draw:layer="layout" svg:width="0.133cm" svg:height="0.134cm" svg:x="15.118cm" svg:y="18.578cm" svg:viewBox="0 0 134 135" svg:d="M0 66c0-38 28-65 66-66 41 0 70 30 68 71-1 36-32 65-70 64-36-1-64-32-64-69z">
          <text:p/>
        </draw:path>
        <draw:path draw:style-name="gr9" draw:text-style-name="P7" draw:layer="layout" svg:width="0.135cm" svg:height="0.133cm" svg:x="15.408cm" svg:y="19.162cm" svg:viewBox="0 0 136 134" svg:d="M136 65c-1 32-21 65-64 69-37 3-72-30-72-68 1-36 31-66 67-66 37 0 68 29 69 65z">
          <text:p/>
        </draw:path>
        <draw:path draw:style-name="gr9" draw:text-style-name="P7" draw:layer="layout" svg:width="0.132cm" svg:height="0.132cm" svg:x="6.069cm" svg:y="17.411cm" svg:viewBox="0 0 133 133" svg:d="M133 64c1 39-25 67-62 69-40 2-72-27-71-67 0-36 30-65 66-66 36 0 65 27 67 64z">
          <text:p/>
        </draw:path>
        <draw:path draw:style-name="gr9" draw:text-style-name="P7" draw:layer="layout" svg:width="0.132cm" svg:height="0.133cm" svg:x="15.703cm" svg:y="21.497cm" svg:viewBox="0 0 133 134" svg:d="M133 67c0 36-29 66-66 67-36 1-66-28-67-64-2-39 29-72 67-70 36 1 66 31 66 67z">
          <text:p/>
        </draw:path>
        <draw:path draw:style-name="gr9" draw:text-style-name="P7" draw:layer="layout" svg:width="0.133cm" svg:height="0.135cm" svg:x="8.404cm" svg:y="26.168cm" svg:viewBox="0 0 134 136" svg:d="M134 71c-2 35-34 66-69 65-38-1-69-35-65-74 3-37 35-65 71-62 36 4 64 36 63 71z">
          <text:p/>
        </draw:path>
        <draw:path draw:style-name="gr9" draw:text-style-name="P7" draw:layer="layout" svg:width="0.134cm" svg:height="0.133cm" svg:x="7.82cm" svg:y="25.876cm" svg:viewBox="0 0 135 134" svg:d="M68 134c-38 1-66-27-68-65-1-40 29-70 69-69 37 1 67 31 66 67 0 37-28 67-67 67z">
          <text:p/>
        </draw:path>
        <draw:path draw:style-name="gr9" draw:text-style-name="P7" draw:layer="layout" svg:width="0.133cm" svg:height="0.134cm" svg:x="14.243cm" svg:y="24.708cm" svg:viewBox="0 0 134 135" svg:d="M65 135c-38-1-66-31-65-68 0-36 29-66 66-67s70 35 68 71c-3 37-33 65-69 64z">
          <text:p/>
        </draw:path>
        <draw:path draw:style-name="gr9" draw:text-style-name="P7" draw:layer="layout" svg:width="0.133cm" svg:height="0.133cm" svg:x="5.484cm" svg:y="18.285cm" svg:viewBox="0 0 134 134" svg:d="M134 69c0 37-30 65-66 65-37 0-67-28-68-64-1-38 33-72 70-70 36 2 64 33 64 69z">
          <text:p/>
        </draw:path>
        <draw:path draw:style-name="gr9" draw:text-style-name="P7" draw:layer="layout" svg:width="0.133cm" svg:height="0.134cm" svg:x="5.193cm" svg:y="18.87cm" svg:viewBox="0 0 134 135" svg:d="M64 135c-38-2-65-32-64-69 0-36 30-66 67-66s70 35 67 72-34 64-70 63z">
          <text:p/>
        </draw:path>
        <draw:path draw:style-name="gr9" draw:text-style-name="P7" draw:layer="layout" svg:width="0.131cm" svg:height="0.131cm" svg:x="12.491cm" svg:y="15.953cm" svg:viewBox="0 0 132 132" svg:d="M0 67c0-38 27-66 65-67s67 27 67 64c1 37-28 67-64 68-31 2-68-26-68-65z">
          <text:p/>
        </draw:path>
        <draw:path draw:style-name="gr9" draw:text-style-name="P7" draw:layer="layout" svg:width="0.131cm" svg:height="0.131cm" svg:x="5.485cm" svg:y="23.834cm" svg:viewBox="0 0 132 132" svg:d="M132 65c1 38-27 67-65 67-36 1-66-29-67-65-1-31 27-67 65-67 39 1 67 27 67 65z">
          <text:p/>
        </draw:path>
        <draw:path draw:style-name="gr9" draw:text-style-name="P7" draw:layer="layout" svg:width="0.132cm" svg:height="0.133cm" svg:x="7.236cm" svg:y="25.586cm" svg:viewBox="0 0 133 134" svg:d="M0 68c-1-37 27-67 63-68 38-1 68 27 70 62 3 38-29 72-67 72-36 0-65-29-66-66z">
          <text:p/>
        </draw:path>
        <draw:path draw:style-name="gr9" draw:text-style-name="P7" draw:layer="layout" svg:width="0.131cm" svg:height="0.132cm" svg:x="15.703cm" svg:y="21.791cm" svg:viewBox="0 0 132 133" svg:d="M64 0c39 0 67 29 68 66 1 35-29 65-65 67-31 1-67-27-67-65s27-67 64-68z">
          <text:p/>
        </draw:path>
        <draw:path draw:style-name="gr9" draw:text-style-name="P7" draw:layer="layout" svg:width="0.131cm" svg:height="0.131cm" svg:x="14.534cm" svg:y="24.418cm" svg:viewBox="0 0 132 132" svg:d="M64 0c39-1 67 26 68 64 1 37-28 67-65 68-35 1-66-29-67-65-1-37 27-66 64-67z">
          <text:p/>
        </draw:path>
        <draw:path draw:style-name="gr9" draw:text-style-name="P7" draw:layer="layout" svg:width="0.134cm" svg:height="0.132cm" svg:x="14.826cm" svg:y="17.995cm" svg:viewBox="0 0 135 133" svg:d="M76 1c34 3 64 41 58 74-6 37-37 60-74 58-31-2-64-30-60-70 4-45 37-67 76-62z">
          <text:p/>
        </draw:path>
        <draw:path draw:style-name="gr9" draw:text-style-name="P7" draw:layer="layout" svg:width="0.133cm" svg:height="0.133cm" svg:x="13.949cm" svg:y="25.001cm" svg:viewBox="0 0 134 134" svg:d="M134 67c-1 37-30 66-66 67-37 0-70-33-68-71 2-35 32-64 69-63 37 0 65 30 65 67z">
          <text:p/>
        </draw:path>
        <draw:path draw:style-name="gr9" draw:text-style-name="P7" draw:layer="layout" svg:width="0.132cm" svg:height="0.132cm" svg:x="10.448cm" svg:y="26.46cm" svg:viewBox="0 0 133 133" svg:d="M0 61c2-36 31-62 70-61 36 2 64 32 63 69-1 38-34 67-73 64-37-3-62-33-60-72z">
          <text:p/>
        </draw:path>
        <draw:path draw:style-name="gr9" draw:text-style-name="P7" draw:layer="layout" svg:width="0.132cm" svg:height="0.133cm" svg:x="8.111cm" svg:y="15.952cm" svg:viewBox="0 0 133 134" svg:d="M133 67c0 38-28 66-65 67-35 0-67-29-68-66-1-39 30-69 70-68 37 1 64 29 63 67z">
          <text:p/>
        </draw:path>
        <draw:path draw:style-name="gr9" draw:text-style-name="P7" draw:layer="layout" svg:width="0.131cm" svg:height="0.132cm" svg:x="15.703cm" svg:y="20.331cm" svg:viewBox="0 0 132 133" svg:d="M65 0c37 0 67 29 67 66 1 36-29 67-66 67-35 1-66-29-66-65 0-38 28-67 65-68z">
          <text:p/>
        </draw:path>
        <draw:path draw:style-name="gr9" draw:text-style-name="P7" draw:layer="layout" svg:width="0.131cm" svg:height="0.131cm" svg:x="13.66cm" svg:y="25.293cm" svg:viewBox="0 0 132 132" svg:d="M67 132c-39 0-66-26-67-64 0-38 28-68 66-68 35-1 66 30 66 66 1 36-28 66-65 66z">
          <text:p/>
        </draw:path>
        <draw:path draw:style-name="gr9" draw:text-style-name="P7" draw:layer="layout" svg:width="0.134cm" svg:height="0.133cm" svg:x="7.527cm" svg:y="16.242cm" svg:viewBox="0 0 135 134" svg:d="M59 133c-41-3-62-43-59-71 4-37 37-64 72-62 38 3 67 37 62 77-5 36-37 60-75 56z">
          <text:p/>
        </draw:path>
        <draw:path draw:style-name="gr9" draw:text-style-name="P7" draw:layer="layout" svg:width="0.131cm" svg:height="0.131cm" svg:x="13.075cm" svg:y="16.243cm" svg:viewBox="0 0 132 132" svg:d="M68 132c-38 1-67-25-68-62-1-38 26-68 62-70s68 27 70 63c2 37-26 67-64 69z">
          <text:p/>
        </draw:path>
        <draw:path draw:style-name="gr9" draw:text-style-name="P7" draw:layer="layout" svg:width="0.133cm" svg:height="0.132cm" svg:x="10.154cm" svg:y="26.46cm" svg:viewBox="0 0 134 133" svg:d="M70 133c-36 1-67-26-70-62-3-30 25-72 69-71 37 1 64 29 65 66 0 37-28 66-64 67z">
          <text:p/>
        </draw:path>
        <draw:path draw:style-name="gr9" draw:text-style-name="P7" draw:layer="layout" svg:width="0.132cm" svg:height="0.131cm" svg:x="11.615cm" svg:y="15.659cm" svg:viewBox="0 0 133 132" svg:d="M69 132c-34 1-65-19-69-63-3-35 28-67 63-69s67 28 70 64c2 34-27 67-64 68z">
          <text:p/>
        </draw:path>
        <draw:path draw:style-name="gr9" draw:text-style-name="P7" draw:layer="layout" svg:width="0.131cm" svg:height="0.131cm" svg:x="5.194cm" svg:y="23.25cm" svg:viewBox="0 0 132 132" svg:d="M67 132c-38 1-66-25-67-64-1-37 26-67 63-68 35-1 68 28 69 64 2 36-29 67-65 68z">
          <text:p/>
        </draw:path>
        <draw:path draw:style-name="gr9" draw:text-style-name="P7" draw:layer="layout" svg:width="0.133cm" svg:height="0.132cm" svg:x="10.739cm" svg:y="26.46cm" svg:viewBox="0 0 134 133" svg:d="M70 133c-36 2-67-26-70-61-3-32 24-73 67-72 38 1 66 29 67 66s-27 66-64 67z">
          <text:p/>
        </draw:path>
        <draw:path draw:style-name="gr9" draw:text-style-name="P7" draw:layer="layout" svg:width="0.132cm" svg:height="0.134cm" svg:x="15.703cm" svg:y="20.913cm" svg:viewBox="0 0 133 135" svg:d="M133 65c1 36-26 68-63 70-32 2-68-22-70-61-3-40 26-73 64-74 36-1 67 29 69 65z">
          <text:p/>
        </draw:path>
        <draw:path draw:style-name="gr9" draw:text-style-name="P7" draw:layer="layout" svg:width="0.129cm" svg:height="0.129cm" svg:x="15.704cm" svg:y="22.082cm" svg:viewBox="0 0 130 130" svg:d="M65 130c-37 1-65-27-65-64-1-41 37-68 67-66 33 1 62 30 63 63 2 37-27 67-65 67z">
          <text:p/>
        </draw:path>
        <draw:path draw:style-name="gr9" draw:text-style-name="P7" draw:layer="layout" svg:width="0.132cm" svg:height="0.131cm" svg:x="6.945cm" svg:y="16.537cm" svg:viewBox="0 0 133 132" svg:d="M69 0c36 1 66 32 64 69-3 36-36 66-70 63-40-4-64-35-63-69 0-37 32-65 69-63z">
          <text:p/>
        </draw:path>
        <draw:path draw:style-name="gr9" draw:text-style-name="P7" draw:layer="layout" svg:width="0.132cm" svg:height="0.132cm" svg:x="4.901cm" svg:y="22.375cm" svg:viewBox="0 0 133 133" svg:d="M66 0c37-1 66 26 67 63 0 38-28 68-64 70-34 1-67-30-69-66-1-35 29-66 66-67z">
          <text:p/>
        </draw:path>
        <draw:path draw:style-name="gr9" draw:text-style-name="P7" draw:layer="layout" svg:width="0.132cm" svg:height="0.131cm" svg:x="9.571cm" svg:y="26.461cm" svg:viewBox="0 0 133 132" svg:d="M69 132c-37 1-68-28-69-64-1-31 24-67 66-68 33-1 66 22 67 64s-32 68-64 68z">
          <text:p/>
        </draw:path>
        <draw:path draw:style-name="gr9" draw:text-style-name="P7" draw:layer="layout" svg:width="0.13cm" svg:height="0.13cm" svg:x="15.704cm" svg:y="20.039cm" svg:viewBox="0 0 131 131" svg:d="M60 131c-36-2-63-34-60-71 3-33 33-61 66-60 37 1 66 34 65 69-2 37-35 64-71 62z">
          <text:p/>
        </draw:path>
        <draw:path draw:style-name="gr9" draw:text-style-name="P7" draw:layer="layout" svg:width="0.13cm" svg:height="0.13cm" svg:x="14.828cm" svg:y="24.127cm" svg:viewBox="0 0 131 131" svg:d="M131 66c1 35-31 66-68 65-34 0-62-27-63-61-2-42 25-69 62-70 40-1 65 25 69 66z">
          <text:p/>
        </draw:path>
        <draw:path draw:style-name="gr9" draw:text-style-name="P7" draw:layer="layout" svg:width="0.132cm" svg:height="0.131cm" svg:x="12.783cm" svg:y="25.877cm" svg:viewBox="0 0 133 132" svg:d="M68 132c-37 2-66-27-68-64-2-31 24-67 64-68 36-1 68 27 69 63s-28 68-65 69z">
          <text:p/>
        </draw:path>
        <draw:path draw:style-name="gr9" draw:text-style-name="P7" draw:layer="layout" svg:width="0.132cm" svg:height="0.131cm" svg:x="11.032cm" svg:y="26.461cm" svg:viewBox="0 0 133 132" svg:d="M0 62c2-37 31-63 69-62 41 1 65 41 64 69-3 36-34 64-70 63-37-2-64-32-63-70z">
          <text:p/>
        </draw:path>
        <draw:path draw:style-name="gr9" draw:text-style-name="P7" draw:layer="layout" svg:width="0.129cm" svg:height="0.13cm" svg:x="13.951cm" svg:y="16.827cm" svg:viewBox="0 0 130 131" svg:d="M130 64c1 39-26 67-64 67-37 0-67-30-66-66 0-33 29-63 63-65 36-2 67 28 67 64z">
          <text:p/>
        </draw:path>
        <draw:path draw:style-name="gr9" draw:text-style-name="P7" draw:layer="layout" svg:width="0.13cm" svg:height="0.129cm" svg:x="7.823cm" svg:y="15.954cm" svg:viewBox="0 0 131 130" svg:d="M0 64c0-38 27-64 66-64 41-1 67 40 65 67-3 33-32 62-65 63-36 2-66-29-66-66z">
          <text:p/>
        </draw:path>
        <draw:path draw:style-name="gr9" draw:text-style-name="P7" draw:layer="layout" svg:width="0.13cm" svg:height="0.13cm" svg:x="11.324cm" svg:y="26.461cm" svg:viewBox="0 0 131 131" svg:d="M131 69c-1 37-32 64-70 62-33-2-61-32-61-64 0-37 31-67 67-67 38 1 65 30 64 69z">
          <text:p/>
        </draw:path>
        <draw:path draw:style-name="gr9" draw:text-style-name="P7" draw:layer="layout" svg:width="0.131cm" svg:height="0.132cm" svg:x="15.119cm" svg:y="23.541cm" svg:viewBox="0 0 132 133" svg:d="M132 64c2 33-22 67-64 69-40 1-67-33-68-66s26-65 65-67c29-2 67 22 67 64z">
          <text:p/>
        </draw:path>
        <draw:path draw:style-name="gr9" draw:text-style-name="P7" draw:layer="layout" svg:width="0.129cm" svg:height="0.13cm" svg:x="7.529cm" svg:y="25.877cm" svg:viewBox="0 0 130 131" svg:d="M130 66c0 38-28 66-66 65-41 0-66-40-64-69 2-33 32-61 65-62 37 0 66 29 65 66z">
          <text:p/>
        </draw:path>
        <draw:path draw:style-name="gr9" draw:text-style-name="P7" draw:layer="layout" svg:width="0.129cm" svg:height="0.128cm" svg:x="7.238cm" svg:y="16.244cm" svg:viewBox="0 0 130 129" svg:d="M64 129c-38 0-64-28-64-66 0-37 32-61 61-63 34-2 68 29 69 64 1 36-30 66-66 65z">
          <text:p/>
        </draw:path>
        <draw:path draw:style-name="gr9" draw:text-style-name="P7" draw:layer="layout" svg:width="0.13cm" svg:height="0.129cm" svg:x="8.696cm" svg:y="15.66cm" svg:viewBox="0 0 131 130" svg:d="M131 66c0 37-28 65-66 64-35 0-63-27-65-61-1-35 29-68 65-69 35-2 66 30 66 66z">
          <text:p/>
        </draw:path>
        <draw:path draw:style-name="gr9" draw:text-style-name="P7" draw:layer="layout" svg:width="0.129cm" svg:height="0.129cm" svg:x="6.654cm" svg:y="25.294cm" svg:viewBox="0 0 130 130" svg:d="M65 130c-39 1-66-35-65-66 1-35 33-66 68-64 33 2 60 31 62 63 2 30-25 68-65 67z">
          <text:p/>
        </draw:path>
        <draw:path draw:style-name="gr9" draw:text-style-name="P7" draw:layer="layout" svg:width="0.13cm" svg:height="0.13cm" svg:x="4.902cm" svg:y="19.455cm" svg:viewBox="0 0 131 131" svg:d="M131 64c1 39-26 67-64 67s-68-31-67-67c1-33 29-61 62-64 36-2 68 27 69 64z">
          <text:p/>
        </draw:path>
        <draw:path draw:style-name="gr9" draw:text-style-name="P7" draw:layer="layout" svg:width="0.128cm" svg:height="0.129cm" svg:x="10.45cm" svg:y="15.369cm" svg:viewBox="0 0 129 130" svg:d="M0 61c2-37 32-63 69-61 33 3 61 32 60 66 0 34-34 66-68 64-36-2-63-33-61-69z">
          <text:p/>
        </draw:path>
        <draw:path draw:style-name="gr9" draw:text-style-name="P7" draw:layer="layout" svg:width="0.129cm" svg:height="0.13cm" svg:x="6.07cm" svg:y="24.71cm" svg:viewBox="0 0 130 131" svg:d="M130 68c-1 36-30 64-68 63-35-2-62-30-62-64-1-43 36-67 66-67 28 0 66 24 64 68z">
          <text:p/>
        </draw:path>
        <draw:path draw:style-name="gr9" draw:text-style-name="P7" draw:layer="layout" svg:width="0.13cm" svg:height="0.13cm" svg:x="13.367cm" svg:y="25.588cm" svg:viewBox="0 0 131 131" svg:d="M66 0c38 0 66 29 65 67-1 34-29 62-63 64s-67-30-68-65c-1-36 29-67 66-66z">
          <text:p/>
        </draw:path>
        <draw:path draw:style-name="gr9" draw:text-style-name="P7" draw:layer="layout" svg:width="0.13cm" svg:height="0.13cm" svg:x="14.245cm" svg:y="17.121cm" svg:viewBox="0 0 131 131" svg:d="M0 62c1-37 31-64 68-62 34 2 62 30 63 63 0 34-33 68-68 68-35-1-64-33-63-69z">
          <text:p/>
        </draw:path>
        <draw:path draw:style-name="gr9" draw:text-style-name="P7" draw:layer="layout" svg:width="0.13cm" svg:height="0.129cm" svg:x="9.281cm" svg:y="26.462cm" svg:viewBox="0 0 131 130" svg:d="M131 64c1 37-29 67-66 66-36 0-66-31-65-67 2-35 29-62 63-63 38-2 68 26 68 64z">
          <text:p/>
        </draw:path>
        <draw:path draw:style-name="gr9" draw:text-style-name="P7" draw:layer="layout" svg:width="0.127cm" svg:height="0.129cm" svg:x="8.991cm" svg:y="26.462cm" svg:viewBox="0 0 128 130" svg:d="M0 62c1-36 30-64 67-62 34 2 60 29 61 63 1 36-29 67-65 67s-64-30-63-68z">
          <text:p/>
        </draw:path>
        <draw:path draw:style-name="gr9" draw:text-style-name="P7" draw:layer="layout" svg:width="0.128cm" svg:height="0.128cm" svg:x="4.612cm" svg:y="21.209cm" svg:viewBox="0 0 129 129" svg:d="M67 0c35 1 65 34 62 68-3 33-32 61-64 61-37 1-66-29-65-66 0-37 30-65 67-63z">
          <text:p/>
        </draw:path>
        <draw:path draw:style-name="gr9" draw:text-style-name="P7" draw:layer="layout" svg:width="0.128cm" svg:height="0.129cm" svg:x="5.195cm" svg:y="18.581cm" svg:viewBox="0 0 129 130" svg:d="M0 62c2-38 30-64 68-62 34 1 61 31 61 64 1 35-32 66-66 66-36-1-64-32-63-68z">
          <text:p/>
        </draw:path>
        <draw:path draw:style-name="gr9" draw:text-style-name="P7" draw:layer="layout" svg:width="0.128cm" svg:height="0.129cm" svg:x="10.156cm" svg:y="15.369cm" svg:viewBox="0 0 129 130" svg:d="M129 66c0 36-31 66-66 64-32-2-61-30-63-63-2-35 30-67 65-67 38 0 65 27 64 66z">
          <text:p/>
        </draw:path>
        <draw:path draw:style-name="gr9" draw:text-style-name="P7" draw:layer="layout" svg:width="0.129cm" svg:height="0.129cm" svg:x="5.486cm" svg:y="17.997cm" svg:viewBox="0 0 130 130" svg:d="M130 67c-1 36-32 65-69 63-32-3-60-33-61-65 0-35 31-66 66-65 37 1 65 30 64 67z">
          <text:p/>
        </draw:path>
        <draw:path draw:style-name="gr9" draw:text-style-name="P7" draw:layer="layout" svg:width="0.129cm" svg:height="0.129cm" svg:x="14.535cm" svg:y="17.413cm" svg:viewBox="0 0 130 130" svg:d="M65 130c-35 0-65-30-65-66 1-33 28-62 61-64 35-2 68 27 69 63 1 37-28 66-65 67z">
          <text:p/>
        </draw:path>
        <draw:path draw:style-name="gr9" draw:text-style-name="P7" draw:layer="layout" svg:width="0.128cm" svg:height="0.127cm" svg:x="11.909cm" svg:y="15.661cm" svg:viewBox="0 0 129 128" svg:d="M67 128c-38 1-68-27-67-63 0-42 35-66 67-65 33 0 61 29 62 62 2 37-25 66-62 66z">
          <text:p/>
        </draw:path>
        <draw:path draw:style-name="gr9" draw:text-style-name="P7" draw:layer="layout" svg:width="0.129cm" svg:height="0.128cm" svg:x="15.12cm" svg:y="18.287cm" svg:viewBox="0 0 130 129" svg:d="M67 129c-37 1-67-27-67-63 1-43 36-66 67-66 34 1 61 29 63 62 2 37-26 66-63 67z">
          <text:p/>
        </draw:path>
        <draw:path draw:style-name="gr9" draw:text-style-name="P7" draw:layer="layout" svg:width="0.128cm" svg:height="0.129cm" svg:x="4.903cm" svg:y="22.667cm" svg:viewBox="0 0 129 130" svg:d="M129 70c-1 36-31 62-69 60-39-2-60-38-60-64 0-36 34-67 68-66 35 2 63 33 61 70z">
          <text:p/>
        </draw:path>
        <draw:path draw:style-name="gr9" draw:text-style-name="P7" draw:layer="layout" svg:width="0.13cm" svg:height="0.131cm" svg:x="6.363cm" svg:y="25.002cm" svg:viewBox="0 0 131 132" svg:d="M131 66c0 34-33 67-68 66-36-1-65-33-63-69 1-34 28-62 63-63 44 0 66 34 68 66z">
          <text:p/>
        </draw:path>
        <draw:path draw:style-name="gr9" draw:text-style-name="P7" draw:layer="layout" svg:width="0.129cm" svg:height="0.129cm" svg:x="15.704cm" svg:y="19.748cm" svg:viewBox="0 0 130 130" svg:d="M62 0c36-1 67 28 68 63s-31 67-66 67c-33 0-61-28-64-61-2-36 25-66 62-69z">
          <text:p/>
        </draw:path>
        <draw:path draw:style-name="gr9" draw:text-style-name="P7" draw:layer="layout" svg:width="0.128cm" svg:height="0.128cm" svg:x="13.662cm" svg:y="16.538cm" svg:viewBox="0 0 129 129" svg:d="M0 65c0-39 27-65 65-65 42 0 62 35 64 61 3 34-28 67-64 68-34 2-65-29-65-64z">
          <text:p/>
        </draw:path>
        <draw:path draw:style-name="gr9" draw:text-style-name="P7" draw:layer="layout" svg:width="0.127cm" svg:height="0.129cm" svg:x="5.779cm" svg:y="24.419cm" svg:viewBox="0 0 128 130" svg:d="M0 62c1-34 27-61 62-62 37 0 68 30 66 66-2 35-30 63-63 64-36 1-67-29-65-68z">
          <text:p/>
        </draw:path>
        <draw:path draw:style-name="gr9" draw:text-style-name="P7" draw:layer="layout" svg:width="0.127cm" svg:height="0.127cm" svg:x="15.705cm" svg:y="22.377cm" svg:viewBox="0 0 128 128" svg:d="M65 0c39 0 63 35 63 61 0 38-31 67-66 67-33-1-61-30-62-63-1-36 28-65 65-65z">
          <text:p/>
        </draw:path>
        <draw:path draw:style-name="gr9" draw:text-style-name="P7" draw:layer="layout" svg:width="0.127cm" svg:height="0.128cm" svg:x="4.612cm" svg:y="20.624cm" svg:viewBox="0 0 128 129" svg:d="M0 63c1-33 29-62 63-63 35-1 66 32 65 66-1 33-30 62-62 63-36 1-67-30-66-66z">
          <text:p/>
        </draw:path>
        <draw:path draw:style-name="gr9" draw:text-style-name="P7" draw:layer="layout" svg:width="0.127cm" svg:height="0.127cm" svg:x="9.867cm" svg:y="15.37cm" svg:viewBox="0 0 128 128" svg:d="M64 0c33 0 62 27 64 62 2 34-32 67-66 66-33-1-61-29-62-62-2-37 28-67 64-66z">
          <text:p/>
        </draw:path>
        <draw:path draw:style-name="gr9" draw:text-style-name="P7" draw:layer="layout" svg:width="0.127cm" svg:height="0.127cm" svg:x="15.121cm" svg:y="23.836cm" svg:viewBox="0 0 128 128" svg:d="M128 65c0 33-29 62-62 63-35 1-67-31-66-66 1-33 30-61 63-62 36-1 66 29 65 65z">
          <text:p/>
        </draw:path>
        <draw:path draw:style-name="gr9" draw:text-style-name="P7" draw:layer="layout" svg:width="0.128cm" svg:height="0.128cm" svg:x="8.113cm" svg:y="26.172cm" svg:viewBox="0 0 129 129" svg:d="M129 65c0 34-27 62-61 64-34 1-69-31-68-65 0-37 32-66 70-64 34 2 60 29 59 65z">
          <text:p/>
        </draw:path>
        <draw:path draw:style-name="gr9" draw:text-style-name="P7" draw:layer="layout" svg:width="0.127cm" svg:height="0.125cm" svg:x="12.493cm" svg:y="26.173cm" svg:viewBox="0 0 128 126" svg:d="M63 0c37-1 67 29 65 65-1 33-28 60-62 61-36 1-67-29-66-64 1-34 29-61 63-62z">
          <text:p/>
        </draw:path>
        <draw:path draw:style-name="gr9" draw:text-style-name="P7" draw:layer="layout" svg:width="0.127cm" svg:height="0.125cm" svg:x="4.612cm" svg:y="20.335cm" svg:viewBox="0 0 128 126" svg:d="M0 64c-1-35 25-62 59-64 37-3 68 24 69 60 2 34-29 66-65 66-34-1-62-28-63-62z">
          <text:p/>
        </draw:path>
        <draw:path draw:style-name="gr9" draw:text-style-name="P7" draw:layer="layout" svg:width="0.128cm" svg:height="0.128cm" svg:x="4.612cm" svg:y="20.916cm" svg:viewBox="0 0 129 129" svg:d="M0 62c-1-28 21-61 64-62 36 0 67 32 65 67-2 37-33 64-71 62-35-3-59-32-58-67z">
          <text:p/>
        </draw:path>
        <draw:path draw:style-name="gr9" draw:text-style-name="P7" draw:layer="layout" svg:width="0.127cm" svg:height="0.127cm" svg:x="13.077cm" svg:y="25.879cm" svg:viewBox="0 0 128 128" svg:d="M0 65c-1-36 30-67 65-65 33 1 62 30 63 62 1 33-27 64-59 66-38 2-68-26-69-63z">
          <text:p/>
        </draw:path>
        <draw:path draw:style-name="gr9" draw:text-style-name="P7" draw:layer="layout" svg:width="0.126cm" svg:height="0.127cm" svg:x="10.743cm" svg:y="15.37cm" svg:viewBox="0 0 127 128" svg:d="M127 67c-2 34-31 62-63 61-40-2-65-31-64-69 0-33 31-59 64-59 37 0 64 29 63 67z">
          <text:p/>
        </draw:path>
        <draw:path draw:style-name="gr9" draw:text-style-name="P7" draw:layer="layout" svg:width="0.125cm" svg:height="0.127cm" svg:x="11.618cm" svg:y="26.463cm" svg:viewBox="0 0 126 128" svg:d="M0 65c0-37 29-67 65-65 34 1 61 30 61 64 0 33-27 62-60 64-35 2-66-27-66-63z">
          <text:p/>
        </draw:path>
        <draw:path draw:style-name="gr9" draw:text-style-name="P7" draw:layer="layout" svg:width="0.127cm" svg:height="0.128cm" svg:x="15.412cm" svg:y="18.872cm" svg:viewBox="0 0 128 129" svg:d="M128 63c1 35-23 64-58 66-36 3-69-20-70-62s30-65 66-67c33-1 61 28 62 63z">
          <text:p/>
        </draw:path>
        <draw:path draw:style-name="gr9" draw:text-style-name="P7" draw:layer="layout" svg:width="0.125cm" svg:height="0.126cm" svg:x="11.035cm" svg:y="15.37cm" svg:viewBox="0 0 126 127" svg:d="M0 66c-1-35 24-63 58-66 37-2 68 27 68 63-1 35-28 63-62 64-33 1-63-27-64-61z">
          <text:p/>
        </draw:path>
        <draw:path draw:style-name="gr9" draw:text-style-name="P7" draw:layer="layout" svg:width="0.127cm" svg:height="0.126cm" svg:x="4.612cm" svg:y="21.5cm" svg:viewBox="0 0 128 127" svg:d="M65 127c-38 2-64-30-65-58-1-36 23-67 64-69 34-1 66 32 64 67-2 34-29 60-63 60z">
          <text:p/>
        </draw:path>
        <draw:path draw:style-name="gr9" draw:text-style-name="P7" draw:layer="layout" svg:width="0.123cm" svg:height="0.126cm" svg:x="6.366cm" svg:y="16.829cm" svg:viewBox="0 0 124 127" svg:d="M124 62c0 35-25 64-60 65-36 2-65-28-64-66 1-33 29-61 62-61 34 0 61 28 62 62z">
          <text:p/>
        </draw:path>
        <draw:path draw:style-name="gr9" draw:text-style-name="P7" draw:layer="layout" svg:width="0.127cm" svg:height="0.124cm" svg:x="14.536cm" svg:y="24.713cm" svg:viewBox="0 0 128 125" svg:d="M63 125c-34 0-63-29-63-62 1-33 30-62 64-63 36 0 66 32 64 67-3 34-31 59-65 58z">
          <text:p/>
        </draw:path>
        <draw:path draw:style-name="gr9" draw:text-style-name="P7" draw:layer="layout" svg:width="0.126cm" svg:height="0.122cm" svg:x="5.488cm" svg:y="24.131cm" svg:viewBox="0 0 127 123" svg:d="M57 123c-33-2-61-34-57-66 5-36 32-59 67-57 37 1 64 33 59 70-4 34-33 56-69 53z">
          <text:p/>
        </draw:path>
        <draw:path draw:style-name="gr9" draw:text-style-name="P7" draw:layer="layout" svg:width="0.127cm" svg:height="0.124cm" svg:x="5.196cm" svg:y="23.544cm" svg:viewBox="0 0 128 125" svg:d="M66 125c-37 1-64-23-66-59-1-36 23-64 59-66 37-3 68 25 69 62 0 34-28 62-62 63z">
          <text:p/>
        </draw:path>
        <draw:path draw:style-name="gr9" draw:text-style-name="P7" draw:layer="layout" svg:width="0.126cm" svg:height="0.126cm" svg:x="15.705cm" svg:y="19.457cm" svg:viewBox="0 0 127 127" svg:d="M61 0c31-2 63 26 66 59 4 32-25 65-58 68-36 3-68-26-69-62 0-33 27-62 61-65z">
          <text:p/>
        </draw:path>
        <draw:path draw:style-name="gr9" draw:text-style-name="P7" draw:layer="layout" svg:width="0.125cm" svg:height="0.127cm" svg:x="9.575cm" svg:y="15.37cm" svg:viewBox="0 0 126 128" svg:d="M126 66c-1 34-30 61-63 62-34 1-64-30-63-66 1-35 28-62 61-62 37-1 66 28 65 66z">
          <text:p/>
        </draw:path>
        <draw:path draw:style-name="gr9" draw:text-style-name="P7" draw:layer="layout" svg:width="0.125cm" svg:height="0.125cm" svg:x="13.37cm" svg:y="16.246cm" svg:viewBox="0 0 126 126" svg:d="M126 60c1 36-24 64-59 66-36 2-67-27-67-64 1-33 29-62 62-62 28-1 63 22 64 60z">
          <text:p/>
        </draw:path>
        <draw:path draw:style-name="gr9" draw:text-style-name="P7" draw:layer="layout" svg:width="0.125cm" svg:height="0.127cm" svg:x="15.413cm" svg:y="23.252cm" svg:viewBox="0 0 126 128" svg:d="M126 69c-2 34-30 60-63 59-36 0-65-31-63-68 2-34 33-61 65-60 36 1 63 32 61 69z">
          <text:p/>
        </draw:path>
        <draw:path draw:style-name="gr9" draw:text-style-name="P7" draw:layer="layout" svg:width="0.125cm" svg:height="0.127cm" svg:x="6.948cm" svg:y="25.589cm" svg:viewBox="0 0 126 128" svg:d="M126 65c-1 34-27 62-61 63-35 1-66-30-65-66 1-39 32-64 69-62 34 3 58 29 57 65z">
          <text:p/>
        </draw:path>
        <draw:path draw:style-name="gr9" draw:text-style-name="P7" draw:layer="layout" svg:width="0.126cm" svg:height="0.127cm" svg:x="4.904cm" svg:y="19.165cm" svg:viewBox="0 0 127 128" svg:d="M127 63c1 37-30 67-66 65-33-2-61-30-61-63s25-66 66-65c36 2 61 28 61 63z">
          <text:p/>
        </draw:path>
        <draw:path draw:style-name="gr9" draw:text-style-name="P7" draw:layer="layout" svg:width="0.126cm" svg:height="0.126cm" svg:x="8.698cm" svg:y="26.463cm" svg:viewBox="0 0 127 127" svg:d="M127 62c1 33-26 63-59 65-35 3-69-30-68-64s30-63 64-63c33 0 62 29 63 62z">
          <text:p/>
        </draw:path>
        <draw:path draw:style-name="gr9" draw:text-style-name="P7" draw:layer="layout" svg:width="0.125cm" svg:height="0.127cm" svg:x="12.787cm" svg:y="15.955cm" svg:viewBox="0 0 126 128" svg:d="M126 63c-1 34-26 63-60 65s-66-29-66-65c0-34 27-62 60-63 37-1 66 26 66 63z">
          <text:p/>
        </draw:path>
        <draw:path draw:style-name="gr9" draw:text-style-name="P7" draw:layer="layout" svg:width="0.123cm" svg:height="0.126cm" svg:x="15.414cm" svg:y="18.582cm" svg:viewBox="0 0 124 127" svg:d="M0 65c-1-35 25-63 59-65s63 24 65 57c3 37-25 70-61 70-32 0-62-29-63-62z">
          <text:p/>
        </draw:path>
        <draw:path draw:style-name="gr9" draw:text-style-name="P7" draw:layer="layout" svg:width="0.125cm" svg:height="0.126cm" svg:x="4.613cm" svg:y="21.794cm" svg:viewBox="0 0 126 127" svg:d="M64 0c30-1 61 26 62 64 1 32-28 61-62 63-27 1-67-23-64-67 2-34 30-61 64-60z">
          <text:p/>
        </draw:path>
        <draw:path draw:style-name="gr9" draw:text-style-name="P7" draw:layer="layout" svg:width="0.126cm" svg:height="0.123cm" svg:x="7.824cm" svg:y="26.174cm" svg:viewBox="0 0 127 124" svg:d="M61 124c-34-1-61-29-61-63 1-34 27-61 62-61 36-1 68 30 65 65s-32 60-66 59z">
          <text:p/>
        </draw:path>
        <draw:path draw:style-name="gr9" draw:text-style-name="P7" draw:layer="layout" svg:width="0.126cm" svg:height="0.126cm" svg:x="8.408cm" svg:y="15.662cm" svg:viewBox="0 0 127 127" svg:d="M62 127c-34 0-61-26-62-60-2-39 28-66 63-67 36-1 68 34 64 68-4 37-32 59-65 59z">
          <text:p/>
        </draw:path>
        <draw:path draw:style-name="gr9" draw:text-style-name="P7" draw:layer="layout" svg:width="0.124cm" svg:height="0.124cm" svg:x="15.123cm" svg:y="17.999cm" svg:viewBox="0 0 125 125" svg:d="M0 61c1-34 33-63 64-61 34 2 63 32 61 65-1 33-33 62-66 60-32-1-61-33-59-64z">
          <text:p/>
        </draw:path>
        <draw:path draw:style-name="gr9" draw:text-style-name="P7" draw:layer="layout" svg:width="0.124cm" svg:height="0.126cm" svg:x="14.247cm" svg:y="25.004cm" svg:viewBox="0 0 125 127" svg:d="M0 63c0-35 26-62 61-63 30 0 61 20 64 61 3 35-29 67-65 66-34-2-60-30-60-64z">
          <text:p/>
        </draw:path>
        <draw:path draw:style-name="gr9" draw:text-style-name="P7" draw:layer="layout" svg:width="0.127cm" svg:height="0.124cm" svg:x="6.071cm" svg:y="17.123cm" svg:viewBox="0 0 128 125" svg:d="M63 0c35 0 63 25 65 60 2 36-28 65-65 65-35-1-63-29-63-62 1-34 29-62 63-63z">
          <text:p/>
        </draw:path>
        <draw:path draw:style-name="gr9" draw:text-style-name="P7" draw:layer="layout" svg:width="0.122cm" svg:height="0.124cm" svg:x="14.831cm" svg:y="24.421cm" svg:viewBox="0 0 123 125" svg:d="M123 62c0 35-28 64-61 63-31-1-61-23-62-63 0-38 33-62 61-62 33 0 62 27 62 62z">
          <text:p/>
        </draw:path>
        <draw:path draw:style-name="gr9" draw:text-style-name="P7" draw:layer="layout" svg:width="0.126cm" svg:height="0.125cm" svg:x="13.953cm" svg:y="25.296cm" svg:viewBox="0 0 127 126" svg:d="M63 0c40 2 64 35 64 62 0 37-30 66-67 64-36-1-61-35-60-63 1-33 31-63 63-63z">
          <text:p/>
        </draw:path>
        <draw:path draw:style-name="gr9" draw:text-style-name="P7" draw:layer="layout" svg:width="0.126cm" svg:height="0.126cm" svg:x="9.283cm" svg:y="15.37cm" svg:viewBox="0 0 127 127" svg:d="M62 0c34 0 64 26 65 60 2 37-30 67-65 67-33-1-62-32-62-64 1-33 29-62 62-63z">
          <text:p/>
        </draw:path>
        <draw:path draw:style-name="gr9" draw:text-style-name="P7" draw:layer="layout" svg:width="0.124cm" svg:height="0.125cm" svg:x="11.911cm" svg:y="26.464cm" svg:viewBox="0 0 125 126" svg:d="M65 0c33 2 62 33 60 65-1 33-32 62-64 61-34-2-63-33-61-65 2-33 33-63 65-61z">
          <text:p/>
        </draw:path>
        <draw:path draw:style-name="gr9" draw:text-style-name="P7" draw:layer="layout" svg:width="0.125cm" svg:height="0.126cm" svg:x="4.613cm" svg:y="20.041cm" svg:viewBox="0 0 126 127" svg:d="M126 62c2 32-26 63-60 65-33 2-63-24-66-57-4-45 35-70 62-70 32 0 63 29 64 62z">
          <text:p/>
        </draw:path>
        <draw:path draw:style-name="gr9" draw:text-style-name="P7" draw:layer="layout" svg:width="0.125cm" svg:height="0.123cm" svg:x="15.706cm" svg:y="22.671cm" svg:viewBox="0 0 126 124" svg:d="M61 124c-33-1-62-30-61-63s31-62 64-61c32 0 63 31 62 64s-32 61-65 60z">
          <text:p/>
        </draw:path>
        <draw:path draw:style-name="gr9" draw:text-style-name="P7" draw:layer="layout" svg:width="0.124cm" svg:height="0.125cm" svg:x="7.24cm" svg:y="25.88cm" svg:viewBox="0 0 125 126" svg:d="M62 0c34 1 64 31 63 63-1 34-30 63-64 63-33-1-61-31-61-64 0-36 33-61 62-62z">
          <text:p/>
        </draw:path>
        <draw:path draw:style-name="gr9" draw:text-style-name="P7" draw:layer="layout" svg:width="0.122cm" svg:height="0.125cm" svg:x="5.781cm" svg:y="17.415cm" svg:viewBox="0 0 123 126" svg:d="M123 64c0 34-28 62-62 62-26 0-61-22-61-62 1-34 28-64 61-64 34 0 62 29 62 64z">
          <text:p/>
        </draw:path>
        <draw:path draw:style-name="gr9" draw:text-style-name="P7" draw:layer="layout" svg:width="0.124cm" svg:height="0.124cm" svg:x="4.613cm" svg:y="22.085cm" svg:viewBox="0 0 125 125" svg:d="M125 63c0 34-29 63-63 62-35 0-62-30-62-63 1-34 30-62 64-62 33 1 62 31 61 63z">
          <text:p/>
        </draw:path>
        <draw:path draw:style-name="gr9" draw:text-style-name="P7" draw:layer="layout" svg:width="0.122cm" svg:height="0.122cm" svg:x="13.079cm" svg:y="15.957cm" svg:viewBox="0 0 123 123" svg:d="M64 123c-35 1-64-28-64-62 0-33 30-62 64-61 30 0 57 27 59 58 2 34-26 64-59 65z">
          <text:p/>
        </draw:path>
        <draw:path draw:style-name="gr9" draw:text-style-name="P7" draw:layer="layout" svg:width="0.123cm" svg:height="0.124cm" svg:x="11.328cm" svg:y="15.371cm" svg:viewBox="0 0 124 125" svg:d="M62 0c34 0 62 28 62 61 1 34-27 63-61 64-33 1-63-29-63-63-1-33 28-62 62-62z">
          <text:p/>
        </draw:path>
        <draw:path draw:style-name="gr9" draw:text-style-name="P7" draw:layer="layout" svg:width="0.125cm" svg:height="0.122cm" svg:x="6.656cm" svg:y="16.54cm" svg:viewBox="0 0 126 123" svg:d="M126 60c1 32-28 63-62 63-34 1-63-27-64-60s27-62 61-63c32-1 61 24 65 60z">
          <text:p/>
        </draw:path>
        <draw:path draw:style-name="gr9" draw:text-style-name="P7" draw:layer="layout" svg:width="0.124cm" svg:height="0.123cm" svg:x="13.663cm" svg:y="25.59cm" svg:viewBox="0 0 125 124" svg:d="M125 66c-4 36-32 60-66 58-35-2-61-32-59-67 3-36 37-62 74-56 30 5 54 36 51 65z">
          <text:p/>
        </draw:path>
        <draw:path draw:style-name="gr9" draw:text-style-name="P7" draw:layer="layout" svg:width="0.123cm" svg:height="0.12cm" svg:x="9.868cm" svg:y="26.759cm" svg:viewBox="0 0 124 121" svg:d="M65 121c-35 1-63-25-65-60-1-33 28-61 62-61 35 0 64 29 62 62-1 25-19 58-59 59z">
          <text:p/>
        </draw:path>
        <draw:path draw:style-name="gr9" draw:text-style-name="P7" draw:layer="layout" svg:width="0.123cm" svg:height="0.123cm" svg:x="4.906cm" svg:y="22.962cm" svg:viewBox="0 0 124 124" svg:d="M59 0c36-1 63 23 65 57 3 37-25 68-63 67-33-1-60-20-61-61-2-39 28-63 59-63z">
          <text:p/>
        </draw:path>
        <draw:path draw:style-name="gr9" draw:text-style-name="P7" draw:layer="layout" svg:width="0.123cm" svg:height="0.124cm" svg:x="7.533cm" svg:y="15.956cm" svg:viewBox="0 0 124 125" svg:d="M124 62c1 29-21 61-63 63-33 2-61-29-61-63s28-62 61-62c35 0 62 28 63 62z">
          <text:p/>
        </draw:path>
        <draw:path draw:style-name="gr9" draw:text-style-name="P7" draw:layer="layout" svg:width="0.123cm" svg:height="0.124cm" svg:x="12.204cm" svg:y="15.663cm" svg:viewBox="0 0 124 125" svg:d="M124 63c1 35-25 61-59 62-36 1-63-24-65-58-2-38 25-66 64-67 34 0 60 28 60 63z">
          <text:p/>
        </draw:path>
        <draw:path draw:style-name="gr9" draw:text-style-name="P7" draw:layer="layout" svg:width="0.125cm" svg:height="0.125cm" svg:x="14.83cm" svg:y="17.706cm" svg:viewBox="0 0 126 126" svg:d="M65 126c-36 1-63-23-65-59-2-38 25-67 63-67 35 0 63 27 63 61 1 36-26 63-61 65z">
          <text:p/>
        </draw:path>
        <draw:path draw:style-name="gr9" draw:text-style-name="P7" draw:layer="layout" svg:width="0.123cm" svg:height="0.12cm" svg:x="14.538cm" svg:y="17.125cm" svg:viewBox="0 0 124 121" svg:d="M61 121c-35-1-63-32-61-64 3-32 29-56 61-57 40-2 63 33 63 60 1 33-28 61-63 61z">
          <text:p/>
        </draw:path>
        <draw:path draw:style-name="gr9" draw:text-style-name="P7" draw:layer="layout" svg:width="0.124cm" svg:height="0.122cm" svg:x="8.116cm" svg:y="15.665cm" svg:viewBox="0 0 125 123" svg:d="M59 123c-32-1-61-29-59-65 3-31 24-59 66-58 34 0 61 31 59 65s-31 59-66 58z">
          <text:p/>
        </draw:path>
        <draw:path draw:style-name="gr9" draw:text-style-name="P7" draw:layer="layout" svg:width="0.12cm" svg:height="0.123cm" svg:x="16.001cm" svg:y="20.626cm" svg:viewBox="0 0 121 124" svg:d="M121 63c0 34-31 64-63 61-32-2-57-29-58-60-1-35 27-64 61-64 33 0 61 29 60 63z">
          <text:p/>
        </draw:path>
        <draw:path draw:style-name="gr9" draw:text-style-name="P7" draw:layer="layout" svg:width="0.12cm" svg:height="0.123cm" svg:x="16.001cm" svg:y="21.211cm" svg:viewBox="0 0 121 124" svg:d="M0 64c0-35 29-65 62-64 25 1 61 23 59 65-1 38-33 57-58 59-32 3-63-26-63-60z">
          <text:p/>
        </draw:path>
        <draw:path draw:style-name="gr9" draw:text-style-name="P7" draw:layer="layout" svg:width="0.123cm" svg:height="0.12cm" svg:x="12.495cm" svg:y="15.666cm" svg:viewBox="0 0 124 121" svg:d="M124 60c-3 36-31 62-63 61-34-1-63-32-61-65 2-31 29-56 61-56 35-1 63 26 63 60z">
          <text:p/>
        </draw:path>
        <draw:path draw:style-name="gr9" draw:text-style-name="P7" draw:layer="layout" svg:width="0.121cm" svg:height="0.123cm" svg:x="14.248cm" svg:y="16.831cm" svg:viewBox="0 0 122 124" svg:d="M122 63c-1 35-31 63-64 61-34-2-60-32-58-67 2-28 24-55 60-57 35-2 62 28 62 63z">
          <text:p/>
        </draw:path>
        <draw:path draw:style-name="gr9" draw:text-style-name="P7" draw:layer="layout" svg:width="0.12cm" svg:height="0.122cm" svg:x="4.908cm" svg:y="23.255cm" svg:viewBox="0 0 121 123" svg:d="M0 63c-1-35 25-64 59-63 33 0 60 24 62 56 3 33-22 64-57 67-33 3-63-26-64-60z">
          <text:p/>
        </draw:path>
        <draw:path draw:style-name="gr9" draw:text-style-name="P7" draw:layer="layout" svg:width="0.122cm" svg:height="0.122cm" svg:x="4.907cm" svg:y="18.876cm" svg:viewBox="0 0 123 123" svg:d="M123 65c-1 34-29 59-64 58s-60-29-59-64 29-60 65-59c34 2 59 30 58 65z">
          <text:p/>
        </draw:path>
        <draw:path draw:style-name="gr9" draw:text-style-name="P7" draw:layer="layout" svg:width="0.123cm" svg:height="0.122cm" svg:x="5.197cm" svg:y="18.291cm" svg:viewBox="0 0 124 123" svg:d="M59 123c-34-1-59-28-59-63 1-35 29-61 64-60 34 1 61 29 60 64-2 35-30 60-65 59z">
          <text:p/>
        </draw:path>
        <draw:path draw:style-name="gr9" draw:text-style-name="P7" draw:layer="layout" svg:width="0.123cm" svg:height="0.121cm" svg:x="6.073cm" svg:y="25.006cm" svg:viewBox="0 0 124 122" svg:d="M124 59c2 30-23 59-54 62-35 4-64-19-69-54-5-31 25-65 58-67s63 25 65 59z">
          <text:p/>
        </draw:path>
        <draw:path draw:style-name="gr9" draw:text-style-name="P7" draw:layer="layout" svg:width="0.12cm" svg:height="0.123cm" svg:x="5.198cm" svg:y="23.838cm" svg:viewBox="0 0 121 124" svg:d="M121 61c1 35-27 65-60 63s-59-27-61-58c-2-34 25-64 59-66 33-2 62 26 62 61z">
          <text:p/>
        </draw:path>
        <draw:path draw:style-name="gr9" draw:text-style-name="P7" draw:layer="layout" svg:width="0.123cm" svg:height="0.121cm" svg:x="15.707cm" svg:y="19.167cm" svg:viewBox="0 0 124 122" svg:d="M124 58c2 30-23 60-55 64-35 3-64-20-69-55-4-32 24-64 57-67 33-2 64 25 67 58z">
          <text:p/>
        </draw:path>
        <draw:path draw:style-name="gr9" draw:text-style-name="P7" draw:layer="layout" svg:width="0.12cm" svg:height="0.123cm" svg:x="8.41cm" svg:y="26.465cm" svg:viewBox="0 0 121 124" svg:d="M121 61c1 34-26 64-60 63-35-2-63-30-61-63 1-32 26-59 58-61 32-3 62 25 63 61z">
          <text:p/>
        </draw:path>
        <draw:path draw:style-name="gr9" draw:text-style-name="P7" draw:layer="layout" svg:width="0.121cm" svg:height="0.119cm" svg:x="15.125cm" svg:y="24.133cm" svg:viewBox="0 0 122 120" svg:d="M122 60c-3 29-25 62-66 60-31-2-58-31-56-61 1-32 24-61 65-59 31 2 57 29 57 60z">
          <text:p/>
        </draw:path>
        <draw:path draw:style-name="gr9" draw:text-style-name="P7" draw:layer="layout" svg:width="0.119cm" svg:height="0.122cm" svg:x="12.206cm" svg:y="26.465cm" svg:viewBox="0 0 120 123" svg:d="M120 58c1 35-26 67-60 65-38-3-59-32-60-59-2-40 34-63 61-64 31 0 58 27 59 58z">
          <text:p/>
        </draw:path>
        <draw:path draw:style-name="gr9" draw:text-style-name="P7" draw:layer="layout" svg:width="0.12cm" svg:height="0.122cm" svg:x="6.367cm" svg:y="25.299cm" svg:viewBox="0 0 121 123" svg:d="M121 60c2 41-34 63-60 63-30-1-62-26-61-63 1-33 25-58 58-60 35-2 63 24 63 60z">
          <text:p/>
        </draw:path>
        <draw:path draw:style-name="gr9" draw:text-style-name="P7" draw:layer="layout" svg:width="0.12cm" svg:height="0.12cm" svg:x="13.374cm" svg:y="25.883cm" svg:viewBox="0 0 121 121" svg:d="M57 0c30-2 59 23 63 53 3 33-24 66-57 68-30 3-60-23-63-55-4-44 29-63 57-66z">
          <text:p/>
        </draw:path>
        <draw:path draw:style-name="gr9" draw:text-style-name="P7" draw:layer="layout" svg:width="0.122cm" svg:height="0.12cm" svg:x="5.49cm" svg:y="17.709cm" svg:viewBox="0 0 123 121" svg:d="M64 0c34 0 61 29 59 63s-30 59-65 58c-31-2-59-30-58-61 2-40 31-61 64-60z">
          <text:p/>
        </draw:path>
        <draw:path draw:style-name="gr9" draw:text-style-name="P7" draw:layer="layout" svg:width="0.122cm" svg:height="0.12cm" svg:x="10.452cm" svg:y="26.759cm" svg:viewBox="0 0 123 121" svg:d="M66 0c31 1 57 27 57 58 0 41-31 64-61 63-34-1-63-28-62-63 1-34 31-59 66-58z">
          <text:p/>
        </draw:path>
        <draw:path draw:style-name="gr9" draw:text-style-name="P7" draw:layer="layout" svg:width="0.122cm" svg:height="0.122cm" svg:x="4.614cm" svg:y="22.379cm" svg:viewBox="0 0 123 123" svg:d="M123 59c2 35-25 62-61 64-32 0-59-24-62-56-3-33 24-64 57-67 35-2 64 26 66 59z">
          <text:p/>
        </draw:path>
        <draw:path draw:style-name="gr9" draw:text-style-name="P7" draw:layer="layout" svg:width="0.12cm" svg:height="0.118cm" svg:x="15.708cm" svg:y="22.964cm" svg:viewBox="0 0 121 119" svg:d="M61 119c-35 1-64-30-61-62 2-32 29-56 60-57 33-1 63 26 61 62-2 33-26 58-60 57z">
          <text:p/>
        </draw:path>
        <draw:path draw:style-name="gr9" draw:text-style-name="P7" draw:layer="layout" svg:width="0.12cm" svg:height="0.121cm" svg:x="6.951cm" svg:y="16.249cm" svg:viewBox="0 0 121 122" svg:d="M121 60c2 37-32 62-61 62-34 0-61-28-60-63 1-32 25-58 57-59 35-2 64 24 64 60z">
          <text:p/>
        </draw:path>
        <draw:path draw:style-name="gr9" draw:text-style-name="P7" draw:layer="layout" svg:width="0.122cm" svg:height="0.12cm" svg:x="4.614cm" svg:y="19.751cm" svg:viewBox="0 0 123 121" svg:d="M62 0c35 1 63 29 61 63-2 32-27 58-60 58-35 1-63-26-63-60 0-29 25-62 62-61z">
          <text:p/>
        </draw:path>
        <draw:path draw:style-name="gr9" draw:text-style-name="P7" draw:layer="layout" svg:width="0.121cm" svg:height="0.118cm" svg:x="9.286cm" svg:y="26.76cm" svg:viewBox="0 0 122 119" svg:d="M64 0c32 1 58 27 58 58 0 26-22 63-63 61-31-1-59-27-59-59 1-32 25-62 64-60z">
          <text:p/>
        </draw:path>
        <draw:path draw:style-name="gr9" draw:text-style-name="P7" draw:layer="layout" svg:width="0.121cm" svg:height="0.12cm" svg:x="10.746cm" svg:y="26.759cm" svg:viewBox="0 0 122 121" svg:d="M62 121c-35 1-62-25-62-61 0-32 24-58 55-60 36-2 65 22 67 56 1 36-26 64-60 65z">
          <text:p/>
        </draw:path>
        <draw:path draw:style-name="gr9" draw:text-style-name="P7" draw:layer="layout" svg:width="0.119cm" svg:height="0.119cm" svg:x="11.037cm" svg:y="26.759cm" svg:viewBox="0 0 120 120" svg:d="M59 0c33 0 59 24 61 56 2 37-25 64-60 64-31 0-58-24-60-56-2-34 24-63 59-64z">
          <text:p/>
        </draw:path>
        <draw:path draw:style-name="gr9" draw:text-style-name="P7" draw:layer="layout" svg:width="0.121cm" svg:height="0.12cm" svg:x="10.161cm" svg:y="26.759cm" svg:viewBox="0 0 122 121" svg:d="M57 0c40-3 65 31 65 58 0 36-28 63-62 63-32 0-58-24-60-56-2-36 23-64 57-65z">
          <text:p/>
        </draw:path>
        <draw:path draw:style-name="gr9" draw:text-style-name="P7" draw:layer="layout" svg:width="0.119cm" svg:height="0.118cm" svg:x="9.578cm" svg:y="26.76cm" svg:viewBox="0 0 120 119" svg:d="M58 0c35-1 63 25 62 60 0 32-25 58-57 59-36 2-63-25-63-61 0-32 25-57 58-58z">
          <text:p/>
        </draw:path>
        <draw:path draw:style-name="gr9" draw:text-style-name="P7" draw:layer="layout" svg:width="0.119cm" svg:height="0.12cm" svg:x="16.002cm" svg:y="20.045cm" svg:viewBox="0 0 120 121" svg:d="M0 60c-1-28 17-58 56-60 38-3 65 29 64 60-1 32-26 58-58 61-32 2-62-26-62-61z">
          <text:p/>
        </draw:path>
        <draw:path draw:style-name="gr9" draw:text-style-name="P7" draw:layer="layout" svg:width="0.12cm" svg:height="0.12cm" svg:x="15.416cm" svg:y="23.547cm" svg:viewBox="0 0 121 121" svg:d="M62 121c-35 1-62-26-62-60 0-36 28-62 63-61 32 1 57 25 58 58 1 35-24 63-59 63z">
          <text:p/>
        </draw:path>
        <draw:path draw:style-name="gr9" draw:text-style-name="P7" draw:layer="layout" svg:width="0.12cm" svg:height="0.122cm" svg:x="8.994cm" svg:y="15.371cm" svg:viewBox="0 0 121 123" svg:d="M0 64c-2-40 33-64 60-64 34 0 61 29 61 64-1 33-25 58-58 59-37 2-64-27-63-59z">
          <text:p/>
        </draw:path>
        <draw:path draw:style-name="gr9" draw:text-style-name="P7" draw:layer="layout" svg:width="0.121cm" svg:height="0.12cm" svg:x="8.701cm" svg:y="15.372cm" svg:viewBox="0 0 122 121" svg:d="M63 0c34 2 63 36 59 68-5 32-32 54-64 53s-58-28-58-59c0-34 32-64 63-62z">
          <text:p/>
        </draw:path>
        <draw:path draw:style-name="gr9" draw:text-style-name="P7" draw:layer="layout" svg:width="0.118cm" svg:height="0.12cm" svg:x="14.833cm" svg:y="17.418cm" svg:viewBox="0 0 119 121" svg:d="M119 60c1 35-30 63-62 61s-56-28-57-60c-1-31 23-63 62-61 40 2 58 32 57 60z">
          <text:p/>
        </draw:path>
        <draw:path draw:style-name="gr9" draw:text-style-name="P7" draw:layer="layout" svg:width="0.12cm" svg:height="0.123cm" svg:x="11.62cm" svg:y="15.371cm" svg:viewBox="0 0 121 124" svg:d="M121 62c1 41-32 62-62 62-32-1-57-27-59-58-2-42 33-65 59-66 35 0 62 28 62 62z">
          <text:p/>
        </draw:path>
        <draw:path draw:style-name="gr9" draw:text-style-name="P7" draw:layer="layout" svg:width="0.12cm" svg:height="0.119cm" svg:x="13.957cm" svg:y="16.541cm" svg:viewBox="0 0 121 120" svg:d="M61 120c-33 1-59-22-61-55-2-35 25-65 60-65 33 0 62 30 61 64-2 31-27 56-60 56z">
          <text:p/>
        </draw:path>
        <draw:path draw:style-name="gr9" draw:text-style-name="P7" draw:layer="layout" svg:width="0.119cm" svg:height="0.119cm" svg:x="4.615cm" svg:y="19.462cm" svg:viewBox="0 0 120 120" svg:d="M120 60c0 32-27 59-58 60-33 1-63-30-62-62 0-34 30-60 64-58s57 28 56 60z">
          <text:p/>
        </draw:path>
        <draw:path draw:style-name="gr9" draw:text-style-name="P7" draw:layer="layout" svg:width="0.12cm" svg:height="0.12cm" svg:x="16.001cm" svg:y="21.504cm" svg:viewBox="0 0 121 121" svg:d="M0 62c-1-36 27-62 61-62 33 0 58 24 60 57 2 35-23 63-57 64-35 2-63-24-64-59z">
          <text:p/>
        </draw:path>
        <draw:path draw:style-name="gr9" draw:text-style-name="P7" draw:layer="layout" svg:width="0.119cm" svg:height="0.119cm" svg:x="16.002cm" svg:y="20.337cm" svg:viewBox="0 0 120 120" svg:d="M62 120c-33 1-59-21-62-53-3-36 22-65 56-67 35-1 64 26 64 61 0 32-26 58-58 59z">
          <text:p/>
        </draw:path>
        <draw:path draw:style-name="gr9" draw:text-style-name="P7" draw:layer="layout" svg:width="0.119cm" svg:height="0.119cm" svg:x="7.535cm" svg:y="26.175cm" svg:viewBox="0 0 120 120" svg:d="M59 120c-32 0-58-24-59-58 0-35 27-62 62-62 31 1 57 27 58 58 2 35-26 63-61 62z">
          <text:p/>
        </draw:path>
        <draw:path draw:style-name="gr9" draw:text-style-name="P7" draw:layer="layout" svg:width="0.12cm" svg:height="0.119cm" svg:x="6.658cm" svg:y="25.592cm" svg:viewBox="0 0 121 120" svg:d="M62 120c-35 0-64-29-62-63 3-31 30-57 60-57 34-1 64 29 61 62-1 33-26 57-59 58z">
          <text:p/>
        </draw:path>
        <draw:path draw:style-name="gr9" draw:text-style-name="P7" draw:layer="layout" svg:width="0.118cm" svg:height="0.119cm" svg:x="5.783cm" svg:y="24.717cm" svg:viewBox="0 0 119 120" svg:d="M61 0c32 0 57 24 58 56 1 35-25 64-60 64-32-1-58-27-59-59-2-35 24-62 61-61z">
          <text:p/>
        </draw:path>
        <draw:path draw:style-name="gr9" draw:text-style-name="P7" draw:layer="layout" svg:width="0.121cm" svg:height="0.12cm" svg:x="12.789cm" svg:y="26.175cm" svg:viewBox="0 0 122 121" svg:d="M122 61c0 35-28 61-63 60-33 0-57-24-59-57-1-36 24-63 59-64 34-1 62 25 63 61z">
          <text:p/>
        </draw:path>
        <draw:path draw:style-name="gr9" draw:text-style-name="P7" draw:layer="layout" svg:width="0.12cm" svg:height="0.12cm" svg:x="16.001cm" svg:y="20.92cm" svg:viewBox="0 0 121 121" svg:d="M121 62c0 35-27 60-62 59s-61-28-59-64c2-32 28-56 60-57 35 0 62 27 61 62z">
          <text:p/>
        </draw:path>
        <draw:path draw:style-name="gr9" draw:text-style-name="P7" draw:layer="layout" svg:width="0.119cm" svg:height="0.119cm" svg:x="15.417cm" svg:y="18.293cm" svg:viewBox="0 0 120 120" svg:d="M56 0c35-1 64 25 64 60-1 32-27 58-58 60-34 2-62-25-62-60-1-33 23-59 56-60z">
          <text:p/>
        </draw:path>
        <draw:path draw:style-name="gr9" draw:text-style-name="P7" draw:layer="layout" svg:width="0.116cm" svg:height="0.116cm" svg:x="11.622cm" svg:y="26.761cm" svg:viewBox="0 0 117 117" svg:d="M60 0c32 0 57 26 57 57 1 32-24 59-55 60-35 1-63-29-62-62 2-31 28-56 60-55z">
          <text:p/>
        </draw:path>
        <draw:path draw:style-name="gr9" draw:text-style-name="P7" draw:layer="layout" svg:width="0.118cm" svg:height="0.118cm" svg:x="8.12cm" svg:y="26.467cm" svg:viewBox="0 0 119 119" svg:d="M0 57c1-31 28-58 59-57 32 0 62 32 60 63-3 31-29 56-60 56-34 1-61-27-59-62z">
          <text:p/>
        </draw:path>
        <draw:path draw:style-name="gr9" draw:text-style-name="P7" draw:layer="layout" svg:width="0.118cm" svg:height="0.118cm" svg:x="14.541cm" svg:y="25.007cm" svg:viewBox="0 0 119 119" svg:d="M61 119c-38 1-61-27-61-62 0-30 27-56 59-57s62 29 60 61c-1 33-26 57-58 58z">
          <text:p/>
        </draw:path>
        <draw:path draw:style-name="gr9" draw:text-style-name="P7" draw:layer="layout" svg:width="0.118cm" svg:height="0.118cm" svg:x="5.199cm" svg:y="18.002cm" svg:viewBox="0 0 119 119" svg:d="M119 62c-1 32-27 57-59 57s-62-31-60-63c3-30 26-55 61-56 33-2 59 28 58 62z">
          <text:p/>
        </draw:path>
        <draw:path draw:style-name="gr9" draw:text-style-name="P7" draw:layer="layout" svg:width="0.116cm" svg:height="0.116cm" svg:x="8.996cm" svg:y="26.761cm" svg:viewBox="0 0 117 117" svg:d="M59 117c-30 1-58-25-59-56-2-33 26-62 59-61 32 1 58 26 58 58 0 31-26 58-58 59z">
          <text:p/>
        </draw:path>
        <draw:path draw:style-name="gr9" draw:text-style-name="P7" draw:layer="layout" svg:width="0.119cm" svg:height="0.118cm" svg:x="11.914cm" svg:y="15.373cm" svg:viewBox="0 0 120 119" svg:d="M120 59c1 30-24 57-55 60-36 2-64-22-65-56-1-31 23-59 54-63s64 27 66 59z">
          <text:p/>
        </draw:path>
        <draw:path draw:style-name="gr9" draw:text-style-name="P7" draw:layer="layout" svg:width="0.116cm" svg:height="0.117cm" svg:x="16.003cm" svg:y="19.753cm" svg:viewBox="0 0 117 118" svg:d="M0 61c-1-31 24-59 54-61 34-2 64 28 63 61 0 31-26 56-59 57-31 0-57-25-58-57z">
          <text:p/>
        </draw:path>
        <draw:path draw:style-name="gr9" draw:text-style-name="P7" draw:layer="layout" svg:width="0.116cm" svg:height="0.116cm" svg:x="5.784cm" svg:y="17.127cm" svg:viewBox="0 0 117 117" svg:d="M117 60c-1 32-27 57-59 57s-58-27-58-58c-1-33 29-62 62-59 32 2 56 29 55 60z">
          <text:p/>
        </draw:path>
        <draw:path draw:style-name="gr9" draw:text-style-name="P7" draw:layer="layout" svg:width="0.118cm" svg:height="0.118cm" svg:x="15.709cm" svg:y="18.879cm" svg:viewBox="0 0 119 119" svg:d="M58 0c34-1 60 22 61 60 1 31-26 57-56 59-30 1-62-22-63-61-1-31 26-57 58-58z">
          <text:p/>
        </draw:path>
        <draw:path draw:style-name="gr9" draw:text-style-name="P7" draw:layer="layout" svg:width="0.118cm" svg:height="0.118cm" svg:x="4.615cm" svg:y="22.674cm" svg:viewBox="0 0 119 119" svg:d="M119 55c1 34-21 61-53 64-31 4-65-26-66-60 0-31 27-57 59-59 33-1 59 23 60 55z">
          <text:p/>
        </draw:path>
        <draw:path draw:style-name="gr9" draw:text-style-name="P7" draw:layer="layout" svg:width="0.117cm" svg:height="0.118cm" svg:x="13.666cm" svg:y="16.251cm" svg:viewBox="0 0 118 119" svg:d="M62 0c33 1 57 26 56 59 0 33-26 60-58 60-33 0-63-33-60-65s29-55 62-54z">
          <text:p/>
        </draw:path>
        <draw:path draw:style-name="gr9" draw:text-style-name="P7" draw:layer="layout" svg:width="0.119cm" svg:height="0.12cm" svg:x="16.002cm" svg:y="21.796cm" svg:viewBox="0 0 120 121" svg:d="M0 58c1-31 27-57 58-58 25-1 63 22 62 62-1 32-28 58-60 59-34 1-61-28-60-63z">
          <text:p/>
        </draw:path>
        <draw:path draw:style-name="gr9" draw:text-style-name="P7" draw:layer="layout" svg:width="0.118cm" svg:height="0.118cm" svg:x="6.952cm" svg:y="25.884cm" svg:viewBox="0 0 119 119" svg:d="M0 60c0-32 25-58 57-60 34-2 62 26 62 60-1 31-25 57-56 59-32 3-62-26-63-59z">
          <text:p/>
        </draw:path>
        <draw:path draw:style-name="gr9" draw:text-style-name="P7" draw:layer="layout" svg:width="0.116cm" svg:height="0.115cm" svg:x="4.325cm" svg:y="20.63cm" svg:viewBox="0 0 117 116" svg:d="M0 54c2-31 31-56 62-54 30 2 56 30 55 60-1 33-31 59-64 56s-55-29-53-62z">
          <text:p/>
        </draw:path>
        <draw:path draw:style-name="gr9" draw:text-style-name="P7" draw:layer="layout" svg:width="0.116cm" svg:height="0.117cm" svg:x="4.325cm" svg:y="20.922cm" svg:viewBox="0 0 117 118" svg:d="M0 58c1-32 27-58 59-58 31 0 57 27 58 58 2 32-28 61-61 60-32-2-56-28-56-60z">
          <text:p/>
        </draw:path>
        <draw:path draw:style-name="gr9" draw:text-style-name="P7" draw:layer="layout" svg:width="0.118cm" svg:height="0.118cm" svg:x="7.242cm" svg:y="15.958cm" svg:viewBox="0 0 119 119" svg:d="M119 63c-1 33-26 57-60 56-33-1-59-26-59-58s32-64 64-61c33 4 56 31 55 63z">
          <text:p/>
        </draw:path>
        <draw:path draw:style-name="gr9" draw:text-style-name="P7" draw:layer="layout" svg:width="0.118cm" svg:height="0.117cm" svg:x="15.126cm" svg:y="17.71cm" svg:viewBox="0 0 119 118" svg:d="M62 0c38 1 57 33 57 59 0 33-27 61-61 59-32-1-59-27-58-58 1-40 32-62 62-60z">
          <text:p/>
        </draw:path>
        <draw:path draw:style-name="gr9" draw:text-style-name="P7" draw:layer="layout" svg:width="0.117cm" svg:height="0.116cm" svg:x="4.91cm" svg:y="23.549cm" svg:viewBox="0 0 118 117" svg:d="M0 54c2-32 30-55 62-54 30 1 56 29 56 60-1 33-32 60-65 57-31-3-54-30-53-63z">
          <text:p/>
        </draw:path>
        <draw:path draw:style-name="gr9" draw:text-style-name="P7" draw:layer="layout" svg:width="0.116cm" svg:height="0.116cm" svg:x="14.834cm" svg:y="24.718cm" svg:viewBox="0 0 117 117" svg:d="M60 0c33 1 57 26 57 59 0 31-25 57-57 58-33 2-62-29-60-61 2-33 28-56 60-56z">
          <text:p/>
        </draw:path>
        <draw:path draw:style-name="gr9" draw:text-style-name="P7" draw:layer="layout" svg:width="0.116cm" svg:height="0.116cm" svg:x="5.2cm" svg:y="24.134cm" svg:viewBox="0 0 117 117" svg:d="M117 63c-1 31-28 55-60 54-30 0-57-28-57-58 0-34 30-61 64-59 32 3 55 29 53 63z">
          <text:p/>
        </draw:path>
        <draw:path draw:style-name="gr9" draw:text-style-name="P7" draw:layer="layout" svg:width="0.118cm" svg:height="0.118cm" svg:x="14.249cm" svg:y="25.301cm" svg:viewBox="0 0 119 119" svg:d="M119 60c-1 32-26 58-59 59-32 0-62-31-60-64 3-32 29-56 62-55 34 1 58 26 57 60z">
          <text:p/>
        </draw:path>
        <draw:path draw:style-name="gr9" draw:text-style-name="P7" draw:layer="layout" svg:width="0.116cm" svg:height="0.116cm" svg:x="16.003cm" svg:y="22.381cm" svg:viewBox="0 0 117 117" svg:d="M60 117c-32 1-58-22-60-54-2-39 31-63 59-63 31 0 58 28 58 58 1 32-24 58-57 59z">
          <text:p/>
        </draw:path>
        <draw:path draw:style-name="gr9" draw:text-style-name="P7" draw:layer="layout" svg:width="0.117cm" svg:height="0.118cm" svg:x="11.332cm" svg:y="26.76cm" svg:viewBox="0 0 118 119" svg:d="M118 61c-2 35-33 61-67 57-32-3-54-32-51-65 2-32 29-55 62-53 32 2 58 31 56 61z">
          <text:p/>
        </draw:path>
        <draw:path draw:style-name="gr9" draw:text-style-name="P7" draw:layer="layout" svg:width="0.116cm" svg:height="0.116cm" svg:x="4.325cm" svg:y="21.506cm" svg:viewBox="0 0 117 117" svg:d="M0 56c1-32 28-56 60-56 31 1 57 28 57 59 1 32-31 61-63 58-32-2-55-29-54-61z">
          <text:p/>
        </draw:path>
        <draw:path draw:style-name="gr9" draw:text-style-name="P7" draw:layer="layout" svg:width="0.116cm" svg:height="0.116cm" svg:x="6.369cm" svg:y="16.543cm" svg:viewBox="0 0 117 117" svg:d="M59 117c-32 0-58-25-59-56-1-33 28-63 61-61 32 2 56 28 56 59 0 32-25 58-58 58z">
          <text:p/>
        </draw:path>
        <draw:path draw:style-name="gr9" draw:text-style-name="P7" draw:layer="layout" svg:width="0.118cm" svg:height="0.118cm" svg:x="5.493cm" svg:y="24.423cm" svg:viewBox="0 0 119 119" svg:d="M59 0c32 1 59 29 60 59 1 35-29 62-65 60-32-2-55-28-54-62 2-31 29-58 59-57z">
          <text:p/>
        </draw:path>
        <draw:path draw:style-name="gr9" draw:text-style-name="P7" draw:layer="layout" svg:width="0.117cm" svg:height="0.118cm" svg:x="16.003cm" svg:y="22.089cm" svg:viewBox="0 0 118 119" svg:d="M0 56c0-32 26-56 59-56 33 1 59 26 59 58 0 35-31 64-64 61-32-3-55-30-54-63z">
          <text:p/>
        </draw:path>
        <draw:path draw:style-name="gr9" draw:text-style-name="P7" draw:layer="layout" svg:width="0.116cm" svg:height="0.115cm" svg:x="4.325cm" svg:y="21.215cm" svg:viewBox="0 0 117 116" svg:d="M0 58c0-33 26-57 58-58 31-1 58 27 59 57 2 32-28 61-61 59-33-1-56-26-56-58z">
          <text:p/>
        </draw:path>
        <draw:path draw:style-name="gr9" draw:text-style-name="P7" draw:layer="layout" svg:width="0.116cm" svg:height="0.116cm" svg:x="10.164cm" svg:y="15.084cm" svg:viewBox="0 0 117 117" svg:d="M0 56c1-33 27-57 59-56 30 0 58 27 58 59s-32 61-64 58-55-29-53-61z">
          <text:p/>
        </draw:path>
        <draw:path draw:style-name="gr9" draw:text-style-name="P7" draw:layer="layout" svg:width="0.116cm" svg:height="0.116cm" svg:x="10.749cm" svg:y="15.084cm" svg:viewBox="0 0 117 117" svg:d="M0 55c1-32 28-56 59-55s58 28 58 59c0 33-32 61-65 58-31-3-54-29-52-62z">
          <text:p/>
        </draw:path>
        <draw:path draw:style-name="gr9" draw:text-style-name="P7" draw:layer="layout" svg:width="0.118cm" svg:height="0.118cm" svg:x="6.076cm" svg:y="16.834cm" svg:viewBox="0 0 119 119" svg:d="M119 56c3 32-28 64-60 63-30 0-57-27-59-58s23-58 54-61c34-3 64 23 65 56z">
          <text:p/>
        </draw:path>
        <draw:path draw:style-name="gr9" draw:text-style-name="P7" draw:layer="layout" svg:width="0.117cm" svg:height="0.116cm" svg:x="12.791cm" svg:y="15.668cm" svg:viewBox="0 0 118 117" svg:d="M61 0c32 1 57 27 57 59-1 30-27 58-57 58-28 1-63-24-61-62 2-33 29-56 61-55z">
          <text:p/>
        </draw:path>
        <draw:path draw:style-name="gr9" draw:text-style-name="P7" draw:layer="layout" svg:width="0.118cm" svg:height="0.118cm" svg:x="7.827cm" svg:y="15.667cm" svg:viewBox="0 0 119 119" svg:d="M62 0c34 1 58 27 57 60s-26 59-59 59-63-32-60-65c4-32 30-55 62-54z">
          <text:p/>
        </draw:path>
        <draw:path draw:style-name="gr9" draw:text-style-name="P7" draw:layer="layout" svg:width="0.115cm" svg:height="0.114cm" svg:x="9.58cm" svg:y="15.085cm" svg:viewBox="0 0 116 115" svg:d="M116 55c2 30-24 58-54 60-32 2-60-23-62-54-1-31 23-60 55-61 31-2 59 24 61 55z">
          <text:p/>
        </draw:path>
        <draw:path draw:style-name="gr9" draw:text-style-name="P7" draw:layer="layout" svg:width="0.116cm" svg:height="0.116cm" svg:x="10.455cm" svg:y="15.084cm" svg:viewBox="0 0 117 117" svg:d="M117 60c-1 32-26 57-57 57-32 0-59-25-60-56-2-33 27-62 62-61 31 1 55 27 55 60z">
          <text:p/>
        </draw:path>
        <draw:path draw:style-name="gr9" draw:text-style-name="P7" draw:layer="layout" svg:width="0.116cm" svg:height="0.116cm" svg:x="8.412cm" svg:y="15.374cm" svg:viewBox="0 0 117 117" svg:d="M58 117c-32 0-58-26-58-57-1-32 30-62 62-60 31 3 55 28 55 60-1 32-27 57-59 57z">
          <text:p/>
        </draw:path>
        <draw:path draw:style-name="gr9" draw:text-style-name="P7" draw:layer="layout" svg:width="0.116cm" svg:height="0.116cm" svg:x="13.959cm" svg:y="25.593cm" svg:viewBox="0 0 117 117" svg:d="M0 57c1-31 27-57 58-57 30 0 58 27 59 57 2 32-27 61-61 60-32-1-57-27-56-60z">
          <text:p/>
        </draw:path>
        <draw:path draw:style-name="gr9" draw:text-style-name="P7" draw:layer="layout" svg:width="0.116cm" svg:height="0.116cm" svg:x="13.375cm" svg:y="15.959cm" svg:viewBox="0 0 117 117" svg:d="M56 117c-32-1-57-26-56-59 1-32 28-58 58-58 32 0 62 31 59 63-2 32-28 55-61 54z">
          <text:p/>
        </draw:path>
        <draw:path draw:style-name="gr9" draw:text-style-name="P7" draw:layer="layout" svg:width="0.116cm" svg:height="0.116cm" svg:x="4.616cm" svg:y="19.169cm" svg:viewBox="0 0 117 117" svg:d="M117 61c0 32-24 56-56 56-33 1-59-23-61-55-1-31 29-63 62-62 31 2 55 28 55 61z">
          <text:p/>
        </draw:path>
        <draw:path draw:style-name="gr9" draw:text-style-name="P7" draw:layer="layout" svg:width="0.115cm" svg:height="0.114cm" svg:x="11.039cm" svg:y="15.085cm" svg:viewBox="0 0 116 115" svg:d="M60 115c-30 2-58-24-60-55-2-29 25-59 56-60 32-2 59 24 60 55 1 32-23 59-56 60z">
          <text:p/>
        </draw:path>
        <draw:path draw:style-name="gr9" draw:text-style-name="P7" draw:layer="layout" svg:width="0.116cm" svg:height="0.116cm" svg:x="13.081cm" svg:y="26.177cm" svg:viewBox="0 0 117 117" svg:d="M117 61c-1 32-26 57-59 56-31-1-59-28-58-58 2-37 33-62 63-59 33 2 55 29 54 61z">
          <text:p/>
        </draw:path>
        <draw:path draw:style-name="gr9" draw:text-style-name="P7" draw:layer="layout" svg:width="0.117cm" svg:height="0.118cm" svg:x="4.91cm" svg:y="18.585cm" svg:viewBox="0 0 118 119" svg:d="M57 0c31 0 60 27 61 57 2 32-24 60-56 62-36 2-63-24-62-61 0-32 26-58 57-58z">
          <text:p/>
        </draw:path>
        <draw:path draw:style-name="gr9" draw:text-style-name="P7" draw:layer="layout" svg:width="0.115cm" svg:height="0.115cm" svg:x="4.326cm" svg:y="20.339cm" svg:viewBox="0 0 116 116" svg:d="M57 116c-32 0-57-25-57-58 0-31 26-58 56-58 31 0 59 28 60 58 0 31-27 58-59 58z">
          <text:p/>
        </draw:path>
        <draw:path draw:style-name="gr9" draw:text-style-name="P7" draw:layer="layout" svg:width="0.116cm" svg:height="0.116cm" svg:x="15.71cm" svg:y="23.259cm" svg:viewBox="0 0 117 117" svg:d="M57 117c-32-2-57-29-57-60 1-33 26-57 60-57 32 0 58 26 57 60-1 32-30 58-60 57z">
          <text:p/>
        </draw:path>
        <draw:path draw:style-name="gr9" draw:text-style-name="P7" draw:layer="layout" svg:width="0.115cm" svg:height="0.115cm" svg:x="4.911cm" svg:y="18.295cm" svg:viewBox="0 0 116 116" svg:d="M59 0c39 1 58 37 57 60-1 30-30 58-60 56-32-1-57-28-56-59 1-32 26-58 59-57z">
          <text:p/>
        </draw:path>
        <draw:path draw:style-name="gr9" draw:text-style-name="P7" draw:layer="layout" svg:width="0.115cm" svg:height="0.114cm" svg:x="12.208cm" svg:y="15.375cm" svg:viewBox="0 0 116 115" svg:d="M59 115c-33 0-59-25-59-56 0-29 21-58 58-59 32 0 58 25 58 58 0 32-25 57-57 57z">
          <text:p/>
        </draw:path>
        <draw:path draw:style-name="gr9" draw:text-style-name="P7" draw:layer="layout" svg:width="0.115cm" svg:height="0.114cm" svg:x="16.004cm" svg:y="19.464cm" svg:viewBox="0 0 116 115" svg:d="M116 58c-3 38-34 59-60 57-31-1-57-27-56-60 1-31 27-55 60-55 31 1 57 28 56 58z">
          <text:p/>
        </draw:path>
        <draw:path draw:style-name="gr9" draw:text-style-name="P7" draw:layer="layout" svg:width="0.116cm" svg:height="0.115cm" svg:x="12.498cm" svg:y="26.468cm" svg:viewBox="0 0 117 116" svg:d="M58 0c32-1 58 25 59 59 0 33-26 58-58 57-33 0-59-26-59-57 1-33 26-58 58-59z">
          <text:p/>
        </draw:path>
        <draw:path draw:style-name="gr9" draw:text-style-name="P7" draw:layer="layout" svg:width="0.114cm" svg:height="0.115cm" svg:x="4.617cm" svg:y="22.966cm" svg:viewBox="0 0 115 116" svg:d="M114 62c-2 31-28 55-60 54-31-2-58-31-54-61 2-31 30-57 60-55 31 2 56 29 54 62z">
          <text:p/>
        </draw:path>
        <draw:path draw:style-name="gr9" draw:text-style-name="P7" draw:layer="layout" svg:width="0.114cm" svg:height="0.115cm" svg:x="7.538cm" svg:y="15.669cm" svg:viewBox="0 0 115 116" svg:d="M56 0c32-1 59 25 59 56 1 30-27 58-56 60-31 1-59-26-59-57-1-32 23-59 56-59z">
          <text:p/>
        </draw:path>
        <draw:path draw:style-name="gr9" draw:text-style-name="P7" draw:layer="layout" svg:width="0.113cm" svg:height="0.114cm" svg:x="5.202cm" svg:y="17.712cm" svg:viewBox="0 0 114 115" svg:d="M114 57c0 32-28 59-58 58-31-2-59-33-56-62 2-28 28-53 56-53 31-1 58 26 58 57z">
          <text:p/>
        </draw:path>
        <draw:path draw:style-name="gr9" draw:text-style-name="P7" draw:layer="layout" svg:width="0.114cm" svg:height="0.113cm" svg:x="5.785cm" svg:y="25.01cm" svg:viewBox="0 0 115 114" svg:d="M115 56c1 31-25 58-57 58s-59-28-58-58c1-27 26-54 55-56 29-3 59 25 60 56z">
          <text:p/>
        </draw:path>
        <draw:path draw:style-name="gr9" draw:text-style-name="P7" draw:layer="layout" svg:width="0.114cm" svg:height="0.113cm" svg:x="14.835cm" svg:y="17.128cm" svg:viewBox="0 0 115 114" svg:d="M115 58c0 30-28 58-59 56-28-1-54-26-56-54-1-30 27-59 57-60s58 27 58 58z">
          <text:p/>
        </draw:path>
        <draw:path draw:style-name="gr9" draw:text-style-name="P7" draw:layer="layout" svg:width="0.114cm" svg:height="0.114cm" svg:x="15.711cm" svg:y="18.587cm" svg:viewBox="0 0 115 115" svg:d="M57 115c-34-1-57-26-57-58 1-31 28-58 60-57 31 1 55 28 55 60-1 32-26 57-58 55z">
          <text:p/>
        </draw:path>
        <draw:path draw:style-name="gr9" draw:text-style-name="P7" draw:layer="layout" svg:width="0.114cm" svg:height="0.113cm" svg:x="6.37cm" svg:y="25.595cm" svg:viewBox="0 0 115 114" svg:d="M115 58c-1 31-28 57-60 56-28-2-53-27-55-55-1-30 28-60 58-59 32 1 57 27 57 58z">
          <text:p/>
        </draw:path>
        <draw:path draw:style-name="gr9" draw:text-style-name="P7" draw:layer="layout" svg:width="0.113cm" svg:height="0.114cm" svg:x="15.129cm" svg:y="24.425cm" svg:viewBox="0 0 114 115" svg:d="M57 115c-33 1-57-23-57-55-1-33 24-60 55-60 32 0 58 26 59 58 0 32-24 57-57 57z">
          <text:p/>
        </draw:path>
        <draw:path draw:style-name="gr9" draw:text-style-name="P7" draw:layer="layout" svg:width="0.113cm" svg:height="0.113cm" svg:x="14.252cm" svg:y="16.544cm" svg:viewBox="0 0 114 114" svg:d="M58 0c30 0 57 28 56 60-1 29-24 53-53 54-32 2-60-22-61-54-1-29 27-59 58-60z">
          <text:p/>
        </draw:path>
        <draw:path draw:style-name="gr9" draw:text-style-name="P7" draw:layer="layout" svg:width="0.115cm" svg:height="0.116cm" svg:x="9.872cm" svg:y="15.084cm" svg:viewBox="0 0 116 117" svg:d="M56 0c33-1 59 23 60 56 2 31-22 59-53 61-30 2-63-19-63-58 0-38 29-59 56-59z">
          <text:p/>
        </draw:path>
        <draw:path draw:style-name="gr9" draw:text-style-name="P7" draw:layer="layout" svg:width="0.111cm" svg:height="0.111cm" svg:x="4.327cm" svg:y="19.756cm" svg:viewBox="0 0 112 112" svg:d="M112 57c-1 32-30 58-61 55-29-2-52-28-51-58 1-28 25-53 54-54 30-2 59 27 58 57z">
          <text:p/>
        </draw:path>
        <draw:path draw:style-name="gr9" draw:text-style-name="P7" draw:layer="layout" svg:width="0.112cm" svg:height="0.112cm" svg:x="4.327cm" svg:y="22.092cm" svg:viewBox="0 0 113 113" svg:d="M56 113c-31-2-57-24-56-58 0-30 23-54 53-55 32-1 59 23 60 55 1 30-27 58-57 58z">
          <text:p/>
        </draw:path>
        <draw:path draw:style-name="gr9" draw:text-style-name="P7" draw:layer="layout" svg:width="0.112cm" svg:height="0.113cm" svg:x="4.619cm" svg:y="18.881cm" svg:viewBox="0 0 113 114" svg:d="M113 54c1 32-23 59-54 60s-59-26-59-57c0-29 23-54 52-57 32-2 59 21 61 54z">
          <text:p/>
        </draw:path>
        <draw:path draw:style-name="gr9" draw:text-style-name="P7" draw:layer="layout" svg:width="0.116cm" svg:height="0.116cm" svg:x="15.418cm" svg:y="23.841cm" svg:viewBox="0 0 117 117" svg:d="M60 0c32 2 57 30 57 60 0 34-30 60-65 57-31-3-54-30-52-62 2-29 26-54 60-55z">
          <text:p/>
        </draw:path>
        <draw:path draw:style-name="gr9" draw:text-style-name="P7" draw:layer="layout" svg:width="0.114cm" svg:height="0.114cm" svg:x="4.326cm" svg:y="21.799cm" svg:viewBox="0 0 115 115" svg:d="M56 115c-33-1-57-25-56-58 1-32 27-58 58-57 31 0 58 28 57 59 0 31-26 56-59 56z">
          <text:p/>
        </draw:path>
        <draw:path draw:style-name="gr9" draw:text-style-name="P7" draw:layer="layout" svg:width="0.114cm" svg:height="0.114cm" svg:x="5.495cm" svg:y="17.421cm" svg:viewBox="0 0 115 115" svg:d="M0 57c0-33 24-57 58-57 32 1 58 27 57 58s-27 57-58 57c-28-1-57-20-57-58z">
          <text:p/>
        </draw:path>
        <draw:path draw:style-name="gr9" draw:text-style-name="P7" draw:layer="layout" svg:width="0.114cm" svg:height="0.114cm" svg:x="13.668cm" svg:y="25.886cm" svg:viewBox="0 0 115 115" svg:d="M56 0c33 0 58 24 59 57 0 35-25 56-57 58-31 1-57-25-58-56-2-31 24-58 56-59z">
          <text:p/>
        </draw:path>
        <draw:path draw:style-name="gr9" draw:text-style-name="P7" draw:layer="layout" svg:width="0.112cm" svg:height="0.111cm" svg:x="8.122cm" svg:y="15.377cm" svg:viewBox="0 0 113 112" svg:d="M55 112c-32 0-56-26-55-59 1-29 24-52 53-53 31-2 60 24 60 55 1 31-25 57-58 57z">
          <text:p/>
        </draw:path>
        <draw:path draw:style-name="gr9" draw:text-style-name="P7" draw:layer="layout" svg:width="0.111cm" svg:height="0.112cm" svg:x="13.377cm" svg:y="26.179cm" svg:viewBox="0 0 112 113" svg:d="M53 113c-32-1-57-30-53-62 2-28 29-52 57-51 28 2 54 28 55 55 0 31-29 59-59 58z">
          <text:p/>
        </draw:path>
        <draw:path draw:style-name="gr9" draw:text-style-name="P7" draw:layer="layout" svg:width="0.113cm" svg:height="0.112cm" svg:x="11.624cm" svg:y="15.086cm" svg:viewBox="0 0 114 113" svg:d="M114 56c0 31-30 59-60 57-28-2-54-29-54-57 0-30 30-58 60-56 29 2 53 28 54 56z">
          <text:p/>
        </draw:path>
        <draw:path draw:style-name="gr9" draw:text-style-name="P7" draw:layer="layout" svg:width="0.112cm" svg:height="0.115cm" svg:x="11.334cm" svg:y="15.085cm" svg:viewBox="0 0 113 116" svg:d="M113 55c2 31-25 59-55 61-29 1-55-24-58-52-2-33 20-60 53-64 30-2 58 24 60 55z">
          <text:p/>
        </draw:path>
        <draw:path draw:style-name="gr9" draw:text-style-name="P7" draw:layer="layout" svg:width="0.115cm" svg:height="0.113cm" svg:x="15.419cm" svg:y="18.004cm" svg:viewBox="0 0 116 114" svg:d="M60 114c-33 1-59-22-60-55-1-31 23-58 56-59 31-1 58 23 60 55 1 31-25 58-56 59z">
          <text:p/>
        </draw:path>
        <draw:path draw:style-name="gr9" draw:text-style-name="P7" draw:layer="layout" svg:width="0.114cm" svg:height="0.115cm" svg:x="8.705cm" svg:y="26.761cm" svg:viewBox="0 0 115 116" svg:d="M58 116c-32 1-58-25-58-58 0-32 25-58 57-58 31 1 57 27 58 58 0 31-27 58-57 58z">
          <text:p/>
        </draw:path>
        <draw:path draw:style-name="gr9" draw:text-style-name="P7" draw:layer="layout" svg:width="0.111cm" svg:height="0.112cm" svg:x="8.415cm" svg:y="26.763cm" svg:viewBox="0 0 112 113" svg:d="M112 53c2 32-25 60-57 60-27 0-53-25-55-54-2-30 25-59 56-59 29 0 54 24 56 53z">
          <text:p/>
        </draw:path>
        <draw:path draw:style-name="gr9" draw:text-style-name="P7" draw:layer="layout" svg:width="0.113cm" svg:height="0.112cm" svg:x="6.954cm" svg:y="15.961cm" svg:viewBox="0 0 114 113" svg:d="M53 113c-32-2-56-30-53-61 2-28 28-52 56-52 30 0 59 29 58 59-1 31-29 56-61 54z">
          <text:p/>
        </draw:path>
        <draw:path draw:style-name="gr9" draw:text-style-name="P7" draw:layer="layout" svg:width="0.114cm" svg:height="0.114cm" svg:x="6.661cm" svg:y="16.253cm" svg:viewBox="0 0 115 115" svg:d="M59 0c33 0 57 26 56 58-2 32-29 59-60 57s-56-30-55-61c2-32 27-55 59-54z">
          <text:p/>
        </draw:path>
        <draw:path draw:style-name="gr9" draw:text-style-name="P7" draw:layer="layout" svg:width="0.112cm" svg:height="0.112cm" svg:x="8.998cm" svg:y="15.086cm" svg:viewBox="0 0 113 113" svg:d="M56 113c-28 0-54-27-56-54-2-30 27-60 58-59 30 0 57 30 55 60-3 28-29 54-57 53z">
          <text:p/>
        </draw:path>
        <draw:path draw:style-name="gr9" draw:text-style-name="P7" draw:layer="layout" svg:width="0.112cm" svg:height="0.111cm" svg:x="16.005cm" svg:y="19.172cm" svg:viewBox="0 0 113 112" svg:d="M54 112c-29-1-53-26-54-55-1-30 28-58 58-57 29 2 54 27 55 55 1 30-27 59-59 57z">
          <text:p/>
        </draw:path>
        <draw:path draw:style-name="gr9" draw:text-style-name="P7" draw:layer="layout" svg:width="0.112cm" svg:height="0.112cm" svg:x="15.42cm" svg:y="24.136cm" svg:viewBox="0 0 113 113" svg:d="M55 0c31 0 60 29 58 59-2 27-29 54-57 54-27 1-54-25-56-53-2-30 25-60 55-60z">
          <text:p/>
        </draw:path>
        <draw:path draw:style-name="gr9" draw:text-style-name="P7" draw:layer="layout" svg:width="0.114cm" svg:height="0.112cm" svg:x="16.004cm" svg:y="22.677cm" svg:viewBox="0 0 115 113" svg:d="M60 0c31 1 58 31 55 61-3 28-30 52-58 52-30 1-57-27-57-58 1-31 28-56 60-55z">
          <text:p/>
        </draw:path>
        <draw:path draw:style-name="gr9" draw:text-style-name="P7" draw:layer="layout" svg:width="0.114cm" svg:height="0.112cm" svg:x="7.829cm" svg:y="26.47cm" svg:viewBox="0 0 115 113" svg:d="M55 113c-32-1-59-30-54-60 5-37 30-55 63-53 31 2 52 27 51 58 0 33-27 57-60 55z">
          <text:p/>
        </draw:path>
        <draw:path draw:style-name="gr9" draw:text-style-name="P7" draw:layer="layout" svg:width="0.111cm" svg:height="0.115cm" svg:x="9.291cm" svg:y="15.085cm" svg:viewBox="0 0 112 116" svg:d="M54 0c30-1 57 25 58 57 1 31-25 59-56 59-28 0-54-25-56-54-2-32 22-59 54-62z">
          <text:p/>
        </draw:path>
        <draw:path draw:style-name="gr9" draw:text-style-name="P7" draw:layer="layout" svg:width="0.112cm" svg:height="0.114cm" svg:x="7.245cm" svg:y="26.178cm" svg:viewBox="0 0 113 115" svg:d="M113 59c0 32-29 58-60 56-28-2-52-28-53-57 0-30 27-58 57-58 31 0 57 27 56 59z">
          <text:p/>
        </draw:path>
        <draw:path draw:style-name="gr9" draw:text-style-name="P7" draw:layer="layout" svg:width="0.111cm" svg:height="0.112cm" svg:x="16.297cm" svg:y="20.924cm" svg:viewBox="0 0 112 113" svg:d="M57 0c31 1 56 29 54 61-2 30-30 54-58 52-31-1-57-29-53-61 3-29 28-52 57-52z">
          <text:p/>
        </draw:path>
        <draw:path draw:style-name="gr9" draw:text-style-name="P7" draw:layer="layout" svg:width="0.111cm" svg:height="0.114cm" svg:x="11.918cm" svg:y="26.762cm" svg:viewBox="0 0 112 115" svg:d="M54 0c30-1 57 24 58 56 0 32-26 59-57 59-28-1-53-24-55-54-2-33 22-59 54-61z">
          <text:p/>
        </draw:path>
        <draw:path draw:style-name="gr9" draw:text-style-name="P7" draw:layer="layout" svg:width="0.112cm" svg:height="0.112cm" svg:x="4.327cm" svg:y="22.384cm" svg:viewBox="0 0 113 113" svg:d="M113 56c0 28-24 54-52 57-33 2-60-24-61-55 0-29 23-54 52-58 30-2 60 26 61 56z">
          <text:p/>
        </draw:path>
        <draw:path draw:style-name="gr9" draw:text-style-name="P7" draw:layer="layout" svg:width="0.111cm" svg:height="0.112cm" svg:x="6.079cm" svg:y="25.304cm" svg:viewBox="0 0 112 113" svg:d="M56 0c32-1 57 24 56 56 0 33-27 58-58 57-30-2-53-25-54-55-1-33 23-58 56-58z">
          <text:p/>
        </draw:path>
        <draw:path draw:style-name="gr9" draw:text-style-name="P7" draw:layer="layout" svg:width="0.11cm" svg:height="0.111cm" svg:x="13.085cm" svg:y="15.67cm" svg:viewBox="0 0 111 112" svg:d="M53 112c-32-1-57-30-53-61 3-30 27-52 57-51 32 1 55 28 53 62-2 28-29 52-57 50z">
          <text:p/>
        </draw:path>
        <draw:path draw:style-name="gr9" draw:text-style-name="P7" draw:layer="layout" svg:width="0.109cm" svg:height="0.112cm" svg:x="15.714cm" svg:y="23.551cm" svg:viewBox="0 0 110 113" svg:d="M110 57c0 32-27 58-58 56-30-2-52-27-52-56 0-31 27-59 59-57 28 2 51 28 51 57z">
          <text:p/>
        </draw:path>
        <draw:path draw:style-name="gr9" draw:text-style-name="P7" draw:layer="layout" svg:width="0.112cm" svg:height="0.109cm" svg:x="12.793cm" svg:y="26.472cm" svg:viewBox="0 0 113 110" svg:d="M56 110c-31-1-54-24-56-53-1-32 26-58 59-57 29 0 53 24 54 54 2 30-25 56-57 56z">
          <text:p/>
        </draw:path>
        <draw:path draw:style-name="gr9" draw:text-style-name="P7" draw:layer="layout" svg:width="0.11cm" svg:height="0.11cm" svg:x="16.006cm" svg:y="22.968cm" svg:viewBox="0 0 111 111" svg:d="M52 111c-28-2-53-29-52-57 1-27 27-54 55-54 29 0 59 31 56 60-5 30-32 53-59 51z">
          <text:p/>
        </draw:path>
        <draw:path draw:style-name="gr9" draw:text-style-name="P7" draw:layer="layout" svg:width="0.11cm" svg:height="0.11cm" svg:x="12.211cm" svg:y="26.764cm" svg:viewBox="0 0 111 111" svg:d="M58 0c28 2 53 30 53 57-1 27-28 54-55 54-30 1-59-31-56-59 3-29 30-54 58-52z">
          <text:p/>
        </draw:path>
        <draw:path draw:style-name="gr9" draw:text-style-name="P7" draw:layer="layout" svg:width="0.11cm" svg:height="0.112cm" svg:x="5.496cm" svg:y="24.72cm" svg:viewBox="0 0 111 113" svg:d="M111 57c0 28-24 54-54 56-30 1-57-27-57-59 1-29 24-53 53-54 33-1 59 25 58 57z">
          <text:p/>
        </draw:path>
        <draw:path draw:style-name="gr9" draw:text-style-name="P7" draw:layer="layout" svg:width="0.111cm" svg:height="0.109cm" svg:x="10.166cm" svg:y="27.057cm" svg:viewBox="0 0 112 110" svg:d="M57 110c-32 1-58-25-57-57 0-29 23-52 53-53 32-1 59 24 59 55-1 30-26 54-55 55z">
          <text:p/>
        </draw:path>
        <draw:path draw:style-name="gr9" draw:text-style-name="P7" draw:layer="layout" svg:width="0.108cm" svg:height="0.109cm" svg:x="9.876cm" svg:y="27.057cm" svg:viewBox="0 0 109 110" svg:d="M109 57c-1 32-27 55-60 53-29-3-50-28-49-58 1-33 28-55 61-52 29 3 50 27 48 57z">
          <text:p/>
        </draw:path>
        <draw:path draw:style-name="gr9" draw:text-style-name="P7" draw:layer="layout" svg:width="0.11cm" svg:height="0.107cm" svg:x="9.582cm" svg:y="27.058cm" svg:viewBox="0 0 111 108" svg:d="M60 0c30 2 53 28 51 56-2 30-26 52-56 52-29 0-54-24-55-54 0-31 27-56 60-54z">
          <text:p/>
        </draw:path>
        <draw:path draw:style-name="gr9" draw:text-style-name="P7" draw:layer="layout" svg:width="0.109cm" svg:height="0.107cm" svg:x="10.751cm" svg:y="27.058cm" svg:viewBox="0 0 110 108" svg:d="M61 0c29 3 52 30 49 59-2 29-27 50-58 49-29-1-52-26-52-55 1-33 28-55 61-53z">
          <text:p/>
        </draw:path>
        <draw:path draw:style-name="gr9" draw:text-style-name="P7" draw:layer="layout" svg:width="0.109cm" svg:height="0.107cm" svg:x="11.043cm" svg:y="27.058cm" svg:viewBox="0 0 110 108" svg:d="M57 0c29 1 53 25 53 54-1 30-24 54-54 54-32 1-59-26-56-58 2-30 26-51 57-50z">
          <text:p/>
        </draw:path>
        <draw:path draw:style-name="gr9" draw:text-style-name="P7" draw:layer="layout" svg:width="0.111cm" svg:height="0.109cm" svg:x="4.912cm" svg:y="23.845cm" svg:viewBox="0 0 112 110" svg:d="M64 0c28 3 51 29 48 57-2 33-29 55-62 52-29-3-52-29-50-59 2-31 31-54 64-50z">
          <text:p/>
        </draw:path>
        <draw:path draw:style-name="gr9" draw:text-style-name="P7" draw:layer="layout" svg:width="0.11cm" svg:height="0.108cm" svg:x="14.837cm" svg:y="25.012cm" svg:viewBox="0 0 111 109" svg:d="M111 55c-1 28-27 54-55 54-29 0-55-26-56-54-1-30 28-58 60-55 29 2 52 27 51 55z">
          <text:p/>
        </draw:path>
        <draw:path draw:style-name="gr9" draw:text-style-name="P7" draw:layer="layout" svg:width="0.11cm" svg:height="0.111cm" svg:x="14.545cm" svg:y="16.837cm" svg:viewBox="0 0 111 112" svg:d="M111 56c0 33-25 57-58 56-31-2-53-24-53-55-1-34 24-58 58-57 31 1 53 24 53 56z">
          <text:p/>
        </draw:path>
        <draw:path draw:style-name="gr9" draw:text-style-name="P7" draw:layer="layout" svg:width="0.109cm" svg:height="0.107cm" svg:x="7.539cm" svg:y="26.473cm" svg:viewBox="0 0 110 108" svg:d="M110 52c1 29-22 54-51 56-37 2-56-26-59-48-4-28 19-57 48-60 34-3 60 19 62 52z">
          <text:p/>
        </draw:path>
        <draw:path draw:style-name="gr9" draw:text-style-name="P7" draw:layer="layout" svg:width="0.11cm" svg:height="0.107cm" svg:x="5.787cm" svg:y="16.839cm" svg:viewBox="0 0 111 108" svg:d="M51 108c-30-2-53-29-51-57 3-29 27-52 58-51 29 0 53 26 53 54 0 32-27 56-60 54z">
          <text:p/>
        </draw:path>
        <draw:path draw:style-name="gr9" draw:text-style-name="P7" draw:layer="layout" svg:width="0.11cm" svg:height="0.107cm" svg:x="4.913cm" svg:y="18.008cm" svg:viewBox="0 0 111 108" svg:d="M0 57c-2-29 22-55 51-57 33-2 60 21 60 54 0 30-24 53-54 54-29 1-54-22-57-51z">
          <text:p/>
        </draw:path>
        <draw:path draw:style-name="gr9" draw:text-style-name="P7" draw:layer="layout" svg:width="0.107cm" svg:height="0.109cm" svg:x="6.081cm" svg:y="16.547cm" svg:viewBox="0 0 108 110" svg:d="M57 0c31 2 52 25 51 57 0 31-29 57-60 53-29-4-50-29-48-59s27-52 57-51z">
          <text:p/>
        </draw:path>
        <draw:path draw:style-name="gr9" draw:text-style-name="P7" draw:layer="layout" svg:width="0.112cm" svg:height="0.111cm" svg:x="4.326cm" svg:y="20.049cm" svg:viewBox="0 0 113 112" svg:d="M113 59c-2 31-29 55-60 52-33-2-56-29-53-61 2-25 25-54 64-50 28 4 51 31 49 59z">
          <text:p/>
        </draw:path>
        <draw:path draw:style-name="gr9" draw:text-style-name="P7" draw:layer="layout" svg:width="0.11cm" svg:height="0.11cm" svg:x="13.961cm" svg:y="16.254cm" svg:viewBox="0 0 111 111" svg:d="M111 56c0 29-22 53-51 55-33 2-59-23-60-55 0-30 23-55 53-56 32-2 58 23 58 56z">
          <text:p/>
        </draw:path>
        <draw:path draw:style-name="gr9" draw:text-style-name="P7" draw:layer="layout" svg:width="0.107cm" svg:height="0.109cm" svg:x="15.715cm" svg:y="18.297cm" svg:viewBox="0 0 108 110" svg:d="M56 110c-29 2-54-21-56-51s19-55 48-59c31-3 60 23 60 54s-22 55-52 56z">
          <text:p/>
        </draw:path>
        <draw:path draw:style-name="gr9" draw:text-style-name="P7" draw:layer="layout" svg:width="0.108cm" svg:height="0.109cm" svg:x="15.131cm" svg:y="17.423cm" svg:viewBox="0 0 109 110" svg:d="M109 58c-1 32-27 54-60 52-30-3-51-27-49-57 1-32 27-56 61-53 29 3 49 28 48 58z">
          <text:p/>
        </draw:path>
        <draw:path draw:style-name="gr9" draw:text-style-name="P7" draw:layer="layout" svg:width="0.108cm" svg:height="0.11cm" svg:x="5.497cm" svg:y="17.13cm" svg:viewBox="0 0 109 111" svg:d="M109 56c-1 30-26 55-54 55s-54-25-55-54c-1-32 28-60 58-57 28 4 51 22 51 56z">
          <text:p/>
        </draw:path>
        <draw:path draw:style-name="gr9" draw:text-style-name="P7" draw:layer="layout" svg:width="0.108cm" svg:height="0.109cm" svg:x="15.422cm" svg:y="17.714cm" svg:viewBox="0 0 109 110" svg:d="M54 0c28 0 55 28 55 56s-27 54-56 54c-27-1-54-28-53-55 0-28 27-55 54-55z">
          <text:p/>
        </draw:path>
        <draw:path draw:style-name="gr9" draw:text-style-name="P7" draw:layer="layout" svg:width="0.109cm" svg:height="0.109cm" svg:x="6.664cm" svg:y="25.888cm" svg:viewBox="0 0 110 110" svg:d="M52 110c-32-1-54-27-52-60 2-30 26-50 56-50 33 1 56 27 54 60-3 30-27 51-58 50z">
          <text:p/>
        </draw:path>
        <draw:path draw:style-name="gr9" draw:text-style-name="P7" draw:layer="layout" svg:width="0.11cm" svg:height="0.108cm" svg:x="6.372cm" svg:y="16.255cm" svg:viewBox="0 0 111 109" svg:d="M111 56c-1 29-27 53-56 53-29-1-55-26-55-55 1-24 23-58 61-54 28 2 52 29 50 56z">
          <text:p/>
        </draw:path>
        <draw:path draw:style-name="gr9" draw:text-style-name="P7" draw:layer="layout" svg:width="0.107cm" svg:height="0.11cm" svg:x="8.708cm" svg:y="15.086cm" svg:viewBox="0 0 108 111" svg:d="M56 111c-28 1-55-23-56-52-2-30 20-55 49-59 27-4 56 20 58 49 4 33-19 60-51 62z">
          <text:p/>
        </draw:path>
        <draw:path draw:style-name="gr9" draw:text-style-name="P7" draw:layer="layout" svg:width="0.109cm" svg:height="0.107cm" svg:x="5.204cm" svg:y="24.43cm" svg:viewBox="0 0 110 108" svg:d="M110 52c1 29-22 54-51 56-31 2-58-21-59-55 0-29 24-53 55-53 30-1 54 24 55 52z">
          <text:p/>
        </draw:path>
        <draw:path draw:style-name="gr9" draw:text-style-name="P7" draw:layer="layout" svg:width="0.108cm" svg:height="0.109cm" svg:x="7.248cm" svg:y="15.671cm" svg:viewBox="0 0 109 110" svg:d="M52 0c28-2 55 22 57 51 2 32-22 58-56 59-29 0-52-24-53-55 0-29 23-54 52-55z">
          <text:p/>
        </draw:path>
        <draw:path draw:style-name="gr9" draw:text-style-name="P7" draw:layer="layout" svg:width="0.107cm" svg:height="0.109cm" svg:x="16.299cm" svg:y="21.509cm" svg:viewBox="0 0 108 110" svg:d="M108 57c0 28-24 53-53 53-32 1-57-26-55-58 1-29 28-54 57-52 28 2 52 28 51 57z">
          <text:p/>
        </draw:path>
        <draw:path draw:style-name="gr9" draw:text-style-name="P7" draw:layer="layout" svg:width="0.109cm" svg:height="0.108cm" svg:x="4.328cm" svg:y="19.466cm" svg:viewBox="0 0 110 109" svg:d="M55 109c-30 0-54-23-55-53-1-31 26-57 58-56 28 2 53 28 52 56-1 30-26 53-55 53z">
          <text:p/>
        </draw:path>
        <draw:path draw:style-name="gr9" draw:text-style-name="P7" draw:layer="layout" svg:width="0.109cm" svg:height="0.108cm" svg:x="14.254cm" svg:y="25.598cm" svg:viewBox="0 0 110 109" svg:d="M52 0c30-2 56 21 58 49 3 32-23 61-55 60-29 0-54-24-55-53 0-30 23-55 52-56z">
          <text:p/>
        </draw:path>
        <draw:path draw:style-name="gr9" draw:text-style-name="P7" draw:layer="layout" svg:width="0.108cm" svg:height="0.11cm" svg:x="16.298cm" svg:y="20.342cm" svg:viewBox="0 0 109 111" svg:d="M109 53c1 29-22 55-51 58-30 2-59-26-58-58 1-29 27-54 55-53 29 0 54 25 54 53z">
          <text:p/>
        </draw:path>
        <draw:path draw:style-name="gr9" draw:text-style-name="P7" draw:layer="layout" svg:width="0.109cm" svg:height="0.108cm" svg:x="4.62cm" svg:y="23.262cm" svg:viewBox="0 0 110 109" svg:d="M56 109c-30 1-54-20-56-50-3-32 22-59 55-59 30-1 53 22 55 51 2 33-21 58-54 58z">
          <text:p/>
        </draw:path>
        <draw:path draw:style-name="gr9" draw:text-style-name="P7" draw:layer="layout" svg:width="0.108cm" svg:height="0.107cm" svg:x="16.007cm" svg:y="18.883cm" svg:viewBox="0 0 109 108" svg:d="M109 53c1 29-25 55-53 55-29 1-55-23-56-51-1-27 24-56 52-57s56 25 57 53z">
          <text:p/>
        </draw:path>
        <draw:path draw:style-name="gr9" draw:text-style-name="P7" draw:layer="layout" svg:width="0.11cm" svg:height="0.108cm" svg:x="16.297cm" svg:y="21.219cm" svg:viewBox="0 0 111 109" svg:d="M111 56c-1 32-28 55-61 53-29-2-50-26-50-55 1-33 26-56 60-54 29 2 51 27 51 56z">
          <text:p/>
        </draw:path>
        <draw:path draw:style-name="gr9" draw:text-style-name="P7" draw:layer="layout" svg:width="0.106cm" svg:height="0.106cm" svg:x="15.132cm" svg:y="24.722cm" svg:viewBox="0 0 107 107" svg:d="M107 57c-2 30-26 52-56 50-31-2-53-26-51-56 2-29 28-54 57-51 29 2 51 27 50 57z">
          <text:p/>
        </draw:path>
        <draw:path draw:style-name="gr9" draw:text-style-name="P7" draw:layer="layout" svg:width="0.106cm" svg:height="0.107cm" svg:x="8.124cm" svg:y="26.765cm" svg:viewBox="0 0 107 108" svg:d="M107 57c0 29-27 53-55 51-29-1-53-27-52-55 1-29 28-54 55-53 29 1 53 26 52 57z">
          <text:p/>
        </draw:path>
        <draw:path draw:style-name="gr9" draw:text-style-name="P7" draw:layer="layout" svg:width="0.11cm" svg:height="0.109cm" svg:x="16.297cm" svg:y="20.633cm" svg:viewBox="0 0 111 110" svg:d="M111 57c-2 32-29 55-62 52-29-2-50-27-49-57 2-33 28-55 61-52 29 2 51 27 50 57z">
          <text:p/>
        </draw:path>
        <draw:path draw:style-name="gr9" draw:text-style-name="P7" draw:layer="layout" svg:width="0.105cm" svg:height="0.105cm" svg:x="11.628cm" svg:y="27.059cm" svg:viewBox="0 0 106 106" svg:d="M52 106c-29 0-53-26-52-55 2-28 23-49 50-51 30-1 55 22 56 52 2 28-24 54-54 54z">
          <text:p/>
        </draw:path>
        <draw:path draw:style-name="gr9" draw:text-style-name="P7" draw:layer="layout" svg:width="0.108cm" svg:height="0.11cm" svg:x="12.502cm" svg:y="15.378cm" svg:viewBox="0 0 109 111" svg:d="M51 111c-32-2-54-28-51-61 2-30 27-51 57-50 30 2 52 25 52 56 0 32-25 56-58 55z">
          <text:p/>
        </draw:path>
        <draw:path draw:style-name="gr9" draw:text-style-name="P7" draw:layer="layout" svg:width="0.104cm" svg:height="0.105cm" svg:x="12.505cm" svg:y="26.766cm" svg:viewBox="0 0 105 106" svg:d="M105 50c2 30-21 55-51 56-28 1-51-19-54-47-3-30 17-55 48-59 27-3 55 21 57 50z">
          <text:p/>
        </draw:path>
        <draw:path draw:style-name="gr9" draw:text-style-name="P7" draw:layer="layout" svg:width="0.109cm" svg:height="0.109cm" svg:x="10.459cm" svg:y="27.057cm" svg:viewBox="0 0 110 110" svg:d="M55 0c34 0 57 25 55 58-1 29-25 52-56 52-32 0-56-27-54-59 2-30 25-51 55-51z">
          <text:p/>
        </draw:path>
        <draw:path draw:style-name="gr9" draw:text-style-name="P7" draw:layer="layout" svg:width="0.106cm" svg:height="0.108cm" svg:x="4.623cm" svg:y="23.553cm" svg:viewBox="0 0 107 109" svg:d="M49 109c-34-6-50-27-49-57 1-31 28-55 57-52s51 29 50 58c-2 29-29 53-58 51z">
          <text:p/>
        </draw:path>
        <draw:path draw:style-name="gr9" draw:text-style-name="P7" draw:layer="layout" svg:width="0.106cm" svg:height="0.108cm" svg:x="11.92cm" svg:y="15.088cm" svg:viewBox="0 0 107 109" svg:d="M55 109c-28 1-54-23-55-52-1-30 22-55 51-57 28-2 55 22 56 52s-18 52-52 57z">
          <text:p/>
        </draw:path>
        <draw:path draw:style-name="gr9" draw:text-style-name="P7" draw:layer="layout" svg:width="0.105cm" svg:height="0.105cm" svg:x="9.002cm" svg:y="27.059cm" svg:viewBox="0 0 106 106" svg:d="M106 55c-1 29-28 52-57 51-29-2-52-28-49-57 2-28 24-49 52-49 30 0 55 25 54 55z">
          <text:p/>
        </draw:path>
        <draw:path draw:style-name="gr9" draw:text-style-name="P7" draw:layer="layout" svg:width="0.104cm" svg:height="0.105cm" svg:x="4.04cm" svg:y="20.928cm" svg:viewBox="0 0 105 106" svg:d="M54 106c-30 1-54-23-54-52 0-31 24-55 53-54 27 0 50 22 52 50 2 29-21 54-51 56z">
          <text:p/>
        </draw:path>
        <draw:path draw:style-name="gr9" draw:text-style-name="P7" draw:layer="layout" svg:width="0.107cm" svg:height="0.107cm" svg:x="14.546cm" svg:y="25.305cm" svg:viewBox="0 0 108 108" svg:d="M55 0c30 0 53 24 53 54 1 33-24 57-57 54-31-1-52-25-51-55s25-54 55-53z">
          <text:p/>
        </draw:path>
        <draw:path draw:style-name="gr9" draw:text-style-name="P7" draw:layer="layout" svg:width="0.107cm" svg:height="0.107cm" svg:x="7.834cm" svg:y="15.38cm" svg:viewBox="0 0 108 108" svg:d="M53 108c-31-1-53-23-53-54-1-31 21-54 52-54 33-1 58 24 56 56-1 30-25 52-55 52z">
          <text:p/>
        </draw:path>
        <draw:path draw:style-name="gr9" draw:text-style-name="P7" draw:layer="layout" svg:width="0.107cm" svg:height="0.107cm" svg:x="13.672cm" svg:y="15.965cm" svg:viewBox="0 0 108 108" svg:d="M54 0c31 0 54 22 54 53 1 32-25 57-58 55-29-2-51-26-50-56 1-31 24-53 54-52z">
          <text:p/>
        </draw:path>
        <draw:path draw:style-name="gr9" draw:text-style-name="P7" draw:layer="layout" svg:width="0.106cm" svg:height="0.105cm" svg:x="13.088cm" svg:y="26.474cm" svg:viewBox="0 0 107 106" svg:d="M50 106c-30-1-51-25-50-55 1-32 24-53 55-51 29 1 53 26 52 56-2 29-28 51-57 50z">
          <text:p/>
        </draw:path>
        <draw:path draw:style-name="gr9" draw:text-style-name="P7" draw:layer="layout" svg:width="0.107cm" svg:height="0.108cm" svg:x="4.622cm" svg:y="18.591cm" svg:viewBox="0 0 108 109" svg:d="M108 56c-1 30-24 53-54 53-33 0-57-27-54-60 2-30 26-50 58-49 29 2 51 26 50 56z">
          <text:p/>
        </draw:path>
        <draw:path draw:style-name="gr9" draw:text-style-name="P7" draw:layer="layout" svg:width="0.107cm" svg:height="0.107cm" svg:x="16.299cm" svg:y="21.803cm" svg:viewBox="0 0 108 108" svg:d="M108 53c1 30-22 54-51 55-32 2-59-23-57-57 0-30 24-51 55-51 30 1 53 23 53 53z">
          <text:p/>
        </draw:path>
        <draw:path draw:style-name="gr9" draw:text-style-name="P7" draw:layer="layout" svg:width="0.106cm" svg:height="0.105cm" svg:x="11.336cm" svg:y="27.059cm" svg:viewBox="0 0 107 106" svg:d="M56 0c31 1 52 24 51 55s-25 52-56 51c-29-1-52-27-51-56s26-51 56-50z">
          <text:p/>
        </draw:path>
        <draw:path draw:style-name="gr9" draw:text-style-name="P7" draw:layer="layout" svg:width="0.105cm" svg:height="0.104cm" svg:x="14.84cm" svg:y="16.84cm" svg:viewBox="0 0 106 105" svg:d="M53 0c29 0 56 27 53 55-4 33-28 52-58 50-27-2-47-23-48-52 0-29 24-54 53-53z">
          <text:p/>
        </draw:path>
        <draw:path draw:style-name="gr9" draw:text-style-name="P7" draw:layer="layout" svg:width="0.105cm" svg:height="0.104cm" svg:x="16.008cm" svg:y="23.264cm" svg:viewBox="0 0 106 105" svg:d="M106 51c1 30-22 54-54 54-29 0-54-27-52-55 2-27 24-49 50-50 30-2 55 21 56 51z">
          <text:p/>
        </draw:path>
        <draw:path draw:style-name="gr9" draw:text-style-name="P7" draw:layer="layout" svg:width="0.108cm" svg:height="0.108cm" svg:x="6.957cm" svg:y="26.181cm" svg:viewBox="0 0 109 109" svg:d="M109 56c-1 27-29 55-56 53-28-1-54-29-53-56 1-28 28-53 56-53 29 1 54 28 53 56z">
          <text:p/>
        </draw:path>
        <draw:path draw:style-name="gr9" draw:text-style-name="P7" draw:layer="layout" svg:width="0.105cm" svg:height="0.106cm" svg:x="16.3cm" svg:y="20.051cm" svg:viewBox="0 0 106 107" svg:d="M106 55c-1 30-25 53-55 52-31-1-53-24-51-56 1-30 25-52 55-51s53 26 51 55z">
          <text:p/>
        </draw:path>
        <draw:path draw:style-name="gr9" draw:text-style-name="P7" draw:layer="layout" svg:width="0.106cm" svg:height="0.105cm" svg:x="13.963cm" svg:y="25.89cm" svg:viewBox="0 0 107 106" svg:d="M50 106c-29-1-52-27-50-56 1-29 27-52 57-50 29 1 51 25 50 55-2 31-25 53-57 51z">
          <text:p/>
        </draw:path>
        <draw:path draw:style-name="gr9" draw:text-style-name="P7" draw:layer="layout" svg:width="0.104cm" svg:height="0.105cm" svg:x="10.168cm" svg:y="14.797cm" svg:viewBox="0 0 105 106" svg:d="M55 0c31 2 52 27 50 58-2 27-24 48-52 48-29-1-54-26-53-54 1-30 26-53 55-52z">
          <text:p/>
        </draw:path>
        <draw:path draw:style-name="gr9" draw:text-style-name="P7" draw:layer="layout" svg:width="0.105cm" svg:height="0.104cm" svg:x="5.207cm" svg:y="17.425cm" svg:viewBox="0 0 106 105" svg:d="M106 54c-2 29-27 53-56 51-31-1-52-27-50-57 2-27 25-48 53-48 29 0 54 26 53 54z">
          <text:p/>
        </draw:path>
        <draw:path draw:style-name="gr9" draw:text-style-name="P7" draw:layer="layout" svg:width="0.105cm" svg:height="0.106cm" svg:x="16.3cm" svg:y="22.094cm" svg:viewBox="0 0 106 107" svg:d="M55 0c29 1 52 28 51 56-1 29-25 51-55 51-31-1-53-24-51-55 1-30 26-54 55-52z">
          <text:p/>
        </draw:path>
        <draw:path draw:style-name="gr9" draw:text-style-name="P7" draw:layer="layout" svg:width="0.105cm" svg:height="0.104cm" svg:x="14.547cm" svg:y="16.55cm" svg:viewBox="0 0 106 105" svg:d="M106 50c1 30-23 55-53 55-28 1-53-24-53-53 0-28 22-50 49-52 32-2 56 20 57 50z">
          <text:p/>
        </draw:path>
        <draw:path draw:style-name="gr9" draw:text-style-name="P7" draw:layer="layout" svg:width="0.106cm" svg:height="0.106cm" svg:x="4.329cm" svg:y="22.679cm" svg:viewBox="0 0 107 107" svg:d="M107 57c-1 30-24 51-56 50-29-1-53-27-51-56s28-52 56-51c29 1 52 26 51 57z">
          <text:p/>
        </draw:path>
        <draw:path draw:style-name="gr9" draw:text-style-name="P7" draw:layer="layout" svg:width="0.105cm" svg:height="0.104cm" svg:x="6.082cm" svg:y="25.6cm" svg:viewBox="0 0 106 105" svg:d="M53 105c-29-1-54-27-53-56 2-30 28-52 58-49 28 1 48 23 48 52s-25 54-53 53z">
          <text:p/>
        </draw:path>
        <draw:path draw:style-name="gr9" draw:text-style-name="P7" draw:layer="layout" svg:width="0.105cm" svg:height="0.104cm" svg:x="16.3cm" svg:y="22.389cm" svg:viewBox="0 0 106 105" svg:d="M106 49c2 27-23 54-52 56-25 2-51-21-53-46-4-31 16-57 46-59 30-3 57 19 59 49z">
          <text:p/>
        </draw:path>
        <draw:path draw:style-name="gr9" draw:text-style-name="P7" draw:layer="layout" svg:width="0.105cm" svg:height="0.104cm" svg:x="12.796cm" svg:y="15.381cm" svg:viewBox="0 0 106 105" svg:d="M106 53c0 30-26 54-54 52-35-2-53-31-52-57 2-27 25-48 53-48 31 0 54 23 53 53z">
          <text:p/>
        </draw:path>
        <draw:path draw:style-name="gr9" draw:text-style-name="P7" draw:layer="layout" svg:width="0.105cm" svg:height="0.105cm" svg:x="5.79cm" svg:y="25.306cm" svg:viewBox="0 0 106 106" svg:d="M50 106c-30-1-53-27-50-56 3-27 26-50 52-50 27 0 56 28 54 55-2 26-21 52-56 51z">
          <text:p/>
        </draw:path>
        <draw:path draw:style-name="gr9" draw:text-style-name="P7" draw:layer="layout" svg:width="0.105cm" svg:height="0.105cm" svg:x="15.423cm" svg:y="24.431cm" svg:viewBox="0 0 106 106" svg:d="M106 51c1 29-24 55-52 55-29 0-56-27-54-56 2-22 17-48 51-50 28-1 52 16 55 51z">
          <text:p/>
        </draw:path>
        <draw:path draw:style-name="gr9" draw:text-style-name="P7" draw:layer="layout" svg:width="0.104cm" svg:height="0.105cm" svg:x="16.3cm" svg:y="19.76cm" svg:viewBox="0 0 105 106" svg:d="M105 51c1 27-24 54-53 55-26 0-50-21-52-48-3-32 18-57 47-58 29-2 57 21 58 51z">
          <text:p/>
        </draw:path>
        <draw:path draw:style-name="gr9" draw:text-style-name="P7" draw:layer="layout" svg:width="0.104cm" svg:height="0.105cm" svg:x="13.674cm" svg:y="26.183cm" svg:viewBox="0 0 105 106" svg:d="M105 53c0 29-27 56-55 53-25-2-52-21-50-57 1-28 24-48 51-49 29 0 55 25 54 53z">
          <text:p/>
        </draw:path>
        <draw:path draw:style-name="gr9" draw:text-style-name="P7" draw:layer="layout" svg:width="0.105cm" svg:height="0.105cm" svg:x="5.498cm" svg:y="25.015cm" svg:viewBox="0 0 106 106" svg:d="M51 106c-28-2-53-30-51-57 2-29 28-51 58-49 31 2 51 27 47 58-2 26-28 49-54 48z">
          <text:p/>
        </draw:path>
        <draw:path draw:style-name="gr9" draw:text-style-name="P7" draw:layer="layout" svg:width="0.105cm" svg:height="0.105cm" svg:x="9.294cm" svg:y="27.059cm" svg:viewBox="0 0 106 106" svg:d="M106 52c0 30-23 54-53 54s-53-24-53-53c-1-30 22-53 52-53s54 22 54 52z">
          <text:p/>
        </draw:path>
        <draw:path draw:style-name="gr9" draw:text-style-name="P7" draw:layer="layout" svg:width="0.102cm" svg:height="0.103cm" svg:x="8.71cm" svg:y="27.06cm" svg:viewBox="0 0 103 104" svg:d="M103 49c2 30-22 55-51 55-26 0-51-22-52-49-2-29 23-55 53-55 27 0 49 23 50 49z">
          <text:p/>
        </draw:path>
        <draw:path draw:style-name="gr9" draw:text-style-name="P7" draw:layer="layout" svg:width="0.105cm" svg:height="0.104cm" svg:x="14.257cm" svg:y="16.256cm" svg:viewBox="0 0 106 105" svg:d="M106 53c1 28-24 52-53 52s-51-20-53-47c-2-29 21-56 50-58 28-2 55 24 56 53z">
          <text:p/>
        </draw:path>
        <draw:path draw:style-name="gr9" draw:text-style-name="P7" draw:layer="layout" svg:width="0.103cm" svg:height="0.102cm" svg:x="16.301cm" svg:y="19.469cm" svg:viewBox="0 0 104 103" svg:d="M50 0c29-1 55 27 54 54s-24 49-52 49c-28 1-50-19-52-47-2-30 21-56 50-56z">
          <text:p/>
        </draw:path>
        <draw:path draw:style-name="gr9" draw:text-style-name="P7" draw:layer="layout" svg:width="0.105cm" svg:height="0.105cm" svg:x="15.716cm" svg:y="23.847cm" svg:viewBox="0 0 106 106" svg:d="M106 53c1 29-23 53-53 53-29 1-53-22-53-51-1-32 21-55 52-55 29-1 54 22 54 53z">
          <text:p/>
        </draw:path>
        <draw:path draw:style-name="gr9" draw:text-style-name="P7" draw:layer="layout" svg:width="0.102cm" svg:height="0.103cm" svg:x="6.377cm" svg:y="25.891cm" svg:viewBox="0 0 103 104" svg:d="M54 104c-29 1-51-19-54-47-3-29 20-56 49-57 28-1 55 25 54 53s-22 49-49 51z">
          <text:p/>
        </draw:path>
        <draw:path draw:style-name="gr9" draw:text-style-name="P7" draw:layer="layout" svg:width="0.104cm" svg:height="0.104cm" svg:x="4.04cm" svg:y="21.221cm" svg:viewBox="0 0 105 105" svg:d="M54 105c-29 1-54-21-54-51-1-28 19-51 46-54 31-3 57 19 59 49 2 29-21 55-51 56z">
          <text:p/>
        </draw:path>
        <draw:path draw:style-name="gr9" draw:text-style-name="P7" draw:layer="layout" svg:width="0.104cm" svg:height="0.104cm" svg:x="4.329cm" svg:y="19.177cm" svg:viewBox="0 0 105 105" svg:d="M105 53c-1 29-27 54-55 52s-53-30-50-56c2-27 25-49 51-49 31-1 54 22 54 53z">
          <text:p/>
        </draw:path>
        <draw:path draw:style-name="gr9" draw:text-style-name="P7" draw:layer="layout" svg:width="0.102cm" svg:height="0.102cm" svg:x="15.133cm" svg:y="17.135cm" svg:viewBox="0 0 103 103" svg:d="M103 47c1 30-22 55-51 56-26 0-51-23-52-50-3-29 22-53 52-53 28 0 50 20 51 47z">
          <text:p/>
        </draw:path>
        <draw:path draw:style-name="gr9" draw:text-style-name="P7" draw:layer="layout" svg:width="0.104cm" svg:height="0.104cm" svg:x="4.04cm" svg:y="20.636cm" svg:viewBox="0 0 105 105" svg:d="M105 55c-1 29-27 52-57 50-29-2-51-28-48-57 2-27 25-48 52-48 31 0 54 25 53 55z">
          <text:p/>
        </draw:path>
        <draw:path draw:style-name="gr9" draw:text-style-name="P7" draw:layer="layout" svg:width="0.103cm" svg:height="0.103cm" svg:x="7.251cm" svg:y="26.475cm" svg:viewBox="0 0 104 104" svg:d="M104 50c1 25-21 51-47 54-30 3-56-22-57-51-1-28 20-51 47-53 29-2 55 21 57 50z">
          <text:p/>
        </draw:path>
        <draw:path draw:style-name="gr9" draw:text-style-name="P7" draw:layer="layout" svg:width="0.104cm" svg:height="0.105cm" svg:x="10.462cm" svg:y="14.797cm" svg:viewBox="0 0 105 106" svg:d="M50 0c29 0 55 24 55 53s-25 53-55 53c-27-1-48-22-50-49-1-31 20-56 50-57z">
          <text:p/>
        </draw:path>
        <draw:path draw:style-name="gr9" draw:text-style-name="P7" draw:layer="layout" svg:width="0.104cm" svg:height="0.104cm" svg:x="9.878cm" svg:y="14.797cm" svg:viewBox="0 0 105 105" svg:d="M56 0c29 2 52 29 49 58-2 26-25 47-52 47-30 1-53-23-53-53 1-31 25-53 56-52z">
          <text:p/>
        </draw:path>
        <draw:path draw:style-name="gr9" draw:text-style-name="P7" draw:layer="layout" svg:width="0.102cm" svg:height="0.101cm" svg:x="4.041cm" svg:y="20.347cm" svg:viewBox="0 0 103 102" svg:d="M50 102c-30-1-52-25-50-55 1-27 23-48 52-47 30 0 54 26 51 55-2 27-27 48-53 47z">
          <text:p/>
        </draw:path>
        <draw:path draw:style-name="gr9" draw:text-style-name="P7" draw:layer="layout" svg:width="0.103cm" svg:height="0.102cm" svg:x="5.208cm" svg:y="24.724cm" svg:viewBox="0 0 104 103" svg:d="M104 52c0 26-22 49-49 51-32 1-55-20-55-51 0-32 24-49 49-52 26-4 54 25 55 52z">
          <text:p/>
        </draw:path>
        <draw:path draw:style-name="gr9" draw:text-style-name="P7" draw:layer="layout" svg:width="0.103cm" svg:height="0.103cm" svg:x="15.717cm" svg:y="18.01cm" svg:viewBox="0 0 104 104" svg:d="M104 52c-1 26-23 50-49 52-30 1-55-25-55-54 1-27 23-49 50-50 30-1 55 23 54 52z">
          <text:p/>
        </draw:path>
        <draw:path draw:style-name="gr9" draw:text-style-name="P7" draw:layer="layout" svg:width="0.101cm" svg:height="0.101cm" svg:x="9.296cm" svg:y="14.799cm" svg:viewBox="0 0 102 102" svg:d="M102 48c1 26-20 50-46 54-29 3-57-24-56-52 0-27 23-50 51-50 26-1 50 21 51 48z">
          <text:p/>
        </draw:path>
        <draw:path draw:style-name="gr9" draw:text-style-name="P7" draw:layer="layout" svg:width="0.102cm" svg:height="0.102cm" svg:x="4.041cm" svg:y="21.806cm" svg:viewBox="0 0 103 103" svg:d="M103 48c2 29-25 56-53 55-26 0-49-22-50-50-2-27 18-51 45-53 30-3 57 19 58 48z">
          <text:p/>
        </draw:path>
        <draw:path draw:style-name="gr9" draw:text-style-name="P7" draw:layer="layout" svg:width="0.104cm" svg:height="0.105cm" svg:x="4.915cm" svg:y="24.139cm" svg:viewBox="0 0 105 106" svg:d="M105 54c0 31-25 55-54 52-28-2-50-24-51-51-2-27 26-54 53-55 29 0 53 25 52 54z">
          <text:p/>
        </draw:path>
        <draw:path draw:style-name="gr9" draw:text-style-name="P7" draw:layer="layout" svg:width="0.104cm" svg:height="0.104cm" svg:x="13.38cm" svg:y="15.672cm" svg:viewBox="0 0 105 105" svg:d="M105 55c-1 32-25 53-56 50-27-1-49-25-49-51-1-27 25-54 53-54s53 26 52 55z">
          <text:p/>
        </draw:path>
        <draw:path draw:style-name="gr9" draw:text-style-name="P7" draw:layer="layout" svg:width="0.101cm" svg:height="0.101cm" svg:x="11.922cm" svg:y="27.061cm" svg:viewBox="0 0 102 102" svg:d="M53 102c-26 1-51-21-53-49-2-25 20-50 46-53 30-3 57 21 56 51 0 27-22 50-49 51z">
          <text:p/>
        </draw:path>
        <draw:path draw:style-name="gr9" draw:text-style-name="P7" draw:layer="layout" svg:width="0.101cm" svg:height="0.102cm" svg:x="4.041cm" svg:y="20.053cm" svg:viewBox="0 0 102 103" svg:d="M52 103c-28-1-51-23-52-50-1-29 26-55 55-53 26 3 49 28 47 53-1 27-24 50-50 50z">
          <text:p/>
        </draw:path>
        <draw:path draw:style-name="gr9" draw:text-style-name="P7" draw:layer="layout" svg:width="0.104cm" svg:height="0.105cm" svg:x="8.419cm" svg:y="15.089cm" svg:viewBox="0 0 105 106" svg:d="M105 50c3 27-23 55-52 56-27 1-50-19-53-47-2-30 18-56 48-59 27-3 55 22 57 50z">
          <text:p/>
        </draw:path>
        <draw:path draw:style-name="gr9" draw:text-style-name="P7" draw:layer="layout" svg:width="0.105cm" svg:height="0.104cm" svg:x="6.666cm" svg:y="15.967cm" svg:viewBox="0 0 106 105" svg:d="M106 50c0 29-24 55-53 55-30-1-53-26-53-56 1-27 22-48 50-49 30-2 55 20 56 50z">
          <text:p/>
        </draw:path>
        <draw:path draw:style-name="gr9" draw:text-style-name="P7" draw:layer="layout" svg:width="0.102cm" svg:height="0.103cm" svg:x="9.586cm" svg:y="14.798cm" svg:viewBox="0 0 103 104" svg:d="M52 104c-29 0-54-26-52-55 2-28 24-48 51-49 30 0 53 24 52 55-2 27-24 49-51 49z">
          <text:p/>
        </draw:path>
        <draw:path draw:style-name="gr9" draw:text-style-name="P7" draw:layer="layout" svg:width="0.103cm" svg:height="0.102cm" svg:x="4.04cm" svg:y="21.512cm" svg:viewBox="0 0 104 103" svg:d="M104 50c1 27-21 51-47 53-31 2-56-19-57-50 0-29 25-54 53-53 27 1 50 24 51 50z">
          <text:p/>
        </draw:path>
        <draw:path draw:style-name="gr9" draw:text-style-name="P7" draw:layer="layout" svg:width="0.102cm" svg:height="0.102cm" svg:x="4.625cm" svg:y="18.3cm" svg:viewBox="0 0 103 103" svg:d="M103 55c-1 29-27 51-57 48-27-2-48-24-46-53 1-26 24-49 50-50 28-1 55 28 53 55z">
          <text:p/>
        </draw:path>
        <draw:path draw:style-name="gr9" draw:text-style-name="P7" draw:layer="layout" svg:width="0.103cm" svg:height="0.101cm" svg:x="7.836cm" svg:y="26.768cm" svg:viewBox="0 0 104 102" svg:d="M52 0c30 1 54 29 51 57-4 26-27 46-55 45-30-1-51-25-48-57 2-26 25-47 52-45z">
          <text:p/>
        </draw:path>
        <draw:path draw:style-name="gr9" draw:text-style-name="P7" draw:layer="layout" svg:width="0.102cm" svg:height="0.103cm" svg:x="16.009cm" svg:y="18.594cm" svg:viewBox="0 0 103 104" svg:d="M103 52c0 27-22 50-48 52-28 1-55-24-55-53 1-29 25-53 55-51 27 1 49 24 48 52z">
          <text:p/>
        </draw:path>
        <draw:path draw:style-name="gr9" draw:text-style-name="P7" draw:layer="layout" svg:width="0.103cm" svg:height="0.103cm" svg:x="7.542cm" svg:y="15.382cm" svg:viewBox="0 0 104 104" svg:d="M49 104c-29-2-53-31-49-58 4-28 26-47 53-46 31 1 52 26 50 56-3 28-28 49-54 48z">
          <text:p/>
        </draw:path>
        <draw:path draw:style-name="gr9" draw:text-style-name="P7" draw:layer="layout" svg:width="0.103cm" svg:height="0.103cm" svg:x="13.964cm" svg:y="15.967cm" svg:viewBox="0 0 104 104" svg:d="M55 104c-27 2-55-26-55-53s23-49 49-51c29-1 52 18 55 45 2 30-19 57-49 59z">
          <text:p/>
        </draw:path>
        <draw:path draw:style-name="gr9" draw:text-style-name="P7" draw:layer="layout" svg:width="0.102cm" svg:height="0.102cm" svg:x="6.959cm" svg:y="15.673cm" svg:viewBox="0 0 103 103" svg:d="M55 0c30 3 51 29 48 59-3 29-25 46-55 44-30-1-52-29-47-58 4-25 30-47 54-45z">
          <text:p/>
        </draw:path>
        <draw:path draw:style-name="gr9" draw:text-style-name="P7" draw:layer="layout" svg:width="0.101cm" svg:height="0.101cm" svg:x="4.625cm" svg:y="23.849cm" svg:viewBox="0 0 102 102" svg:d="M51 102c-28 0-50-22-51-49 0-28 21-51 49-53s55 25 53 54c-1 26-25 49-51 48z">
          <text:p/>
        </draw:path>
        <draw:path draw:style-name="gr9" draw:text-style-name="P7" draw:layer="layout" svg:width="0.102cm" svg:height="0.102cm" svg:x="4.331cm" svg:y="22.973cm" svg:viewBox="0 0 103 103" svg:d="M52 103c-28 0-55-28-52-55 2-26 26-48 53-48 30 0 52 24 50 55-2 27-24 48-51 48z">
          <text:p/>
        </draw:path>
        <draw:path draw:style-name="gr9" draw:text-style-name="P7" draw:layer="layout" svg:width="0.102cm" svg:height="0.103cm" svg:x="10.754cm" svg:y="14.798cm" svg:viewBox="0 0 103 104" svg:d="M103 55c-1 27-23 49-49 49-29 0-56-26-54-54 2-30 29-52 58-50 27 3 46 26 45 55z">
          <text:p/>
        </draw:path>
        <draw:path draw:style-name="gr9" draw:text-style-name="P7" draw:layer="layout" svg:width="0.101cm" svg:height="0.101cm" svg:x="16.302cm" svg:y="22.681cm" svg:viewBox="0 0 102 102" svg:d="M102 54c-4 26-25 52-59 47-27-4-46-30-43-57 3-26 32-48 56-44 26 4 48 30 46 54z">
          <text:p/>
        </draw:path>
        <draw:path draw:style-name="gr9" draw:text-style-name="P7" draw:layer="layout" svg:width="0.101cm" svg:height="0.099cm" svg:x="6.668cm" svg:y="26.186cm" svg:viewBox="0 0 102 100" svg:d="M47 0c29-2 52 18 55 45 3 28-22 56-51 55-29 0-50-22-51-49s20-50 47-51z">
          <text:p/>
        </draw:path>
        <draw:path draw:style-name="gr9" draw:text-style-name="P7" draw:layer="layout" svg:width="0.102cm" svg:height="0.103cm" svg:x="11.047cm" svg:y="14.798cm" svg:viewBox="0 0 103 104" svg:d="M103 51c1 25-21 50-47 53-29 3-55-20-56-50-1-29 19-52 47-54 29-2 55 21 56 51z">
          <text:p/>
        </draw:path>
        <draw:path draw:style-name="gr9" draw:text-style-name="P7" draw:layer="layout" svg:width="0.101cm" svg:height="0.102cm" svg:x="13.09cm" svg:y="15.383cm" svg:viewBox="0 0 102 103" svg:d="M102 48c2 25-21 50-47 54-25 3-52-20-55-45-2-28 17-53 43-57 29-4 57 18 59 48z">
          <text:p/>
        </draw:path>
        <draw:path draw:style-name="gr9" draw:text-style-name="P7" draw:layer="layout" svg:width="0.101cm" svg:height="0.102cm" svg:x="11.338cm" svg:y="14.799cm" svg:viewBox="0 0 102 103" svg:d="M54 103c-24 2-51-21-54-47-3-24 19-52 45-55 29-5 56 20 57 49 0 27-21 51-48 53z">
          <text:p/>
        </draw:path>
        <draw:path draw:style-name="gr9" draw:text-style-name="P7" draw:layer="layout" svg:width="0.1cm" svg:height="0.101cm" svg:x="13.382cm" svg:y="26.476cm" svg:viewBox="0 0 101 102" svg:d="M101 52c0 27-23 50-50 50-26 0-49-22-51-49-2-29 25-55 53-53 23 1 50 20 48 52z">
          <text:p/>
        </draw:path>
        <draw:path draw:style-name="gr9" draw:text-style-name="P7" draw:layer="layout" svg:width="0.102cm" svg:height="0.102cm" svg:x="4.916cm" svg:y="17.717cm" svg:viewBox="0 0 103 103" svg:d="M103 53c0 28-21 49-48 50-30 1-56-24-55-51 1-29 27-54 57-52 26 2 46 25 46 53z">
          <text:p/>
        </draw:path>
        <draw:path draw:style-name="gr9" draw:text-style-name="P7" draw:layer="layout" svg:width="0.101cm" svg:height="0.101cm" svg:x="4.041cm" svg:y="22.096cm" svg:viewBox="0 0 102 102" svg:d="M54 0c26 2 49 26 48 52 0 30-26 53-57 50-26-2-47-27-45-55 3-26 28-48 54-47z">
          <text:p/>
        </draw:path>
        <draw:path draw:style-name="gr9" draw:text-style-name="P7" draw:layer="layout" svg:width="0.101cm" svg:height="0.1cm" svg:x="16.302cm" svg:y="19.179cm" svg:viewBox="0 0 102 101" svg:d="M102 52c-2 27-27 50-52 49-30-1-53-27-50-57 3-27 26-46 55-44 26 1 49 26 47 52z">
          <text:p/>
        </draw:path>
        <draw:path draw:style-name="gr9" draw:text-style-name="P7" draw:layer="layout" svg:width="0.101cm" svg:height="0.1cm" svg:x="15.134cm" svg:y="25.017cm" svg:viewBox="0 0 102 101" svg:d="M102 53c-1 27-25 49-52 48-28 0-53-28-50-56 4-28 28-47 55-45 28 2 49 25 47 53z">
          <text:p/>
        </draw:path>
        <draw:path draw:style-name="gr9" draw:text-style-name="P7" draw:layer="layout" svg:width="0.101cm" svg:height="0.101cm" svg:x="5.5cm" svg:y="16.842cm" svg:viewBox="0 0 102 102" svg:d="M102 47c2 28-18 52-45 55-30 2-56-22-57-52 0-25 24-49 51-50 25-2 50 21 51 47z">
          <text:p/>
        </draw:path>
        <draw:path draw:style-name="gr9" draw:text-style-name="P7" draw:layer="layout" svg:width="0.099cm" svg:height="0.1cm" svg:x="5.793cm" svg:y="16.552cm" svg:viewBox="0 0 100 101" svg:d="M100 49c0 28-22 51-49 52-28 2-54-25-51-54 1-28 23-47 51-47 26 0 48 19 49 49z">
          <text:p/>
        </draw:path>
        <draw:path draw:style-name="gr9" draw:text-style-name="P7" draw:layer="layout" svg:width="0.099cm" svg:height="0.1cm" svg:x="4.626cm" svg:y="18.011cm" svg:viewBox="0 0 100 101" svg:d="M52 101c-27 1-51-22-52-49s21-50 49-52c25-1 49 22 51 48 1 26-22 52-48 53z">
          <text:p/>
        </draw:path>
        <draw:path draw:style-name="gr9" draw:text-style-name="P7" draw:layer="layout" svg:width="0.1cm" svg:height="0.1cm" svg:x="4.332cm" svg:y="18.887cm" svg:viewBox="0 0 101 101" svg:d="M50 101c-33 0-50-26-50-50 0-33 25-52 54-51 28 1 48 25 47 52-1 29-22 49-51 49z">
          <text:p/>
        </draw:path>
        <draw:path draw:style-name="gr9" draw:text-style-name="P7" draw:layer="layout" svg:width="0.101cm" svg:height="0.1cm" svg:x="14.549cm" svg:y="25.602cm" svg:viewBox="0 0 102 101" svg:d="M49 101c-27-1-49-25-49-51 0-30 26-52 57-50 27 3 47 27 45 55-2 26-27 48-53 46z">
          <text:p/>
        </draw:path>
        <draw:path draw:style-name="gr9" draw:text-style-name="P7" draw:layer="layout" svg:width="0.099cm" svg:height="0.101cm" svg:x="14.843cm" svg:y="25.308cm" svg:viewBox="0 0 100 102" svg:d="M47 0c26-1 51 21 53 48 2 28-17 51-45 54-31 2-55-19-55-50 0-27 21-51 47-52z">
          <text:p/>
        </draw:path>
        <draw:path draw:style-name="gr9" draw:text-style-name="P7" draw:layer="layout" svg:width="0.097cm" svg:height="0.1cm" svg:x="4.334cm" svg:y="23.266cm" svg:viewBox="0 0 98 101" svg:d="M98 53c-1 27-25 49-51 48-27-2-48-25-47-53 1-26 25-49 50-48 27 1 49 25 48 53z">
          <text:p/>
        </draw:path>
        <draw:path draw:style-name="gr9" draw:text-style-name="P7" draw:layer="layout" svg:width="0.101cm" svg:height="0.101cm" svg:x="6.084cm" svg:y="16.258cm" svg:viewBox="0 0 102 102" svg:d="M102 53c-1 28-24 49-51 49-28-1-51-23-51-51s29-54 56-51 48 27 46 53z">
          <text:p/>
        </draw:path>
        <draw:path draw:style-name="gr9" draw:text-style-name="P7" draw:layer="layout" svg:width="0.1cm" svg:height="0.101cm" svg:x="14.259cm" svg:y="25.892cm" svg:viewBox="0 0 101 102" svg:d="M101 53c-1 27-24 49-51 49-29 0-52-25-50-55 2-26 28-49 53-47 26 2 50 28 48 53z">
          <text:p/>
        </draw:path>
        <draw:path draw:style-name="gr9" draw:text-style-name="P7" draw:layer="layout" svg:width="0.099cm" svg:height="0.101cm" svg:x="15.426cm" svg:y="17.427cm" svg:viewBox="0 0 100 102" svg:d="M100 48c1 28-18 51-45 54-29 2-55-22-55-52 0-26 24-49 50-50 25-1 49 21 50 48z">
          <text:p/>
        </draw:path>
        <draw:path draw:style-name="gr9" draw:text-style-name="P7" draw:layer="layout" svg:width="0.097cm" svg:height="0.099cm" svg:x="4.919cm" svg:y="24.434cm" svg:viewBox="0 0 98 100" svg:d="M52 100c-25 2-50-21-52-48s19-50 46-52 51 19 52 46c2 34-24 50-46 54z">
          <text:p/>
        </draw:path>
        <draw:path draw:style-name="gr9" draw:text-style-name="P7" draw:layer="layout" svg:width="0.098cm" svg:height="0.099cm" svg:x="7.253cm" svg:y="15.384cm" svg:viewBox="0 0 99 100" svg:d="M46 100c-26-2-48-26-46-52 1-27 24-50 52-48 27 1 49 27 47 52-2 26-27 49-53 48z">
          <text:p/>
        </draw:path>
        <draw:path draw:style-name="gr9" draw:text-style-name="P7" draw:layer="layout" svg:width="0.098cm" svg:height="0.1cm" svg:x="16.595cm" svg:y="20.638cm" svg:viewBox="0 0 99 101" svg:d="M99 51c0 27-22 50-49 50-26 0-50-24-50-50 1-27 23-51 51-51 26 0 48 24 48 51z">
          <text:p/>
        </draw:path>
        <draw:path draw:style-name="gr9" draw:text-style-name="P7" draw:layer="layout" svg:width="0.097cm" svg:height="0.099cm" svg:x="8.422cm" svg:y="27.062cm" svg:viewBox="0 0 98 100" svg:d="M50 0c27 1 49 25 48 52 0 26-25 49-51 48s-48-24-47-51c0-27 24-50 50-49z">
          <text:p/>
        </draw:path>
        <draw:path draw:style-name="gr9" draw:text-style-name="P7" draw:layer="layout" svg:width="0.101cm" svg:height="0.098cm" svg:x="8.127cm" svg:y="15.093cm" svg:viewBox="0 0 102 99" svg:d="M50 0c27-2 50 18 52 45 1 29-18 52-45 54-29 2-57-20-57-49-1-26 22-49 50-50z">
          <text:p/>
        </draw:path>
        <draw:path draw:style-name="gr9" draw:text-style-name="P7" draw:layer="layout" svg:width="0.098cm" svg:height="0.097cm" svg:x="15.136cm" svg:y="16.843cm" svg:viewBox="0 0 99 98" svg:d="M51 98c-27 1-52-25-51-50 1-23 22-46 46-48 25-3 51 20 53 46 1 26-22 51-48 52z">
          <text:p/>
        </draw:path>
        <draw:path draw:style-name="gr9" draw:text-style-name="P7" draw:layer="layout" svg:width="0.098cm" svg:height="0.1cm" svg:x="16.595cm" svg:y="21.223cm" svg:viewBox="0 0 99 101" svg:d="M50 0c27 0 49 24 49 51s-22 50-49 50c-26 0-50-24-50-50 1-27 23-51 50-51z">
          <text:p/>
        </draw:path>
        <draw:path draw:style-name="gr9" draw:text-style-name="P7" draw:layer="layout" svg:width="0.096cm" svg:height="0.097cm" svg:x="8.129cm" svg:y="27.062cm" svg:viewBox="0 0 97 98" svg:d="M45 0c25-3 51 20 52 47s-23 51-49 51c-23 0-46-20-48-44-3-26 18-52 45-54z">
          <text:p/>
        </draw:path>
        <draw:path draw:style-name="gr9" draw:text-style-name="P7" draw:layer="layout" svg:width="0.097cm" svg:height="0.097cm" svg:x="6.086cm" svg:y="25.894cm" svg:viewBox="0 0 98 98" svg:d="M98 50c-1 27-27 50-52 48-26-1-49-28-46-54 3-23 26-44 48-44 27 0 52 25 50 50z">
          <text:p/>
        </draw:path>
        <draw:path draw:style-name="gr9" draw:text-style-name="P7" draw:layer="layout" svg:width="0.1cm" svg:height="0.098cm" svg:x="4.042cm" svg:y="22.391cm" svg:viewBox="0 0 101 99" svg:d="M50 99c-27 0-50-22-50-50 0-26 22-48 49-49 28 0 51 22 52 48 0 27-24 51-51 51z">
          <text:p/>
        </draw:path>
        <draw:path draw:style-name="gr9" draw:text-style-name="P7" draw:layer="layout" svg:width="0.097cm" svg:height="0.098cm" svg:x="8.712cm" svg:y="14.8cm" svg:viewBox="0 0 98 99" svg:d="M45 99c-26-2-49-31-45-55 4-26 31-48 55-43 25 4 44 27 43 50-1 26-27 51-53 48z">
          <text:p/>
        </draw:path>
        <draw:path draw:style-name="gr9" draw:text-style-name="P7" draw:layer="layout" svg:width="0.097cm" svg:height="0.096cm" svg:x="5.503cm" svg:y="25.311cm" svg:viewBox="0 0 98 97" svg:d="M47 0c26-1 51 22 51 48 0 24-20 47-45 49-26 3-51-19-53-46-2-25 20-50 47-51z">
          <text:p/>
        </draw:path>
        <draw:path draw:style-name="gr9" draw:text-style-name="P7" draw:layer="layout" svg:width="0.098cm" svg:height="0.096cm" svg:x="14.551cm" svg:y="16.261cm" svg:viewBox="0 0 99 97" svg:d="M49 0c26-1 50 24 50 50-1 26-25 48-52 47-24-1-45-22-47-45-2-25 22-52 49-52z">
          <text:p/>
        </draw:path>
        <draw:path draw:style-name="gr9" draw:text-style-name="P7" draw:layer="layout" svg:width="0.095cm" svg:height="0.095cm" svg:x="15.721cm" svg:y="24.435cm" svg:viewBox="0 0 96 96" svg:d="M50 0c24 2 45 23 46 47 1 26-24 50-50 49-24-2-46-22-46-47-1-25 25-50 50-49z">
          <text:p/>
        </draw:path>
        <draw:path draw:style-name="gr9" draw:text-style-name="P7" draw:layer="layout" svg:width="0.102cm" svg:height="0.101cm" svg:x="12.215cm" svg:y="15.091cm" svg:viewBox="0 0 103 102" svg:d="M103 52c0 29-25 52-55 50-28-1-48-23-48-50 1-27 16-49 48-52 29-3 55 23 55 52z">
          <text:p/>
        </draw:path>
        <draw:path draw:style-name="gr9" draw:text-style-name="P7" draw:layer="layout" svg:width="0.097cm" svg:height="0.096cm" svg:x="4.043cm" svg:y="19.473cm" svg:viewBox="0 0 98 97" svg:d="M98 49c0 27-26 50-52 48-26-1-49-27-46-53 4-27 23-43 48-44 26-1 51 23 50 49z">
          <text:p/>
        </draw:path>
        <draw:path draw:style-name="gr9" draw:text-style-name="P7" draw:layer="layout" svg:width="0.098cm" svg:height="0.098cm" svg:x="10.757cm" svg:y="27.353cm" svg:viewBox="0 0 99 99" svg:d="M99 53c-1 27-24 47-53 46-27-2-48-25-46-52 2-28 25-48 52-47 28 2 48 24 47 53z">
          <text:p/>
        </draw:path>
        <draw:path draw:style-name="gr9" draw:text-style-name="P7" draw:layer="layout" svg:width="0.097cm" svg:height="0.097cm" svg:x="16.596cm" svg:y="21.515cm" svg:viewBox="0 0 98 98" svg:d="M50 0c28 0 48 22 48 49 0 29-21 49-49 49-35 0-50-28-49-50 0-27 22-48 50-48z">
          <text:p/>
        </draw:path>
        <draw:path draw:style-name="gr9" draw:text-style-name="P7" draw:layer="layout" svg:width="0.097cm" svg:height="0.097cm" svg:x="4.043cm" svg:y="22.684cm" svg:viewBox="0 0 98 98" svg:d="M51 98c-27 1-51-22-51-48s24-50 50-50c23 1 45 22 48 46 3 25-21 51-47 52z">
          <text:p/>
        </draw:path>
        <draw:path draw:style-name="gr9" draw:text-style-name="P7" draw:layer="layout" svg:width="0.101cm" svg:height="0.098cm" svg:x="15.718cm" svg:y="24.143cm" svg:viewBox="0 0 102 99" svg:d="M102 49c1 26-22 49-49 50-28 2-50-17-53-44-2-30 20-55 51-55 26 0 50 23 51 49z">
          <text:p/>
        </draw:path>
        <draw:path draw:style-name="gr9" draw:text-style-name="P7" draw:layer="layout" svg:width="0.099cm" svg:height="0.096cm" svg:x="13.966cm" svg:y="26.187cm" svg:viewBox="0 0 100 97" svg:d="M99 52c-1 27-25 47-53 45-27-1-50-26-46-52 3-27 25-47 53-45 27 1 48 24 46 52z">
          <text:p/>
        </draw:path>
        <draw:path draw:style-name="gr9" draw:text-style-name="P7" draw:layer="layout" svg:width="0.099cm" svg:height="0.097cm" svg:x="10.464cm" svg:y="27.353cm" svg:viewBox="0 0 100 98" svg:d="M47 98c-27-1-48-24-47-52 2-28 25-48 52-46 27 1 51 26 48 52-3 25-21 47-53 46z">
          <text:p/>
        </draw:path>
        <draw:path draw:style-name="gr9" draw:text-style-name="P7" draw:layer="layout" svg:width="0.098cm" svg:height="0.098cm" svg:x="10.172cm" svg:y="27.353cm" svg:viewBox="0 0 99 99" svg:d="M99 53c-2 27-24 47-53 46-27-2-48-25-46-53 2-27 25-47 52-46 28 2 48 25 47 53z">
          <text:p/>
        </draw:path>
        <draw:path draw:style-name="gr9" draw:text-style-name="P7" draw:layer="layout" svg:width="0.099cm" svg:height="0.097cm" svg:x="16.303cm" svg:y="22.975cm" svg:viewBox="0 0 100 98" svg:d="M100 49c0 26-25 49-51 49-28 0-50-22-49-49 0-27 22-49 49-49 34 0 49 28 51 49z">
          <text:p/>
        </draw:path>
        <draw:path draw:style-name="gr9" draw:text-style-name="P7" draw:layer="layout" svg:width="0.097cm" svg:height="0.099cm" svg:x="6.379cm" svg:y="15.969cm" svg:viewBox="0 0 98 100" svg:d="M98 48c0 27-21 50-47 52-25 1-50-21-51-48-1-28 20-51 47-52s50 21 51 48z">
          <text:p/>
        </draw:path>
        <draw:path draw:style-name="gr9" draw:text-style-name="P7" draw:layer="layout" svg:width="0.098cm" svg:height="0.098cm" svg:x="11.924cm" svg:y="14.8cm" svg:viewBox="0 0 99 99" svg:d="M46 98c-25-2-49-30-46-54 4-26 31-48 55-44 25 4 44 26 44 49-1 26-27 51-53 49z">
          <text:p/>
        </draw:path>
        <draw:path draw:style-name="gr9" draw:text-style-name="P7" draw:layer="layout" svg:width="0.099cm" svg:height="0.098cm" svg:x="13.676cm" svg:y="15.676cm" svg:viewBox="0 0 100 99" svg:d="M100 48c2 25-22 50-49 51s-50-21-51-48 20-49 47-51c27-1 51 21 53 48z">
          <text:p/>
        </draw:path>
        <draw:path draw:style-name="gr9" draw:text-style-name="P7" draw:layer="layout" svg:width="0.099cm" svg:height="0.098cm" svg:x="16.011cm" svg:y="23.558cm" svg:viewBox="0 0 100 99" svg:d="M49 99c-28 0-49-21-49-49 0-29 24-52 54-50 29 2 47 24 46 53-1 27-22 46-51 46z">
          <text:p/>
        </draw:path>
        <draw:path draw:style-name="gr9" draw:text-style-name="P7" draw:layer="layout" svg:width="0.096cm" svg:height="0.098cm" svg:x="16.013cm" svg:y="18.303cm" svg:viewBox="0 0 97 99" svg:d="M97 46c1 29-18 51-46 53-28 1-50-19-51-47-2-28 18-50 46-52 28-1 50 19 51 46z">
          <text:p/>
        </draw:path>
        <draw:path draw:style-name="gr9" draw:text-style-name="P7" draw:layer="layout" svg:width="0.097cm" svg:height="0.096cm" svg:x="16.596cm" svg:y="20.932cm" svg:viewBox="0 0 98 97" svg:d="M98 52c-1 27-23 46-51 45-33 0-48-27-47-50 0-28 23-48 52-47 27 1 47 23 46 52z">
          <text:p/>
        </draw:path>
        <draw:path draw:style-name="gr9" draw:text-style-name="P7" draw:layer="layout" svg:width="0.096cm" svg:height="0.097cm" svg:x="15.428cm" svg:y="24.727cm" svg:viewBox="0 0 97 98" svg:d="M97 50c0 29-23 49-51 48-27 0-47-22-46-51 0-31 23-47 49-47 29 0 49 22 48 50z">
          <text:p/>
        </draw:path>
        <draw:path draw:style-name="gr9" draw:text-style-name="P7" draw:layer="layout" svg:width="0.1cm" svg:height="0.097cm" svg:x="9.88cm" svg:y="27.354cm" svg:viewBox="0 0 101 98" svg:d="M52 98c-27 1-50-20-52-48-1-26 21-49 48-50s51 20 53 47c1 26-22 50-49 51z">
          <text:p/>
        </draw:path>
        <draw:path draw:style-name="gr9" draw:text-style-name="P7" draw:layer="layout" svg:width="0.098cm" svg:height="0.096cm" svg:x="5.21cm" svg:y="17.137cm" svg:viewBox="0 0 99 97" svg:d="M47 0c28-1 52 20 52 47 0 22-14 49-49 50-28 1-49-20-50-48s20-49 47-49z">
          <text:p/>
        </draw:path>
        <draw:path draw:style-name="gr9" draw:text-style-name="P7" draw:layer="layout" svg:width="0.097cm" svg:height="0.096cm" svg:x="7.546cm" svg:y="26.771cm" svg:viewBox="0 0 98 97" svg:d="M49 0c28 0 49 21 49 48 0 29-21 49-50 49-28 0-49-19-48-49 0-30 20-48 49-48z">
          <text:p/>
        </draw:path>
        <draw:path draw:style-name="gr9" draw:text-style-name="P7" draw:layer="layout" svg:width="0.099cm" svg:height="0.098cm" svg:x="12.799cm" svg:y="26.77cm" svg:viewBox="0 0 100 99" svg:d="M49 0c29-1 50 18 51 46 2 29-17 51-44 53-31 2-56-19-56-49 0-28 21-50 49-50z">
          <text:p/>
        </draw:path>
        <draw:path draw:style-name="gr9" draw:text-style-name="P7" draw:layer="layout" svg:width="0.095cm" svg:height="0.095cm" svg:x="9.59cm" svg:y="27.355cm" svg:viewBox="0 0 96 96" svg:d="M96 48c0 27-21 49-49 48-28 0-48-22-47-51 1-25 20-44 46-45 28-1 50 19 50 48z">
          <text:p/>
        </draw:path>
        <draw:path draw:style-name="gr9" draw:text-style-name="P7" draw:layer="layout" svg:width="0.099cm" svg:height="0.097cm" svg:x="4.042cm" svg:y="19.763cm" svg:viewBox="0 0 100 98" svg:d="M100 47c2 26-21 50-48 51-28 1-51-20-52-47-1-26 21-50 48-51 28 0 51 20 52 47z">
          <text:p/>
        </draw:path>
        <draw:path draw:style-name="gr9" draw:text-style-name="P7" draw:layer="layout" svg:width="0.095cm" svg:height="0.098cm" svg:x="16.597cm" svg:y="20.055cm" svg:viewBox="0 0 96 99" svg:d="M47 0c22 1 51 19 49 50 0 28-25 50-51 49-24-2-44-22-45-48s21-51 47-51z">
          <text:p/>
        </draw:path>
        <draw:path draw:style-name="gr9" draw:text-style-name="P7" draw:layer="layout" svg:width="0.097cm" svg:height="0.095cm" svg:x="9.298cm" svg:y="27.355cm" svg:viewBox="0 0 98 96" svg:d="M98 49c0 21-19 48-51 47-27-1-49-25-47-52 2-24 22-43 47-44 28-1 52 22 51 49z">
          <text:p/>
        </draw:path>
        <draw:path draw:style-name="gr9" draw:text-style-name="P7" draw:layer="layout" svg:width="0.096cm" svg:height="0.099cm" svg:x="9.006cm" svg:y="14.8cm" svg:viewBox="0 0 97 100" svg:d="M46 100c-26-1-47-24-46-51 0-27 24-50 49-49 28 2 49 24 48 52-1 27-24 50-51 48z">
          <text:p/>
        </draw:path>
        <draw:path draw:style-name="gr9" draw:text-style-name="P7" draw:layer="layout" svg:width="0.094cm" svg:height="0.096cm" svg:x="13.678cm" svg:y="26.478cm" svg:viewBox="0 0 95 97" svg:d="M46 97c-26-1-50-28-46-53 2-23 25-44 48-44 25 1 48 25 46 52-2 25-25 46-48 45z">
          <text:p/>
        </draw:path>
        <draw:path draw:style-name="gr9" draw:text-style-name="P7" draw:layer="layout" svg:width="0.097cm" svg:height="0.099cm" svg:x="12.217cm" svg:y="27.062cm" svg:viewBox="0 0 98 100" svg:d="M98 49c1 27-20 50-47 51-26 1-50-21-51-48 0-27 21-51 48-52 26-1 49 22 50 49z">
          <text:p/>
        </draw:path>
        <draw:path draw:style-name="gr9" draw:text-style-name="P7" draw:layer="layout" svg:width="0.1cm" svg:height="0.096cm" svg:x="12.507cm" svg:y="15.094cm" svg:viewBox="0 0 101 97" svg:d="M49 0c27-1 50 19 52 47 1 26-22 49-49 50s-51-20-52-46c-1-28 22-50 49-51z">
          <text:p/>
        </draw:path>
        <draw:path draw:style-name="gr9" draw:text-style-name="P7" draw:layer="layout" svg:width="0.093cm" svg:height="0.092cm" svg:x="12.803cm" svg:y="15.096cm" svg:viewBox="0 0 94 93" svg:d="M43 93c-25-1-43-21-43-46 0-29 22-49 50-47 24 1 44 21 44 47 0 27-24 48-51 46z">
          <text:p/>
        </draw:path>
        <draw:path draw:style-name="gr9" draw:text-style-name="P7" draw:layer="layout" svg:width="0.097cm" svg:height="0.095cm" svg:x="6.67cm" svg:y="15.678cm" svg:viewBox="0 0 98 96" svg:d="M98 46c2 25-21 49-48 50-32 1-50-27-50-48-1-24 20-46 44-48 27-2 52 18 54 46z">
          <text:p/>
        </draw:path>
        <draw:path draw:style-name="gr9" draw:text-style-name="P7" draw:layer="layout" svg:width="0.097cm" svg:height="0.099cm" svg:x="11.632cm" svg:y="14.8cm" svg:viewBox="0 0 98 100" svg:d="M52 0c27 2 47 25 46 53-1 26-26 50-51 47-28-2-48-25-47-52s25-50 52-48z">
          <text:p/>
        </draw:path>
        <draw:path draw:style-name="gr9" draw:text-style-name="P7" draw:layer="layout" svg:width="0.095cm" svg:height="0.097cm" svg:x="4.921cm" svg:y="17.429cm" svg:viewBox="0 0 96 98" svg:d="M0 48c0-27 24-50 49-48 26 2 46 22 47 46 1 27-21 51-48 52-26 1-49-23-48-50z">
          <text:p/>
        </draw:path>
        <draw:path draw:style-name="gr9" draw:text-style-name="P7" draw:layer="layout" svg:width="0.094cm" svg:height="0.095cm" svg:x="16.304cm" svg:y="23.269cm" svg:viewBox="0 0 95 96" svg:d="M95 46c1 24-18 47-42 50-25 2-52-22-53-48-1-25 25-49 51-48 24 1 43 21 44 46z">
          <text:p/>
        </draw:path>
        <draw:path draw:style-name="gr9" draw:text-style-name="P7" draw:layer="layout" svg:width="0.097cm" svg:height="0.095cm" svg:x="16.303cm" svg:y="18.89cm" svg:viewBox="0 0 98 96" svg:d="M98 44c2 27-19 51-47 52-27 1-50-21-51-48 0-24 20-46 44-48 28-2 52 17 54 44z">
          <text:p/>
        </draw:path>
        <draw:path draw:style-name="gr9" draw:text-style-name="P7" draw:layer="layout" svg:width="0.093cm" svg:height="0.092cm" svg:x="6.672cm" svg:y="26.48cm" svg:viewBox="0 0 94 93" svg:d="M94 44c1 25-19 47-43 49-23 2-46-17-50-42-5-24 20-51 46-51 23-1 46 20 47 44z">
          <text:p/>
        </draw:path>
        <draw:path draw:style-name="gr9" draw:text-style-name="P7" draw:layer="layout" svg:width="0.094cm" svg:height="0.098cm" svg:x="6.964cm" svg:y="26.477cm" svg:viewBox="0 0 95 99" svg:d="M95 49c0 28-23 51-49 50-24-1-45-22-46-47-2-27 19-50 46-52 26-1 49 22 49 49z">
          <text:p/>
        </draw:path>
        <draw:path draw:style-name="gr9" draw:text-style-name="P7" draw:layer="layout" svg:width="0.097cm" svg:height="0.095cm" svg:x="15.72cm" svg:y="17.721cm" svg:viewBox="0 0 98 96" svg:d="M98 46c1 26-22 50-49 50-26 0-46-19-49-44s19-50 46-52c28-1 51 20 52 46z">
          <text:p/>
        </draw:path>
        <draw:path draw:style-name="gr9" draw:text-style-name="P7" draw:layer="layout" svg:width="0.094cm" svg:height="0.095cm" svg:x="5.795cm" svg:y="25.604cm" svg:viewBox="0 0 95 96" svg:d="M47 0c27-1 49 21 48 49 0 25-19 44-44 47-28 2-51-19-51-47-1-27 20-49 47-49z">
          <text:p/>
        </draw:path>
        <draw:path draw:style-name="gr9" draw:text-style-name="P7" draw:layer="layout" svg:width="0.094cm" svg:height="0.095cm" svg:x="14.845cm" svg:y="16.554cm" svg:viewBox="0 0 95 96" svg:d="M95 46c2 28-19 50-47 50-25 0-46-18-48-42-2-28 17-52 44-54 28-2 50 17 51 46z">
          <text:p/>
        </draw:path>
        <draw:path draw:style-name="gr9" draw:text-style-name="P7" draw:layer="layout" svg:width="0.094cm" svg:height="0.098cm" svg:x="16.014cm" svg:y="23.851cm" svg:viewBox="0 0 95 99" svg:d="M51 0c27 2 46 26 44 53s-29 49-53 45c-28-6-45-28-42-57 3-24 28-43 51-41z">
          <text:p/>
        </draw:path>
        <draw:path draw:style-name="gr9" draw:text-style-name="P7" draw:layer="layout" svg:width="0.096cm" svg:height="0.095cm" svg:x="12.509cm" svg:y="27.064cm" svg:viewBox="0 0 97 96" svg:d="M46 0c23-1 47 19 50 43 3 25-22 52-47 53-23 0-46-20-49-44-3-25 21-51 46-52z">
          <text:p/>
        </draw:path>
        <draw:path draw:style-name="gr9" draw:text-style-name="P7" draw:layer="layout" svg:width="0.095cm" svg:height="0.097cm" svg:x="16.597cm" svg:y="21.808cm" svg:viewBox="0 0 96 98" svg:d="M45 0c26-2 51 20 51 48 1 25-16 48-48 50-24 1-45-20-48-44-2-28 18-52 45-54z">
          <text:p/>
        </draw:path>
        <draw:path draw:style-name="gr9" draw:text-style-name="P7" draw:layer="layout" svg:width="0.096cm" svg:height="0.097cm" svg:x="4.335cm" svg:y="18.596cm" svg:viewBox="0 0 97 98" svg:d="M97 48c0 27-23 50-50 50-26 0-48-25-47-52 1-24 21-45 45-46 27-1 51 21 52 48z">
          <text:p/>
        </draw:path>
        <draw:path draw:style-name="gr9" draw:text-style-name="P7" draw:layer="layout" svg:width="0.094cm" svg:height="0.093cm" svg:x="11.343cm" svg:y="27.356cm" svg:viewBox="0 0 95 94" svg:d="M46 0c26 0 47 19 49 44 2 26-21 50-48 50-27 1-49-22-47-49 2-31 24-45 46-45z">
          <text:p/>
        </draw:path>
        <draw:path draw:style-name="gr9" draw:text-style-name="P7" draw:layer="layout" svg:width="0.095cm" svg:height="0.095cm" svg:x="11.049cm" svg:y="27.355cm" svg:viewBox="0 0 96 96" svg:d="M96 49c0 27-22 48-49 47s-48-24-47-52c2-24 22-43 48-44 27-1 49 21 48 49z">
          <text:p/>
        </draw:path>
        <draw:path draw:style-name="gr9" draw:text-style-name="P7" draw:layer="layout" svg:width="0.096cm" svg:height="0.094cm" svg:x="7.839cm" svg:y="15.095cm" svg:viewBox="0 0 97 95" svg:d="M97 49c-1 27-25 48-53 46-26-1-47-27-44-53 3-27 27-45 55-42 23 2 43 25 42 49z">
          <text:p/>
        </draw:path>
        <draw:path draw:style-name="gr9" draw:text-style-name="P7" draw:layer="layout" svg:width="0.092cm" svg:height="0.094cm" svg:x="5.212cm" svg:y="25.019cm" svg:viewBox="0 0 93 95" svg:d="M47 0c27 1 48 23 46 52-1 25-22 43-47 43-25-1-45-20-46-44-1-28 21-51 47-51z">
          <text:p/>
        </draw:path>
        <draw:path draw:style-name="gr9" draw:text-style-name="P7" draw:layer="layout" svg:width="0.093cm" svg:height="0.094cm" svg:x="14.262cm" svg:y="15.97cm" svg:viewBox="0 0 94 95" svg:d="M94 47c0 25-18 46-43 48-27 3-51-19-51-47-1-26 24-49 50-48 24 2 43 22 44 47z">
          <text:p/>
        </draw:path>
        <draw:path draw:style-name="gr9" draw:text-style-name="P7" draw:layer="layout" svg:width="0.095cm" svg:height="0.093cm" svg:x="4.044cm" svg:y="19.181cm" svg:viewBox="0 0 96 94" svg:d="M50 94c-27 1-51-21-50-47 1-25 22-46 45-47 27-2 51 21 51 49 0 23-22 44-46 45z">
          <text:p/>
        </draw:path>
        <draw:path draw:style-name="gr9" draw:text-style-name="P7" draw:layer="layout" svg:width="0.092cm" svg:height="0.093cm" svg:x="15.43cm" svg:y="17.138cm" svg:viewBox="0 0 93 94" svg:d="M93 50c0 24-20 44-46 44-28 1-48-20-47-48 1-25 20-45 45-46 28 0 49 23 48 50z">
          <text:p/>
        </draw:path>
        <draw:path draw:style-name="gr9" draw:text-style-name="P7" draw:layer="layout" svg:width="0.093cm" svg:height="0.095cm" svg:x="13.387cm" svg:y="15.385cm" svg:viewBox="0 0 94 96" svg:d="M47 96c-25 0-46-20-47-45-2-27 19-51 45-51 28 0 50 24 49 50-1 24-22 45-47 46z">
          <text:p/>
        </draw:path>
        <draw:path draw:style-name="gr9" draw:text-style-name="P7" draw:layer="layout" svg:width="0.092cm" svg:height="0.094cm" svg:x="6.381cm" svg:y="26.188cm" svg:viewBox="0 0 93 95" svg:d="M93 50c-1 25-20 45-46 45-27 0-49-23-47-51 1-24 23-44 47-44 27 0 48 22 46 50z">
          <text:p/>
        </draw:path>
        <draw:path draw:style-name="gr9" draw:text-style-name="P7" draw:layer="layout" svg:width="0.093cm" svg:height="0.095cm" svg:x="8.423cm" svg:y="14.802cm" svg:viewBox="0 0 94 96" svg:d="M48 0c26 0 48 24 46 51-1 25-25 46-47 45-24-1-45-21-47-46-1-26 22-51 48-50z">
          <text:p/>
        </draw:path>
        <draw:path draw:style-name="gr9" draw:text-style-name="P7" draw:layer="layout" svg:width="0.097cm" svg:height="0.094cm" svg:x="13.092cm" svg:y="26.772cm" svg:viewBox="0 0 98 95" svg:d="M98 46c-2 26-18 50-50 49-24 0-46-19-48-44-2-27 19-50 47-51 32-2 48 21 51 46z">
          <text:p/>
        </draw:path>
        <draw:path draw:style-name="gr9" draw:text-style-name="P7" draw:layer="layout" svg:width="0.094cm" svg:height="0.095cm" svg:x="16.597cm" svg:y="20.349cm" svg:viewBox="0 0 95 96" svg:d="M43 96c-27-1-46-24-43-52 2-25 22-44 47-44 27 0 49 23 48 50 0 28-23 48-52 46z">
          <text:p/>
        </draw:path>
        <draw:path draw:style-name="gr9" draw:text-style-name="P7" draw:layer="layout" svg:width="0.092cm" svg:height="0.094cm" svg:x="16.598cm" svg:y="22.101cm" svg:viewBox="0 0 93 95" svg:d="M93 44c2 26-20 51-47 51-23 0-45-21-46-45-2-28 19-50 47-50 25 0 45 20 46 44z">
          <text:p/>
        </draw:path>
        <draw:path draw:style-name="gr9" draw:text-style-name="P7" draw:layer="layout" svg:width="0.091cm" svg:height="0.091cm" svg:x="3.754cm" svg:y="20.935cm" svg:viewBox="0 0 92 92" svg:d="M45 92c-25 0-45-21-45-45-1-26 19-46 44-47 28-1 50 21 48 49-2 25-23 44-47 43z">
          <text:p/>
        </draw:path>
        <draw:path draw:style-name="gr9" draw:text-style-name="P7" draw:layer="layout" svg:width="0.091cm" svg:height="0.092cm" svg:x="9.592cm" svg:y="14.512cm" svg:viewBox="0 0 92 93" svg:d="M44 0c24-1 46 19 48 43 2 25-15 46-40 49-27 4-52-17-52-44 0-25 20-46 44-48z">
          <text:p/>
        </draw:path>
        <draw:path draw:style-name="gr9" draw:text-style-name="P7" draw:layer="layout" svg:width="0.091cm" svg:height="0.092cm" svg:x="5.212cm" svg:y="16.847cm" svg:viewBox="0 0 92 93" svg:d="M92 48c-1 24-22 45-46 45-25 0-50-26-46-51 2-24 21-43 50-42 25 2 43 22 42 48z">
          <text:p/>
        </draw:path>
        <draw:path draw:style-name="gr9" draw:text-style-name="P7" draw:layer="layout" svg:width="0.092cm" svg:height="0.091cm" svg:x="4.045cm" svg:y="22.977cm" svg:viewBox="0 0 93 92" svg:d="M93 48c-2 25-22 44-48 44-24-2-46-23-45-47 1-23 19-49 52-45 24 2 43 24 41 48z">
          <text:p/>
        </draw:path>
        <draw:path draw:style-name="gr9" draw:text-style-name="P7" draw:layer="layout" svg:width="0.092cm" svg:height="0.093cm" svg:x="9.007cm" svg:y="27.356cm" svg:viewBox="0 0 93 94" svg:d="M93 44c1 28-19 50-47 50-24 1-45-19-46-43-2-29 18-51 46-51 26 0 46 18 47 44z">
          <text:p/>
        </draw:path>
        <draw:path draw:style-name="gr9" draw:text-style-name="P7" draw:layer="layout" svg:width="0.092cm" svg:height="0.092cm" svg:x="9.884cm" svg:y="14.512cm" svg:viewBox="0 0 93 93" svg:d="M93 45c1 24-18 46-42 48-27 1-53-20-51-46 1-26 21-46 46-47 24 0 45 20 47 45z">
          <text:p/>
        </draw:path>
        <draw:path draw:style-name="gr9" draw:text-style-name="P7" draw:layer="layout" svg:width="0.091cm" svg:height="0.091cm" svg:x="3.754cm" svg:y="20.351cm" svg:viewBox="0 0 92 92" svg:d="M44 92c-26-1-45-22-44-47 0-24 20-45 45-45 27-1 49 23 47 49-2 25-23 44-48 43z">
          <text:p/>
        </draw:path>
        <draw:path draw:style-name="gr9" draw:text-style-name="P7" draw:layer="layout" svg:width="0.093cm" svg:height="0.093cm" svg:x="4.337cm" svg:y="23.561cm" svg:viewBox="0 0 94 94" svg:d="M94 50c-2 27-27 46-54 43-25-2-42-23-40-49 1-28 23-47 52-44 24 3 43 25 42 50z">
          <text:p/>
        </draw:path>
        <draw:path draw:style-name="gr9" draw:text-style-name="P7" draw:layer="layout" svg:width="0.094cm" svg:height="0.093cm" svg:x="4.628cm" svg:y="24.146cm" svg:viewBox="0 0 95 94" svg:d="M48 0c25 0 45 18 47 44 2 27-19 50-46 50-26 0-47-19-49-43-3-26 20-51 48-51z">
          <text:p/>
        </draw:path>
        <draw:path draw:style-name="gr9" draw:text-style-name="P7" draw:layer="layout" svg:width="0.094cm" svg:height="0.092cm" svg:x="16.598cm" svg:y="19.765cm" svg:viewBox="0 0 95 93" svg:d="M95 44c1 26-18 47-42 49-29 3-52-16-53-44 0-26 18-46 42-49 27-2 51 18 53 44z">
          <text:p/>
        </draw:path>
        <draw:path draw:style-name="gr9" draw:text-style-name="P7" draw:layer="layout" svg:width="0.09cm" svg:height="0.09cm" svg:x="16.306cm" svg:y="23.562cm" svg:viewBox="0 0 91 91" svg:d="M91 44c0 26-19 46-43 47-25 0-47-20-48-45-1-23 21-45 45-46 25-1 45 19 46 44z">
          <text:p/>
        </draw:path>
        <draw:path draw:style-name="gr9" draw:text-style-name="P7" draw:layer="layout" svg:width="0.091cm" svg:height="0.091cm" svg:x="4.923cm" svg:y="24.731cm" svg:viewBox="0 0 92 92" svg:d="M92 47c-2 25-23 45-46 45-28 0-48-24-46-52 2-25 22-42 50-40 24 2 43 23 42 47z">
          <text:p/>
        </draw:path>
        <draw:path draw:style-name="gr9" draw:text-style-name="P7" draw:layer="layout" svg:width="0.091cm" svg:height="0.091cm" svg:x="10.467cm" svg:y="14.512cm" svg:viewBox="0 0 92 92" svg:d="M45 92c-30-1-45-29-45-46 0-26 26-49 53-46 24 3 41 24 39 50-1 25-21 43-47 42z">
          <text:p/>
        </draw:path>
        <draw:path draw:style-name="gr9" draw:text-style-name="P7" draw:layer="layout" svg:width="0.091cm" svg:height="0.092cm" svg:x="12.22cm" svg:y="14.803cm" svg:viewBox="0 0 92 93" svg:d="M46 93c-24 0-46-21-46-46-1-27 25-50 50-47s43 23 42 48c0 25-18 43-46 45z">
          <text:p/>
        </draw:path>
        <draw:path draw:style-name="gr9" draw:text-style-name="P7" draw:layer="layout" svg:width="0.091cm" svg:height="0.091cm" svg:x="13.972cm" svg:y="15.68cm" svg:viewBox="0 0 92 92" svg:d="M92 48c-3 27-29 47-55 43-24-4-40-26-37-51 2-26 22-43 49-40 24 2 45 25 43 48z">
          <text:p/>
        </draw:path>
        <draw:path draw:style-name="gr9" draw:text-style-name="P7" draw:layer="layout" svg:width="0.091cm" svg:height="0.091cm" svg:x="10.176cm" svg:y="14.512cm" svg:viewBox="0 0 92 92" svg:d="M92 46c1 23-19 45-44 46-26 2-46-15-48-40-2-28 19-52 45-52 25 1 46 22 47 46z">
          <text:p/>
        </draw:path>
        <draw:path draw:style-name="gr9" draw:text-style-name="P7" draw:layer="layout" svg:width="0.091cm" svg:height="0.091cm" svg:x="4.338cm" svg:y="18.307cm" svg:viewBox="0 0 92 92" svg:d="M92 45c1 23-20 45-44 47s-46-17-48-41c-3-29 17-51 45-51 24 0 46 20 47 45z">
          <text:p/>
        </draw:path>
        <draw:path draw:style-name="gr9" draw:text-style-name="P7" draw:layer="layout" svg:width="0.092cm" svg:height="0.092cm" svg:x="10.761cm" svg:y="14.512cm" svg:viewBox="0 0 93 93" svg:d="M48 0c24 1 45 24 45 47 0 21-19 50-52 45-25-2-42-22-41-48 2-25 24-45 48-44z">
          <text:p/>
        </draw:path>
        <draw:path draw:style-name="gr9" draw:text-style-name="P7" draw:layer="layout" svg:width="0.092cm" svg:height="0.091cm" svg:x="7.549cm" svg:y="15.096cm" svg:viewBox="0 0 93 92" svg:d="M46 92c-24 0-45-20-46-45-1-26 17-46 42-47 32-3 52 24 51 46-1 25-22 45-47 46z">
          <text:p/>
        </draw:path>
        <draw:path draw:style-name="gr9" draw:text-style-name="P7" draw:layer="layout" svg:width="0.092cm" svg:height="0.093cm" svg:x="14.554cm" svg:y="25.897cm" svg:viewBox="0 0 93 94" svg:d="M93 44c1 23-19 46-43 49-24 5-50-20-50-47 0-24 20-44 45-46 25 0 47 21 48 44z">
          <text:p/>
        </draw:path>
        <draw:path draw:style-name="gr9" draw:text-style-name="P7" draw:layer="layout" svg:width="0.091cm" svg:height="0.091cm" svg:x="11.635cm" svg:y="27.357cm" svg:viewBox="0 0 92 92" svg:d="M47 92c-24 0-46-21-47-45-2-24 17-46 41-47 29-3 51 18 51 45 0 24-21 46-45 47z">
          <text:p/>
        </draw:path>
        <draw:path draw:style-name="gr9" draw:text-style-name="P7" draw:layer="layout" svg:width="0.09cm" svg:height="0.089cm" svg:x="3.754cm" svg:y="22.104cm" svg:viewBox="0 0 91 90" svg:d="M91 44c0 23-21 45-44 46s-46-21-47-44c0-25 19-46 45-46 25-1 46 20 46 44z">
          <text:p/>
        </draw:path>
        <draw:path draw:style-name="gr9" draw:text-style-name="P7" draw:layer="layout" svg:width="0.091cm" svg:height="0.091cm" svg:x="4.629cm" svg:y="17.723cm" svg:viewBox="0 0 92 92" svg:d="M48 0c25 1 44 21 44 46 0 26-19 46-45 46-26 1-50-25-47-50 2-24 23-42 48-42z">
          <text:p/>
        </draw:path>
        <draw:path draw:style-name="gr9" draw:text-style-name="P7" draw:layer="layout" svg:width="0.091cm" svg:height="0.091cm" svg:x="16.6cm" svg:y="22.394cm" svg:viewBox="0 0 92 92" svg:d="M92 48c-1 23-21 43-46 44-25 0-46-18-46-43-1-29 22-51 48-49 24 2 44 23 44 48z">
          <text:p/>
        </draw:path>
        <draw:path draw:style-name="gr9" draw:text-style-name="P7" draw:layer="layout" svg:width="0.092cm" svg:height="0.091cm" svg:x="7.255cm" svg:y="26.773cm" svg:viewBox="0 0 93 92" svg:d="M93 44c1 25-17 46-42 48-32 3-51-25-51-46 0-23 22-45 45-46 25-1 46 18 48 44z">
          <text:p/>
        </draw:path>
        <draw:path draw:style-name="gr9" draw:text-style-name="P7" draw:layer="layout" svg:width="0.092cm" svg:height="0.092cm" svg:x="15.722cm" svg:y="17.432cm" svg:viewBox="0 0 93 93" svg:d="M49 0c26 2 45 23 44 47s-22 46-47 46-49-27-46-52c3-24 25-42 49-41z">
          <text:p/>
        </draw:path>
        <draw:path draw:style-name="gr9" draw:text-style-name="P7" draw:layer="layout" svg:width="0.089cm" svg:height="0.089cm" svg:x="3.755cm" svg:y="21.811cm" svg:viewBox="0 0 90 90" svg:d="M43 90c-26-1-45-21-43-46 1-25 24-46 47-44 24 2 44 24 43 48s-22 43-47 42z">
          <text:p/>
        </draw:path>
        <draw:path draw:style-name="gr9" draw:text-style-name="P7" draw:layer="layout" svg:width="0.091cm" svg:height="0.092cm" svg:x="3.754cm" svg:y="20.641cm" svg:viewBox="0 0 92 93" svg:d="M92 46c1 24-18 45-42 47-24 3-48-16-50-40-3-27 19-54 46-53 24 2 45 20 46 46z">
          <text:p/>
        </draw:path>
        <draw:path draw:style-name="gr9" draw:text-style-name="P7" draw:layer="layout" svg:width="0.091cm" svg:height="0.092cm" svg:x="3.754cm" svg:y="21.227cm" svg:viewBox="0 0 92 93" svg:d="M43 93c-26-2-44-24-43-49 0-29 26-45 46-44 24 0 48 19 46 51-2 24-25 43-49 42z">
          <text:p/>
        </draw:path>
        <draw:path draw:style-name="gr9" draw:text-style-name="P7" draw:layer="layout" svg:width="0.091cm" svg:height="0.091cm" svg:x="16.305cm" svg:y="18.598cm" svg:viewBox="0 0 92 92" svg:d="M49 0c23 1 43 23 43 48s-19 44-45 44c-28 0-51-23-47-49 3-24 25-44 49-43z">
          <text:p/>
        </draw:path>
        <draw:path draw:style-name="gr9" draw:text-style-name="P7" draw:layer="layout" svg:width="0.091cm" svg:height="0.092cm" svg:x="16.016cm" svg:y="18.015cm" svg:viewBox="0 0 92 93" svg:d="M45 93c-29-3-45-22-45-45-1-25 17-46 42-48 27-2 50 21 50 47-1 26-22 46-47 46z">
          <text:p/>
        </draw:path>
        <draw:path draw:style-name="gr9" draw:text-style-name="P7" draw:layer="layout" svg:width="0.092cm" svg:height="0.092cm" svg:x="8.716cm" svg:y="27.357cm" svg:viewBox="0 0 93 93" svg:d="M47 0c25 1 46 22 46 45 0 24-21 46-46 48-26 1-49-24-47-50s21-43 47-43z">
          <text:p/>
        </draw:path>
        <draw:path draw:style-name="gr9" draw:text-style-name="P7" draw:layer="layout" svg:width="0.092cm" svg:height="0.091cm" svg:x="14.846cm" svg:y="25.605cm" svg:viewBox="0 0 93 92" svg:d="M93 49c-1 25-21 43-47 43-25-1-45-20-46-45 0-26 25-50 51-47 24 2 42 24 42 49z">
          <text:p/>
        </draw:path>
        <draw:path draw:style-name="gr9" draw:text-style-name="P7" draw:layer="layout" svg:width="0.091cm" svg:height="0.091cm" svg:x="5.796cm" svg:y="16.264cm" svg:viewBox="0 0 92 92" svg:d="M48 92c-23 2-46-17-48-42-3-25 14-46 39-49 26-4 49 12 52 36 4 27-16 53-43 55z">
          <text:p/>
        </draw:path>
        <draw:path draw:style-name="gr9" draw:text-style-name="P7" draw:layer="layout" svg:width="0.089cm" svg:height="0.09cm" svg:x="11.346cm" svg:y="14.513cm" svg:viewBox="0 0 90 91" svg:d="M47 0c24 2 46 25 43 49-2 24-23 43-48 42-24-1-43-22-42-47 1-26 24-45 47-44z">
          <text:p/>
        </draw:path>
        <draw:path draw:style-name="gr9" draw:text-style-name="P7" draw:layer="layout" svg:width="0.091cm" svg:height="0.091cm" svg:x="3.754cm" svg:y="21.519cm" svg:viewBox="0 0 92 92" svg:d="M44 92c-25-1-44-22-44-47 0-27 22-48 52-45 25 4 42 25 40 50-3 24-25 43-48 42z">
          <text:p/>
        </draw:path>
        <draw:path draw:style-name="gr9" draw:text-style-name="P7" draw:layer="layout" svg:width="0.091cm" svg:height="0.091cm" svg:x="6.966cm" svg:y="15.386cm" svg:viewBox="0 0 92 92" svg:d="M43 0c23-1 47 20 49 44 1 25-17 46-42 48-26 3-48-14-50-38-3-28 17-53 43-54z">
          <text:p/>
        </draw:path>
        <draw:path draw:style-name="gr9" draw:text-style-name="P7" draw:layer="layout" svg:width="0.089cm" svg:height="0.09cm" svg:x="13.095cm" svg:y="15.097cm" svg:viewBox="0 0 90 91" svg:d="M48 91c-24 1-45-18-48-43-2-22 18-46 41-48 26-2 47 17 49 41 1 26-16 48-42 50z">
          <text:p/>
        </draw:path>
        <draw:path draw:style-name="gr9" draw:text-style-name="P7" draw:layer="layout" svg:width="0.09cm" svg:height="0.09cm" svg:x="15.431cm" svg:y="25.021cm" svg:viewBox="0 0 91 91" svg:d="M47 0c23 1 44 23 44 47-1 24-21 44-46 44-25-1-45-21-45-45 1-25 24-47 47-46z">
          <text:p/>
        </draw:path>
        <draw:path draw:style-name="gr9" draw:text-style-name="P7" draw:layer="layout" svg:width="0.091cm" svg:height="0.091cm" svg:x="5.506cm" svg:y="16.555cm" svg:viewBox="0 0 92 92" svg:d="M43 0c23-1 45 18 49 42 4 26-20 50-47 50-25 1-44-18-45-45 0-25 19-46 43-47z">
          <text:p/>
        </draw:path>
        <draw:path draw:style-name="gr9" draw:text-style-name="P7" draw:layer="layout" svg:width="0.09cm" svg:height="0.09cm" svg:x="14.263cm" svg:y="26.19cm" svg:viewBox="0 0 91 91" svg:d="M48 91c-24 0-46-19-48-43-1-23 20-47 45-48 23-1 45 19 46 44 1 26-18 46-43 47z">
          <text:p/>
        </draw:path>
        <draw:path draw:style-name="gr9" draw:text-style-name="P7" draw:layer="layout" svg:width="0.091cm" svg:height="0.092cm" svg:x="16.6cm" svg:y="19.476cm" svg:viewBox="0 0 92 93" svg:d="M43 92c-26-2-46-27-42-55 3-24 26-40 52-37 25 4 42 26 39 51-3 24-26 43-49 41z">
          <text:p/>
        </draw:path>
        <draw:path draw:style-name="gr9" draw:text-style-name="P7" draw:layer="layout" svg:width="0.089cm" svg:height="0.09cm" svg:x="13.389cm" svg:y="26.774cm" svg:viewBox="0 0 90 91" svg:d="M46 91c-24 1-46-19-46-45-1-25 19-45 43-46s46 20 47 43c1 24-20 47-44 48z">
          <text:p/>
        </draw:path>
        <draw:path draw:style-name="gr9" draw:text-style-name="P7" draw:layer="layout" svg:width="0.092cm" svg:height="0.092cm" svg:x="7.84cm" svg:y="27.065cm" svg:viewBox="0 0 93 93" svg:d="M93 48c0 25-20 45-45 45-24 0-46-20-48-43-1-26 23-51 50-50 24 1 43 22 43 48z">
          <text:p/>
        </draw:path>
        <draw:path draw:style-name="gr9" draw:text-style-name="P7" draw:layer="layout" svg:width="0.09cm" svg:height="0.089cm" svg:x="16.6cm" svg:y="22.689cm" svg:viewBox="0 0 91 90" svg:d="M44 0c25 0 47 20 47 43 0 24-23 47-46 47s-44-21-45-46c0-25 19-44 44-44z">
          <text:p/>
        </draw:path>
        <draw:path draw:style-name="gr9" draw:text-style-name="P7" draw:layer="layout" svg:width="0.092cm" svg:height="0.092cm" svg:x="6.089cm" svg:y="15.971cm" svg:viewBox="0 0 93 93" svg:d="M43 0c23-3 46 18 50 42 3 23-16 46-41 50-28 4-51-17-52-44 0-24 19-46 43-48z">
          <text:p/>
        </draw:path>
        <draw:path draw:style-name="gr9" draw:text-style-name="P7" draw:layer="layout" svg:width="0.092cm" svg:height="0.092cm" svg:x="15.139cm" svg:y="25.314cm" svg:viewBox="0 0 93 93" svg:d="M92 48c-1 24-24 45-47 45-26 0-49-25-45-51 3-27 23-43 48-42 24 2 46 24 44 48z">
          <text:p/>
        </draw:path>
        <draw:path draw:style-name="gr9" draw:text-style-name="P7" draw:layer="layout" svg:width="0.089cm" svg:height="0.089cm" svg:x="4.924cm" svg:y="17.14cm" svg:viewBox="0 0 90 90" svg:d="M90 43c2 23-19 46-43 47-25 2-46-18-47-43-1-24 19-46 43-47 23-1 45 19 47 43z">
          <text:p/>
        </draw:path>
        <draw:path draw:style-name="gr9" draw:text-style-name="P7" draw:layer="layout" svg:width="0.09cm" svg:height="0.09cm" svg:x="6.382cm" svg:y="15.681cm" svg:viewBox="0 0 91 91" svg:d="M45 0c25 0 46 19 46 45 0 24-22 46-45 46s-45-21-46-45c0-24 20-46 45-46z">
          <text:p/>
        </draw:path>
        <draw:path draw:style-name="gr9" draw:text-style-name="P7" draw:layer="layout" svg:width="0.089cm" svg:height="0.09cm" svg:x="11.052cm" svg:y="14.513cm" svg:viewBox="0 0 90 91" svg:d="M48 0c24 2 43 23 42 49-1 25-21 43-47 42-25-2-45-24-43-47 2-25 24-45 48-44z">
          <text:p/>
        </draw:path>
        <draw:path draw:style-name="gr9" draw:text-style-name="P7" draw:layer="layout" svg:width="0.088cm" svg:height="0.088cm" svg:x="8.426cm" svg:y="27.359cm" svg:viewBox="0 0 89 89" svg:d="M89 43c0 24-21 46-45 46-23-1-45-24-44-47 2-21 20-41 42-42 25-1 46 19 47 43z">
          <text:p/>
        </draw:path>
        <draw:path draw:style-name="gr9" draw:text-style-name="P7" draw:layer="layout" svg:width="0.088cm" svg:height="0.087cm" svg:x="14.848cm" svg:y="16.266cm" svg:viewBox="0 0 89 88" svg:d="M47 0c25 1 44 23 42 48-3 22-24 40-44 40-23 0-45-22-45-45 1-25 23-44 47-43z">
          <text:p/>
        </draw:path>
        <draw:path draw:style-name="gr9" draw:text-style-name="P7" draw:layer="layout" svg:width="0.088cm" svg:height="0.09cm" svg:x="9.303cm" svg:y="14.513cm" svg:viewBox="0 0 89 91" svg:d="M89 49c-1 24-23 43-48 42-24-1-43-22-41-47 1-26 23-45 46-44 25 2 45 24 43 49z">
          <text:p/>
        </draw:path>
        <draw:path draw:style-name="gr9" draw:text-style-name="P7" draw:layer="layout" svg:width="0.087cm" svg:height="0.088cm" svg:x="16.601cm" svg:y="19.184cm" svg:viewBox="0 0 88 89" svg:d="M88 50c-4 25-26 42-51 39-25-5-40-28-36-53 4-20 27-39 46-35 25 4 45 28 41 49z">
          <text:p/>
        </draw:path>
        <draw:path draw:style-name="gr9" draw:text-style-name="P7" draw:layer="layout" svg:width="0.088cm" svg:height="0.088cm" svg:x="16.601cm" svg:y="22.979cm" svg:viewBox="0 0 89 89" svg:d="M89 45c0 23-22 45-47 44-21 0-40-18-42-40-1-25 18-47 42-49 23-1 46 21 47 45z">
          <text:p/>
        </draw:path>
        <draw:path draw:style-name="gr9" draw:text-style-name="P7" draw:layer="layout" svg:width="0.089cm" svg:height="0.089cm" svg:x="11.929cm" svg:y="27.358cm" svg:viewBox="0 0 90 90" svg:d="M90 48c-2 24-25 44-49 42-23-1-42-22-41-47 2-26 22-44 47-43 24 2 45 25 43 48z">
          <text:p/>
        </draw:path>
        <draw:path draw:style-name="gr9" draw:text-style-name="P7" draw:layer="layout" svg:width="0.088cm" svg:height="0.089cm" svg:x="4.047cm" svg:y="18.893cm" svg:viewBox="0 0 89 90" svg:d="M89 42c1 26-17 47-40 48-25 2-47-18-49-42-2-23 17-46 42-48 26-1 46 16 47 42z">
          <text:p/>
        </draw:path>
        <draw:path draw:style-name="gr9" draw:text-style-name="P7" draw:layer="layout" svg:width="0.089cm" svg:height="0.089cm" svg:x="3.755cm" svg:y="20.06cm" svg:viewBox="0 0 90 90" svg:d="M0 45c-1-25 19-45 45-45 25 0 45 20 45 44 0 25-17 45-45 46-24 0-45-17-45-45z">
          <text:p/>
        </draw:path>
        <draw:path draw:style-name="gr9" draw:text-style-name="P7" draw:layer="layout" svg:width="0.089cm" svg:height="0.088cm" svg:x="12.805cm" svg:y="27.067cm" svg:viewBox="0 0 90 89" svg:d="M43 0c25-1 46 19 47 43s-20 46-45 46c-25 1-45-20-45-44-1-22 14-43 43-45z">
          <text:p/>
        </draw:path>
        <draw:path draw:style-name="gr9" draw:text-style-name="P7" draw:layer="layout" svg:width="0.087cm" svg:height="0.087cm" svg:x="3.755cm" svg:y="22.396cm" svg:viewBox="0 0 88 88" svg:d="M88 43c2 23-20 45-44 45-23 0-42-17-44-38-3-24 15-47 41-50 22-2 46 20 47 43z">
          <text:p/>
        </draw:path>
        <draw:path draw:style-name="gr9" draw:text-style-name="P7" draw:layer="layout" svg:width="0.088cm" svg:height="0.087cm" svg:x="16.891cm" svg:y="20.937cm" svg:viewBox="0 0 89 88" svg:d="M43 88c-25-2-45-26-43-49 4-24 26-42 51-39 21 3 38 22 38 44-1 24-23 46-46 44z">
          <text:p/>
        </draw:path>
        <draw:path draw:style-name="gr9" draw:text-style-name="P7" draw:layer="layout" svg:width="0.088cm" svg:height="0.086cm" svg:x="5.798cm" svg:y="25.9cm" svg:viewBox="0 0 89 87" svg:d="M89 40c1 25-20 47-45 47-22 0-42-18-44-41-2-24 19-46 44-46 23 0 44 18 45 40z">
          <text:p/>
        </draw:path>
        <draw:path draw:style-name="gr9" draw:text-style-name="P7" draw:layer="layout" svg:width="0.086cm" svg:height="0.088cm" svg:x="6.092cm" svg:y="26.191cm" svg:viewBox="0 0 87 89" svg:d="M87 44c0 26-21 46-46 45-23-1-40-20-41-43 0-24 16-43 38-46 24-2 48 18 49 44z">
          <text:p/>
        </draw:path>
        <draw:path draw:style-name="gr9" draw:text-style-name="P7" draw:layer="layout" svg:width="0.087cm" svg:height="0.087cm" svg:x="16.308cm" svg:y="18.309cm" svg:viewBox="0 0 88 88" svg:d="M42 0c25-1 46 19 46 44 0 24-24 46-46 44-21-1-40-20-42-41-2-23 19-47 42-47z">
          <text:p/>
        </draw:path>
        <draw:path draw:style-name="gr9" draw:text-style-name="P7" draw:layer="layout" svg:width="0.087cm" svg:height="0.087cm" svg:x="5.215cm" svg:y="25.316cm" svg:viewBox="0 0 88 88" svg:d="M88 47c-2 24-25 44-49 41-21-4-39-23-39-43-1-24 21-45 45-45 26 1 44 22 43 47z">
          <text:p/>
        </draw:path>
        <draw:path draw:style-name="gr9" draw:text-style-name="P7" draw:layer="layout" svg:width="0.089cm" svg:height="0.088cm" svg:x="8.134cm" svg:y="14.805cm" svg:viewBox="0 0 90 89" svg:d="M45 0c24 0 46 22 45 47 0 24-22 43-48 42-23-1-41-19-42-42 0-27 20-47 45-47z">
          <text:p/>
        </draw:path>
        <draw:path draw:style-name="gr9" draw:text-style-name="P7" draw:layer="layout" svg:width="0.088cm" svg:height="0.085cm" svg:x="15.432cm" svg:y="16.85cm" svg:viewBox="0 0 89 86" svg:d="M89 44c-2 25-21 44-48 42-23-2-41-20-41-43 0-26 23-45 49-43 22 2 41 22 40 44z">
          <text:p/>
        </draw:path>
        <draw:path draw:style-name="gr9" draw:text-style-name="P7" draw:layer="layout" svg:width="0.089cm" svg:height="0.089cm" svg:x="4.339cm" svg:y="23.855cm" svg:viewBox="0 0 90 90" svg:d="M43 0c25 1 44 16 47 44 2 23-20 45-45 46-25 0-45-19-45-43-1-27 18-46 43-47z">
          <text:p/>
        </draw:path>
        <draw:path draw:style-name="gr9" draw:text-style-name="P7" draw:layer="layout" svg:width="0.086cm" svg:height="0.088cm" svg:x="7.258cm" svg:y="15.098cm" svg:viewBox="0 0 87 89" svg:d="M46 0c24 1 43 22 41 47-1 22-20 41-41 42-23 1-47-22-46-45 1-26 22-45 46-44z">
          <text:p/>
        </draw:path>
        <draw:path draw:style-name="gr9" draw:text-style-name="P7" draw:layer="layout" svg:width="0.087cm" svg:height="0.087cm" svg:x="10.178cm" svg:y="27.651cm" svg:viewBox="0 0 88 88" svg:d="M41 88c-23-1-41-20-41-43-1-25 20-46 46-45 21 1 41 21 42 42 2 24-21 46-47 46z">
          <text:p/>
        </draw:path>
        <draw:path draw:style-name="gr9" draw:text-style-name="P7" draw:layer="layout" svg:width="0.089cm" svg:height="0.088cm" svg:x="13.68cm" svg:y="15.388cm" svg:viewBox="0 0 90 89" svg:d="M44 89c-24-1-46-24-44-47s26-44 49-42c23 1 42 22 41 47-1 26-20 44-46 42z">
          <text:p/>
        </draw:path>
        <draw:path draw:style-name="gr9" draw:text-style-name="P7" draw:layer="layout" svg:width="0.088cm" svg:height="0.088cm" svg:x="6.967cm" svg:y="26.775cm" svg:viewBox="0 0 89 89" svg:d="M45 0c24 0 45 23 44 46-2 24-25 45-48 43-22-2-40-22-41-44-1-23 21-45 45-45z">
          <text:p/>
        </draw:path>
        <draw:path draw:style-name="gr9" draw:text-style-name="P7" draw:layer="layout" svg:width="0.09cm" svg:height="0.09cm" svg:x="16.016cm" svg:y="24.147cm" svg:viewBox="0 0 91 91" svg:d="M44 0c25 0 46 21 47 45 1 23-20 45-45 46-24 1-45-20-46-44 0-24 20-46 44-47z">
          <text:p/>
        </draw:path>
        <draw:path draw:style-name="gr9" draw:text-style-name="P7" draw:layer="layout" svg:width="0.086cm" svg:height="0.086cm" svg:x="10.47cm" svg:y="27.651cm" svg:viewBox="0 0 87 87" svg:d="M87 46c0 23-17 41-42 41-25 1-47-21-45-45 1-21 20-41 42-42 25-1 46 20 45 46z">
          <text:p/>
        </draw:path>
        <draw:path draw:style-name="gr9" draw:text-style-name="P7" draw:layer="layout" svg:width="0.084cm" svg:height="0.084cm" svg:x="6.969cm" svg:y="15.1cm" svg:viewBox="0 0 85 85" svg:d="M43 0c22 1 43 23 42 43-1 22-23 43-45 42-21-1-41-23-40-45 1-20 23-41 43-40z">
          <text:p/>
        </draw:path>
        <draw:path draw:style-name="gr9" draw:text-style-name="P7" draw:layer="layout" svg:width="0.088cm" svg:height="0.088cm" svg:x="16.017cm" svg:y="17.725cm" svg:viewBox="0 0 89 89" svg:d="M89 41c2 23-19 47-43 48-21 0-42-17-45-40-4-23 15-46 40-49 23-3 46 17 48 41z">
          <text:p/>
        </draw:path>
        <draw:path draw:style-name="gr9" draw:text-style-name="P7" draw:layer="layout" svg:width="0.088cm" svg:height="0.088cm" svg:x="3.755cm" svg:y="19.767cm" svg:viewBox="0 0 89 89" svg:d="M47 89c-25 1-47-19-47-43s23-47 46-46c21 1 41 20 43 42 2 23-18 46-42 47z">
          <text:p/>
        </draw:path>
        <draw:path draw:style-name="gr9" draw:text-style-name="P7" draw:layer="layout" svg:width="0.088cm" svg:height="0.088cm" svg:x="9.01cm" svg:y="14.514cm" svg:viewBox="0 0 89 89" svg:d="M46 89c-24 1-46-21-46-45 0-23 23-45 45-44 21 1 42 20 44 41 2 25-19 47-43 48z">
          <text:p/>
        </draw:path>
        <draw:path draw:style-name="gr9" draw:text-style-name="P7" draw:layer="layout" svg:width="0.086cm" svg:height="0.087cm" svg:x="5.509cm" svg:y="25.608cm" svg:viewBox="0 0 87 88" svg:d="M87 43c1 21-17 42-39 44-27 3-48-15-48-41-1-22 15-42 37-46 24-4 49 19 50 43z">
          <text:p/>
        </draw:path>
        <draw:path draw:style-name="gr9" draw:text-style-name="P7" draw:layer="layout" svg:width="0.087cm" svg:height="0.088cm" svg:x="12.222cm" svg:y="27.359cm" svg:viewBox="0 0 88 89" svg:d="M44 89c-22 0-45-23-44-46 1-24 24-45 48-43 22 2 40 21 40 43 1 23-21 46-44 46z">
          <text:p/>
        </draw:path>
        <draw:path draw:style-name="gr9" draw:text-style-name="P7" draw:layer="layout" svg:width="0.087cm" svg:height="0.088cm" svg:x="11.637cm" svg:y="14.514cm" svg:viewBox="0 0 88 89" svg:d="M88 46c-1 25-24 45-48 43-21-2-40-21-40-43-1-23 21-46 44-46s45 23 44 46z">
          <text:p/>
        </draw:path>
        <draw:path draw:style-name="gr9" draw:text-style-name="P7" draw:layer="layout" svg:width="0.085cm" svg:height="0.085cm" svg:x="4.925cm" svg:y="25.024cm" svg:viewBox="0 0 86 86" svg:d="M86 43c0 23-21 43-42 43-23 0-42-18-44-41-1-24 21-47 45-45 21 2 42 22 41 43z">
          <text:p/>
        </draw:path>
        <draw:path draw:style-name="gr9" draw:text-style-name="P7" draw:layer="layout" svg:width="0.089cm" svg:height="0.089cm" svg:x="4.63cm" svg:y="24.438cm" svg:viewBox="0 0 90 90" svg:d="M47 0c23 0 43 21 43 46s-19 44-45 44c-25-1-46-23-45-46s23-44 47-44z">
          <text:p/>
        </draw:path>
        <draw:path draw:style-name="gr9" draw:text-style-name="P7" draw:layer="layout" svg:width="0.087cm" svg:height="0.084cm" svg:x="4.34cm" svg:y="18.019cm" svg:viewBox="0 0 88 85" svg:d="M88 42c0 25-22 45-48 43-23-1-40-20-40-43s18-41 41-42c25-3 46 17 47 42z">
          <text:p/>
        </draw:path>
        <draw:path draw:style-name="gr9" draw:text-style-name="P7" draw:layer="layout" svg:width="0.084cm" svg:height="0.086cm" svg:x="13.683cm" svg:y="26.776cm" svg:viewBox="0 0 85 87" svg:d="M44 87c-22 0-42-18-44-40-1-26 20-48 44-47 23 1 41 21 41 44 0 22-19 42-41 43z">
          <text:p/>
        </draw:path>
        <draw:path draw:style-name="gr9" draw:text-style-name="P7" draw:layer="layout" svg:width="0.085cm" svg:height="0.085cm" svg:x="16.893cm" svg:y="20.354cm" svg:viewBox="0 0 86 86" svg:d="M86 50c-3 21-23 38-44 36-25-1-45-26-41-48 5-22 25-40 46-38 24 2 43 26 39 50z">
          <text:p/>
        </draw:path>
        <draw:path draw:style-name="gr9" draw:text-style-name="P7" draw:layer="layout" svg:width="0.086cm" svg:height="0.085cm" svg:x="13.974cm" svg:y="26.484cm" svg:viewBox="0 0 87 86" svg:d="M87 46c-3 25-24 42-50 39-22-2-39-21-37-45 2-26 23-43 49-40 23 3 41 25 38 46z">
          <text:p/>
        </draw:path>
        <draw:path draw:style-name="gr9" draw:text-style-name="P7" draw:layer="layout" svg:width="0.086cm" svg:height="0.082cm" svg:x="6.384cm" svg:y="26.485cm" svg:viewBox="0 0 87 83" svg:d="M47 83c-24 2-44-14-47-36-4-23 18-47 43-47 23 0 42 17 43 40 1 22-17 42-39 43z">
          <text:p/>
        </draw:path>
        <draw:path draw:style-name="gr9" draw:text-style-name="P7" draw:layer="layout" svg:width="0.085cm" svg:height="0.083cm" svg:x="16.893cm" svg:y="21.815cm" svg:viewBox="0 0 86 84" svg:d="M86 42c-1 24-19 42-42 42-23 1-43-17-44-40-2-25 19-46 46-44 23 1 40 20 40 42z">
          <text:p/>
        </draw:path>
        <draw:path draw:style-name="gr9" draw:text-style-name="P7" draw:layer="layout" svg:width="0.087cm" svg:height="0.085cm" svg:x="16.891cm" svg:y="20.645cm" svg:viewBox="0 0 88 86" svg:d="M88 44c0 24-17 41-41 42-25 1-48-20-47-44 2-25 24-44 50-42 23 2 39 21 38 44z">
          <text:p/>
        </draw:path>
        <draw:path draw:style-name="gr9" draw:text-style-name="P7" draw:layer="layout" svg:width="0.085cm" svg:height="0.086cm" svg:x="13.39cm" svg:y="15.099cm" svg:viewBox="0 0 86 87" svg:d="M86 40c2 23-21 47-44 47-20 0-40-21-42-42-1-23 20-46 43-45 21 0 42 19 43 40z">
          <text:p/>
        </draw:path>
        <draw:path draw:style-name="gr9" draw:text-style-name="P7" draw:layer="layout" svg:width="0.084cm" svg:height="0.085cm" svg:x="8.136cm" svg:y="27.36cm" svg:viewBox="0 0 85 86" svg:d="M85 42c0 23-18 43-40 44-22 2-43-18-45-40-2-26 18-47 44-46 22 0 41 20 41 42z">
          <text:p/>
        </draw:path>
        <draw:path draw:style-name="gr9" draw:text-style-name="P7" draw:layer="layout" svg:width="0.083cm" svg:height="0.085cm" svg:x="15.727cm" svg:y="17.142cm" svg:viewBox="0 0 84 86" svg:d="M43 86c-22 1-42-18-43-40-1-26 20-48 44-46 22 2 40 21 40 43 0 23-18 43-41 43z">
          <text:p/>
        </draw:path>
        <draw:path draw:style-name="gr9" draw:text-style-name="P7" draw:layer="layout" svg:width="0.085cm" svg:height="0.087cm" svg:x="15.726cm" svg:y="24.733cm" svg:viewBox="0 0 86 88" svg:d="M44 88c-26 0-46-22-44-47 1-24 19-41 43-41 23-1 41 16 43 40 1 26-18 48-42 48z">
          <text:p/>
        </draw:path>
        <draw:path draw:style-name="gr9" draw:text-style-name="P7" draw:layer="layout" svg:width="0.087cm" svg:height="0.085cm" svg:x="7.551cm" svg:y="27.069cm" svg:viewBox="0 0 88 86" svg:d="M41 0c27-1 48 19 47 44-1 22-19 41-42 42-27 1-46-18-46-44 1-24 18-41 41-42z">
          <text:p/>
        </draw:path>
        <draw:path draw:style-name="gr9" draw:text-style-name="P7" draw:layer="layout" svg:width="0.086cm" svg:height="0.084cm" svg:x="3.756cm" svg:y="22.691cm" svg:viewBox="0 0 87 85" svg:d="M41 0c22-2 42 14 46 38 3 22-19 47-43 47-23 0-43-19-44-41s18-43 41-44z">
          <text:p/>
        </draw:path>
        <draw:path draw:style-name="gr9" draw:text-style-name="P7" draw:layer="layout" svg:width="0.082cm" svg:height="0.085cm" svg:x="11.932cm" svg:y="14.516cm" svg:viewBox="0 0 83 86" svg:d="M83 40c1 25-14 42-38 46-24 3-46-19-45-45 0-22 19-41 40-41 22-1 42 18 43 40z">
          <text:p/>
        </draw:path>
        <draw:path draw:style-name="gr9" draw:text-style-name="P7" draw:layer="layout" svg:width="0.086cm" svg:height="0.083cm" svg:x="14.849cm" svg:y="25.901cm" svg:viewBox="0 0 87 84" svg:d="M87 43c-1 23-21 41-43 41-23 0-42-17-44-40-1-24 21-45 46-44 22 1 42 21 41 43z">
          <text:p/>
        </draw:path>
        <draw:path draw:style-name="gr9" draw:text-style-name="P7" draw:layer="layout" svg:width="0.083cm" svg:height="0.085cm" svg:x="8.72cm" svg:y="14.516cm" svg:viewBox="0 0 84 86" svg:d="M84 40c0 25-14 42-38 46-23 3-47-19-46-45 0-22 20-41 42-41 21-1 41 18 42 40z">
          <text:p/>
        </draw:path>
        <draw:path draw:style-name="gr9" draw:text-style-name="P7" draw:layer="layout" svg:width="0.087cm" svg:height="0.085cm" svg:x="16.891cm" svg:y="21.23cm" svg:viewBox="0 0 88 86" svg:d="M46 86c-26 0-48-21-46-46 2-22 22-39 45-40 25 0 45 20 43 46-1 23-19 40-42 40z">
          <text:p/>
        </draw:path>
        <draw:path draw:style-name="gr9" draw:text-style-name="P7" draw:layer="layout" svg:width="0.086cm" svg:height="0.084cm" svg:x="3.756cm" svg:y="19.479cm" svg:viewBox="0 0 87 85" svg:d="M45 0c22 0 42 20 42 41 0 22-19 43-41 44-25 1-47-21-46-46 2-22 22-40 45-39z">
          <text:p/>
        </draw:path>
        <draw:path draw:style-name="gr9" draw:text-style-name="P7" draw:layer="layout" svg:width="0.086cm" svg:height="0.084cm" svg:x="16.018cm" svg:y="24.441cm" svg:viewBox="0 0 87 85" svg:d="M44 0c22 0 42 20 43 42 1 23-22 44-47 43-22-2-41-23-40-44 1-22 22-41 44-41z">
          <text:p/>
        </draw:path>
        <draw:path draw:style-name="gr9" draw:text-style-name="P7" draw:layer="layout" svg:width="0.085cm" svg:height="0.083cm" svg:x="12.807cm" svg:y="14.808cm" svg:viewBox="0 0 86 84" svg:d="M43 0c23 0 42 19 43 41 0 21-19 42-42 43-25 1-46-22-44-45 1-23 20-40 43-39z">
          <text:p/>
        </draw:path>
        <draw:path draw:style-name="gr9" draw:text-style-name="P7" draw:layer="layout" svg:width="0.085cm" svg:height="0.086cm" svg:x="4.34cm" svg:y="24.149cm" svg:viewBox="0 0 86 87" svg:d="M86 41c2 23-20 47-43 46-22 0-41-19-43-41-1-24 20-46 44-46 21 1 41 20 42 41z">
          <text:p/>
        </draw:path>
        <draw:path draw:style-name="gr9" draw:text-style-name="P7" draw:layer="layout" svg:width="0.086cm" svg:height="0.083cm" svg:x="9.595cm" svg:y="27.653cm" svg:viewBox="0 0 87 84" svg:d="M86 41c2 16-13 42-40 43-22 2-43-14-46-36-4-24 17-48 42-48 23 0 43 18 44 41z">
          <text:p/>
        </draw:path>
        <draw:path draw:style-name="gr9" draw:text-style-name="P7" draw:layer="layout" svg:width="0.084cm" svg:height="0.087cm" svg:x="15.142cm" svg:y="16.557cm" svg:viewBox="0 0 85 88" svg:d="M85 47c-1 23-19 41-42 41-27 0-45-21-43-47 1-22 21-41 43-41 24 1 44 22 42 47z">
          <text:p/>
        </draw:path>
        <draw:path draw:style-name="gr9" draw:text-style-name="P7" draw:layer="layout" svg:width="0.085cm" svg:height="0.083cm" svg:x="10.764cm" svg:y="27.653cm" svg:viewBox="0 0 86 84" svg:d="M86 45c-3 22-22 39-45 39-26-1-44-23-41-48 4-24 24-39 48-36 22 2 40 23 38 45z">
          <text:p/>
        </draw:path>
        <draw:path draw:style-name="gr9" draw:text-style-name="P7" draw:layer="layout" svg:width="0.085cm" svg:height="0.084cm" svg:x="11.054cm" svg:y="27.653cm" svg:viewBox="0 0 86 85" svg:d="M45 0c22 0 41 19 41 42 1 22-17 41-39 43-26 1-48-21-47-44 2-24 21-41 45-41z">
          <text:p/>
        </draw:path>
        <draw:path draw:style-name="gr9" draw:text-style-name="P7" draw:layer="layout" svg:width="0.085cm" svg:height="0.086cm" svg:x="14.557cm" svg:y="15.974cm" svg:viewBox="0 0 86 87" svg:d="M0 46c0-26 20-47 45-46 22 2 40 20 41 42 2 26-18 46-44 45-24 0-41-17-42-41z">
          <text:p/>
        </draw:path>
        <draw:path draw:style-name="gr9" draw:text-style-name="P7" draw:layer="layout" svg:width="0.082cm" svg:height="0.085cm" svg:x="15.144cm" svg:y="25.609cm" svg:viewBox="0 0 83 86" svg:d="M83 42c1 24-18 43-40 44-23 1-42-16-43-40-2-25 18-47 42-46 23 2 41 20 41 42z">
          <text:p/>
        </draw:path>
        <draw:path draw:style-name="gr9" draw:text-style-name="P7" draw:layer="layout" svg:width="0.085cm" svg:height="0.085cm" svg:x="16.602cm" svg:y="18.895cm" svg:viewBox="0 0 86 86" svg:d="M45 86c-20 1-43-18-45-39-1-23 15-44 38-47 25-3 48 19 48 43 0 21-20 42-41 43z">
          <text:p/>
        </draw:path>
        <draw:path draw:style-name="gr9" draw:text-style-name="P7" draw:layer="layout" svg:width="0.085cm" svg:height="0.082cm" svg:x="16.893cm" svg:y="20.063cm" svg:viewBox="0 0 86 83" svg:d="M43 0c22-1 41 17 43 39 1 23-16 43-39 44-27 2-48-19-47-43 1-23 19-40 43-40z">
          <text:p/>
        </draw:path>
        <draw:path draw:style-name="gr9" draw:text-style-name="P7" draw:layer="layout" svg:width="0.084cm" svg:height="0.086cm" svg:x="9.887cm" svg:y="27.651cm" svg:viewBox="0 0 85 87" svg:d="M43 87c-24 1-41-15-43-38-2-25 16-47 41-49 24-1 45 21 44 47 0 23-17 40-42 40z">
          <text:p/>
        </draw:path>
        <draw:path draw:style-name="gr9" draw:text-style-name="P7" draw:layer="layout" svg:width="0.083cm" svg:height="0.084cm" svg:x="5.509cm" svg:y="16.267cm" svg:viewBox="0 0 84 85" svg:d="M84 45c-1 22-20 40-42 40-25 0-45-22-42-48 2-23 23-39 46-37 22 2 39 21 38 45z">
          <text:p/>
        </draw:path>
        <draw:path draw:style-name="gr9" draw:text-style-name="P7" draw:layer="layout" svg:width="0.083cm" svg:height="0.086cm" svg:x="4.05cm" svg:y="23.564cm" svg:viewBox="0 0 84 87" svg:d="M84 42c1 22-16 42-38 45-23 2-46-20-46-44 1-24 20-42 42-43 22 0 41 19 42 42z">
          <text:p/>
        </draw:path>
        <draw:path draw:style-name="gr9" draw:text-style-name="P7" draw:layer="layout" svg:width="0.085cm" svg:height="0.085cm" svg:x="14.266cm" svg:y="15.683cm" svg:viewBox="0 0 86 86" svg:d="M41 86c-20-2-41-23-41-43 0-24 23-46 47-43 23 3 41 23 39 45s-23 42-45 41z">
          <text:p/>
        </draw:path>
        <draw:path draw:style-name="gr9" draw:text-style-name="P7" draw:layer="layout" svg:width="0.085cm" svg:height="0.086cm" svg:x="16.893cm" svg:y="21.521cm" svg:viewBox="0 0 86 87" svg:d="M42 0c22 0 43 19 44 42 1 24-23 47-46 45-22-2-41-23-40-44 0-23 20-43 42-43z">
          <text:p/>
        </draw:path>
        <draw:path draw:style-name="gr9" draw:text-style-name="P7" draw:layer="layout" svg:width="0.082cm" svg:height="0.081cm" svg:x="16.603cm" svg:y="23.275cm" svg:viewBox="0 0 83 82" svg:d="M83 42c-1 24-18 40-43 40-22 0-40-19-40-42 1-22 20-40 42-40 23 1 42 20 41 42z">
          <text:p/>
        </draw:path>
        <draw:path draw:style-name="gr9" draw:text-style-name="P7" draw:layer="layout" svg:width="0.083cm" svg:height="0.083cm" svg:x="16.894cm" svg:y="19.77cm" svg:viewBox="0 0 84 84" svg:d="M42 0c21-1 42 20 42 42 0 21-20 42-41 42-22 1-42-19-43-41 0-22 20-43 42-43z">
          <text:p/>
        </draw:path>
        <draw:path draw:style-name="gr9" draw:text-style-name="P7" draw:layer="layout" svg:width="0.083cm" svg:height="0.081cm" svg:x="3.757cm" svg:y="19.188cm" svg:viewBox="0 0 84 82" svg:d="M84 38c1 22-18 43-40 44-21 2-43-16-44-38-2-22 17-43 40-44 22-2 42 16 44 38z">
          <text:p/>
        </draw:path>
        <draw:path draw:style-name="gr9" draw:text-style-name="P7" draw:layer="layout" svg:width="0.082cm" svg:height="0.083cm" svg:x="8.43cm" svg:y="14.517cm" svg:viewBox="0 0 83 84" svg:d="M83 39c1 22-17 43-40 45-21 2-43-17-43-40-1-26 16-41 38-44 22-2 43 18 45 39z">
          <text:p/>
        </draw:path>
        <draw:path draw:style-name="gr9" draw:text-style-name="P7" draw:layer="layout" svg:width="0.083cm" svg:height="0.083cm" svg:x="4.341cm" svg:y="17.727cm" svg:viewBox="0 0 84 84" svg:d="M0 42c0-21 20-42 41-42 22-1 42 20 43 41 0 21-20 43-42 43-21 1-42-21-42-42z">
          <text:p/>
        </draw:path>
        <draw:path draw:style-name="gr9" draw:text-style-name="P7" draw:layer="layout" svg:width="0.081cm" svg:height="0.083cm" svg:x="14.559cm" svg:y="26.194cm" svg:viewBox="0 0 82 84" svg:d="M82 44c-1 22-20 41-43 40-22-1-39-20-39-43 1-22 21-42 43-41s39 21 39 44z">
          <text:p/>
        </draw:path>
        <draw:path draw:style-name="gr9" draw:text-style-name="P7" draw:layer="layout" svg:width="0.081cm" svg:height="0.082cm" svg:x="4.051cm" svg:y="18.311cm" svg:viewBox="0 0 82 83" svg:d="M40 0c21-1 42 19 42 41 1 23-18 41-40 42-23 1-41-17-42-40 0-23 17-42 40-43z">
          <text:p/>
        </draw:path>
        <draw:path draw:style-name="gr9" draw:text-style-name="P7" draw:layer="layout" svg:width="0.082cm" svg:height="0.08cm" svg:x="4.926cm" svg:y="16.852cm" svg:viewBox="0 0 83 81" svg:d="M43 0c24 1 41 20 40 42-1 23-19 40-43 39-23 0-41-21-40-42 2-22 21-40 43-39z">
          <text:p/>
        </draw:path>
        <draw:path draw:style-name="gr9" draw:text-style-name="P7" draw:layer="layout" svg:width="0.081cm" svg:height="0.082cm" svg:x="6.094cm" svg:y="15.684cm" svg:viewBox="0 0 82 83" svg:d="M82 45c-1 22-21 40-43 38-24-2-40-21-39-44 2-22 22-41 44-39 23 2 39 22 38 45z">
          <text:p/>
        </draw:path>
        <draw:path draw:style-name="gr9" draw:text-style-name="P7" draw:layer="layout" svg:width="0.081cm" svg:height="0.082cm" svg:x="12.516cm" svg:y="27.361cm" svg:viewBox="0 0 82 83" svg:d="M41 83c-23-1-41-20-41-43 1-22 21-41 42-40 22 0 40 20 40 42s-19 42-41 41z">
          <text:p/>
        </draw:path>
        <draw:path draw:style-name="gr9" draw:text-style-name="P7" draw:layer="layout" svg:width="0.082cm" svg:height="0.081cm" svg:x="7.553cm" svg:y="14.809cm" svg:viewBox="0 0 83 82" svg:d="M83 42c-1 23-19 40-42 40-23-1-41-20-41-41 1-24 19-41 43-41 23 0 40 18 40 42z">
          <text:p/>
        </draw:path>
        <draw:path draw:style-name="gr9" draw:text-style-name="P7" draw:layer="layout" svg:width="0.081cm" svg:height="0.08cm" svg:x="5.802cm" svg:y="26.196cm" svg:viewBox="0 0 82 81" svg:d="M37 0c22-2 44 18 45 39 0 20-22 42-42 42-18 0-37-17-39-36-4-21 14-44 36-45z">
          <text:p/>
        </draw:path>
        <draw:path draw:style-name="gr9" draw:text-style-name="P7" draw:layer="layout" svg:width="0.082cm" svg:height="0.082cm" svg:x="5.218cm" svg:y="16.561cm" svg:viewBox="0 0 83 83" svg:d="M41 0c23 0 42 19 42 41 0 23-21 42-43 42-21 0-41-20-40-43 0-22 19-41 41-40z">
          <text:p/>
        </draw:path>
        <draw:path draw:style-name="gr9" draw:text-style-name="P7" draw:layer="layout" svg:width="0.083cm" svg:height="0.081cm" svg:x="5.801cm" svg:y="15.978cm" svg:viewBox="0 0 84 82" svg:d="M38 82c-21-2-40-24-38-45 2-22 21-38 44-37s42 22 40 43c-3 23-23 40-46 39z">
          <text:p/>
        </draw:path>
        <draw:path draw:style-name="gr9" draw:text-style-name="P7" draw:layer="layout" svg:width="0.08cm" svg:height="0.08cm" svg:x="3.759cm" svg:y="22.984cm" svg:viewBox="0 0 81 81" svg:d="M38 81c-21-2-40-24-38-45 3-22 24-39 46-36 20 3 35 21 35 40 0 22-22 42-43 41z">
          <text:p/>
        </draw:path>
        <draw:path draw:style-name="gr9" draw:text-style-name="P7" draw:layer="layout" svg:width="0.084cm" svg:height="0.083cm" svg:x="4.633cm" svg:y="17.436cm" svg:viewBox="0 0 85 84" svg:d="M85 42c-1 24-18 42-42 42-23 0-41-17-43-40-1-25 19-45 45-44 24 1 40 19 40 42z">
          <text:p/>
        </draw:path>
        <draw:path draw:style-name="gr9" draw:text-style-name="P7" draw:layer="layout" svg:width="0.083cm" svg:height="0.081cm" svg:x="15.434cm" svg:y="25.318cm" svg:viewBox="0 0 84 82" svg:d="M84 42c-2 23-17 40-42 40-23 0-43-21-42-42 1-22 21-40 44-40 21 0 41 20 40 42z">
          <text:p/>
        </draw:path>
        <draw:path draw:style-name="gr9" draw:text-style-name="P7" draw:layer="layout" svg:width="0.08cm" svg:height="0.081cm" svg:x="12.226cm" svg:y="14.518cm" svg:viewBox="0 0 81 82" svg:d="M81 42c0 20-22 42-43 40-22-2-40-23-38-44 2-20 20-37 39-38 22 0 43 21 42 42z">
          <text:p/>
        </draw:path>
        <draw:path draw:style-name="gr9" draw:text-style-name="P7" draw:layer="layout" svg:width="0.086cm" svg:height="0.085cm" svg:x="4.049cm" svg:y="23.274cm" svg:viewBox="0 0 87 86" svg:d="M41 0c23-1 43 14 45 38 3 25-16 46-41 48-22 1-42-16-45-38-3-26 15-47 41-48z">
          <text:p/>
        </draw:path>
        <draw:path draw:style-name="gr9" draw:text-style-name="P7" draw:layer="layout" svg:width="0.081cm" svg:height="0.082cm" svg:x="4.635cm" svg:y="24.734cm" svg:viewBox="0 0 82 83" svg:d="M82 43c0 22-20 42-41 40-22-1-41-13-41-41 0-23 19-42 42-42 22 1 41 22 40 43z">
          <text:p/>
        </draw:path>
        <draw:path draw:style-name="gr9" draw:text-style-name="P7" draw:layer="layout" svg:width="0.082cm" svg:height="0.081cm" svg:x="9.012cm" svg:y="27.655cm" svg:viewBox="0 0 83 82" svg:d="M83 37c2 20-17 43-39 45-22 1-41-15-44-39-3-20 15-41 38-43 22-2 43 15 45 37z">
          <text:p/>
        </draw:path>
        <draw:path draw:style-name="gr9" draw:text-style-name="P7" draw:layer="layout" svg:width="0.077cm" svg:height="0.077cm" svg:x="9.308cm" svg:y="14.227cm" svg:viewBox="0 0 78 78" svg:d="M42 0c22 2 39 22 35 45-3 20-20 34-40 33-22-2-40-23-37-44 5-20 24-35 42-34z">
          <text:p/>
        </draw:path>
        <draw:path draw:style-name="gr9" draw:text-style-name="P7" draw:layer="layout" svg:width="0.078cm" svg:height="0.079cm" svg:x="9.891cm" svg:y="14.226cm" svg:viewBox="0 0 79 80" svg:d="M79 40c1 23-17 40-41 40-21-1-36-16-38-36-2-22 15-42 37-44 23-1 42 18 42 40z">
          <text:p/>
        </draw:path>
        <draw:path draw:style-name="gr9" draw:text-style-name="P7" draw:layer="layout" svg:width="0.078cm" svg:height="0.079cm" svg:x="10.475cm" svg:y="14.226cm" svg:viewBox="0 0 79 80" svg:d="M41 0c22 2 40 22 38 44-1 21-21 38-44 36-20-2-35-18-35-39 0-23 19-42 41-41z">
          <text:p/>
        </draw:path>
        <draw:path draw:style-name="gr9" draw:text-style-name="P7" draw:layer="layout" svg:width="0.081cm" svg:height="0.079cm" svg:x="11.641cm" svg:y="27.656cm" svg:viewBox="0 0 82 80" svg:d="M82 41c-4 22-23 41-45 39-21-2-40-25-36-46 3-22 23-37 46-33 19 2 36 21 35 40z">
          <text:p/>
        </draw:path>
        <draw:path draw:style-name="gr9" draw:text-style-name="P7" draw:layer="layout" svg:width="0.079cm" svg:height="0.08cm" svg:x="13.687cm" svg:y="15.102cm" svg:viewBox="0 0 80 81" svg:d="M37 0c21-2 42 18 43 39 0 23-20 42-42 42-19-1-37-17-38-38-2-22 15-42 37-43z">
          <text:p/>
        </draw:path>
        <draw:path draw:style-name="gr9" draw:text-style-name="P7" draw:layer="layout" svg:width="0.078cm" svg:height="0.079cm" svg:x="13.102cm" svg:y="14.81cm" svg:viewBox="0 0 79 80" svg:d="M38 80c-23-1-40-19-38-43 1-20 16-36 36-37 23-1 42 16 43 38 1 23-18 42-41 42z">
          <text:p/>
        </draw:path>
        <draw:path draw:style-name="gr9" draw:text-style-name="P7" draw:layer="layout" svg:width="0.085cm" svg:height="0.085cm" svg:x="12.514cm" svg:y="14.807cm" svg:viewBox="0 0 86 86" svg:d="M86 41c1 23-15 42-37 44-27 3-47-14-49-40-1-23 15-43 37-45 27-3 48 15 49 41z">
          <text:p/>
        </draw:path>
        <draw:path draw:style-name="gr9" draw:text-style-name="P7" draw:layer="layout" svg:width="0.084cm" svg:height="0.082cm" svg:x="7.845cm" svg:y="14.808cm" svg:viewBox="0 0 85 83" svg:d="M85 40c0 23-17 42-40 43-23 2-42-15-44-37-4-25 16-46 41-46 24 1 42 17 43 40z">
          <text:p/>
        </draw:path>
        <draw:path draw:style-name="gr9" draw:text-style-name="P7" draw:layer="layout" svg:width="0.079cm" svg:height="0.078cm" svg:x="5.511cm" svg:y="25.903cm" svg:viewBox="0 0 80 79" svg:d="M80 43c-1 23-21 39-44 36-20-1-35-18-36-38 0-22 19-41 41-41s40 19 39 43z">
          <text:p/>
        </draw:path>
        <draw:path draw:style-name="gr9" draw:text-style-name="P7" draw:layer="layout" svg:width="0.078cm" svg:height="0.079cm" svg:x="8.722cm" svg:y="27.656cm" svg:viewBox="0 0 79 80" svg:d="M38 80c-21-1-39-21-38-43s20-39 43-37c22 2 36 18 36 38 1 23-18 42-41 42z">
          <text:p/>
        </draw:path>
        <draw:path draw:style-name="gr9" draw:text-style-name="P7" draw:layer="layout" svg:width="0.08cm" svg:height="0.079cm" svg:x="14.853cm" svg:y="15.979cm" svg:viewBox="0 0 81 80" svg:d="M43 0c22 2 41 24 37 44-3 20-20 36-39 36-23 0-42-19-41-42 0-23 19-39 43-38z">
          <text:p/>
        </draw:path>
        <draw:path draw:style-name="gr9" draw:text-style-name="P7" draw:layer="layout" svg:width="0.079cm" svg:height="0.078cm" svg:x="15.145cm" svg:y="16.269cm" svg:viewBox="0 0 80 79" svg:d="M44 79c-25 2-43-16-44-38 0-22 19-41 41-41 20 0 37 16 39 35 2 23-14 43-36 44z">
          <text:p/>
        </draw:path>
        <draw:path draw:style-name="gr9" draw:text-style-name="P7" draw:layer="layout" svg:width="0.077cm" svg:height="0.076cm" svg:x="15.73cm" svg:y="16.854cm" svg:viewBox="0 0 78 77" svg:d="M37 77c-22-1-39-20-37-43 3-19 20-35 40-34s37 17 38 36c1 23-18 42-41 41z">
          <text:p/>
        </draw:path>
        <draw:path draw:style-name="gr9" draw:text-style-name="P7" draw:layer="layout" svg:width="0.082cm" svg:height="0.081cm" svg:x="16.895cm" svg:y="22.106cm" svg:viewBox="0 0 83 82" svg:d="M83 40c1 23-19 42-41 42-25 0-40-14-42-40-2-22 17-41 39-42 22 0 42 18 44 40z">
          <text:p/>
        </draw:path>
        <draw:path draw:style-name="gr9" draw:text-style-name="P7" draw:layer="layout" svg:width="0.076cm" svg:height="0.076cm" svg:x="4.054cm" svg:y="18.023cm" svg:viewBox="0 0 77 77" svg:d="M77 40c0 22-21 40-42 37-20-2-36-19-35-39 0-21 17-37 37-38 22-1 41 17 40 40z">
          <text:p/>
        </draw:path>
        <draw:path draw:style-name="gr9" draw:text-style-name="P7" draw:layer="layout" svg:width="0.081cm" svg:height="0.08cm" svg:x="16.312cm" svg:y="18.021cm" svg:viewBox="0 0 82 81" svg:d="M38 0c24-1 43 16 44 39s-16 41-40 42c-23 1-41-15-42-38s16-42 38-43z">
          <text:p/>
        </draw:path>
        <draw:path draw:style-name="gr9" draw:text-style-name="P7" draw:layer="layout" svg:width="0.078cm" svg:height="0.078cm" svg:x="3.468cm" svg:y="21.818cm" svg:viewBox="0 0 79 79" svg:d="M79 36c1 23-17 43-39 43-22 1-41-19-40-41 0-21 16-37 36-38 23-2 42 14 43 36z">
          <text:p/>
        </draw:path>
        <draw:path draw:style-name="gr9" draw:text-style-name="P7" draw:layer="layout" svg:width="0.082cm" svg:height="0.083cm" svg:x="4.051cm" svg:y="18.603cm" svg:viewBox="0 0 83 84" svg:d="M83 41c0 24-16 42-39 43-25 2-45-17-44-44 0-23 19-40 42-40 23 1 41 18 41 41z">
          <text:p/>
        </draw:path>
        <draw:path draw:style-name="gr9" draw:text-style-name="P7" draw:layer="layout" svg:width="0.083cm" svg:height="0.082cm" svg:x="13.099cm" svg:y="27.07cm" svg:viewBox="0 0 84 83" svg:d="M42 83c-24 1-41-16-42-39s16-43 38-44c27-1 47 18 46 44-1 23-18 39-42 39z">
          <text:p/>
        </draw:path>
        <draw:path draw:style-name="gr9" draw:text-style-name="P7" draw:layer="layout" svg:width="0.081cm" svg:height="0.08cm" svg:x="7.262cm" svg:y="27.071cm" svg:viewBox="0 0 82 81" svg:d="M37 0c23-1 43 16 45 38 1 22-15 42-39 43-23 2-41-13-43-36s14-43 37-45z">
          <text:p/>
        </draw:path>
        <draw:path draw:style-name="gr9" draw:text-style-name="P7" draw:layer="layout" svg:width="0.077cm" svg:height="0.077cm" svg:x="6.096cm" svg:y="26.488cm" svg:viewBox="0 0 78 78" svg:d="M78 40c-1 19-17 37-37 38-22 1-42-20-41-41 1-22 23-39 44-37 20 2 34 20 34 40z">
          <text:p/>
        </draw:path>
        <draw:path draw:style-name="gr9" draw:text-style-name="P7" draw:layer="layout" svg:width="0.078cm" svg:height="0.08cm" svg:x="16.313cm" svg:y="24.152cm" svg:viewBox="0 0 79 81" svg:d="M79 38c1 22-17 42-39 43-20 1-38-15-40-35-3-23 12-44 35-46 20-3 42 17 44 38z">
          <text:p/>
        </draw:path>
        <draw:path draw:style-name="gr9" draw:text-style-name="P7" draw:layer="layout" svg:width="0.076cm" svg:height="0.076cm" svg:x="3.469cm" svg:y="20.066cm" svg:viewBox="0 0 77 77" svg:d="M77 40c-1 22-22 39-44 37-20-2-34-19-33-39 0-23 21-41 42-38 19 2 36 20 35 40z">
          <text:p/>
        </draw:path>
        <draw:path draw:style-name="gr9" draw:text-style-name="P7" draw:layer="layout" svg:width="0.078cm" svg:height="0.078cm" svg:x="3.467cm" svg:y="21.234cm" svg:viewBox="0 0 79 79" svg:d="M79 37c1 23-16 42-38 42-21 1-39-14-41-33-3-23 13-44 36-46 22-2 42 14 43 37z">
          <text:p/>
        </draw:path>
        <draw:path draw:style-name="gr9" draw:text-style-name="P7" draw:layer="layout" svg:width="0.078cm" svg:height="0.078cm" svg:x="3.467cm" svg:y="20.649cm" svg:viewBox="0 0 79 79" svg:d="M37 0c22-2 41 15 42 37 1 24-17 42-40 42-20 0-37-15-39-35-3-23 14-43 37-44z">
          <text:p/>
        </draw:path>
        <draw:path draw:style-name="gr9" draw:text-style-name="P7" draw:layer="layout" svg:width="0.078cm" svg:height="0.078cm" svg:x="4.053cm" svg:y="23.861cm" svg:viewBox="0 0 79 79" svg:d="M79 40c-1 23-20 40-43 39-22-2-39-21-36-45 2-20 18-34 38-34 24-1 42 17 41 40z">
          <text:p/>
        </draw:path>
        <draw:path draw:style-name="gr9" draw:text-style-name="P7" draw:layer="layout" svg:width="0.084cm" svg:height="0.082cm" svg:x="16.31cm" svg:y="23.859cm" svg:viewBox="0 0 85 83" svg:d="M85 39c0 24-17 42-40 44-23 1-42-15-44-37-4-26 16-47 41-46 24 0 42 16 43 39z">
          <text:p/>
        </draw:path>
        <draw:path draw:style-name="gr9" draw:text-style-name="P7" draw:layer="layout" svg:width="0.08cm" svg:height="0.08cm" svg:x="11.349cm" svg:y="27.655cm" svg:viewBox="0 0 81 81" svg:d="M81 43c-1 24-20 40-43 38-23-1-39-21-38-43 1-23 20-39 43-38 24 1 40 20 38 43z">
          <text:p/>
        </draw:path>
        <draw:path draw:style-name="gr9" draw:text-style-name="P7" draw:layer="layout" svg:width="0.08cm" svg:height="0.079cm" svg:x="6.388cm" svg:y="15.394cm" svg:viewBox="0 0 81 80" svg:d="M81 38c1 21-19 42-41 42s-41-19-40-41c0-20 16-37 36-39 24-1 43 16 45 38z">
          <text:p/>
        </draw:path>
        <draw:path draw:style-name="gr9" draw:text-style-name="P7" draw:layer="layout" svg:width="0.083cm" svg:height="0.082cm" svg:x="6.677cm" svg:y="15.392cm" svg:viewBox="0 0 84 83" svg:d="M42 0c23 0 41 17 42 39 0 24-16 43-38 44-26 2-46-17-46-44 1-22 19-39 42-39z">
          <text:p/>
        </draw:path>
        <draw:path draw:style-name="gr9" draw:text-style-name="P7" draw:layer="layout" svg:width="0.081cm" svg:height="0.08cm" svg:x="13.975cm" svg:y="15.393cm" svg:viewBox="0 0 82 81" svg:d="M42 0c24 0 41 19 40 42s-20 40-42 39c-23-1-40-19-40-41 1-22 19-40 42-40z">
          <text:p/>
        </draw:path>
        <draw:path draw:style-name="gr9" draw:text-style-name="P7" draw:layer="layout" svg:width="0.083cm" svg:height="0.082cm" svg:x="9.305cm" svg:y="27.654cm" svg:viewBox="0 0 84 83" svg:d="M84 41c0 23-16 41-39 42-25 2-46-17-45-43 1-24 20-41 43-40 23 0 40 17 41 41z">
          <text:p/>
        </draw:path>
        <draw:path draw:style-name="gr9" draw:text-style-name="P7" draw:layer="layout" svg:width="0.079cm" svg:height="0.079cm" svg:x="3.759cm" svg:y="18.897cm" svg:viewBox="0 0 80 80" svg:d="M37 80c-22-1-40-23-37-43 3-21 21-37 39-37 21-1 43 20 41 42-1 24-17 38-43 38z">
          <text:p/>
        </draw:path>
        <draw:path draw:style-name="gr9" draw:text-style-name="P7" draw:layer="layout" svg:width="0.078cm" svg:height="0.08cm" svg:x="8.138cm" svg:y="14.519cm" svg:viewBox="0 0 79 81" svg:d="M43 0c23 1 38 20 36 44-1 20-19 36-38 37-21 0-42-21-41-42 0-22 22-40 43-39z">
          <text:p/>
        </draw:path>
        <draw:path draw:style-name="gr9" draw:text-style-name="P7" draw:layer="layout" svg:width="0.079cm" svg:height="0.079cm" svg:x="5.22cm" svg:y="25.613cm" svg:viewBox="0 0 80 80" svg:d="M80 39c0 22-20 41-42 41-21 0-39-20-38-42 1-21 17-37 37-38 24 0 43 17 43 39z">
          <text:p/>
        </draw:path>
        <draw:path draw:style-name="gr9" draw:text-style-name="P7" draw:layer="layout" svg:width="0.079cm" svg:height="0.08cm" svg:x="6.679cm" svg:y="26.779cm" svg:viewBox="0 0 80 81" svg:d="M38 0c20-2 42 18 42 40 0 19-16 38-36 40-20 4-42-15-44-37-1-23 15-42 38-43z">
          <text:p/>
        </draw:path>
        <draw:path draw:style-name="gr9" draw:text-style-name="P7" draw:layer="layout" svg:width="0.078cm" svg:height="0.079cm" svg:x="3.468cm" svg:y="20.358cm" svg:viewBox="0 0 79 80" svg:d="M79 39c0 21-20 42-41 41-22-2-40-22-38-44 1-20 18-35 38-36 22-2 41 17 41 39z">
          <text:p/>
        </draw:path>
        <draw:path draw:style-name="gr9" draw:text-style-name="P7" draw:layer="layout" svg:width="0.079cm" svg:height="0.079cm" svg:x="16.021cm" svg:y="17.438cm" svg:viewBox="0 0 80 80" svg:d="M37 0c23-2 42 15 43 38 2 19-13 39-34 41-23 3-43-13-46-35-3-20 16-42 37-44z">
          <text:p/>
        </draw:path>
        <draw:path draw:style-name="gr9" draw:text-style-name="P7" draw:layer="layout" svg:width="0.079cm" svg:height="0.079cm" svg:x="4.636cm" svg:y="17.146cm" svg:viewBox="0 0 80 80" svg:d="M80 40c0 21-20 41-41 40-22 0-40-20-39-44 2-20 19-36 39-36 21-1 41 18 41 40z">
          <text:p/>
        </draw:path>
        <draw:path draw:style-name="gr9" draw:text-style-name="P7" draw:layer="layout" svg:width="0.078cm" svg:height="0.079cm" svg:x="15.73cm" svg:y="25.028cm" svg:viewBox="0 0 79 80" svg:d="M79 35c1 23-17 43-38 45-21 1-41-18-41-41-1-20 13-37 33-39 27-2 43 15 46 35z">
          <text:p/>
        </draw:path>
        <draw:path draw:style-name="gr9" draw:text-style-name="P7" draw:layer="layout" svg:width="0.079cm" svg:height="0.08cm" svg:x="15.436cm" svg:y="16.563cm" svg:viewBox="0 0 80 81" svg:d="M44 80c-21 2-42-17-44-39-2-18 15-38 34-41 24-3 44 13 46 35 3 21-15 43-36 45z">
          <text:p/>
        </draw:path>
        <draw:path draw:style-name="gr9" draw:text-style-name="P7" draw:layer="layout" svg:width="0.08cm" svg:height="0.079cm" svg:x="9.597cm" svg:y="14.226cm" svg:viewBox="0 0 81 80" svg:d="M42 80c-23 0-43-20-42-41 3-22 22-40 44-39 20 2 35 18 37 39 3 21-17 41-39 41z">
          <text:p/>
        </draw:path>
        <draw:path draw:style-name="gr9" draw:text-style-name="P7" draw:layer="layout" svg:width="0.078cm" svg:height="0.079cm" svg:x="16.897cm" svg:y="22.401cm" svg:viewBox="0 0 79 80" svg:d="M79 41c0 21-22 40-43 39s-38-21-36-44c1-20 17-35 38-36 23 0 42 18 41 41z">
          <text:p/>
        </draw:path>
        <draw:path draw:style-name="gr9" draw:text-style-name="P7" draw:layer="layout" svg:width="0.079cm" svg:height="0.08cm" svg:x="3.468cm" svg:y="20.94cm" svg:viewBox="0 0 80 81" svg:d="M79 38c2 23-16 42-38 43-19 1-39-14-41-34-3-23 13-44 35-47 17-2 43 13 44 38z">
          <text:p/>
        </draw:path>
        <draw:path draw:style-name="gr9" draw:text-style-name="P7" draw:layer="layout" svg:width="0.078cm" svg:height="0.079cm" svg:x="16.897cm" svg:y="19.481cm" svg:viewBox="0 0 79 80" svg:d="M79 38c2 18-15 38-34 41-23 3-43-12-45-35s11-41 35-44c21-3 42 16 44 38z">
          <text:p/>
        </draw:path>
        <draw:path draw:style-name="gr9" draw:text-style-name="P7" draw:layer="layout" svg:width="0.079cm" svg:height="0.079cm" svg:x="10.181cm" svg:y="14.226cm" svg:viewBox="0 0 80 80" svg:d="M80 41c-1 24-19 40-42 39-20-2-36-17-38-37s17-42 39-43 41 18 41 41z">
          <text:p/>
        </draw:path>
        <draw:path draw:style-name="gr9" draw:text-style-name="P7" draw:layer="layout" svg:width="0.076cm" svg:height="0.077cm" svg:x="11.351cm" svg:y="14.227cm" svg:viewBox="0 0 77 78" svg:d="M41 78c-22 0-42-19-41-40 1-20 18-36 38-38 21-1 40 17 39 41 0 20-16 36-36 37z">
          <text:p/>
        </draw:path>
        <draw:path draw:style-name="gr9" draw:text-style-name="P7" draw:layer="layout" svg:width="0.079cm" svg:height="0.079cm" svg:x="7.848cm" svg:y="27.362cm" svg:viewBox="0 0 80 80" svg:d="M39 0c21 0 41 19 41 41s-21 40-43 39c-21-1-36-17-37-38 0-23 16-42 39-42z">
          <text:p/>
        </draw:path>
        <draw:path draw:style-name="gr9" draw:text-style-name="P7" draw:layer="layout" svg:width="0.079cm" svg:height="0.078cm" svg:x="16.604cm" svg:y="18.606cm" svg:viewBox="0 0 80 79" svg:d="M80 40c-1 24-20 41-42 39s-41-25-38-45c3-21 24-36 47-34 20 2 34 20 33 40z">
          <text:p/>
        </draw:path>
        <draw:path draw:style-name="gr9" draw:text-style-name="P7" draw:layer="layout" svg:width="0.079cm" svg:height="0.079cm" svg:x="10.766cm" svg:y="14.226cm" svg:viewBox="0 0 80 80" svg:d="M80 40c1 23-17 40-40 40-24-1-37-18-40-35-3-20 16-43 38-45 22-1 41 16 42 40z">
          <text:p/>
        </draw:path>
        <draw:path draw:style-name="gr9" draw:text-style-name="P7" draw:layer="layout" svg:width="0.078cm" svg:height="0.079cm" svg:x="4.342cm" svg:y="24.445cm" svg:viewBox="0 0 79 80" svg:d="M0 43c-2-18 13-39 32-42 24-4 45 11 47 34 3 27-16 43-36 45s-41-16-43-37z">
          <text:p/>
        </draw:path>
        <draw:path draw:style-name="gr9" draw:text-style-name="P7" draw:layer="layout" svg:width="0.079cm" svg:height="0.079cm" svg:x="11.058cm" svg:y="14.226cm" svg:viewBox="0 0 80 80" svg:d="M38 0c23 0 42 20 42 41 0 22-19 39-42 39-21-1-36-16-38-36-1-23 16-44 38-44z">
          <text:p/>
        </draw:path>
        <draw:path draw:style-name="gr9" draw:text-style-name="P7" draw:layer="layout" svg:width="0.076cm" svg:height="0.077cm" svg:x="11.934cm" svg:y="27.657cm" svg:viewBox="0 0 77 78" svg:d="M39 0c21 1 37 15 38 35 1 23-17 43-38 43-23-1-41-22-39-44 1-19 19-34 39-34z">
          <text:p/>
        </draw:path>
        <draw:path draw:style-name="gr9" draw:text-style-name="P7" draw:layer="layout" svg:width="0.078cm" svg:height="0.075cm" svg:x="16.605cm" svg:y="23.569cm" svg:viewBox="0 0 79 76" svg:d="M38 0c21-2 38 14 41 35 1 22-13 39-34 41-22 3-45-15-45-37 0-19 19-38 38-39z">
          <text:p/>
        </draw:path>
        <draw:path draw:style-name="gr9" draw:text-style-name="P7" draw:layer="layout" svg:width="0.079cm" svg:height="0.079cm" svg:x="14.27cm" svg:y="26.487cm" svg:viewBox="0 0 80 80" svg:d="M80 40c0 21-20 40-43 40-22-1-39-22-37-44 2-21 18-36 38-36 23 0 42 18 42 40z">
          <text:p/>
        </draw:path>
        <draw:path draw:style-name="gr9" draw:text-style-name="P7" draw:layer="layout" svg:width="0.078cm" svg:height="0.079cm" svg:x="13.392cm" svg:y="27.072cm" svg:viewBox="0 0 79 80" svg:d="M39 80c-22-1-41-21-39-42 1-23 21-39 43-38 21 1 36 18 36 39 1 23-18 41-40 41z">
          <text:p/>
        </draw:path>
        <draw:path draw:style-name="gr9" draw:text-style-name="P7" draw:layer="layout" svg:width="0.074cm" svg:height="0.075cm" svg:x="8.724cm" svg:y="14.228cm" svg:viewBox="0 0 75 76" svg:d="M39 76c-20 1-38-16-39-36-1-18 17-39 36-40 20-1 38 18 39 37 1 20-15 38-36 39z">
          <text:p/>
        </draw:path>
        <draw:path draw:style-name="gr9" draw:text-style-name="P7" draw:layer="layout" svg:width="0.075cm" svg:height="0.074cm" svg:x="14.562cm" svg:y="26.489cm" svg:viewBox="0 0 76 75" svg:d="M39 0c21 1 38 19 37 39s-20 38-40 36c-19-1-37-20-36-39 2-20 20-37 39-36z">
          <text:p/>
        </draw:path>
        <draw:path draw:style-name="gr9" draw:text-style-name="P7" draw:layer="layout" svg:width="0.075cm" svg:height="0.075cm" svg:x="15.147cm" svg:y="25.905cm" svg:viewBox="0 0 76 76" svg:d="M36 0c19-1 39 17 40 37s-17 38-37 39c-20 0-37-16-39-36 0-20 17-39 36-40z">
          <text:p/>
        </draw:path>
        <draw:path draw:style-name="gr9" draw:text-style-name="P7" draw:layer="layout" svg:width="0.078cm" svg:height="0.078cm" svg:x="3.468cm" svg:y="21.524cm" svg:viewBox="0 0 79 79" svg:d="M79 44c-1 21-22 38-44 35-20-2-36-18-35-40 0-22 20-41 41-39 22 1 39 21 38 44z">
          <text:p/>
        </draw:path>
        <draw:path draw:style-name="gr9" draw:text-style-name="P7" draw:layer="layout" svg:width="0.076cm" svg:height="0.076cm" svg:x="16.606cm" svg:y="18.313cm" svg:viewBox="0 0 77 77" svg:d="M40 0c19 2 36 14 37 38 0 22-14 38-35 39-24 1-45-18-42-41 2-20 21-36 40-36z">
          <text:p/>
        </draw:path>
        <draw:path draw:style-name="gr9" draw:text-style-name="P7" draw:layer="layout" svg:width="0.076cm" svg:height="0.077cm" svg:x="4.929cm" svg:y="25.32cm" svg:viewBox="0 0 77 78" svg:d="M42 0c23 3 38 24 34 48-3 20-22 33-44 29-19-3-35-24-32-42 4-21 24-37 42-35z">
          <text:p/>
        </draw:path>
        <draw:path draw:style-name="gr9" draw:text-style-name="P7" draw:layer="layout" svg:width="0.076cm" svg:height="0.076cm" svg:x="16.898cm" svg:y="19.191cm" svg:viewBox="0 0 77 77" svg:d="M77 36c1 19-15 37-35 41-21 3-42-18-42-41 1-21 17-36 39-36 20 0 37 16 38 36z">
          <text:p/>
        </draw:path>
        <draw:path draw:style-name="gr9" draw:text-style-name="P7" draw:layer="layout" svg:width="0.076cm" svg:height="0.076cm" svg:x="16.898cm" svg:y="22.694cm" svg:viewBox="0 0 77 77" svg:d="M77 39c0 19-17 37-37 38-22 1-39-15-40-36-1-24 19-43 41-41 20 2 37 20 36 39z">
          <text:p/>
        </draw:path>
        <draw:path draw:style-name="gr9" draw:text-style-name="P7" draw:layer="layout" svg:width="0.077cm" svg:height="0.077cm" svg:x="7.264cm" svg:y="14.811cm" svg:viewBox="0 0 78 78" svg:d="M78 37c1 19-17 38-36 40-21 4-41-14-42-37 0-20 14-38 34-40 21-2 42 15 44 37z">
          <text:p/>
        </draw:path>
        <draw:path draw:style-name="gr9" draw:text-style-name="P7" draw:layer="layout" svg:width="0.076cm" svg:height="0.077cm" svg:x="7.556cm" svg:y="27.363cm" svg:viewBox="0 0 77 78" svg:d="M41 0c24 3 39 24 35 48-3 20-23 32-45 29-19-3-34-24-31-43s24-36 41-34z">
          <text:p/>
        </draw:path>
        <draw:path draw:style-name="gr9" draw:text-style-name="P7" draw:layer="layout" svg:width="0.075cm" svg:height="0.076cm" svg:x="16.022cm" svg:y="24.737cm" svg:viewBox="0 0 76 77" svg:d="M76 37c1 22-15 39-35 40-22 1-39-13-41-34-3-21 17-43 38-43 15 0 37 11 38 37z">
          <text:p/>
        </draw:path>
        <draw:path draw:style-name="gr9" draw:text-style-name="P7" draw:layer="layout" svg:width="0.075cm" svg:height="0.076cm" svg:x="16.315cm" svg:y="17.73cm" svg:viewBox="0 0 76 77" svg:d="M36 0c20 0 39 17 40 37 3 21-18 41-41 40-21-1-36-17-35-38 0-21 16-38 36-39z">
          <text:p/>
        </draw:path>
        <draw:path draw:style-name="gr9" draw:text-style-name="P7" draw:layer="layout" svg:width="0.075cm" svg:height="0.076cm" svg:x="12.811cm" svg:y="27.363cm" svg:viewBox="0 0 76 77" svg:d="M39 77c-25 0-36-14-39-35s19-43 40-42c20 1 36 19 36 39 0 23-15 38-37 38z">
          <text:p/>
        </draw:path>
        <draw:path draw:style-name="gr9" draw:text-style-name="P7" draw:layer="layout" svg:width="0.077cm" svg:height="0.075cm" svg:x="13.977cm" svg:y="26.781cm" svg:viewBox="0 0 78 76" svg:d="M78 38c0 21-15 37-37 38-20 1-38-14-41-34-2-22 18-43 40-42 21 0 37 17 38 38z">
          <text:p/>
        </draw:path>
        <draw:path draw:style-name="gr9" draw:text-style-name="P7" draw:layer="layout" svg:width="0.076cm" svg:height="0.076cm" svg:x="3.468cm" svg:y="22.109cm" svg:viewBox="0 0 77 77" svg:d="M77 41c-1 23-22 39-45 36-20-3-34-21-32-42 1-19 18-35 37-35 21-1 41 20 40 41z">
          <text:p/>
        </draw:path>
        <draw:path draw:style-name="gr9" draw:text-style-name="P7" draw:layer="layout" svg:width="0.076cm" svg:height="0.076cm" svg:x="8.433cm" svg:y="27.657cm" svg:viewBox="0 0 77 77" svg:d="M40 76c-19 2-38-14-40-35s12-39 32-41c24-3 44 14 45 36 1 20-16 39-37 40z">
          <text:p/>
        </draw:path>
        <draw:path draw:style-name="gr9" draw:text-style-name="P7" draw:layer="layout" svg:width="0.074cm" svg:height="0.074cm" svg:x="9.893cm" svg:y="27.948cm" svg:viewBox="0 0 75 75" svg:d="M35 0c19-1 39 16 40 36 2 20-16 38-36 39-21 1-38-14-39-35-1-20 16-38 35-40z">
          <text:p/>
        </draw:path>
        <draw:path draw:style-name="gr9" draw:text-style-name="P7" draw:layer="layout" svg:width="0.075cm" svg:height="0.074cm" svg:x="17.191cm" svg:y="20.651cm" svg:viewBox="0 0 76 75" svg:d="M37 0c19-1 37 15 39 36 0 21-17 38-37 39-19 1-37-16-39-36s17-38 37-39z">
          <text:p/>
        </draw:path>
        <draw:path draw:style-name="gr9" draw:text-style-name="P7" draw:layer="layout" svg:width="0.075cm" svg:height="0.076cm" svg:x="3.761cm" svg:y="23.278cm" svg:viewBox="0 0 76 77" svg:d="M39 0c20-1 36 17 37 38 1 20-14 38-34 39-24 1-44-18-42-40 2-20 18-37 39-37z">
          <text:p/>
        </draw:path>
        <draw:path draw:style-name="gr9" draw:text-style-name="P7" draw:layer="layout" svg:width="0.073cm" svg:height="0.074cm" svg:x="17.191cm" svg:y="21.236cm" svg:viewBox="0 0 74 75" svg:d="M74 38c0 21-18 38-37 37-20-1-39-20-37-39 2-20 20-37 39-36 20 0 37 17 35 38z">
          <text:p/>
        </draw:path>
        <draw:path draw:style-name="gr9" draw:text-style-name="P7" draw:layer="layout" svg:width="0.075cm" svg:height="0.073cm" svg:x="17.191cm" svg:y="21.527cm" svg:viewBox="0 0 76 74" svg:d="M76 39c-2 21-19 36-40 35s-38-19-36-39 21-37 40-35c20 1 36 19 36 39z">
          <text:p/>
        </draw:path>
        <draw:path draw:style-name="gr9" draw:text-style-name="P7" draw:layer="layout" svg:width="0.073cm" svg:height="0.074cm" svg:x="16.607cm" svg:y="23.863cm" svg:viewBox="0 0 74 75" svg:d="M39 75c-19 0-37-17-39-36 0-20 18-39 37-39 21-1 37 16 37 37 2 20-14 37-35 38z">
          <text:p/>
        </draw:path>
        <draw:path draw:style-name="gr9" draw:text-style-name="P7" draw:layer="layout" svg:width="0.075cm" svg:height="0.074cm" svg:x="3.469cm" svg:y="19.483cm" svg:viewBox="0 0 76 75" svg:d="M40 75c-21 1-39-14-40-35 0-19 16-38 36-40 19-2 38 16 40 36 1 20-16 38-36 39z">
          <text:p/>
        </draw:path>
        <draw:path draw:style-name="gr9" draw:text-style-name="P7" draw:layer="layout" svg:width="0.075cm" svg:height="0.077cm" svg:x="6.972cm" svg:y="27.073cm" svg:viewBox="0 0 76 78" svg:d="M76 38c1 20-15 38-34 40-20 1-40-14-42-34-3-17 11-44 37-44 22 0 38 16 39 38z">
          <text:p/>
        </draw:path>
        <draw:path draw:style-name="gr9" draw:text-style-name="P7" draw:layer="layout" svg:width="0.073cm" svg:height="0.074cm" svg:x="14.273cm" svg:y="15.396cm" svg:viewBox="0 0 74 75" svg:d="M34 75c-19-1-35-19-34-39 0-22 17-37 38-36 20 1 38 20 36 40-3 20-21 36-40 35z">
          <text:p/>
        </draw:path>
        <draw:path draw:style-name="gr9" draw:text-style-name="P7" draw:layer="layout" svg:width="0.073cm" svg:height="0.074cm" svg:x="4.931cm" svg:y="16.565cm" svg:viewBox="0 0 74 75" svg:d="M74 38c-1 22-20 38-39 37-20-2-37-21-35-40 1-20 18-35 38-35 21 1 37 17 36 38z">
          <text:p/>
        </draw:path>
        <draw:path draw:style-name="gr9" draw:text-style-name="P7" draw:layer="layout" svg:width="0.074cm" svg:height="0.074cm" svg:x="4.639cm" svg:y="25.03cm" svg:viewBox="0 0 75 75" svg:d="M34 0c20-1 39 15 41 34 1 20-16 38-36 41-19 2-38-15-39-36-2-21 13-38 34-39z">
          <text:p/>
        </draw:path>
        <draw:path draw:style-name="gr9" draw:text-style-name="P7" draw:layer="layout" svg:width="0.073cm" svg:height="0.073cm" svg:x="13.104cm" svg:y="27.365cm" svg:viewBox="0 0 74 74" svg:d="M39 74c-22 2-38-13-39-34-2-20 14-38 34-40 19-1 37 15 40 35 2 20-15 38-35 39z">
          <text:p/>
        </draw:path>
        <draw:path draw:style-name="gr9" draw:text-style-name="P7" draw:layer="layout" svg:width="0.075cm" svg:height="0.074cm" svg:x="15.731cm" svg:y="25.322cm" svg:viewBox="0 0 76 75" svg:d="M36 75c-20-1-36-18-36-39 1-20 20-37 39-36s37 19 37 38c-1 21-19 37-40 37z">
          <text:p/>
        </draw:path>
        <draw:path draw:style-name="gr9" draw:text-style-name="P7" draw:layer="layout" svg:width="0.073cm" svg:height="0.073cm" svg:x="5.223cm" svg:y="16.272cm" svg:viewBox="0 0 74 74" svg:d="M37 0c19 0 38 19 37 38-1 20-19 36-39 36-21 0-36-16-35-38 0-20 17-37 37-36z">
          <text:p/>
        </draw:path>
        <draw:path draw:style-name="gr9" draw:text-style-name="P7" draw:layer="layout" svg:width="0.073cm" svg:height="0.074cm" svg:x="13.396cm" svg:y="14.812cm" svg:viewBox="0 0 74 75" svg:d="M74 40c-2 21-19 37-39 35-20-1-38-20-35-38 1-22 19-37 38-37 20 1 37 18 36 40z">
          <text:p/>
        </draw:path>
        <draw:path draw:style-name="gr9" draw:text-style-name="P7" draw:layer="layout" svg:width="0.073cm" svg:height="0.074cm" svg:x="4.346cm" svg:y="17.44cm" svg:viewBox="0 0 74 75" svg:d="M74 39c-1 21-18 37-39 36-20 0-37-20-35-39 1-20 19-37 38-36 20 1 36 18 36 39z">
          <text:p/>
        </draw:path>
        <draw:path draw:style-name="gr9" draw:text-style-name="P7" draw:layer="layout" svg:width="0.075cm" svg:height="0.073cm" svg:x="3.469cm" svg:y="22.404cm" svg:viewBox="0 0 76 74" svg:d="M76 38c-2 21-21 38-41 36s-36-20-35-40c2-20 19-35 40-34s37 19 36 38z">
          <text:p/>
        </draw:path>
        <draw:path draw:style-name="gr9" draw:text-style-name="P7" draw:layer="layout" svg:width="0.074cm" svg:height="0.074cm" svg:x="10.477cm" svg:y="27.948cm" svg:viewBox="0 0 75 75" svg:d="M75 39c-1 20-20 37-40 36-20 0-36-17-35-39 1-20 19-37 38-36 20 2 38 21 37 39z">
          <text:p/>
        </draw:path>
        <draw:path draw:style-name="gr9" draw:text-style-name="P7" draw:layer="layout" svg:width="0.073cm" svg:height="0.074cm" svg:x="10.769cm" svg:y="27.948cm" svg:viewBox="0 0 74 75" svg:d="M0 35c2-19 21-36 40-35 19 2 35 20 34 40-1 22-19 37-40 35-20-1-37-21-34-40z">
          <text:p/>
        </draw:path>
        <draw:path draw:style-name="gr9" draw:text-style-name="P7" draw:layer="layout" svg:width="0.073cm" svg:height="0.073cm" svg:x="10.184cm" svg:y="27.948cm" svg:viewBox="0 0 74 74" svg:d="M74 34c1 22-14 39-35 40-20 1-38-14-39-35-3-18 15-37 34-39 19-3 38 14 40 34z">
          <text:p/>
        </draw:path>
        <draw:path draw:style-name="gr9" draw:text-style-name="P7" draw:layer="layout" svg:width="0.077cm" svg:height="0.075cm" svg:x="14.561cm" svg:y="15.686cm" svg:viewBox="0 0 78 76" svg:d="M78 42c-1 20-19 35-41 34-21 0-36-16-37-36 0-24 25-43 43-40 20 2 36 22 35 42z">
          <text:p/>
        </draw:path>
        <draw:path draw:style-name="gr9" draw:text-style-name="P7" draw:layer="layout" svg:width="0.074cm" svg:height="0.074cm" svg:x="5.514cm" svg:y="15.981cm" svg:viewBox="0 0 75 75" svg:d="M39 0c20 1 37 18 36 39-1 20-21 38-39 36-20-1-37-20-36-40 1-19 19-35 39-35z">
          <text:p/>
        </draw:path>
        <draw:path draw:style-name="gr9" draw:text-style-name="P7" draw:layer="layout" svg:width="0.075cm" svg:height="0.075cm" svg:x="16.315cm" svg:y="24.446cm" svg:viewBox="0 0 76 76" svg:d="M39 0c20 1 38 20 37 39-2 19-20 37-39 37-19-1-37-19-37-39 2-20 18-37 39-37z">
          <text:p/>
        </draw:path>
        <draw:path draw:style-name="gr9" draw:text-style-name="P7" draw:layer="layout" svg:width="0.076cm" svg:height="0.076cm" svg:x="12.519cm" svg:y="14.521cm" svg:viewBox="0 0 77 77" svg:d="M37 0c20-1 39 15 40 35 2 19-14 39-35 42s-42-18-42-40c0-20 15-36 37-37z">
          <text:p/>
        </draw:path>
        <draw:path draw:style-name="gr9" draw:text-style-name="P7" draw:layer="layout" svg:width="0.074cm" svg:height="0.075cm" svg:x="13.689cm" svg:y="27.074cm" svg:viewBox="0 0 75 76" svg:d="M75 36c1 19-18 39-37 40-20 1-38-16-38-37-1-21 15-38 35-39 19 0 38 16 40 36z">
          <text:p/>
        </draw:path>
        <draw:path draw:style-name="gr9" draw:text-style-name="P7" draw:layer="layout" svg:width="0.072cm" svg:height="0.072cm" svg:x="14.856cm" svg:y="26.2cm" svg:viewBox="0 0 73 73" svg:d="M73 37c0 21-16 36-37 36-21-1-36-16-36-39 1-20 16-35 38-34 21 0 36 15 35 37z">
          <text:p/>
        </draw:path>
        <draw:path draw:style-name="gr9" draw:text-style-name="P7" draw:layer="layout" svg:width="0.072cm" svg:height="0.071cm" svg:x="3.471cm" svg:y="22.697cm" svg:viewBox="0 0 73 72" svg:d="M34 72c-20-1-36-21-34-40s22-35 40-32 32 19 33 36c0 19-19 37-39 36z">
          <text:p/>
        </draw:path>
        <draw:path draw:style-name="gr9" draw:text-style-name="P7" draw:layer="layout" svg:width="0.072cm" svg:height="0.07cm" svg:x="3.471cm" svg:y="19.193cm" svg:viewBox="0 0 73 71" svg:d="M35 71c-20 0-37-18-35-37 1-20 19-36 39-34 17 1 33 17 34 35 1 19-17 36-38 36z">
          <text:p/>
        </draw:path>
        <draw:path draw:style-name="gr9" draw:text-style-name="P7" draw:layer="layout" svg:width="0.073cm" svg:height="0.073cm" svg:x="7.851cm" svg:y="14.522cm" svg:viewBox="0 0 74 74" svg:d="M74 36c1 19-17 37-37 38-20 0-37-16-37-37-1-21 14-36 35-37 21 0 39 16 39 36z">
          <text:p/>
        </draw:path>
        <draw:path draw:style-name="gr9" draw:text-style-name="P7" draw:layer="layout" svg:width="0.071cm" svg:height="0.072cm" svg:x="4.64cm" svg:y="16.856cm" svg:viewBox="0 0 72 73" svg:d="M37 73c-19 1-37-16-37-36 0-18 15-34 32-37s38 15 40 35c2 18-15 38-35 38z">
          <text:p/>
        </draw:path>
        <draw:path draw:style-name="gr9" draw:text-style-name="P7" draw:layer="layout" svg:width="0.072cm" svg:height="0.072cm" svg:x="16.025cm" svg:y="17.149cm" svg:viewBox="0 0 73 73" svg:d="M35 0c21 0 37 14 38 36 0 21-14 37-36 37-21 1-36-14-37-35-1-22 14-37 35-38z">
          <text:p/>
        </draw:path>
        <draw:path draw:style-name="gr9" draw:text-style-name="P7" draw:layer="layout" svg:width="0.074cm" svg:height="0.072cm" svg:x="17.19cm" svg:y="20.361cm" svg:viewBox="0 0 75 73" svg:d="M0 34c3-20 21-35 41-34 21 1 36 17 34 38-1 21-18 37-38 35s-38-19-37-39z">
          <text:p/>
        </draw:path>
        <draw:path draw:style-name="gr9" draw:text-style-name="P7" draw:layer="layout" svg:width="0.072cm" svg:height="0.072cm" svg:x="6.098cm" svg:y="15.397cm" svg:viewBox="0 0 73 73" svg:d="M33 73c-19-2-36-23-33-41 3-19 23-35 41-31 19 3 32 19 32 36-1 20-21 38-40 36z">
          <text:p/>
        </draw:path>
        <draw:path draw:style-name="gr9" draw:text-style-name="P7" draw:layer="layout" svg:width="0.072cm" svg:height="0.072cm" svg:x="16.316cm" svg:y="17.441cm" svg:viewBox="0 0 73 73" svg:d="M73 37c0 19-18 37-38 36-20 0-36-19-35-38 2-18 17-33 34-35 19-1 38 17 39 37z">
          <text:p/>
        </draw:path>
        <draw:path draw:style-name="gr9" draw:text-style-name="P7" draw:layer="layout" svg:width="0.071cm" svg:height="0.072cm" svg:x="17.192cm" svg:y="20.068cm" svg:viewBox="0 0 72 73" svg:d="M38 73c-21 0-39-19-38-38s20-37 39-35c17 2 32 17 33 34 2 20-15 39-34 39z">
          <text:p/>
        </draw:path>
        <draw:path draw:style-name="gr9" draw:text-style-name="P7" draw:layer="layout" svg:width="0.073cm" svg:height="0.072cm" svg:x="12.521cm" svg:y="27.659cm" svg:viewBox="0 0 74 73" svg:d="M74 33c2 18-15 38-36 40-16 1-33-14-37-31-4-18 11-39 31-42 19-2 39 14 42 33z">
          <text:p/>
        </draw:path>
        <draw:path draw:style-name="gr9" draw:text-style-name="P7" draw:layer="layout" svg:width="0.072cm" svg:height="0.072cm" svg:x="15.149cm" svg:y="15.982cm" svg:viewBox="0 0 73 73" svg:d="M73 36c0 19-18 37-37 37-19-1-38-20-36-39 1-17 18-33 35-34 19-1 37 16 38 36z">
          <text:p/>
        </draw:path>
        <draw:path draw:style-name="gr9" draw:text-style-name="P7" draw:layer="layout" svg:width="0.072cm" svg:height="0.071cm" svg:x="9.31cm" svg:y="27.95cm" svg:viewBox="0 0 73 72" svg:d="M73 35c1 19-16 37-36 37-17 0-34-15-37-32s15-38 35-40c18-2 37 15 38 35z">
          <text:p/>
        </draw:path>
        <draw:path draw:style-name="gr9" draw:text-style-name="P7" draw:layer="layout" svg:width="0.071cm" svg:height="0.072cm" svg:x="8.142cm" svg:y="27.659cm" svg:viewBox="0 0 72 73" svg:d="M72 39c-2 19-23 37-41 33-17-2-31-20-31-36 0-19 18-37 37-36 20 1 37 19 35 39z">
          <text:p/>
        </draw:path>
        <draw:path draw:style-name="gr9" draw:text-style-name="P7" draw:layer="layout" svg:width="0.073cm" svg:height="0.071cm" svg:x="6.391cm" svg:y="26.783cm" svg:viewBox="0 0 74 72" svg:d="M36 72c-21 0-36-15-36-35 0-22 16-37 37-37s37 16 37 37c0 20-16 35-38 35z">
          <text:p/>
        </draw:path>
        <draw:path draw:style-name="gr9" draw:text-style-name="P7" draw:layer="layout" svg:width="0.071cm" svg:height="0.074cm" svg:x="12.23cm" svg:y="27.658cm" svg:viewBox="0 0 72 75" svg:d="M72 39c-1 21-19 38-37 36-21-2-36-19-35-40 1-20 17-36 39-35 20 1 35 19 33 39z">
          <text:p/>
        </draw:path>
        <draw:path draw:style-name="gr9" draw:text-style-name="P7" draw:layer="layout" svg:width="0.072cm" svg:height="0.073cm" svg:x="15.44cm" svg:y="25.616cm" svg:viewBox="0 0 73 74" svg:d="M36 0c21-1 37 14 37 35 0 22-16 39-36 39-19 0-37-16-37-38-1-20 15-36 36-36z">
          <text:p/>
        </draw:path>
        <draw:path draw:style-name="gr9" draw:text-style-name="P7" draw:layer="layout" svg:width="0.074cm" svg:height="0.072cm" svg:x="4.055cm" svg:y="24.156cm" svg:viewBox="0 0 75 73" svg:d="M39 73c-21 1-38-13-39-34-2-20 14-37 34-39 21-1 39 14 41 35 2 19-15 37-36 38z">
          <text:p/>
        </draw:path>
        <draw:path draw:style-name="gr9" draw:text-style-name="P7" draw:layer="layout" svg:width="0.07cm" svg:height="0.071cm" svg:x="11.062cm" svg:y="27.95cm" svg:viewBox="0 0 71 72" svg:d="M37 0c20 1 35 19 34 39-2 19-20 36-40 33-18-2-31-18-31-36 0-20 17-37 37-36z">
          <text:p/>
        </draw:path>
        <draw:path draw:style-name="gr9" draw:text-style-name="P7" draw:layer="layout" svg:width="0.071cm" svg:height="0.071cm" svg:x="11.354cm" svg:y="27.95cm" svg:viewBox="0 0 72 72" svg:d="M72 34c1 20-15 38-36 38-20 0-37-18-36-37 1-18 15-32 32-35 20-2 39 14 40 34z">
          <text:p/>
        </draw:path>
        <draw:path draw:style-name="gr9" draw:text-style-name="P7" draw:layer="layout" svg:width="0.071cm" svg:height="0.074cm" svg:x="9.602cm" svg:y="27.948cm" svg:viewBox="0 0 72 75" svg:d="M72 39c0 21-16 37-37 36-21 0-36-17-35-38 0-20 18-38 38-37 19 1 35 19 34 39z">
          <text:p/>
        </draw:path>
        <draw:path draw:style-name="gr9" draw:text-style-name="P7" draw:layer="layout" svg:width="0.073cm" svg:height="0.072cm" svg:x="16.899cm" svg:y="22.988cm" svg:viewBox="0 0 74 73" svg:d="M74 36c0 20-16 37-37 37s-36-15-37-36c0-22 15-37 36-37 24 0 37 15 38 36z">
          <text:p/>
        </draw:path>
        <draw:path draw:style-name="gr9" draw:text-style-name="P7" draw:layer="layout" svg:width="0.075cm" svg:height="0.072cm" svg:x="6.681cm" svg:y="15.106cm" svg:viewBox="0 0 76 73" svg:d="M37 73c-22-1-38-18-37-39 2-20 20-35 40-34s37 19 36 38c-2 20-19 35-39 35z">
          <text:p/>
        </draw:path>
        <draw:path draw:style-name="gr9" draw:text-style-name="P7" draw:layer="layout" svg:width="0.073cm" svg:height="0.072cm" svg:x="17.191cm" svg:y="20.944cm" svg:viewBox="0 0 74 73" svg:d="M74 40c-1 20-18 34-38 33s-38-19-36-39 20-35 40-34 37 19 34 40z">
          <text:p/>
        </draw:path>
        <draw:path draw:style-name="gr9" draw:text-style-name="P7" draw:layer="layout" svg:width="0.072cm" svg:height="0.075cm" svg:x="9.018cm" svg:y="14.228cm" svg:viewBox="0 0 73 76" svg:d="M73 40c-1 20-18 36-37 36-21-1-36-18-36-38 1-25 20-38 38-38 19 0 35 20 35 40z">
          <text:p/>
        </draw:path>
        <draw:path draw:style-name="gr9" draw:text-style-name="P7" draw:layer="layout" svg:width="0.071cm" svg:height="0.075cm" svg:x="11.645cm" svg:y="14.228cm" svg:viewBox="0 0 72 76" svg:d="M38 76c-21 0-38-15-38-36-1-20 15-38 34-40 20-1 37 16 38 37 2 20-14 38-34 39z">
          <text:p/>
        </draw:path>
        <draw:path draw:style-name="gr9" draw:text-style-name="P7" draw:layer="layout" svg:width="0.072cm" svg:height="0.072cm" svg:x="11.937cm" svg:y="14.23cm" svg:viewBox="0 0 73 73" svg:d="M34 0c20-2 39 16 39 36 0 16-14 33-32 36-17 4-38-13-41-33-2-18 15-37 34-39z">
          <text:p/>
        </draw:path>
        <draw:path draw:style-name="gr9" draw:text-style-name="P7" draw:layer="layout" svg:width="0.074cm" svg:height="0.072cm" svg:x="3.47cm" svg:y="19.776cm" svg:viewBox="0 0 75 73" svg:d="M35 73c-20-1-37-20-35-39 1-20 17-35 38-34s38 18 37 37-19 37-40 36z">
          <text:p/>
        </draw:path>
        <draw:path draw:style-name="gr9" draw:text-style-name="P7" draw:layer="layout" svg:width="0.072cm" svg:height="0.069cm" svg:x="4.056cm" svg:y="17.734cm" svg:viewBox="0 0 73 70" svg:d="M73 32c1 17-13 35-29 37-22 4-40-8-44-29-3-19 12-38 33-40 20-2 38 13 40 32z">
          <text:p/>
        </draw:path>
        <draw:path draw:style-name="gr9" draw:text-style-name="P7" draw:layer="layout" svg:width="0.069cm" svg:height="0.072cm" svg:x="16.61cm" svg:y="18.025cm" svg:viewBox="0 0 70 73" svg:d="M70 39c-1 21-22 37-40 34-17-3-30-19-30-37 0-20 18-37 36-36 21 2 36 20 34 39z">
          <text:p/>
        </draw:path>
        <draw:path draw:style-name="gr9" draw:text-style-name="P7" draw:layer="layout" svg:width="0.072cm" svg:height="0.074cm" svg:x="3.763cm" svg:y="18.608cm" svg:viewBox="0 0 73 75" svg:d="M39 75c-19 1-37-16-39-36-1-20 15-38 34-39 22-1 38 16 39 36s-14 38-34 39z">
          <text:p/>
        </draw:path>
        <draw:path draw:style-name="gr9" draw:text-style-name="P7" draw:layer="layout" svg:width="0.068cm" svg:height="0.072cm" svg:x="6.977cm" svg:y="14.813cm" svg:viewBox="0 0 69 73" svg:d="M34 73c-19-1-35-20-34-40 0-17 14-32 31-33 19-2 38 14 38 34 1 20-17 39-35 39z">
          <text:p/>
        </draw:path>
        <draw:path draw:style-name="gr9" draw:text-style-name="P7" draw:layer="layout" svg:width="0.071cm" svg:height="0.071cm" svg:x="17.192cm" svg:y="21.821cm" svg:viewBox="0 0 72 72" svg:d="M35 0c20-1 38 17 37 36 0 17-13 33-30 36-19 3-39-13-42-32-2-19 15-39 35-40z">
          <text:p/>
        </draw:path>
        <draw:path draw:style-name="gr9" draw:text-style-name="P7" draw:layer="layout" svg:width="0.072cm" svg:height="0.072cm" svg:x="5.806cm" svg:y="15.689cm" svg:viewBox="0 0 73 73" svg:d="M73 37c0 22-16 36-38 36-20 0-35-15-35-38 1-20 17-36 37-35 20 0 37 17 36 37z">
          <text:p/>
        </draw:path>
        <draw:path draw:style-name="gr9" draw:text-style-name="P7" draw:layer="layout" svg:width="0.072cm" svg:height="0.071cm" svg:x="17.192cm" svg:y="22.112cm" svg:viewBox="0 0 73 72" svg:d="M36 0c19-1 36 17 37 37 0 17-15 32-31 35-20 2-40-14-42-33-2-18 15-38 36-39z">
          <text:p/>
        </draw:path>
        <draw:path draw:style-name="gr9" draw:text-style-name="P7" draw:layer="layout" svg:width="0.066cm" svg:height="0.069cm" svg:x="3.766cm" svg:y="23.865cm" svg:viewBox="0 0 67 70" svg:d="M67 37c0 18-17 33-33 33-18 0-33-16-34-34 0-21 18-39 38-36 18 3 30 18 29 37z">
          <text:p/>
        </draw:path>
        <draw:path draw:style-name="gr9" draw:text-style-name="P7" draw:layer="layout" svg:width="0.067cm" svg:height="0.069cm" svg:x="3.182cm" svg:y="21.238cm" svg:viewBox="0 0 68 70" svg:d="M35 70c-18 0-34-16-35-34-1-21 17-39 37-36 19 2 31 17 31 35-1 19-17 35-33 35z">
          <text:p/>
        </draw:path>
        <draw:path draw:style-name="gr9" draw:text-style-name="P7" draw:layer="layout" svg:width="0.069cm" svg:height="0.072cm" svg:x="8.436cm" svg:y="14.23cm" svg:viewBox="0 0 70 73" svg:d="M39 0c18 2 34 23 31 42-2 16-19 31-35 31-20-1-36-19-35-38 0-20 19-37 39-35z">
          <text:p/>
        </draw:path>
        <draw:path draw:style-name="gr9" draw:text-style-name="P7" draw:layer="layout" svg:width="0.068cm" svg:height="0.067cm" svg:x="15.734cm" svg:y="16.567cm" svg:viewBox="0 0 69 68" svg:d="M69 39c-2 17-18 30-36 29-17-1-34-17-33-33 1-21 22-38 41-34 16 2 30 21 28 38z">
          <text:p/>
        </draw:path>
        <draw:path draw:style-name="gr9" draw:text-style-name="P7" draw:layer="layout" svg:width="0.068cm" svg:height="0.066cm" svg:x="3.472cm" svg:y="22.99cm" svg:viewBox="0 0 69 67" svg:d="M69 32c2 16-12 34-29 35-20 2-35-8-39-27-5-18 12-39 33-40 18-1 33 14 35 32z">
          <text:p/>
        </draw:path>
        <draw:path draw:style-name="gr9" draw:text-style-name="P7" draw:layer="layout" svg:width="0.066cm" svg:height="0.069cm" svg:x="5.809cm" svg:y="26.491cm" svg:viewBox="0 0 67 70" svg:d="M67 33c1 20-11 35-29 37-20 3-39-15-38-36 0-17 16-33 34-34 16 0 32 16 33 33z">
          <text:p/>
        </draw:path>
        <draw:path draw:style-name="gr9" draw:text-style-name="P7" draw:layer="layout" svg:width="0.067cm" svg:height="0.069cm" svg:x="3.182cm" svg:y="20.653cm" svg:viewBox="0 0 68 70" svg:d="M35 70c-18 0-34-15-35-32-1-21 17-40 37-38 19 3 31 18 31 37-1 18-17 33-33 33z">
          <text:p/>
        </draw:path>
        <draw:path draw:style-name="gr9" draw:text-style-name="P7" draw:layer="layout" svg:width="0.071cm" svg:height="0.069cm" svg:x="7.266cm" svg:y="27.368cm" svg:viewBox="0 0 72 70" svg:d="M72 35c-1 19-18 36-38 35-20 0-36-19-34-39 1-17 17-30 34-31 20-1 38 16 38 35z">
          <text:p/>
        </draw:path>
        <draw:path draw:style-name="gr9" draw:text-style-name="P7" draw:layer="layout" svg:width="0.069cm" svg:height="0.072cm" svg:x="5.224cm" svg:y="25.907cm" svg:viewBox="0 0 70 73" svg:d="M33 72c-20-1-35-19-33-40 1-19 21-35 39-32s31 19 31 36c0 20-19 38-37 36z">
          <text:p/>
        </draw:path>
        <draw:path draw:style-name="gr9" draw:text-style-name="P7" draw:layer="layout" svg:width="0.069cm" svg:height="0.066cm" svg:x="9.895cm" svg:y="13.94cm" svg:viewBox="0 0 70 67" svg:d="M34 0c18-1 33 12 36 31 2 17-13 34-30 36-21 2-41-14-40-33 1-16 13-34 34-34z">
          <text:p/>
        </draw:path>
        <draw:path draw:style-name="gr9" draw:text-style-name="P7" draw:layer="layout" svg:width="0.07cm" svg:height="0.071cm" svg:x="16.9cm" svg:y="23.28cm" svg:viewBox="0 0 71 72" svg:d="M34 0c19-1 37 17 37 36 0 18-14 34-30 36-20 3-39-12-41-33-1-20 14-37 34-39z">
          <text:p/>
        </draw:path>
        <draw:path draw:style-name="gr9" draw:text-style-name="P7" draw:layer="layout" svg:width="0.068cm" svg:height="0.068cm" svg:x="14.565cm" svg:y="15.398cm" svg:viewBox="0 0 69 69" svg:d="M35 69c-18 1-34-13-35-31-2-16 13-35 31-38 19-2 39 18 38 37 0 17-16 32-34 32z">
          <text:p/>
        </draw:path>
        <draw:path draw:style-name="gr9" draw:text-style-name="P7" draw:layer="layout" svg:width="0.069cm" svg:height="0.068cm" svg:x="4.057cm" svg:y="24.449cm" svg:viewBox="0 0 70 69" svg:d="M34 0c18-1 34 15 36 32 1 17-14 35-32 37-20 1-39-17-38-36 1-17 17-33 34-33z">
          <text:p/>
        </draw:path>
        <draw:path draw:style-name="gr9" draw:text-style-name="P7" draw:layer="layout" svg:width="0.069cm" svg:height="0.069cm" svg:x="16.9cm" svg:y="18.903cm" svg:viewBox="0 0 70 70" svg:d="M70 31c1 23-14 39-36 39-18 0-33-13-34-33-2-20 14-38 35-37 19 0 32 9 35 31z">
          <text:p/>
        </draw:path>
        <draw:path draw:style-name="gr9" draw:text-style-name="P7" draw:layer="layout" svg:width="0.067cm" svg:height="0.067cm" svg:x="11.647cm" svg:y="27.953cm" svg:viewBox="0 0 68 68" svg:d="M68 35c-1 18-16 33-33 33-17 1-34-15-35-32-1-21 16-38 37-36 18 1 31 15 31 35z">
          <text:p/>
        </draw:path>
        <draw:path draw:style-name="gr9" draw:text-style-name="P7" draw:layer="layout" svg:width="0.071cm" svg:height="0.069cm" svg:x="5.516cm" svg:y="26.201cm" svg:viewBox="0 0 72 70" svg:d="M32 69c-19-1-35-20-32-38 4-22 21-34 41-31 18 2 31 19 31 36-1 20-18 35-40 33z">
          <text:p/>
        </draw:path>
        <draw:path draw:style-name="gr9" draw:text-style-name="P7" draw:layer="layout" svg:width="0.067cm" svg:height="0.067cm" svg:x="9.02cm" svg:y="27.953cm" svg:viewBox="0 0 68 68" svg:d="M31 0c18-2 35 11 37 30 2 20-15 39-35 38-17 0-32-16-33-33 0-19 13-34 31-35z">
          <text:p/>
        </draw:path>
        <draw:path draw:style-name="gr9" draw:text-style-name="P7" draw:layer="layout" svg:width="0.067cm" svg:height="0.069cm" svg:x="12.232cm" svg:y="14.232cm" svg:viewBox="0 0 68 70" svg:d="M35 70c-17 0-34-16-35-33-1-20 18-39 38-37 18 2 30 18 30 36-1 18-16 33-33 34z">
          <text:p/>
        </draw:path>
        <draw:path draw:style-name="gr9" draw:text-style-name="P7" draw:layer="layout" svg:width="0.072cm" svg:height="0.072cm" svg:x="6.682cm" svg:y="27.075cm" svg:viewBox="0 0 73 73" svg:d="M73 38c0 19-20 37-38 35-18-1-33-17-35-33-1-20 16-39 36-40 19 0 38 18 37 38z">
          <text:p/>
        </draw:path>
        <draw:path draw:style-name="gr9" draw:text-style-name="P7" draw:layer="layout" svg:width="0.07cm" svg:height="0.069cm" svg:x="14.274cm" svg:y="26.784cm" svg:viewBox="0 0 71 70" svg:d="M71 36c-2 22-19 36-42 33-17-2-30-18-29-37 1-21 18-35 40-32 18 2 32 18 31 36z">
          <text:p/>
        </draw:path>
        <draw:path draw:style-name="gr9" draw:text-style-name="P7" draw:layer="layout" svg:width="0.068cm" svg:height="0.067cm" svg:x="17.195cm" svg:y="19.778cm" svg:viewBox="0 0 69 68" svg:d="M69 36c-2 18-17 32-36 32-21-1-36-19-32-40 4-19 19-30 37-28 17 2 33 20 31 36z">
          <text:p/>
        </draw:path>
        <draw:path draw:style-name="gr9" draw:text-style-name="P7" draw:layer="layout" svg:width="0.069cm" svg:height="0.069cm" svg:x="4.348cm" svg:y="24.741cm" svg:viewBox="0 0 70 70" svg:d="M35 0c19 0 34 13 35 31 2 21-13 39-34 39-22 1-37-17-36-38 1-18 15-31 35-32z">
          <text:p/>
        </draw:path>
        <draw:path draw:style-name="gr9" draw:text-style-name="P7" draw:layer="layout" svg:width="0.068cm" svg:height="0.072cm" svg:x="15.441cm" svg:y="16.273cm" svg:viewBox="0 0 69 73" svg:d="M32 0c19-1 37 16 37 36 1 18-10 32-28 36-21 4-40-11-41-31-2-23 9-35 32-41z">
          <text:p/>
        </draw:path>
        <draw:path draw:style-name="gr9" draw:text-style-name="P7" draw:layer="layout" svg:width="0.069cm" svg:height="0.068cm" svg:x="7.852cm" svg:y="27.66cm" svg:viewBox="0 0 70 69" svg:d="M33 0c17-1 34 13 36 31 4 17-10 35-28 38-19 3-40-13-41-34 0-16 16-33 33-35z">
          <text:p/>
        </draw:path>
        <draw:path draw:style-name="gr9" draw:text-style-name="P7" draw:layer="layout" svg:width="0.068cm" svg:height="0.066cm" svg:x="10.479cm" svg:y="13.94cm" svg:viewBox="0 0 69 67" svg:d="M69 35c0 18-14 32-33 32-18 1-34-12-36-30-1-21 17-38 37-37 18 1 32 16 32 35z">
          <text:p/>
        </draw:path>
        <draw:path draw:style-name="gr9" draw:text-style-name="P7" draw:layer="layout" svg:width="0.068cm" svg:height="0.07cm" svg:x="16.027cm" svg:y="25.031cm" svg:viewBox="0 0 69 71" svg:d="M69 38c-1 18-16 34-34 33-20 0-36-12-35-38 0-18 15-32 33-33 21 0 38 16 36 38z">
          <text:p/>
        </draw:path>
        <draw:path draw:style-name="gr9" draw:text-style-name="P7" draw:layer="layout" svg:width="0.071cm" svg:height="0.069cm" svg:x="13.98cm" svg:y="15.108cm" svg:viewBox="0 0 72 70" svg:d="M39 69c-20 2-37-13-39-32-1-17 14-35 30-37 22-3 40 10 42 30 3 20-12 38-33 39z">
          <text:p/>
        </draw:path>
        <draw:path draw:style-name="gr9" draw:text-style-name="P7" draw:layer="layout" svg:width="0.068cm" svg:height="0.066cm" svg:x="13.106cm" svg:y="14.525cm" svg:viewBox="0 0 69 67" svg:d="M69 34c0 18-15 33-33 33-19 1-34-12-36-30-2-20 15-38 35-37 18 1 34 15 34 34z">
          <text:p/>
        </draw:path>
        <draw:path draw:style-name="gr9" draw:text-style-name="P7" draw:layer="layout" svg:width="0.068cm" svg:height="0.067cm" svg:x="8.727cm" svg:y="27.953cm" svg:viewBox="0 0 69 68" svg:d="M34 68c-17-1-33-17-34-34-1-20 21-37 40-34 17 2 32 22 29 37-3 18-19 32-35 31z">
          <text:p/>
        </draw:path>
        <draw:path draw:style-name="gr9" draw:text-style-name="P7" draw:layer="layout" svg:width="0.066cm" svg:height="0.067cm" svg:x="16.902cm" svg:y="18.61cm" svg:viewBox="0 0 67 68" svg:d="M34 68c-19 0-34-15-34-34-1-20 18-37 38-34 18 2 30 17 29 36s-16 33-33 32z">
          <text:p/>
        </draw:path>
        <draw:path draw:style-name="gr9" draw:text-style-name="P7" draw:layer="layout" svg:width="0.069cm" svg:height="0.069cm" svg:x="3.765cm" svg:y="23.573cm" svg:viewBox="0 0 70 70" svg:d="M70 32c1 21-15 38-36 38-18-1-33-16-34-34s12-34 30-36c21-2 38 11 40 32z">
          <text:p/>
        </draw:path>
        <draw:path draw:style-name="gr9" draw:text-style-name="P7" draw:layer="layout" svg:width="0.067cm" svg:height="0.067cm" svg:x="17.195cm" svg:y="19.488cm" svg:viewBox="0 0 68 68" svg:d="M34 0c18 0 35 16 34 33 0 20-21 38-39 35-17-3-30-19-29-38 1-18 16-31 34-30z">
          <text:p/>
        </draw:path>
        <draw:path draw:style-name="gr9" draw:text-style-name="P7" draw:layer="layout" svg:width="0.067cm" svg:height="0.066cm" svg:x="16.318cm" svg:y="24.743cm" svg:viewBox="0 0 68 67" svg:d="M35 0c18 0 33 15 33 33 0 19-15 34-33 34-20 1-37-17-35-37 1-18 17-31 35-30z">
          <text:p/>
        </draw:path>
        <draw:path draw:style-name="gr9" draw:text-style-name="P7" draw:layer="layout" svg:width="0.068cm" svg:height="0.069cm" svg:x="12.815cm" svg:y="14.524cm" svg:viewBox="0 0 69 70" svg:d="M0 39c-1-22 15-40 35-39 18 0 33 14 34 32 2 21-13 38-34 38-18 0-34-14-35-31z">
          <text:p/>
        </draw:path>
        <draw:path draw:style-name="gr9" draw:text-style-name="P7" draw:layer="layout" svg:width="0.067cm" svg:height="0.068cm" svg:x="17.195cm" svg:y="22.406cm" svg:viewBox="0 0 68 69" svg:d="M68 35c1 17-16 32-33 34-19 1-34-13-35-31-2-21 15-39 35-38 17 2 33 18 33 35z">
          <text:p/>
        </draw:path>
        <draw:path draw:style-name="gr9" draw:text-style-name="P7" draw:layer="layout" svg:width="0.068cm" svg:height="0.067cm" svg:x="4.641cm" svg:y="25.326cm" svg:viewBox="0 0 69 68" svg:d="M36 68c-17 1-33-13-36-30-3-20 17-39 37-38 18 1 32 16 32 35-1 18-15 33-33 33z">
          <text:p/>
        </draw:path>
        <draw:path draw:style-name="gr9" draw:text-style-name="P7" draw:layer="layout" svg:width="0.067cm" svg:height="0.066cm" svg:x="10.188cm" svg:y="13.94cm" svg:viewBox="0 0 68 67" svg:d="M30 67c-18-2-31-17-30-36 2-19 18-32 35-31 21 1 36 20 32 40-3 17-18 28-37 27z">
          <text:p/>
        </draw:path>
        <draw:path draw:style-name="gr9" draw:text-style-name="P7" draw:layer="layout" svg:width="0.064cm" svg:height="0.064cm" svg:x="3.183cm" svg:y="20.073cm" svg:viewBox="0 0 65 65" svg:d="M35 0c19 1 32 16 30 34-1 16-18 32-35 31-17-2-31-19-30-36s17-30 35-29z">
          <text:p/>
        </draw:path>
        <draw:path draw:style-name="gr9" draw:text-style-name="P7" draw:layer="layout" svg:width="0.064cm" svg:height="0.065cm" svg:x="3.183cm" svg:y="21.823cm" svg:viewBox="0 0 65 66" svg:d="M32 0c15 0 33 16 33 32 1 19-13 34-32 34-18 0-33-14-33-31 0-18 16-34 32-35z">
          <text:p/>
        </draw:path>
        <draw:path draw:style-name="gr9" draw:text-style-name="P7" draw:layer="layout" svg:width="0.064cm" svg:height="0.064cm" svg:x="9.315cm" svg:y="13.941cm" svg:viewBox="0 0 65 65" svg:d="M65 35c-2 18-18 31-36 30-17-1-31-17-29-36 1-17 17-31 34-29 17 1 32 18 31 35z">
          <text:p/>
        </draw:path>
        <draw:path draw:style-name="gr9" draw:text-style-name="P7" draw:layer="layout" svg:width="0.066cm" svg:height="0.066cm" svg:x="14.859cm" svg:y="15.693cm" svg:viewBox="0 0 67 67" svg:d="M67 33c0 19-15 34-32 34-21 1-36-16-35-38 2-17 17-30 36-29s32 15 31 33z">
          <text:p/>
        </draw:path>
        <draw:path draw:style-name="gr9" draw:text-style-name="P7" draw:layer="layout" svg:width="0.064cm" svg:height="0.064cm" svg:x="5.52cm" svg:y="15.694cm" svg:viewBox="0 0 65 65" svg:d="M65 32c0 17-17 33-34 33-18 0-32-17-31-35s14-30 31-30c18 0 35 15 34 32z">
          <text:p/>
        </draw:path>
        <draw:path draw:style-name="gr9" draw:text-style-name="P7" draw:layer="layout" svg:width="0.067cm" svg:height="0.066cm" svg:x="16.611cm" svg:y="24.159cm" svg:viewBox="0 0 68 67" svg:d="M32 67c-18 0-32-15-32-33 1-19 15-34 33-34 20 0 37 17 35 38-2 17-18 30-36 29z">
          <text:p/>
        </draw:path>
        <draw:path draw:style-name="gr9" draw:text-style-name="P7" draw:layer="layout" svg:width="0.064cm" svg:height="0.064cm" svg:x="15.153cm" svg:y="26.203cm" svg:viewBox="0 0 65 65" svg:d="M65 37c-2 17-17 29-36 28-17-1-31-18-29-35 2-18 18-32 35-30 18 2 32 20 30 37z">
          <text:p/>
        </draw:path>
        <draw:path draw:style-name="gr9" draw:text-style-name="P7" draw:layer="layout" svg:width="0.066cm" svg:height="0.066cm" svg:x="4.35cm" svg:y="17.152cm" svg:viewBox="0 0 67 67" svg:d="M67 36c-1 18-16 31-36 31-17 0-32-15-31-34 0-21 17-36 38-33 18 3 31 18 29 36z">
          <text:p/>
        </draw:path>
        <draw:path draw:style-name="gr9" draw:text-style-name="P7" draw:layer="layout" svg:width="0.067cm" svg:height="0.066cm" svg:x="3.182cm" svg:y="21.531cm" svg:viewBox="0 0 68 67" svg:d="M36 67c-19 0-34-13-36-31-1-18 11-34 30-36 21-3 38 12 38 33-1 18-15 33-32 34z">
          <text:p/>
        </draw:path>
        <draw:path draw:style-name="gr9" draw:text-style-name="P7" draw:layer="layout" svg:width="0.064cm" svg:height="0.066cm" svg:x="14.86cm" svg:y="26.493cm" svg:viewBox="0 0 65 67" svg:d="M33 0c17 0 32 16 32 33 0 18-15 34-32 34-18-1-33-17-33-34s16-33 33-33z">
          <text:p/>
        </draw:path>
        <draw:path draw:style-name="gr9" draw:text-style-name="P7" draw:layer="layout" svg:width="0.064cm" svg:height="0.065cm" svg:x="16.029cm" svg:y="16.86cm" svg:viewBox="0 0 65 66" svg:d="M65 35c0 16-17 32-33 31-16 0-32-16-32-33 0-18 16-33 34-33 18 1 32 17 31 35z">
          <text:p/>
        </draw:path>
        <draw:path draw:style-name="gr9" draw:text-style-name="P7" draw:layer="layout" svg:width="0.067cm" svg:height="0.066cm" svg:x="10.773cm" svg:y="13.94cm" svg:viewBox="0 0 68 67" svg:d="M34 67c-19 1-33-13-34-31 0-20 13-35 31-36 21-1 38 15 37 36-1 17-15 31-34 31z">
          <text:p/>
        </draw:path>
        <draw:path draw:style-name="gr9" draw:text-style-name="P7" draw:layer="layout" svg:width="0.064cm" svg:height="0.064cm" svg:x="4.351cm" svg:y="25.034cm" svg:viewBox="0 0 65 65" svg:d="M64 37c-2 17-18 29-36 28-19-2-31-17-28-36 2-17 18-31 36-29 17 3 30 21 28 37z">
          <text:p/>
        </draw:path>
        <draw:path draw:style-name="gr9" draw:text-style-name="P7" draw:layer="layout" svg:width="0.067cm" svg:height="0.066cm" svg:x="13.4cm" svg:y="27.37cm" svg:viewBox="0 0 68 67" svg:d="M68 33c-1 21-19 36-40 34-18-3-29-19-28-38 1-18 17-31 36-29 22 1 32 19 32 33z">
          <text:p/>
        </draw:path>
        <draw:path draw:style-name="gr9" draw:text-style-name="P7" draw:layer="layout" svg:width="0.065cm" svg:height="0.064cm" svg:x="11.358cm" svg:y="13.941cm" svg:viewBox="0 0 66 65" svg:d="M34 0c16 1 32 17 32 33-1 17-17 32-34 32s-32-15-32-34c1-17 17-32 34-31z">
          <text:p/>
        </draw:path>
        <draw:path draw:style-name="gr9" draw:text-style-name="P7" draw:layer="layout" svg:width="0.065cm" svg:height="0.064cm" svg:x="12.817cm" svg:y="27.662cm" svg:viewBox="0 0 66 65" svg:d="M32 0c16-1 33 15 34 33 0 17-14 32-32 32-18 1-34-13-34-31s16-34 32-34z">
          <text:p/>
        </draw:path>
        <draw:path draw:style-name="gr9" draw:text-style-name="P7" draw:layer="layout" svg:width="0.065cm" svg:height="0.064cm" svg:x="4.936cm" svg:y="16.278cm" svg:viewBox="0 0 66 65" svg:d="M34 0c17 0 33 17 32 33-2 16-18 32-34 32-17 0-32-16-32-33 0-18 15-33 34-32z">
          <text:p/>
        </draw:path>
        <draw:path draw:style-name="gr9" draw:text-style-name="P7" draw:layer="layout" svg:width="0.064cm" svg:height="0.065cm" svg:x="15.444cm" svg:y="25.911cm" svg:viewBox="0 0 65 66" svg:d="M33 0c18 0 32 14 32 32 0 16-16 34-32 34-17 0-33-17-33-34 0-18 15-32 33-32z">
          <text:p/>
        </draw:path>
        <draw:path draw:style-name="gr9" draw:text-style-name="P7" draw:layer="layout" svg:width="0.064cm" svg:height="0.064cm" svg:x="3.474cm" svg:y="18.906cm" svg:viewBox="0 0 65 65" svg:d="M34 65c-17 0-34-15-34-32-1-17 15-33 33-33 18-1 32 14 32 32 1 17-14 33-31 33z">
          <text:p/>
        </draw:path>
        <draw:path draw:style-name="gr9" draw:text-style-name="P7" draw:layer="layout" svg:width="0.064cm" svg:height="0.064cm" svg:x="6.686cm" svg:y="14.817cm" svg:viewBox="0 0 65 65" svg:d="M33 0c17-1 32 15 32 32 0 18-15 34-32 33-17 0-34-16-33-33 0-17 17-32 33-32z">
          <text:p/>
        </draw:path>
        <draw:path draw:style-name="gr9" draw:text-style-name="P7" draw:layer="layout" svg:width="0.068cm" svg:height="0.068cm" svg:x="13.691cm" svg:y="14.815cm" svg:viewBox="0 0 69 69" svg:d="M68 32c2 18-13 36-29 37-17 2-36-12-39-30s15-38 35-39c16-1 32 15 33 32z">
          <text:p/>
        </draw:path>
        <draw:path draw:style-name="gr9" draw:text-style-name="P7" draw:layer="layout" svg:width="0.064cm" svg:height="0.064cm" svg:x="16.903cm" svg:y="18.321cm" svg:viewBox="0 0 65 65" svg:d="M35 0c17 0 31 14 30 34-1 21-20 32-33 31-18-2-33-18-32-34 1-18 16-32 35-31z">
          <text:p/>
        </draw:path>
        <draw:path draw:style-name="gr9" draw:text-style-name="P7" draw:layer="layout" svg:width="0.067cm" svg:height="0.066cm" svg:x="4.935cm" svg:y="25.618cm" svg:viewBox="0 0 68 67" svg:d="M68 35c0 17-15 32-34 32-18 1-33-12-34-30-1-20 12-35 29-37 21-2 38 14 39 35z">
          <text:p/>
        </draw:path>
        <draw:path draw:style-name="gr9" draw:text-style-name="P7" draw:layer="layout" svg:width="0.064cm" svg:height="0.064cm" svg:x="5.81cm" svg:y="15.4cm" svg:viewBox="0 0 65 65" svg:d="M31 0c17-1 33 15 34 32s-13 33-32 33c-18 0-33-15-33-32s15-33 31-33z">
          <text:p/>
        </draw:path>
        <draw:path draw:style-name="gr9" draw:text-style-name="P7" draw:layer="layout" svg:width="0.067cm" svg:height="0.069cm" svg:x="13.983cm" svg:y="27.077cm" svg:viewBox="0 0 68 70" svg:d="M0 37c-1-18 13-35 30-37 19-2 39 16 38 36 0 17-17 33-34 34-16 1-33-15-34-33z">
          <text:p/>
        </draw:path>
        <draw:path draw:style-name="gr9" draw:text-style-name="P7" draw:layer="layout" svg:width="0.067cm" svg:height="0.066cm" svg:x="3.766cm" svg:y="18.319cm" svg:viewBox="0 0 68 67" svg:d="M36 67c-19 1-34-14-36-32-1-18 11-33 30-35 21-3 38 13 38 33-1 17-15 33-32 34z">
          <text:p/>
        </draw:path>
        <draw:path draw:style-name="gr9" draw:text-style-name="P7" draw:layer="layout" svg:width="0.066cm" svg:height="0.064cm" svg:x="6.102cm" svg:y="26.787cm" svg:viewBox="0 0 67 65" svg:d="M67 32c-1 17-17 33-35 33-17 0-32-16-32-34 1-17 15-31 33-31s34 16 34 32z">
          <text:p/>
        </draw:path>
        <draw:path draw:style-name="gr9" draw:text-style-name="P7" draw:layer="layout" svg:width="0.064cm" svg:height="0.065cm" svg:x="3.767cm" svg:y="18.028cm" svg:viewBox="0 0 65 66" svg:d="M31 0c17 0 34 15 34 32 1 17-13 33-32 34-17 1-32-13-33-32 0-17 14-33 31-34z">
          <text:p/>
        </draw:path>
        <draw:path draw:style-name="gr9" draw:text-style-name="P7" draw:layer="layout" svg:width="0.067cm" svg:height="0.066cm" svg:x="7.561cm" svg:y="14.525cm" svg:viewBox="0 0 68 67" svg:d="M32 0c18 0 34 12 36 31 2 20-15 37-36 36-18 0-32-15-32-33 1-19 15-34 32-34z">
          <text:p/>
        </draw:path>
        <draw:path draw:style-name="gr9" draw:text-style-name="P7" draw:layer="layout" svg:width="0.064cm" svg:height="0.065cm" svg:x="3.183cm" svg:y="22.116cm" svg:viewBox="0 0 65 66" svg:d="M65 32c0 16-17 34-32 34-16 0-32-18-33-34 0-17 15-32 32-32 19 0 34 14 33 32z">
          <text:p/>
        </draw:path>
        <draw:path draw:style-name="gr9" draw:text-style-name="P7" draw:layer="layout" svg:width="0.064cm" svg:height="0.064cm" svg:x="8.438cm" svg:y="27.955cm" svg:viewBox="0 0 65 65" svg:d="M65 30c0 17-13 34-31 35-16 0-32-14-34-32-2-16 13-32 30-33 20-1 34 12 35 30z">
          <text:p/>
        </draw:path>
        <draw:path draw:style-name="gr9" draw:text-style-name="P7" draw:layer="layout" svg:width="0.064cm" svg:height="0.064cm" svg:x="7.269cm" svg:y="14.526cm" svg:viewBox="0 0 65 65" svg:d="M32 0c16-1 33 14 33 31 1 19-14 34-32 34-17 0-33-15-33-32-1-16 15-32 32-33z">
          <text:p/>
        </draw:path>
        <draw:path draw:style-name="gr9" draw:text-style-name="P7" draw:layer="layout" svg:width="0.061cm" svg:height="0.062cm" svg:x="9.023cm" svg:y="13.942cm" svg:viewBox="0 0 62 63" svg:d="M62 34c-1 16-15 29-31 29-17 0-33-18-31-35 2-15 17-28 31-28 18 0 33 17 31 34z">
          <text:p/>
        </draw:path>
        <draw:path draw:style-name="gr9" draw:text-style-name="P7" draw:layer="layout" svg:width="0.059cm" svg:height="0.059cm" svg:x="3.769cm" svg:y="17.739cm" svg:viewBox="0 0 60 60" svg:d="M28 0c15-1 30 12 32 26 3 16-14 35-31 34-14-1-29-17-29-30 0-14 14-29 28-30z">
          <text:p/>
        </draw:path>
        <draw:path draw:style-name="gr9" draw:text-style-name="P7" draw:layer="layout" svg:width="0.064cm" svg:height="0.063cm" svg:x="7.563cm" svg:y="27.662cm" svg:viewBox="0 0 65 64" svg:d="M64 38c-3 17-20 29-40 25-18-3-28-20-23-40 4-15 21-26 36-23 18 3 31 21 27 38z">
          <text:p/>
        </draw:path>
        <draw:path draw:style-name="gr9" draw:text-style-name="P7" draw:layer="layout" svg:width="0.064cm" svg:height="0.064cm" svg:x="4.642cm" svg:y="16.569cm" svg:viewBox="0 0 65 65" svg:d="M64 39c-3 19-20 28-40 25-12-2-27-19-24-34 3-19 19-32 36-30 19 3 31 20 28 39z">
          <text:p/>
        </draw:path>
        <draw:path draw:style-name="gr9" draw:text-style-name="P7" draw:layer="layout" svg:width="0.062cm" svg:height="0.061cm" svg:x="17.489cm" svg:y="20.95cm" svg:viewBox="0 0 63 62" svg:d="M63 31c0 15-12 29-28 31-17 2-35-14-35-31 0-16 17-33 34-31 16 1 29 16 29 31z">
          <text:p/>
        </draw:path>
        <draw:path draw:style-name="gr9" draw:text-style-name="P7" draw:layer="layout" svg:width="0.067cm" svg:height="0.067cm" svg:x="3.182cm" svg:y="20.947cm" svg:viewBox="0 0 68 68" svg:d="M68 35c-1 18-15 33-33 33-21 0-37-17-35-38 2-17 18-31 37-30 18 2 31 17 31 35z">
          <text:p/>
        </draw:path>
        <draw:path draw:style-name="gr9" draw:text-style-name="P7" draw:layer="layout" svg:width="0.062cm" svg:height="0.062cm" svg:x="11.649cm" svg:y="13.942cm" svg:viewBox="0 0 63 63" svg:d="M63 31c1 15-12 30-28 32-18 1-35-15-35-32 0-14 14-29 28-31 18-2 35 14 35 31z">
          <text:p/>
        </draw:path>
        <draw:path draw:style-name="gr9" draw:text-style-name="P7" draw:layer="layout" svg:width="0.065cm" svg:height="0.064cm" svg:x="11.064cm" svg:y="13.941cm" svg:viewBox="0 0 66 65" svg:d="M66 33c-1 19-16 33-34 32-17-1-33-17-32-34s17-32 34-31c18 0 32 15 32 33z">
          <text:p/>
        </draw:path>
        <draw:path draw:style-name="gr9" draw:text-style-name="P7" draw:layer="layout" svg:width="0.067cm" svg:height="0.066cm" svg:x="6.394cm" svg:y="15.109cm" svg:viewBox="0 0 68 67" svg:d="M67 35c-1 19-16 33-35 32-20 0-35-18-32-40 3-17 18-29 37-27s32 17 30 35z">
          <text:p/>
        </draw:path>
        <draw:path draw:style-name="gr9" draw:text-style-name="P7" draw:layer="layout" svg:width="0.061cm" svg:height="0.062cm" svg:x="3.768cm" svg:y="24.161cm" svg:viewBox="0 0 62 63" svg:d="M62 35c-2 18-22 32-38 27-16-4-26-18-24-33 2-19 19-32 36-28 16 4 28 19 26 34z">
          <text:p/>
        </draw:path>
        <draw:path draw:style-name="gr9" draw:text-style-name="P7" draw:layer="layout" svg:width="0.064cm" svg:height="0.064cm" svg:x="6.979cm" svg:y="27.371cm" svg:viewBox="0 0 65 65" svg:d="M35 0c18 1 32 17 30 34s-18 32-34 31c-19-2-32-18-31-36 1-17 16-30 35-29z">
          <text:p/>
        </draw:path>
        <draw:path draw:style-name="gr9" draw:text-style-name="P7" draw:layer="layout" svg:width="0.064cm" svg:height="0.064cm" svg:x="17.197cm" svg:y="19.195cm" svg:viewBox="0 0 65 65" svg:d="M65 36c-2 19-18 31-38 29-16-1-27-15-27-32 0-18 16-34 33-33 18 2 33 19 32 36z">
          <text:p/>
        </draw:path>
        <draw:path draw:style-name="gr9" draw:text-style-name="P7" draw:layer="layout" svg:width="0.064cm" svg:height="0.064cm" svg:x="4.059cm" svg:y="17.446cm" svg:viewBox="0 0 65 65" svg:d="M65 31c0 18-13 34-31 34-15 1-33-16-34-32-1-17 15-32 33-33 17-1 32 14 32 31z">
          <text:p/>
        </draw:path>
        <draw:path draw:style-name="gr9" draw:text-style-name="P7" draw:layer="layout" svg:width="0.061cm" svg:height="0.061cm" svg:x="3.185cm" svg:y="19.781cm" svg:viewBox="0 0 62 62" svg:d="M30 0c14-2 29 10 32 25 4 18-8 35-27 37-15 2-30-9-34-24-4-16 10-36 29-38z">
          <text:p/>
        </draw:path>
        <draw:path draw:style-name="gr9" draw:text-style-name="P7" draw:layer="layout" svg:width="0.062cm" svg:height="0.061cm" svg:x="17.489cm" svg:y="20.366cm" svg:viewBox="0 0 63 62" svg:d="M63 31c0 16-12 30-28 31-18 2-35-13-35-31 0-17 18-33 34-31 16 1 29 16 29 31z">
          <text:p/>
        </draw:path>
        <draw:path draw:style-name="gr9" draw:text-style-name="P7" draw:layer="layout" svg:width="0.064cm" svg:height="0.063cm" svg:x="3.183cm" svg:y="20.364cm" svg:viewBox="0 0 65 64" svg:d="M35 64c-18 2-33-11-35-29-1-18 12-34 30-35 17-2 34 11 35 30 2 18-11 33-30 34z">
          <text:p/>
        </draw:path>
        <draw:path draw:style-name="gr9" draw:text-style-name="P7" draw:layer="layout" svg:width="0.064cm" svg:height="0.064cm" svg:x="9.606cm" svg:y="13.941cm" svg:viewBox="0 0 65 65" svg:d="M64 38c-3 19-20 30-37 26-19-3-30-19-27-38 4-17 21-29 39-25 17 3 29 20 25 37z">
          <text:p/>
        </draw:path>
        <draw:path draw:style-name="gr9" draw:text-style-name="P7" draw:layer="layout" svg:width="0.064cm" svg:height="0.064cm" svg:x="3.474cm" svg:y="23.285cm" svg:viewBox="0 0 65 65" svg:d="M34 0c18 0 32 15 31 32 0 18-16 34-33 33-16-1-32-17-32-35 0-16 17-31 34-30z">
          <text:p/>
        </draw:path>
        <draw:path draw:style-name="gr9" draw:text-style-name="P7" draw:layer="layout" svg:width="0.064cm" svg:height="0.064cm" svg:x="16.613cm" svg:y="17.737cm" svg:viewBox="0 0 65 65" svg:d="M65 32c1 16-15 32-32 33s-33-14-33-31c-1-19 13-34 31-34 17-1 34 14 34 32z">
          <text:p/>
        </draw:path>
        <draw:path draw:style-name="gr9" draw:text-style-name="P7" draw:layer="layout" svg:width="0.059cm" svg:height="0.059cm" svg:x="5.813cm" svg:y="26.789cm" svg:viewBox="0 0 60 60" svg:d="M60 32c-3 14-18 28-31 28-13-1-29-15-29-29-1-17 17-34 33-31 14 2 28 17 27 32z">
          <text:p/>
        </draw:path>
        <draw:path draw:style-name="gr9" draw:text-style-name="P7" draw:layer="layout" svg:width="0.058cm" svg:height="0.059cm" svg:x="15.447cm" svg:y="26.205cm" svg:viewBox="0 0 59 60" svg:d="M32 60c-14 2-30-10-32-25-3-17 14-35 30-35 14 1 29 16 29 30 1 14-13 29-27 30z">
          <text:p/>
        </draw:path>
        <draw:path draw:style-name="gr9" draw:text-style-name="P7" draw:layer="layout" svg:width="0.06cm" svg:height="0.062cm" svg:x="17.489cm" svg:y="21.533cm" svg:viewBox="0 0 61 63" svg:d="M30 0c16 0 30 12 31 28 2 18-14 35-31 35-16 0-32-18-30-35 1-15 16-27 30-28z">
          <text:p/>
        </draw:path>
        <draw:path draw:style-name="gr9" draw:text-style-name="P7" draw:layer="layout" svg:width="0.061cm" svg:height="0.062cm" svg:x="13.403cm" svg:y="14.527cm" svg:viewBox="0 0 62 63" svg:d="M30 63c-15 0-29-12-30-27-2-19 13-36 30-36 16 0 34 18 32 35-2 15-17 28-32 28z">
          <text:p/>
        </draw:path>
        <draw:path draw:style-name="gr9" draw:text-style-name="P7" draw:layer="layout" svg:width="0.061cm" svg:height="0.062cm" svg:x="5.227cm" svg:y="26.204cm" svg:viewBox="0 0 62 63" svg:d="M62 34c-2 16-16 29-31 29-17 0-33-18-31-35 2-14 16-28 30-28 17 0 33 16 32 34z">
          <text:p/>
        </draw:path>
        <draw:path draw:style-name="gr9" draw:text-style-name="P7" draw:layer="layout" svg:width="0.064cm" svg:height="0.064cm" svg:x="5.226cm" svg:y="15.985cm" svg:viewBox="0 0 65 65" svg:d="M31 0c18-1 34 15 34 33 0 17-11 30-27 32-20 2-37-12-38-30-1-17 14-34 31-35z">
          <text:p/>
        </draw:path>
        <draw:path draw:style-name="gr9" draw:text-style-name="P7" draw:layer="layout" svg:width="0.064cm" svg:height="0.065cm" svg:x="12.524cm" svg:y="14.234cm" svg:viewBox="0 0 65 66" svg:d="M65 36c-1 17-19 31-35 30-17-2-31-18-30-35s18-32 35-31c19 2 32 18 30 36z">
          <text:p/>
        </draw:path>
        <draw:path draw:style-name="gr9" draw:text-style-name="P7" draw:layer="layout" svg:width="0.065cm" svg:height="0.064cm" svg:x="11.941cm" svg:y="27.955cm" svg:viewBox="0 0 66 65" svg:d="M66 28c0 18-14 35-31 37-16 2-33-13-35-31-1-18 12-33 30-34 18-2 35 11 36 28z">
          <text:p/>
        </draw:path>
        <draw:path draw:style-name="gr9" draw:text-style-name="P7" draw:layer="layout" svg:width="0.064cm" svg:height="0.064cm" svg:x="14.276cm" svg:y="15.11cm" svg:viewBox="0 0 65 65" svg:d="M65 34c-1 19-17 33-34 31-18-2-32-18-31-36 2-17 17-30 36-29 18 1 31 17 29 34z">
          <text:p/>
        </draw:path>
        <draw:path draw:style-name="gr9" draw:text-style-name="P7" draw:layer="layout" svg:width="0.062cm" svg:height="0.061cm" svg:x="3.184cm" svg:y="22.409cm" svg:viewBox="0 0 63 62" svg:d="M30 62c-17-2-30-15-30-30 0-17 18-34 35-32 18 2 31 21 28 38-3 15-18 25-33 24z">
          <text:p/>
        </draw:path>
        <draw:path draw:style-name="gr9" draw:text-style-name="P7" draw:layer="layout" svg:width="0.062cm" svg:height="0.061cm" svg:x="9.607cm" svg:y="28.247cm" svg:viewBox="0 0 63 62" svg:d="M27 62c-15-1-27-14-27-30 0-18 18-34 33-32 16 2 29 17 30 32 0 17-17 32-36 30z">
          <text:p/>
        </draw:path>
        <draw:path draw:style-name="gr9" draw:text-style-name="P7" draw:layer="layout" svg:width="0.064cm" svg:height="0.064cm" svg:x="15.736cm" svg:y="25.619cm" svg:viewBox="0 0 65 65" svg:d="M65 36c-1 19-16 31-36 29-17-1-31-18-29-34 3-19 19-33 35-31 18 2 31 19 30 36z">
          <text:p/>
        </draw:path>
        <draw:path draw:style-name="gr9" draw:text-style-name="P7" draw:layer="layout" svg:width="0.058cm" svg:height="0.059cm" svg:x="6.982cm" svg:y="14.528cm" svg:viewBox="0 0 59 60" svg:d="M33 60c-14 2-30-9-33-24-3-16 14-36 30-36 13 1 28 17 29 30 1 14-12 29-26 30z">
          <text:p/>
        </draw:path>
        <draw:path draw:style-name="gr9" draw:text-style-name="P7" draw:layer="layout" svg:width="0.064cm" svg:height="0.064cm" svg:x="16.903cm" svg:y="23.575cm" svg:viewBox="0 0 65 65" svg:d="M35 0c17 1 31 17 30 35-1 17-16 31-33 30-18-1-33-17-32-33 1-18 16-32 35-32z">
          <text:p/>
        </draw:path>
        <draw:path draw:style-name="gr9" draw:text-style-name="P7" draw:layer="layout" svg:width="0.062cm" svg:height="0.059cm" svg:x="16.614cm" svg:y="24.452cm" svg:viewBox="0 0 63 60" svg:d="M63 30c0 14-13 29-28 30-19 2-35-11-35-30 0-15 13-28 28-30 17-2 34 13 35 30z">
          <text:p/>
        </draw:path>
        <draw:path draw:style-name="gr9" draw:text-style-name="P7" draw:layer="layout" svg:width="0.061cm" svg:height="0.061cm" svg:x="13.109cm" svg:y="27.664cm" svg:viewBox="0 0 62 62" svg:d="M62 34c-2 16-14 28-31 28-18 0-34-17-30-33 2-16 15-29 30-29 17-1 32 15 31 34z">
          <text:p/>
        </draw:path>
        <draw:path draw:style-name="gr9" draw:text-style-name="P7" draw:layer="layout" svg:width="0.062cm" svg:height="0.061cm" svg:x="16.03cm" svg:y="25.329cm" svg:viewBox="0 0 63 62" svg:d="M31 0c16 0 30 12 32 28 2 17-14 34-32 34-17 1-32-16-31-34 2-16 15-28 31-28z">
          <text:p/>
        </draw:path>
        <draw:path draw:style-name="gr9" draw:text-style-name="P7" draw:layer="layout" svg:width="0.06cm" svg:height="0.061cm" svg:x="8.148cm" svg:y="27.956cm" svg:viewBox="0 0 61 62" svg:d="M61 27c2 18-13 35-31 35-14 0-28-13-30-29-1-16 9-30 24-33 20-2 36 9 37 27z">
          <text:p/>
        </draw:path>
        <draw:path draw:style-name="gr9" draw:text-style-name="P7" draw:layer="layout" svg:width="0.064cm" svg:height="0.063cm" svg:x="8.147cm" svg:y="14.235cm" svg:viewBox="0 0 65 64" svg:d="M30 0c18-1 35 13 35 30 0 18-16 34-34 34-17 1-32-15-31-35 1-16 14-29 30-29z">
          <text:p/>
        </draw:path>
        <draw:path draw:style-name="gr9" draw:text-style-name="P7" draw:layer="layout" svg:width="0.061cm" svg:height="0.061cm" svg:x="10.482cm" svg:y="28.247cm" svg:viewBox="0 0 62 62" svg:d="M34 62c-18 1-34-13-34-30 1-15 14-29 29-32 17-2 34 14 33 33 0 16-11 28-28 29z">
          <text:p/>
        </draw:path>
        <draw:path draw:style-name="gr9" draw:text-style-name="P7" draw:layer="layout" svg:width="0.061cm" svg:height="0.061cm" svg:x="16.321cm" svg:y="25.035cm" svg:viewBox="0 0 62 62" svg:d="M34 61c-18 2-34-13-34-30 0-14 13-29 28-31 16-3 34 14 34 31 0 16-13 29-28 30z">
          <text:p/>
        </draw:path>
        <draw:path draw:style-name="gr9" draw:text-style-name="P7" draw:layer="layout" svg:width="0.061cm" svg:height="0.061cm" svg:x="12.235cm" svg:y="27.956cm" svg:viewBox="0 0 62 62" svg:d="M30 62c-16 0-32-18-30-34s16-28 31-28 30 12 31 28c1 17-15 34-32 34z">
          <text:p/>
        </draw:path>
        <draw:path draw:style-name="gr9" draw:text-style-name="P7" draw:layer="layout" svg:width="0.062cm" svg:height="0.061cm" svg:x="3.184cm" svg:y="19.491cm" svg:viewBox="0 0 63 62" svg:d="M63 30c0 18-17 34-33 32-16-3-29-17-30-32 0-17 17-32 35-30 16 1 28 14 28 30z">
          <text:p/>
        </draw:path>
        <draw:path draw:style-name="gr9" draw:text-style-name="P7" draw:layer="layout" svg:width="0.06cm" svg:height="0.062cm" svg:x="4.644cm" svg:y="25.62cm" svg:viewBox="0 0 61 63" svg:d="M61 35c-1 16-14 28-29 28-18 0-35-16-32-34 1-15 17-28 31-29 16 0 31 16 30 35z">
          <text:p/>
        </draw:path>
        <draw:path draw:style-name="gr9" draw:text-style-name="P7" draw:layer="layout" svg:width="0.064cm" svg:height="0.064cm" svg:x="17.197cm" svg:y="22.701cm" svg:viewBox="0 0 65 65" svg:d="M65 33c-1 17-17 33-35 32-18 0-31-16-30-35 1-16 13-29 30-30 19 0 35 16 35 33z">
          <text:p/>
        </draw:path>
        <draw:path draw:style-name="gr9" draw:text-style-name="P7" draw:layer="layout" svg:width="0.061cm" svg:height="0.061cm" svg:x="17.198cm" svg:y="18.907cm" svg:viewBox="0 0 62 62" svg:d="M62 31c0 18-18 33-36 31-14-2-26-16-26-32 0-19 15-32 34-30 15 2 28 16 28 31z">
          <text:p/>
        </draw:path>
        <draw:path draw:style-name="gr9" draw:text-style-name="P7" draw:layer="layout" svg:width="0.06cm" svg:height="0.06cm" svg:x="7.856cm" svg:y="14.236cm" svg:viewBox="0 0 61 61" svg:d="M60 27c2 19-11 34-30 34-15 0-28-11-30-27-3-16 12-34 29-34 18 0 30 11 31 27z">
          <text:p/>
        </draw:path>
        <draw:path draw:style-name="gr9" draw:text-style-name="P7" draw:layer="layout" svg:width="0.061cm" svg:height="0.06cm" svg:x="4.938cm" svg:y="25.913cm" svg:viewBox="0 0 62 61" svg:d="M32 0c17 2 30 14 30 30 0 17-16 32-35 31-17-2-30-14-27-36 2-16 16-26 32-25z">
          <text:p/>
        </draw:path>
        <draw:path draw:style-name="gr9" draw:text-style-name="P7" draw:layer="layout" svg:width="0.059cm" svg:height="0.061cm" svg:x="4.062cm" svg:y="24.746cm" svg:viewBox="0 0 60 62" svg:d="M60 32c-1 16-14 30-30 30-17 0-32-17-30-35 1-16 12-30 35-27 16 2 26 16 25 32z">
          <text:p/>
        </draw:path>
        <draw:path draw:style-name="gr9" draw:text-style-name="P7" draw:layer="layout" svg:width="0.06cm" svg:height="0.062cm" svg:x="8.732cm" svg:y="13.942cm" svg:viewBox="0 0 61 63" svg:d="M27 63c-15-1-27-15-27-31-1-18 15-34 32-32 15 2 28 16 29 31 0 17-16 33-34 32z">
          <text:p/>
        </draw:path>
        <draw:path draw:style-name="gr9" draw:text-style-name="P7" draw:layer="layout" svg:width="0.058cm" svg:height="0.058cm" svg:x="5.23cm" svg:y="15.696cm" svg:viewBox="0 0 59 59" svg:d="M59 30c-1 14-15 29-29 29s-30-16-30-29c-1-17 15-32 33-30 15 1 26 15 26 30z">
          <text:p/>
        </draw:path>
        <draw:path draw:style-name="gr9" draw:text-style-name="P7" draw:layer="layout" svg:width="0.06cm" svg:height="0.061cm" svg:x="15.155cm" svg:y="15.695cm" svg:viewBox="0 0 61 62" svg:d="M61 32c0 18-18 33-35 30-15-2-26-16-26-31 1-17 12-30 28-31 18-1 34 14 33 32z">
          <text:p/>
        </draw:path>
        <draw:path draw:style-name="gr9" draw:text-style-name="P7" draw:layer="layout" svg:width="0.061cm" svg:height="0.059cm" svg:x="6.397cm" svg:y="27.081cm" svg:viewBox="0 0 62 60" svg:d="M62 28c1 16-9 29-26 32-17 4-35-9-36-26-2-16 9-30 25-33 18-4 35 9 37 27z">
          <text:p/>
        </draw:path>
        <draw:path draw:style-name="gr9" draw:text-style-name="P7" draw:layer="layout" svg:width="0.06cm" svg:height="0.06cm" svg:x="3.476cm" svg:y="18.614cm" svg:viewBox="0 0 61 61" svg:d="M61 31c0 16-11 29-27 30-19 2-33-11-34-29 0-19 16-33 33-32 16 1 28 15 28 31z">
          <text:p/>
        </draw:path>
        <draw:path draw:style-name="gr9" draw:text-style-name="P7" draw:layer="layout" svg:width="0.061cm" svg:height="0.061cm" svg:x="16.321cm" svg:y="17.154cm" svg:viewBox="0 0 62 62" svg:d="M34 62c-18 2-35-14-34-30 0-15 13-30 28-32 16-2 34 13 34 32 0 16-13 29-28 30z">
          <text:p/>
        </draw:path>
        <draw:path draw:style-name="gr9" draw:text-style-name="P7" draw:layer="layout" svg:width="0.061cm" svg:height="0.061cm" svg:x="14.861cm" svg:y="15.402cm" svg:viewBox="0 0 62 62" svg:d="M30 0c17 0 33 17 32 35-1 15-16 27-32 27-15 0-29-13-30-27-2-18 11-32 30-35z">
          <text:p/>
        </draw:path>
        <draw:path draw:style-name="gr9" draw:text-style-name="P7" draw:layer="layout" svg:width="0.061cm" svg:height="0.06cm" svg:x="17.49cm" svg:y="21.243cm" svg:viewBox="0 0 62 61" svg:d="M31 61c-15 0-29-12-31-27-3-18 13-34 30-34 19-1 33 13 31 34-2 15-14 27-30 27z">
          <text:p/>
        </draw:path>
        <draw:path draw:style-name="gr9" draw:text-style-name="P7" draw:layer="layout" svg:width="0.062cm" svg:height="0.059cm" svg:x="17.489cm" svg:y="20.658cm" svg:viewBox="0 0 63 60" svg:d="M63 31c0 16-12 28-29 29-18 1-34-13-34-30 1-15 14-29 29-30 16-1 34 8 34 31z">
          <text:p/>
        </draw:path>
        <draw:path draw:style-name="gr9" draw:text-style-name="P7" draw:layer="layout" svg:width="0.062cm" svg:height="0.06cm" svg:x="15.445cm" svg:y="15.987cm" svg:viewBox="0 0 63 61" svg:d="M29 61c-17-1-29-13-29-29 0-17 17-34 35-32 14 2 27 17 28 31 1 17-16 32-34 30z">
          <text:p/>
        </draw:path>
        <draw:path draw:style-name="gr9" draw:text-style-name="P7" draw:layer="layout" svg:width="0.061cm" svg:height="0.061cm" svg:x="10.776cm" svg:y="28.247cm" svg:viewBox="0 0 62 62" svg:d="M62 31c1 16-14 30-29 31-18 2-34-12-33-31 0-15 13-29 27-31 17-1 35 15 35 31z">
          <text:p/>
        </draw:path>
        <draw:path draw:style-name="gr9" draw:text-style-name="P7" draw:layer="layout" svg:width="0.061cm" svg:height="0.061cm" svg:x="13.694cm" svg:y="27.372cm" svg:viewBox="0 0 62 62" svg:d="M62 30c0 15-12 30-26 32-17 2-34-13-36-31 0-17 17-32 35-31 15 1 27 14 27 30z">
          <text:p/>
        </draw:path>
        <draw:path draw:style-name="gr9" draw:text-style-name="P7" draw:layer="layout" svg:width="0.061cm" svg:height="0.062cm" svg:x="17.198cm" svg:y="22.992cm" svg:viewBox="0 0 62 63" svg:d="M31 63c-16 1-29-11-31-28-2-18 12-35 30-35 16 0 33 18 32 34-2 16-17 29-31 29z">
          <text:p/>
        </draw:path>
        <draw:path draw:style-name="gr9" draw:text-style-name="P7" draw:layer="layout" svg:width="0.059cm" svg:height="0.061cm" svg:x="15.738cm" svg:y="16.279cm" svg:viewBox="0 0 60 62" svg:d="M33 62c-17 1-33-14-33-31 0-16 12-30 28-31s30 9 32 25c3 18-9 35-27 37z">
          <text:p/>
        </draw:path>
        <draw:path draw:style-name="gr9" draw:text-style-name="P7" draw:layer="layout" svg:width="0.061cm" svg:height="0.061cm" svg:x="10.191cm" svg:y="28.247cm" svg:viewBox="0 0 62 62" svg:d="M62 35c-2 18-19 30-38 27-16-3-26-17-24-33s16-29 31-29c17 0 33 18 31 35z">
          <text:p/>
        </draw:path>
        <draw:path draw:style-name="gr9" draw:text-style-name="P7" draw:layer="layout" svg:width="0.061cm" svg:height="0.059cm" svg:x="4.352cm" svg:y="16.863cm" svg:viewBox="0 0 62 60" svg:d="M27 60c-19-2-30-18-27-37 2-14 18-24 34-23 15 2 28 15 28 30 0 18-17 32-35 30z">
          <text:p/>
        </draw:path>
        <draw:path draw:style-name="gr9" draw:text-style-name="P7" draw:layer="layout" svg:width="0.06cm" svg:height="0.06cm" svg:x="16.904cm" svg:y="23.869cm" svg:viewBox="0 0 61 61" svg:d="M31 0c19 1 32 15 30 34-1 15-14 27-31 27-15 0-29-13-30-28-2-17 13-33 31-33z">
          <text:p/>
        </draw:path>
        <draw:path draw:style-name="gr9" draw:text-style-name="P7" draw:layer="layout" svg:width="0.059cm" svg:height="0.061cm" svg:x="9.9cm" svg:y="28.247cm" svg:viewBox="0 0 60 62" svg:d="M30 62c-16 0-28-11-30-27-1-18 13-35 30-35 18 0 32 16 30 35-1 16-13 28-30 27z">
          <text:p/>
        </draw:path>
        <draw:path draw:style-name="gr9" draw:text-style-name="P7" draw:layer="layout" svg:width="0.057cm" svg:height="0.059cm" svg:x="13.697cm" svg:y="14.529cm" svg:viewBox="0 0 58 60" svg:d="M58 27c1 16-11 31-27 32-15 3-29-10-31-26-2-15 10-30 26-33 15-2 30 12 32 27z">
          <text:p/>
        </draw:path>
        <draw:path draw:style-name="gr9" draw:text-style-name="P7" draw:layer="layout" svg:width="0.058cm" svg:height="0.059cm" svg:x="17.492cm" svg:y="19.782cm" svg:viewBox="0 0 59 60" svg:d="M30 60c-14 1-28-12-30-26-2-18 14-35 30-34 14 1 29 16 29 31 0 14-15 28-29 29z">
          <text:p/>
        </draw:path>
        <draw:path draw:style-name="gr9" draw:text-style-name="P7" draw:layer="layout" svg:width="0.058cm" svg:height="0.056cm" svg:x="13.404cm" svg:y="27.667cm" svg:viewBox="0 0 59 57" svg:d="M31 57c-17 1-31-11-31-26-1-17 11-30 28-31 16-1 30 11 31 27 1 15-12 29-28 30z">
          <text:p/>
        </draw:path>
        <draw:path draw:style-name="gr9" draw:text-style-name="P7" draw:layer="layout" svg:width="0.059cm" svg:height="0.058cm" svg:x="9.025cm" svg:y="28.249cm" svg:viewBox="0 0 60 59" svg:d="M31 0c15 2 29 16 28 30 0 18-18 32-36 29-14-3-26-20-23-33 3-15 18-27 31-26z">
          <text:p/>
        </draw:path>
        <draw:path draw:style-name="gr9" draw:text-style-name="P7" draw:layer="layout" svg:width="0.06cm" svg:height="0.058cm" svg:x="13.987cm" svg:y="14.82cm" svg:viewBox="0 0 61 59" svg:d="M61 29c0 15-13 29-29 30-17 2-31-10-32-26-2-19 12-34 32-33 15 1 28 14 29 29z">
          <text:p/>
        </draw:path>
        <draw:path draw:style-name="gr9" draw:text-style-name="P7" draw:layer="layout" svg:width="0.059cm" svg:height="0.057cm" svg:x="17.491cm" svg:y="22.119cm" svg:viewBox="0 0 60 58" svg:d="M30 58c-14 0-30-14-30-28 0-16 14-30 29-30 16 0 30 12 31 29 0 15-15 29-30 29z">
          <text:p/>
        </draw:path>
        <draw:path draw:style-name="gr9" draw:text-style-name="P7" draw:layer="layout" svg:width="0.059cm" svg:height="0.057cm" svg:x="3.186cm" svg:y="22.704cm" svg:viewBox="0 0 60 58" svg:d="M32 0c17 1 29 17 28 32-2 15-17 28-33 26s-28-17-27-31c2-15 17-28 32-27z">
          <text:p/>
        </draw:path>
        <draw:path draw:style-name="gr9" draw:text-style-name="P7" draw:layer="layout" svg:width="0.06cm" svg:height="0.062cm" svg:x="14.57cm" svg:y="26.788cm" svg:viewBox="0 0 61 63" svg:d="M29 0c19 0 33 16 32 34-2 15-15 28-31 29-17 0-31-16-30-34 2-17 14-29 29-29z">
          <text:p/>
        </draw:path>
        <draw:path draw:style-name="gr9" draw:text-style-name="P7" draw:layer="layout" svg:width="0.061cm" svg:height="0.06cm" svg:x="12.819cm" svg:y="14.236cm" svg:viewBox="0 0 62 61" svg:d="M31 0c15 0 29 12 31 27 2 17-13 34-30 34-19 1-33-15-32-33 1-16 14-28 31-28z">
          <text:p/>
        </draw:path>
        <draw:path draw:style-name="gr9" draw:text-style-name="P7" draw:layer="layout" svg:width="0.059cm" svg:height="0.058cm" svg:x="3.186cm" svg:y="19.199cm" svg:viewBox="0 0 60 59" svg:d="M29 0c14-1 29 13 31 27 1 15-11 30-25 32-18 2-36-13-35-29 0-15 15-30 29-30z">
          <text:p/>
        </draw:path>
        <draw:path draw:style-name="gr9" draw:text-style-name="P7" draw:layer="layout" svg:width="0.059cm" svg:height="0.058cm" svg:x="16.032cm" svg:y="16.572cm" svg:viewBox="0 0 60 59" svg:d="M60 27c2 14-10 30-25 32s-30-7-34-23 12-35 29-36c13-1 28 12 30 27z">
          <text:p/>
        </draw:path>
        <draw:path draw:style-name="gr9" draw:text-style-name="P7" draw:layer="layout" svg:width="0.06cm" svg:height="0.062cm" svg:x="3.476cm" svg:y="23.576cm" svg:viewBox="0 0 61 63" svg:d="M61 33c-1 16-14 30-30 30-17 0-32-17-31-34 2-18 18-32 37-28 14 2 25 17 24 32z">
          <text:p/>
        </draw:path>
        <draw:path draw:style-name="gr9" draw:text-style-name="P7" draw:layer="layout" svg:width="0.058cm" svg:height="0.057cm" svg:x="11.068cm" svg:y="28.249cm" svg:viewBox="0 0 59 58" svg:d="M28 58c-16-1-29-17-28-32 1-14 17-28 32-26 16 1 28 15 27 31-1 15-15 28-31 27z">
          <text:p/>
        </draw:path>
        <draw:path draw:style-name="gr9" draw:text-style-name="P7" draw:layer="layout" svg:width="0.06cm" svg:height="0.058cm" svg:x="5.522cm" svg:y="26.497cm" svg:viewBox="0 0 61 59" svg:d="M31 0c15 0 28 13 30 28 1 19-14 33-35 31-16-1-27-14-26-32 1-16 14-28 31-27z">
          <text:p/>
        </draw:path>
        <draw:path draw:style-name="gr9" draw:text-style-name="P7" draw:layer="layout" svg:width="0.058cm" svg:height="0.057cm" svg:x="4.354cm" svg:y="25.331cm" svg:viewBox="0 0 59 58" svg:d="M29 58c-17-1-30-15-29-30 0-15 14-29 30-28 16 0 29 15 29 30-1 14-16 28-30 28z">
          <text:p/>
        </draw:path>
        <draw:path draw:style-name="gr9" draw:text-style-name="P7" draw:layer="layout" svg:width="0.058cm" svg:height="0.059cm" svg:x="8.441cm" svg:y="13.944cm" svg:viewBox="0 0 59 60" svg:d="M32 0c14 2 27 17 26 32 0 17-19 31-35 27-15-4-26-20-23-33 3-16 18-28 32-26z">
          <text:p/>
        </draw:path>
        <draw:path draw:style-name="gr9" draw:text-style-name="P7" draw:layer="layout" svg:width="0.06cm" svg:height="0.061cm" svg:x="6.105cm" svg:y="15.111cm" svg:viewBox="0 0 61 62" svg:d="M26 0c18-1 35 13 35 31 0 15-12 29-28 31-17 3-33-12-33-31 0-15 12-29 26-31z">
          <text:p/>
        </draw:path>
        <draw:path draw:style-name="gr9" draw:text-style-name="P7" draw:layer="layout" svg:width="0.058cm" svg:height="0.056cm" svg:x="4.939cm" svg:y="15.99cm" svg:viewBox="0 0 59 57" svg:d="M59 29c-1 15-15 29-31 28-17 0-29-15-28-30 0-15 14-28 31-27 15 0 28 14 28 29z">
          <text:p/>
        </draw:path>
        <draw:path draw:style-name="gr9" draw:text-style-name="P7" draw:layer="layout" svg:width="0.058cm" svg:height="0.058cm" svg:x="16.906cm" svg:y="24.163cm" svg:viewBox="0 0 59 59" svg:d="M59 26c3 15-9 30-24 33-16 3-35-14-35-30 0-14 15-29 29-29 14-1 29 12 30 26z">
          <text:p/>
        </draw:path>
        <draw:path draw:style-name="gr9" draw:text-style-name="P7" draw:layer="layout" svg:width="0.057cm" svg:height="0.057cm" svg:x="17.492cm" svg:y="21.828cm" svg:viewBox="0 0 58 58" svg:d="M31 58c-16 1-30-11-31-27-2-15 11-30 26-31 17-1 31 10 32 26 2 17-10 31-27 32z">
          <text:p/>
        </draw:path>
        <draw:path draw:style-name="gr9" draw:text-style-name="P7" draw:layer="layout" svg:width="0.057cm" svg:height="0.057cm" svg:x="11.361cm" svg:y="28.249cm" svg:viewBox="0 0 58 58" svg:d="M32 58c-16 2-30-10-32-26-1-16 9-30 25-32s31 10 33 25c1 16-10 31-26 33z">
          <text:p/>
        </draw:path>
        <draw:path draw:style-name="gr9" draw:text-style-name="P7" draw:layer="layout" svg:width="0.055cm" svg:height="0.057cm" svg:x="9.319cm" svg:y="28.25cm" svg:viewBox="0 0 56 58" svg:d="M56 30c-1 16-14 29-30 28-15-1-27-16-26-32 1-15 16-28 30-26 16 1 27 15 26 30z">
          <text:p/>
        </draw:path>
        <draw:path draw:style-name="gr9" draw:text-style-name="P7" draw:layer="layout" svg:width="0.057cm" svg:height="0.056cm" svg:x="17.492cm" svg:y="20.076cm" svg:viewBox="0 0 58 57" svg:d="M29 0c17 1 30 13 29 30 0 15-13 27-30 27-15 0-29-15-28-29 1-17 14-28 29-28z">
          <text:p/>
        </draw:path>
        <draw:path draw:style-name="gr9" draw:text-style-name="P7" draw:layer="layout" svg:width="0.055cm" svg:height="0.058cm" svg:x="3.479cm" svg:y="18.323cm" svg:viewBox="0 0 56 59" svg:d="M56 32c-1 16-15 28-30 27-16-2-27-16-26-31 1-16 16-29 31-28 15 2 27 16 25 32z">
          <text:p/>
        </draw:path>
        <draw:path draw:style-name="gr9" draw:text-style-name="P7" draw:layer="layout" svg:width="0.056cm" svg:height="0.056cm" svg:x="17.2cm" svg:y="23.288cm" svg:viewBox="0 0 57 57" svg:d="M29 0c16 0 27 13 28 29 0 15-12 28-28 28-17 0-29-13-29-28 0-16 12-29 29-29z">
          <text:p/>
        </draw:path>
        <draw:path draw:style-name="gr9" draw:text-style-name="P7" draw:layer="layout" svg:width="0.057cm" svg:height="0.056cm" svg:x="14.28cm" svg:y="27.083cm" svg:viewBox="0 0 58 57" svg:d="M58 29c1 16-13 28-29 28-15 0-29-12-29-27s13-30 29-30c15 0 29 14 29 29z">
          <text:p/>
        </draw:path>
        <draw:path draw:style-name="gr9" draw:text-style-name="P7" draw:layer="layout" svg:width="0.055cm" svg:height="0.056cm" svg:x="12.529cm" svg:y="27.957cm" svg:viewBox="0 0 56 57" svg:d="M56 31c-1 16-14 27-31 26-16-2-26-15-25-31 1-17 14-28 30-26 17 1 28 15 26 31z">
          <text:p/>
        </draw:path>
        <draw:path draw:style-name="gr9" draw:text-style-name="P7" draw:layer="layout" svg:width="0.057cm" svg:height="0.056cm" svg:x="16.907cm" svg:y="18.033cm" svg:viewBox="0 0 58 57" svg:d="M58 26c1 17-11 30-27 31s-30-10-31-27c-2-14 11-28 26-30 16-1 31 11 32 26z">
          <text:p/>
        </draw:path>
        <draw:path draw:style-name="gr9" draw:text-style-name="P7" draw:layer="layout" svg:width="0.054cm" svg:height="0.054cm" svg:x="16.617cm" svg:y="24.748cm" svg:viewBox="0 0 55 55" svg:d="M55 32c-1 12-14 23-27 23-15 1-29-13-28-27 0-14 15-29 29-28 16 1 27 16 26 32z">
          <text:p/>
        </draw:path>
        <draw:path draw:style-name="gr9" draw:text-style-name="P7" draw:layer="layout" svg:width="0.055cm" svg:height="0.057cm" svg:x="6.691cm" svg:y="27.374cm" svg:viewBox="0 0 56 58" svg:d="M56 28c1 15-11 28-27 30-14 2-29-12-29-27-1-17 10-30 26-31 15-1 30 11 30 28z">
          <text:p/>
        </draw:path>
        <draw:path draw:style-name="gr9" draw:text-style-name="P7" draw:layer="layout" svg:width="0.056cm" svg:height="0.057cm" svg:x="7.859cm" svg:y="27.957cm" svg:viewBox="0 0 57 58" svg:d="M57 31c0 15-14 28-29 27-16 0-30-14-28-30 1-17 14-28 30-28 16 1 28 15 27 31z">
          <text:p/>
        </draw:path>
        <draw:path draw:style-name="gr9" draw:text-style-name="P7" draw:layer="layout" svg:width="0.057cm" svg:height="0.055cm" svg:x="16.616cm" svg:y="17.45cm" svg:viewBox="0 0 58 56" svg:d="M58 32c-2 15-16 26-32 24s-28-16-26-31c3-17 17-27 33-25 15 1 27 18 25 32z">
          <text:p/>
        </draw:path>
        <draw:path draw:style-name="gr9" draw:text-style-name="P7" draw:layer="layout" svg:width="0.054cm" svg:height="0.055cm" svg:x="16.909cm" svg:y="17.741cm" svg:viewBox="0 0 55 56" svg:d="M55 25c2 14-12 30-26 31-13 1-25-10-28-23-4-14 6-30 23-33 13-2 29 10 31 25z">
          <text:p/>
        </draw:path>
        <draw:path draw:style-name="gr9" draw:text-style-name="P7" draw:layer="layout" svg:width="0.057cm" svg:height="0.056cm" svg:x="7.566cm" svg:y="14.238cm" svg:viewBox="0 0 58 57" svg:d="M58 27c1 15-13 29-29 30-16 0-29-13-29-29 0-15 12-28 28-28 15-1 29 12 30 27z">
          <text:p/>
        </draw:path>
        <draw:path draw:style-name="gr9" draw:text-style-name="P7" draw:layer="layout" svg:width="0.054cm" svg:height="0.053cm" svg:x="3.772cm" svg:y="24.457cm" svg:viewBox="0 0 55 54" svg:d="M30 54c-16 1-30-12-30-27 0-12 11-25 24-27 15-1 27 8 31 22 3 14-9 31-25 32z">
          <text:p/>
        </draw:path>
        <draw:path draw:style-name="gr9" draw:text-style-name="P7" draw:layer="layout" svg:width="0.055cm" svg:height="0.053cm" svg:x="9.61cm" svg:y="13.655cm" svg:viewBox="0 0 56 54" svg:d="M27 54c-13 0-26-13-27-24-1-15 13-30 28-30s29 17 28 31c-2 11-16 24-29 23z">
          <text:p/>
        </draw:path>
        <draw:path draw:style-name="gr9" draw:text-style-name="P7" draw:layer="layout" svg:width="0.055cm" svg:height="0.055cm" svg:x="15.157cm" svg:y="26.499cm" svg:viewBox="0 0 56 56" svg:d="M56 26c1 17-12 30-28 30-15-1-26-10-28-24-2-16 9-30 25-32s30 9 31 26z">
          <text:p/>
        </draw:path>
        <draw:path draw:style-name="gr9" draw:text-style-name="P7" draw:layer="layout" svg:width="0.056cm" svg:height="0.058cm" svg:x="4.064cm" svg:y="17.156cm" svg:viewBox="0 0 57 59" svg:d="M57 27c1 17-11 31-27 32-15 1-29-11-30-28-1-15 11-30 26-31 15-2 30 12 31 27z">
          <text:p/>
        </draw:path>
        <draw:path draw:style-name="gr9" draw:text-style-name="P7" draw:layer="layout" svg:width="0.055cm" svg:height="0.056cm" svg:x="5.815cm" svg:y="15.114cm" svg:viewBox="0 0 56 57" svg:d="M25 0c13-1 30 13 31 27s-16 30-29 30c-11 0-24-12-27-25-2-14 10-30 25-32z">
          <text:p/>
        </draw:path>
        <draw:path draw:style-name="gr9" draw:text-style-name="P7" draw:layer="layout" svg:width="0.056cm" svg:height="0.057cm" svg:x="17.2cm" svg:y="18.617cm" svg:viewBox="0 0 57 58" svg:d="M57 26c1 17-10 30-26 32-17 1-30-11-31-27-2-16 10-29 27-31 16-1 29 11 30 26z">
          <text:p/>
        </draw:path>
        <draw:path draw:style-name="gr9" draw:text-style-name="P7" draw:layer="layout" svg:width="0.053cm" svg:height="0.055cm" svg:x="8.151cm" svg:y="13.946cm" svg:viewBox="0 0 54 56" svg:d="M0 30c-1-15 14-31 29-30 13 1 25 15 25 27s-11 27-23 29c-14 2-30-12-31-26z">
          <text:p/>
        </draw:path>
        <draw:path draw:style-name="gr9" draw:text-style-name="P7" draw:layer="layout" svg:width="0.055cm" svg:height="0.055cm" svg:x="15.741cm" svg:y="25.915cm" svg:viewBox="0 0 56 56" svg:d="M56 31c-1 15-16 27-32 25-14-1-24-12-24-26-2-18 12-31 28-30 17 1 29 13 28 31z">
          <text:p/>
        </draw:path>
        <draw:path draw:style-name="gr9" draw:text-style-name="P7" draw:layer="layout" svg:width="0.058cm" svg:height="0.055cm" svg:x="6.398cm" svg:y="14.822cm" svg:viewBox="0 0 59 56" svg:d="M59 25c2 15-10 30-26 31-15 2-30-9-33-25-2-14 12-29 27-31 16-2 30 10 32 25z">
          <text:p/>
        </draw:path>
        <draw:path draw:style-name="gr9" draw:text-style-name="P7" draw:layer="layout" svg:width="0.054cm" svg:height="0.053cm" svg:x="4.355cm" svg:y="16.576cm" svg:viewBox="0 0 55 54" svg:d="M55 27c-2 17-16 29-31 26-14-2-24-15-24-28 0-15 15-27 32-25 14 2 23 13 23 27z">
          <text:p/>
        </draw:path>
        <draw:path draw:style-name="gr9" draw:text-style-name="P7" draw:layer="layout" svg:width="0.053cm" svg:height="0.055cm" svg:x="6.692cm" svg:y="14.531cm" svg:viewBox="0 0 54 56" svg:d="M54 28c0 15-15 30-29 28s-25-14-25-27 11-27 24-29c14-2 30 12 30 28z">
          <text:p/>
        </draw:path>
        <draw:path draw:style-name="gr9" draw:text-style-name="P7" draw:layer="layout" svg:width="0.054cm" svg:height="0.055cm" svg:x="4.94cm" svg:y="26.208cm" svg:viewBox="0 0 55 56" svg:d="M29 56c-14 0-30-15-29-29 0-14 17-28 31-27 12 1 24 14 24 27 2 15-12 29-26 29z">
          <text:p/>
        </draw:path>
        <draw:path draw:style-name="gr9" draw:text-style-name="P7" draw:layer="layout" svg:width="0.055cm" svg:height="0.055cm" svg:x="12.239cm" svg:y="13.946cm" svg:viewBox="0 0 56 56" svg:d="M56 27c0 13-17 30-30 29-14 0-29-17-26-31 1-12 13-24 25-25 14-1 30 13 31 27z">
          <text:p/>
        </draw:path>
        <draw:path draw:style-name="gr9" draw:text-style-name="P7" draw:layer="layout" svg:width="0.056cm" svg:height="0.058cm" svg:x="11.945cm" svg:y="13.944cm" svg:viewBox="0 0 57 59" svg:d="M57 31c0 15-14 29-29 28s-28-14-28-30c0-14 15-30 30-29 14 1 27 16 27 31z">
          <text:p/>
        </draw:path>
        <draw:path draw:style-name="gr9" draw:text-style-name="P7" draw:layer="layout" svg:width="0.055cm" svg:height="0.058cm" svg:x="14.572cm" svg:y="15.113cm" svg:viewBox="0 0 56 59" svg:d="M30 0c16 1 28 16 26 31-1 15-16 30-31 28s-26-17-25-32c1-16 15-29 30-27z">
          <text:p/>
        </draw:path>
        <draw:path draw:style-name="gr9" draw:text-style-name="P7" draw:layer="layout" svg:width="0.055cm" svg:height="0.055cm" svg:x="14.865cm" svg:y="26.791cm" svg:viewBox="0 0 56 56" svg:d="M30 0c14 1 28 17 26 32-2 14-19 27-32 24-14-3-24-16-24-27 0-15 17-30 30-29z">
          <text:p/>
        </draw:path>
        <draw:path draw:style-name="gr9" draw:text-style-name="P7" draw:layer="layout" svg:width="0.055cm" svg:height="0.054cm" svg:x="15.448cm" svg:y="15.698cm" svg:viewBox="0 0 56 55" svg:d="M25 55c-16-1-28-18-25-32 2-12 14-23 26-23 14-1 29 14 29 28 1 13-15 28-30 27z">
          <text:p/>
        </draw:path>
        <draw:path draw:style-name="gr9" draw:text-style-name="P7" draw:layer="layout" svg:width="0.054cm" svg:height="0.053cm" svg:x="16.034cm" svg:y="25.626cm" svg:viewBox="0 0 55 54" svg:d="M29 54c-15 1-30-15-29-29 0-13 12-24 25-25 13-2 28 9 30 21 3 14-11 31-26 33z">
          <text:p/>
        </draw:path>
        <draw:path draw:style-name="gr9" draw:text-style-name="P7" draw:layer="layout" svg:width="0.052cm" svg:height="0.052cm" svg:x="3.48cm" svg:y="18.035cm" svg:viewBox="0 0 53 53" svg:d="M29 53c-13 2-25-7-28-21-3-16 7-31 23-32 14-1 27 8 29 20 4 17-7 32-24 33z">
          <text:p/>
        </draw:path>
        <draw:path draw:style-name="gr9" draw:text-style-name="P7" draw:layer="layout" svg:width="0.054cm" svg:height="0.052cm" svg:x="3.772cm" svg:y="17.451cm" svg:viewBox="0 0 55 53" svg:d="M55 26c1 13-10 26-24 27-16 2-31-11-31-26 0-13 11-25 23-27 17-2 31 10 32 26z">
          <text:p/>
        </draw:path>
        <draw:path draw:style-name="gr9" draw:text-style-name="P7" draw:layer="layout" svg:width="0.053cm" svg:height="0.054cm" svg:x="2.896cm" svg:y="20.37cm" svg:viewBox="0 0 54 55" svg:d="M54 27c1 12-10 26-23 28-14 3-30-10-31-26s14-30 29-29c14 1 25 12 25 27z">
          <text:p/>
        </draw:path>
        <draw:path draw:style-name="gr9" draw:text-style-name="P7" draw:layer="layout" svg:width="0.053cm" svg:height="0.052cm" svg:x="2.896cm" svg:y="20.662cm" svg:viewBox="0 0 54 53" svg:d="M24 0c13-1 27 9 29 22 2 15-9 30-25 31-13 1-26-9-28-21-3-15 8-31 24-32z">
          <text:p/>
        </draw:path>
        <draw:path draw:style-name="gr9" draw:text-style-name="P7" draw:layer="layout" svg:width="0.054cm" svg:height="0.054cm" svg:x="12.822cm" svg:y="27.958cm" svg:viewBox="0 0 55 55" svg:d="M28 0c14 0 29 16 27 31-1 11-15 24-27 24s-27-13-28-24c-2-14 14-30 28-31z">
          <text:p/>
        </draw:path>
        <draw:path draw:style-name="gr9" draw:text-style-name="P7" draw:layer="layout" svg:width="0.053cm" svg:height="0.055cm" svg:x="17.201cm" svg:y="23.579cm" svg:viewBox="0 0 54 56" svg:d="M54 29c0 13-13 26-25 27-15 1-30-15-29-29 1-15 17-29 31-27 11 2 24 17 23 29z">
          <text:p/>
        </draw:path>
        <draw:path draw:style-name="gr9" draw:text-style-name="P7" draw:layer="layout" svg:width="0.053cm" svg:height="0.053cm" svg:x="17.494cm" svg:y="22.414cm" svg:viewBox="0 0 54 54" svg:d="M29 0c13 1 25 13 25 25 0 16-14 30-29 29-17-1-28-16-25-33 2-13 15-22 29-21z">
          <text:p/>
        </draw:path>
        <draw:path draw:style-name="gr9" draw:text-style-name="P7" draw:layer="layout" svg:width="0.053cm" svg:height="0.055cm" svg:x="2.896cm" svg:y="20.953cm" svg:viewBox="0 0 54 56" svg:d="M54 31c-1 15-18 27-32 24-11-2-22-15-22-27 0-15 15-29 28-28 15 1 28 15 26 31z">
          <text:p/>
        </draw:path>
        <draw:path draw:style-name="gr9" draw:text-style-name="P7" draw:layer="layout" svg:width="0.055cm" svg:height="0.055cm" svg:x="3.188cm" svg:y="22.996cm" svg:viewBox="0 0 56 56" svg:d="M31 55c-14 2-30-12-31-28 0-11 9-23 22-27 15-3 31 8 34 23 2 14-11 30-25 32z">
          <text:p/>
        </draw:path>
        <draw:path draw:style-name="gr9" draw:text-style-name="P7" draw:layer="layout" svg:width="0.056cm" svg:height="0.055cm" svg:x="7.274cm" svg:y="27.667cm" svg:viewBox="0 0 57 56" svg:d="M57 24c2 16-10 30-26 32-16 1-29-8-31-25-2-16 9-30 25-31 17-2 31 8 32 24z">
          <text:p/>
        </draw:path>
        <draw:path draw:style-name="gr9" draw:text-style-name="P7" draw:layer="layout" svg:width="0.053cm" svg:height="0.052cm" svg:x="2.896cm" svg:y="21.247cm" svg:viewBox="0 0 54 53" svg:d="M24 0c13-1 27 8 29 21 2 15-9 31-25 32-13 1-26-9-28-22-3-15 8-30 24-31z">
          <text:p/>
        </draw:path>
        <draw:path draw:style-name="gr9" draw:text-style-name="P7" draw:layer="layout" svg:width="0.053cm" svg:height="0.052cm" svg:x="14.573cm" svg:y="27.085cm" svg:viewBox="0 0 54 53" svg:d="M54 29c-2 15-13 24-26 24-17 1-29-13-28-29 2-16 18-26 33-23 13 2 22 15 21 28z">
          <text:p/>
        </draw:path>
        <draw:path draw:style-name="gr9" draw:text-style-name="P7" draw:layer="layout" svg:width="0.053cm" svg:height="0.052cm" svg:x="6.108cm" svg:y="27.085cm" svg:viewBox="0 0 54 53" svg:d="M54 27c-1 17-15 28-31 25-13-2-23-14-23-28 1-16 16-27 32-24 13 1 22 13 22 27z">
          <text:p/>
        </draw:path>
        <draw:path draw:style-name="gr9" draw:text-style-name="P7" draw:layer="layout" svg:width="0.055cm" svg:height="0.053cm" svg:x="6.983cm" svg:y="27.669cm" svg:viewBox="0 0 56 54" svg:d="M56 28c-2 16-16 28-31 26-13-2-25-15-25-27 0-16 16-29 32-27 14 2 25 14 24 28z">
          <text:p/>
        </draw:path>
        <draw:path draw:style-name="gr9" draw:text-style-name="P7" draw:layer="layout" svg:width="0.054cm" svg:height="0.053cm" svg:x="11.654cm" svg:y="28.252cm" svg:viewBox="0 0 55 54" svg:d="M29 0c15 1 26 13 26 26-1 16-15 29-31 28-15-2-27-19-24-34 3-13 16-22 29-20z">
          <text:p/>
        </draw:path>
        <draw:path draw:style-name="gr9" draw:text-style-name="P7" draw:layer="layout" svg:width="0.052cm" svg:height="0.053cm" svg:x="3.481cm" svg:y="23.873cm" svg:viewBox="0 0 53 54" svg:d="M53 25c1 13-9 26-22 28-16 2-30-9-31-25-1-14 8-26 21-28 17-3 31 9 32 25z">
          <text:p/>
        </draw:path>
        <draw:path draw:style-name="gr9" draw:text-style-name="P7" draw:layer="layout" svg:width="0.055cm" svg:height="0.054cm" svg:x="3.189cm" svg:y="18.91cm" svg:viewBox="0 0 56 55" svg:d="M55 26c2 14-12 29-27 29-13 1-25-9-28-22-3-14 8-31 23-33s31 10 32 26z">
          <text:p/>
        </draw:path>
        <draw:path draw:style-name="gr9" draw:text-style-name="P7" draw:layer="layout" svg:width="0.052cm" svg:height="0.052cm" svg:x="2.897cm" svg:y="21.831cm" svg:viewBox="0 0 53 53" svg:d="M29 53c-16 1-29-11-29-28 0-13 9-24 23-25s27 8 30 20c2 15-9 32-24 33z">
          <text:p/>
        </draw:path>
        <draw:path draw:style-name="gr9" draw:text-style-name="P7" draw:layer="layout" svg:width="0.053cm" svg:height="0.052cm" svg:x="16.326cm" svg:y="16.866cm" svg:viewBox="0 0 54 53" svg:d="M54 27c0 15-13 27-31 26-13 0-23-12-23-25 0-14 10-27 23-28 16-1 30 11 31 27z">
          <text:p/>
        </draw:path>
        <draw:path draw:style-name="gr9" draw:text-style-name="P7" draw:layer="layout" svg:width="0.053cm" svg:height="0.052cm" svg:x="7.276cm" svg:y="14.24cm" svg:viewBox="0 0 54 53" svg:d="M54 28c-2 16-17 27-34 24-12-2-21-15-20-29 2-14 12-24 26-23 17 0 29 13 28 28z">
          <text:p/>
        </draw:path>
        <draw:path draw:style-name="gr9" draw:text-style-name="P7" draw:layer="layout" svg:width="0.052cm" svg:height="0.053cm" svg:x="4.65cm" svg:y="16.282cm" svg:viewBox="0 0 53 54" svg:d="M53 27c0 13-9 24-23 26-16 3-31-9-30-25 0-15 11-27 23-28 15-2 29 10 30 27z">
          <text:p/>
        </draw:path>
        <draw:path draw:style-name="gr9" draw:text-style-name="P7" draw:layer="layout" svg:width="0.052cm" svg:height="0.052cm" svg:x="13.115cm" svg:y="14.239cm" svg:viewBox="0 0 53 53" svg:d="M24 53c-14-1-24-11-24-26-1-16 12-29 28-27 14 1 24 10 25 24 1 16-12 29-29 29z">
          <text:p/>
        </draw:path>
        <draw:path draw:style-name="gr9" draw:text-style-name="P7" draw:layer="layout" svg:width="0.052cm" svg:height="0.052cm" svg:x="5.525cm" svg:y="15.407cm" svg:viewBox="0 0 53 53" svg:d="M30 53c-16 1-30-11-30-26 0-13 10-25 24-27 16-1 30 12 29 28-1 14-11 25-23 25z">
          <text:p/>
        </draw:path>
        <draw:path draw:style-name="gr9" draw:text-style-name="P7" draw:layer="layout" svg:width="0.053cm" svg:height="0.055cm" svg:x="13.989cm" svg:y="27.375cm" svg:viewBox="0 0 54 56" svg:d="M32 56c-16 1-32-12-32-27 0-12 10-25 23-28 15-4 30 10 31 26 1 13-10 26-22 29z">
          <text:p/>
        </draw:path>
        <draw:path draw:style-name="gr9" draw:text-style-name="P7" draw:layer="layout" svg:width="0.053cm" svg:height="0.054cm" svg:x="2.896cm" svg:y="21.537cm" svg:viewBox="0 0 54 55" svg:d="M54 26c1 13-9 26-22 28-16 3-31-9-32-25 0-15 13-31 28-29 15 1 25 12 26 26z">
          <text:p/>
        </draw:path>
        <draw:path draw:style-name="gr9" draw:text-style-name="P7" draw:layer="layout" svg:width="0.052cm" svg:height="0.053cm" svg:x="16.326cm" svg:y="25.332cm" svg:viewBox="0 0 53 54" svg:d="M23 53c-14-1-23-13-23-27 1-17 15-29 31-26 13 2 22 13 22 27 1 15-13 27-30 26z">
          <text:p/>
        </draw:path>
        <draw:path draw:style-name="gr9" draw:text-style-name="P7" draw:layer="layout" svg:width="0.054cm" svg:height="0.053cm" svg:x="17.494cm" svg:y="22.705cm" svg:viewBox="0 0 55 54" svg:d="M55 25c1 13-9 26-23 28-18 2-32-10-32-26 0-14 10-25 24-27 15-3 29 9 31 25z">
          <text:p/>
        </draw:path>
        <draw:path draw:style-name="gr9" draw:text-style-name="P7" draw:layer="layout" svg:width="0.053cm" svg:height="0.053cm" svg:x="17.494cm" svg:y="19.493cm" svg:viewBox="0 0 54 54" svg:d="M54 29c-1 16-16 27-33 25-13-2-23-14-21-28 1-15 12-25 25-26 15 0 30 14 29 29z">
          <text:p/>
        </draw:path>
        <draw:path draw:style-name="gr9" draw:text-style-name="P7" draw:layer="layout" svg:width="0.053cm" svg:height="0.053cm" svg:x="11.071cm" svg:y="13.655cm" svg:viewBox="0 0 54 54" svg:d="M54 25c1 12-9 26-23 28-17 2-31-10-31-26 0-14 9-25 22-27 16-3 31 9 32 25z">
          <text:p/>
        </draw:path>
        <draw:path draw:style-name="gr9" draw:text-style-name="P7" draw:layer="layout" svg:width="0.053cm" svg:height="0.053cm" svg:x="10.779cm" svg:y="13.655cm" svg:viewBox="0 0 54 54" svg:d="M30 0c16 1 27 17 24 33-2 12-15 22-29 21-13-1-25-14-25-26 0-16 15-29 30-28z">
          <text:p/>
        </draw:path>
        <draw:path draw:style-name="gr9" draw:text-style-name="P7" draw:layer="layout" svg:width="0.052cm" svg:height="0.053cm" svg:x="10.488cm" svg:y="13.655cm" svg:viewBox="0 0 53 54" svg:d="M22 0c15-1 30 11 31 26 1 13-9 26-24 28-13 2-26-8-28-20-4-16 7-32 21-34z">
          <text:p/>
        </draw:path>
        <draw:path draw:style-name="gr9" draw:text-style-name="P7" draw:layer="layout" svg:width="0.053cm" svg:height="0.053cm" svg:x="10.194cm" svg:y="13.655cm" svg:viewBox="0 0 54 54" svg:d="M54 25c1 13-8 26-22 28-16 2-32-10-32-26-1-12 11-25 23-27 16-3 29 8 31 25z">
          <text:p/>
        </draw:path>
        <draw:path draw:style-name="gr9" draw:text-style-name="P7" draw:layer="layout" svg:width="0.049cm" svg:height="0.049cm" svg:x="2.898cm" svg:y="22.122cm" svg:viewBox="0 0 50 50" svg:d="M24 0c12-1 25 11 26 25 2 13-9 24-23 25s-26-9-27-22c0-14 10-25 24-28z">
          <text:p/>
        </draw:path>
        <draw:path draw:style-name="gr9" draw:text-style-name="P7" draw:layer="layout" svg:width="0.049cm" svg:height="0.049cm" svg:x="3.192cm" svg:y="18.621cm" svg:viewBox="0 0 50 50" svg:d="M49 25c-2 16-13 25-26 25-13-1-24-13-23-28 0-14 12-23 26-22s26 13 23 25z">
          <text:p/>
        </draw:path>
        <draw:path draw:style-name="gr9" draw:text-style-name="P7" draw:layer="layout" svg:width="0.049cm" svg:height="0.048cm" svg:x="3.482cm" svg:y="24.168cm" svg:viewBox="0 0 50 49" svg:d="M23 49c-14-2-23-12-23-26 1-14 13-25 26-23 14 1 25 12 24 25 0 13-13 25-27 24z">
          <text:p/>
        </draw:path>
        <draw:path draw:style-name="gr9" draw:text-style-name="P7" draw:layer="layout" svg:width="0.049cm" svg:height="0.05cm" svg:x="15.16cm" svg:y="15.409cm" svg:viewBox="0 0 50 51" svg:d="M25 0c13-1 25 10 25 23 1 12-8 25-20 27-14 4-30-11-30-26 0-12 11-24 25-24z">
          <text:p/>
        </draw:path>
        <draw:path draw:style-name="gr9" draw:text-style-name="P7" draw:layer="layout" svg:width="0.052cm" svg:height="0.052cm" svg:x="9.904cm" svg:y="13.655cm" svg:viewBox="0 0 53 53" svg:d="M30 53c-14 1-26-9-30-21-2-16 10-31 25-32 15-2 28 10 28 27 0 13-9 24-23 26z">
          <text:p/>
        </draw:path>
        <draw:path draw:style-name="gr9" draw:text-style-name="P7" draw:layer="layout" svg:width="0.048cm" svg:height="0.049cm" svg:x="13.408cm" svg:y="14.241cm" svg:viewBox="0 0 49 50" svg:d="M49 23c1 14-9 27-22 27-14 0-26-11-27-24-2-12 11-25 24-26s24 9 25 23z">
          <text:p/>
        </draw:path>
        <draw:path draw:style-name="gr9" draw:text-style-name="P7" draw:layer="layout" svg:width="0.049cm" svg:height="0.049cm" svg:x="5.235cm" svg:y="26.502cm" svg:viewBox="0 0 50 50" svg:d="M26 0c13 1 25 14 24 26-2 14-13 24-27 24s-24-12-23-27 12-24 26-23z">
          <text:p/>
        </draw:path>
        <draw:path draw:style-name="gr9" draw:text-style-name="P7" draw:layer="layout" svg:width="0.052cm" svg:height="0.053cm" svg:x="4.066cm" svg:y="25.041cm" svg:viewBox="0 0 53 54" svg:d="M53 23c0 17-12 31-28 31-13-1-23-12-25-25-2-17 10-30 26-29 15 1 26 11 27 23z">
          <text:p/>
        </draw:path>
        <draw:path draw:style-name="gr9" draw:text-style-name="P7" draw:layer="layout" svg:width="0.049cm" svg:height="0.049cm" svg:x="2.898cm" svg:y="22.416cm" svg:viewBox="0 0 50 50" svg:d="M24 0c14-1 26 11 26 24 1 13-9 25-22 26s-26-10-28-23c-1-13 9-26 24-27z">
          <text:p/>
        </draw:path>
        <draw:path draw:style-name="gr9" draw:text-style-name="P7" draw:layer="layout" svg:width="0.049cm" svg:height="0.049cm" svg:x="17.203cm" svg:y="23.875cm" svg:viewBox="0 0 50 50" svg:d="M27 50c-14 1-26-9-27-23-1-12 10-26 24-27 13-1 25 9 26 24 1 14-9 26-23 26z">
          <text:p/>
        </draw:path>
        <draw:path draw:style-name="gr9" draw:text-style-name="P7" draw:layer="layout" svg:width="0.049cm" svg:height="0.048cm" svg:x="2.898cm" svg:y="19.788cm" svg:viewBox="0 0 50 49" svg:d="M24 49c-15-2-24-12-24-26 1-14 13-24 28-23 14 1 23 11 22 27-1 13-14 24-26 22z">
          <text:p/>
        </draw:path>
        <draw:path draw:style-name="gr9" draw:text-style-name="P7" draw:layer="layout" svg:width="0.052cm" svg:height="0.053cm" svg:x="11.947cm" svg:y="28.253cm" svg:viewBox="0 0 53 54" svg:d="M53 29c-2 16-17 28-31 24-14-3-22-15-22-28 0-17 15-27 32-25 13 1 22 14 21 29z">
          <text:p/>
        </draw:path>
        <draw:path draw:style-name="gr9" draw:text-style-name="P7" draw:layer="layout" svg:width="0.048cm" svg:height="0.049cm" svg:x="3.192cm" svg:y="23.291cm" svg:viewBox="0 0 49 50" svg:d="M49 28c-1 13-12 23-26 22-13 0-25-12-23-26s13-25 26-24 25 15 23 28z">
          <text:p/>
        </draw:path>
        <draw:path draw:style-name="gr9" draw:text-style-name="P7" draw:layer="layout" svg:width="0.048cm" svg:height="0.049cm" svg:x="16.912cm" svg:y="24.459cm" svg:viewBox="0 0 49 50" svg:d="M49 27c-2 14-14 24-26 23-16-1-27-17-22-34 3-11 14-17 25-16 14 1 25 15 23 27z">
          <text:p/>
        </draw:path>
        <draw:path draw:style-name="gr9" draw:text-style-name="P7" draw:layer="layout" svg:width="0.049cm" svg:height="0.048cm" svg:x="17.787cm" svg:y="20.956cm" svg:viewBox="0 0 50 49" svg:d="M50 26c-1 13-14 24-27 23-15-1-24-13-23-26s13-24 26-23c14 1 24 12 24 26z">
          <text:p/>
        </draw:path>
        <draw:path draw:style-name="gr9" draw:text-style-name="P7" draw:layer="layout" svg:width="0.049cm" svg:height="0.049cm" svg:x="17.203cm" svg:y="18.327cm" svg:viewBox="0 0 50 50" svg:d="M27 50c-14 0-26-10-27-24-1-12 11-24 24-26 12-2 25 10 26 23 1 16-9 26-23 27z">
          <text:p/>
        </draw:path>
        <draw:path draw:style-name="gr9" draw:text-style-name="P7" draw:layer="layout" svg:width="0.049cm" svg:height="0.048cm" svg:x="12.532cm" svg:y="13.95cm" svg:viewBox="0 0 50 49" svg:d="M23 0c15-1 27 9 27 22 1 13-8 25-24 27-11 2-25-11-26-24-1-14 9-25 23-25z">
          <text:p/>
        </draw:path>
        <draw:path draw:style-name="gr9" draw:text-style-name="P7" draw:layer="layout" svg:width="0.049cm" svg:height="0.049cm" svg:x="4.651cm" svg:y="25.918cm" svg:viewBox="0 0 50 50" svg:d="M50 26c-1 14-13 24-27 24-13 0-24-12-23-27 1-14 13-25 26-23 14 1 25 14 24 26z">
          <text:p/>
        </draw:path>
        <draw:path draw:style-name="gr9" draw:text-style-name="P7" draw:layer="layout" svg:width="0.049cm" svg:height="0.048cm" svg:x="7.863cm" svg:y="13.95cm" svg:viewBox="0 0 50 49" svg:d="M26 49c-12 2-25-11-26-24-1-12 5-21 16-24 16-5 33 6 34 21 1 13-9 24-24 27z">
          <text:p/>
        </draw:path>
        <draw:path draw:style-name="gr9" draw:text-style-name="P7" draw:layer="layout" svg:width="0.049cm" svg:height="0.049cm" svg:x="5.818cm" svg:y="27.087cm" svg:viewBox="0 0 50 50" svg:d="M50 26c-2 15-13 25-27 24-13 0-24-13-23-27 2-15 12-24 27-23 13 1 24 14 23 26z">
          <text:p/>
        </draw:path>
        <draw:path draw:style-name="gr9" draw:text-style-name="P7" draw:layer="layout" svg:width="0.053cm" svg:height="0.052cm" svg:x="14.283cm" svg:y="14.823cm" svg:viewBox="0 0 54 53" svg:d="M24 0c17 0 31 13 30 28-1 13-12 24-26 25-16 2-29-12-28-28 1-14 11-24 24-25z">
          <text:p/>
        </draw:path>
        <draw:path draw:style-name="gr9" draw:text-style-name="P7" draw:layer="layout" svg:width="0.049cm" svg:height="0.049cm" svg:x="9.322cm" svg:y="13.657cm" svg:viewBox="0 0 50 50" svg:d="M24 50c-15-1-26-14-24-27 1-13 15-24 27-23 13 1 23 13 23 27s-12 24-26 23z">
          <text:p/>
        </draw:path>
        <draw:path draw:style-name="gr9" draw:text-style-name="P7" draw:layer="layout" svg:width="0.049cm" svg:height="0.049cm" svg:x="15.744cm" svg:y="15.994cm" svg:viewBox="0 0 50 50" svg:d="M50 27c-1 12-12 23-24 23-15 0-28-15-26-29 2-12 16-22 28-21 13 1 24 14 22 27z">
          <text:p/>
        </draw:path>
        <draw:path draw:style-name="gr9" draw:text-style-name="P7" draw:layer="layout" svg:width="0.053cm" svg:height="0.052cm" svg:x="8.735cm" svg:y="28.253cm" svg:viewBox="0 0 54 53" svg:d="M25 0c14-1 27 9 28 22 2 16-9 30-25 31-13 1-25-9-28-22-3-15 8-30 25-31z">
          <text:p/>
        </draw:path>
        <draw:path draw:style-name="gr9" draw:text-style-name="P7" draw:layer="layout" svg:width="0.051cm" svg:height="0.049cm" svg:x="5.525cm" svg:y="26.794cm" svg:viewBox="0 0 52 50" svg:d="M52 22c1 15-10 27-22 28-15 2-30-11-30-26 1-12 12-23 25-24 12-1 26 10 27 22z">
          <text:p/>
        </draw:path>
        <draw:path draw:style-name="gr9" draw:text-style-name="P7" draw:layer="layout" svg:width="0.049cm" svg:height="0.048cm" svg:x="13.991cm" svg:y="14.535cm" svg:viewBox="0 0 50 49" svg:d="M0 22c2-13 14-23 28-22 14 0 24 11 22 25-1 15-14 26-26 24-14-3-25-13-24-27z">
          <text:p/>
        </draw:path>
        <draw:path draw:style-name="gr9" draw:text-style-name="P7" draw:layer="layout" svg:width="0.045cm" svg:height="0.047cm" svg:x="16.913cm" svg:y="17.454cm" svg:viewBox="0 0 46 48" svg:d="M46 27c-2 13-15 24-28 20-10-3-19-14-18-25 2-13 17-25 29-21 10 4 18 16 17 26z">
          <text:p/>
        </draw:path>
        <draw:path draw:style-name="gr9" draw:text-style-name="P7" draw:layer="layout" svg:width="0.049cm" svg:height="0.049cm" svg:x="16.328cm" svg:y="16.578cm" svg:viewBox="0 0 50 50" svg:d="M50 26c-2 13-15 25-27 24-16-2-26-17-22-33 3-10 13-18 26-17 14 1 24 14 23 26z">
          <text:p/>
        </draw:path>
        <draw:path draw:style-name="gr9" draw:text-style-name="P7" draw:layer="layout" svg:width="0.048cm" svg:height="0.049cm" svg:x="10.49cm" svg:y="28.546cm" svg:viewBox="0 0 49 50" svg:d="M49 23c2 12-9 26-23 27-12 1-23-7-25-17-5-16 6-32 22-33 12-1 25 10 26 23z">
          <text:p/>
        </draw:path>
        <draw:path draw:style-name="gr9" draw:text-style-name="P7" draw:layer="layout" svg:width="0.048cm" svg:height="0.049cm" svg:x="10.196cm" svg:y="28.546cm" svg:viewBox="0 0 49 50" svg:d="M49 23c2 14-8 27-22 27-13 0-26-10-27-23-1-12 11-25 24-27 12-2 24 9 25 23z">
          <text:p/>
        </draw:path>
        <draw:path draw:style-name="gr9" draw:text-style-name="P7" draw:layer="layout" svg:width="0.049cm" svg:height="0.05cm" svg:x="2.898cm" svg:y="20.079cm" svg:viewBox="0 0 50 51" svg:d="M26 0c12 0 23 10 24 23 2 14-8 26-21 28-16 1-30-12-29-27 2-14 12-23 26-24z">
          <text:p/>
        </draw:path>
        <draw:path draw:style-name="gr9" draw:text-style-name="P7" draw:layer="layout" svg:width="0.048cm" svg:height="0.048cm" svg:x="17.497cm" svg:y="19.205cm" svg:viewBox="0 0 49 49" svg:d="M49 26c-3 13-15 24-27 23-15-1-26-17-21-34 3-10 13-16 25-15 13 1 25 13 23 26z">
          <text:p/>
        </draw:path>
        <draw:path draw:style-name="gr9" draw:text-style-name="P7" draw:layer="layout" svg:width="0.049cm" svg:height="0.049cm" svg:x="7.569cm" svg:y="27.961cm" svg:viewBox="0 0 50 50" svg:d="M27 0c14 1 23 12 23 26s-12 25-27 24c-13-3-25-16-23-27 3-14 15-24 27-23z">
          <text:p/>
        </draw:path>
        <draw:path draw:style-name="gr9" draw:text-style-name="P7" draw:layer="layout" svg:width="0.046cm" svg:height="0.045cm" svg:x="2.9cm" svg:y="19.206cm" svg:viewBox="0 0 47 46" svg:d="M0 23c-1-10 9-21 20-23 13-2 26 8 27 21 1 10-9 23-18 25-13 2-28-9-29-23z">
          <text:p/>
        </draw:path>
        <draw:path draw:style-name="gr9" draw:text-style-name="P7" draw:layer="layout" svg:width="0.046cm" svg:height="0.045cm" svg:x="7.279cm" svg:y="27.963cm" svg:viewBox="0 0 47 46" svg:d="M47 26c-2 12-17 22-28 20-13-2-22-16-18-28 2-9 14-19 23-18 13 1 24 15 23 26z">
          <text:p/>
        </draw:path>
        <draw:path draw:style-name="gr9" draw:text-style-name="P7" draw:layer="layout" svg:width="0.049cm" svg:height="0.049cm" svg:x="4.067cm" svg:y="16.868cm" svg:viewBox="0 0 50 50" svg:d="M50 24c1 13-9 24-22 26-14 1-26-8-28-20-2-15 11-31 26-30 13 0 23 10 24 24z">
          <text:p/>
        </draw:path>
        <draw:path draw:style-name="gr9" draw:text-style-name="P7" draw:layer="layout" svg:width="0.049cm" svg:height="0.049cm" svg:x="16.036cm" svg:y="16.284cm" svg:viewBox="0 0 50 50" svg:d="M28 50c-15 0-27-9-28-22 0-13 10-26 24-28 13-1 24 8 26 24 1 13-9 25-22 26z">
          <text:p/>
        </draw:path>
        <draw:path draw:style-name="gr9" draw:text-style-name="P7" draw:layer="layout" svg:width="0.048cm" svg:height="0.048cm" svg:x="8.447cm" svg:y="28.255cm" svg:viewBox="0 0 49 49" svg:d="M26 49c-13 2-25-10-26-24-1-12 6-22 16-24 17-4 32 6 33 21 1 12-10 26-23 27z">
          <text:p/>
        </draw:path>
        <draw:path draw:style-name="gr9" draw:text-style-name="P7" draw:layer="layout" svg:width="0.045cm" svg:height="0.046cm" svg:x="16.622cm" svg:y="16.869cm" svg:viewBox="0 0 46 47" svg:d="M23 47c-11 0-21-9-23-20-2-13 10-27 22-27 12 1 22 9 23 20 3 14-8 27-22 27z">
          <text:p/>
        </draw:path>
        <draw:path draw:style-name="gr9" draw:text-style-name="P7" draw:layer="layout" svg:width="0.048cm" svg:height="0.049cm" svg:x="11.657cm" svg:y="13.657cm" svg:viewBox="0 0 49 50" svg:d="M49 24c1 12-10 25-24 26-15 1-25-10-25-24 0-13 10-25 23-26 13 0 24 10 26 24z">
          <text:p/>
        </draw:path>
        <draw:path draw:style-name="gr9" draw:text-style-name="P7" draw:layer="layout" svg:width="0.046cm" svg:height="0.046cm" svg:x="13.993cm" svg:y="27.672cm" svg:viewBox="0 0 47 47" svg:d="M0 19c2-11 17-21 29-19 12 3 21 18 17 29-3 10-15 19-25 18-12-3-23-17-21-28z">
          <text:p/>
        </draw:path>
        <draw:path draw:style-name="gr9" draw:text-style-name="P7" draw:layer="layout" svg:width="0.045cm" svg:height="0.046cm" svg:x="17.498cm" svg:y="23.293cm" svg:viewBox="0 0 46 47" svg:d="M45 26c-2 13-17 23-30 20-10-3-17-15-15-26 1-11 10-20 21-20 13 0 26 13 24 26z">
          <text:p/>
        </draw:path>
        <draw:path draw:style-name="gr9" draw:text-style-name="P7" draw:layer="layout" svg:width="0.05cm" svg:height="0.05cm" svg:x="17.786cm" svg:y="21.248cm" svg:viewBox="0 0 51 51" svg:d="M50 26c-1 14-11 25-24 25-16 0-29-16-26-31 2-12 15-21 28-20 13 2 23 14 22 26z">
          <text:p/>
        </draw:path>
        <draw:path draw:style-name="gr9" draw:text-style-name="P7" draw:layer="layout" svg:width="0.046cm" svg:height="0.045cm" svg:x="12.534cm" svg:y="28.256cm" svg:viewBox="0 0 47 46" svg:d="M47 23c0 10-10 20-21 23-12 2-26-10-26-22s8-22 19-24c13-2 27 9 28 23z">
          <text:p/>
        </draw:path>
        <draw:path draw:style-name="gr9" draw:text-style-name="P7" draw:layer="layout" svg:width="0.048cm" svg:height="0.049cm" svg:x="9.03cm" svg:y="13.657cm" svg:viewBox="0 0 49 50" svg:d="M24 0c13 0 23 10 25 24 2 12-9 25-22 26-16 1-27-10-27-23 0-14 10-26 24-27z">
          <text:p/>
        </draw:path>
        <draw:path draw:style-name="gr9" draw:text-style-name="P7" draw:layer="layout" svg:width="0.049cm" svg:height="0.048cm" svg:x="16.619cm" svg:y="25.043cm" svg:viewBox="0 0 50 49" svg:d="M50 25c-1 15-13 26-25 24-14-1-25-15-25-27 1-13 12-22 28-22 13 0 23 11 22 25z">
          <text:p/>
        </draw:path>
        <draw:path draw:style-name="gr9" draw:text-style-name="P7" draw:layer="layout" svg:width="0.048cm" svg:height="0.049cm" svg:x="4.358cm" svg:y="25.628cm" svg:viewBox="0 0 49 50" svg:d="M26 50c-12 0-25-11-26-25-2-11 9-24 23-25 15-1 26 9 26 23 0 15-9 26-23 27z">
          <text:p/>
        </draw:path>
        <draw:path draw:style-name="gr9" draw:text-style-name="P7" draw:layer="layout" svg:width="0.046cm" svg:height="0.046cm" svg:x="11.366cm" svg:y="28.548cm" svg:viewBox="0 0 47 47" svg:d="M21 46c-13-1-23-15-20-26 3-12 18-23 28-20 9 3 18 15 18 25 0 13-13 23-26 21z">
          <text:p/>
        </draw:path>
        <draw:path draw:style-name="gr9" draw:text-style-name="P7" draw:layer="layout" svg:width="0.045cm" svg:height="0.046cm" svg:x="4.652cm" svg:y="15.995cm" svg:viewBox="0 0 46 47" svg:d="M21 47c-12-1-23-16-21-27 1-13 16-22 28-19 10 2 19 13 18 22 0 12-13 25-25 24z">
          <text:p/>
        </draw:path>
        <draw:path draw:style-name="gr9" draw:text-style-name="P7" draw:layer="layout" svg:width="0.05cm" svg:height="0.05cm" svg:x="14.868cm" svg:y="15.117cm" svg:viewBox="0 0 51 51" svg:d="M51 27c0 11-13 24-25 24-13 0-26-11-26-23-1-16 14-30 28-28 12 1 23 16 23 27z">
          <text:p/>
        </draw:path>
        <draw:path draw:style-name="gr9" draw:text-style-name="P7" draw:layer="layout" svg:width="0.049cm" svg:height="0.049cm" svg:x="14.285cm" svg:y="27.377cm" svg:viewBox="0 0 50 50" svg:d="M26 50c-15 1-26-9-26-22 0-14 10-27 22-28s26 11 28 24c1 12-11 24-24 26z">
          <text:p/>
        </draw:path>
        <draw:path draw:style-name="gr9" draw:text-style-name="P7" draw:layer="layout" svg:width="0.049cm" svg:height="0.049cm" svg:x="13.116cm" svg:y="27.961cm" svg:viewBox="0 0 50 50" svg:d="M23 50c-14-1-24-13-23-27s14-25 26-23c13 2 25 14 24 26-1 13-13 24-27 24z">
          <text:p/>
        </draw:path>
        <draw:path draw:style-name="gr9" draw:text-style-name="P7" draw:layer="layout" svg:width="0.049cm" svg:height="0.049cm" svg:x="11.365cm" svg:y="13.657cm" svg:viewBox="0 0 50 50" svg:d="M50 23c1 14-9 27-24 27-14 0-26-9-26-23-1-13 10-25 23-27 13-1 25 10 27 23z">
          <text:p/>
        </draw:path>
        <draw:path draw:style-name="gr9" draw:text-style-name="P7" draw:layer="layout" svg:width="0.049cm" svg:height="0.05cm" svg:x="6.11cm" svg:y="14.824cm" svg:viewBox="0 0 50 51" svg:d="M50 28c-1 13-14 24-26 23-14-1-24-12-24-25 0-15 14-29 29-25 13 2 22 14 21 27z">
          <text:p/>
        </draw:path>
        <draw:path draw:style-name="gr9" draw:text-style-name="P7" draw:layer="layout" svg:width="0.049cm" svg:height="0.049cm" svg:x="13.701cm" svg:y="27.671cm" svg:viewBox="0 0 50 50" svg:d="M50 22c1 12-11 26-24 28-12 2-24-10-26-24-1-14 9-26 23-26 14-1 26 9 27 22z">
          <text:p/>
        </draw:path>
        <draw:path draw:style-name="gr9" draw:text-style-name="P7" draw:layer="layout" svg:width="0.045cm" svg:height="0.045cm" svg:x="17.789cm" svg:y="21.541cm" svg:viewBox="0 0 46 46" svg:d="M46 25c-1 13-14 23-28 21-11-2-19-15-18-25 1-13 16-23 29-20 10 2 18 14 17 24z">
          <text:p/>
        </draw:path>
        <draw:path draw:style-name="gr9" draw:text-style-name="P7" draw:layer="layout" svg:width="0.041cm" svg:height="0.042cm" svg:x="6.697cm" svg:y="14.245cm" svg:viewBox="0 0 42 43" svg:d="M42 23c-1 11-12 21-22 20-11-2-21-12-20-22 0-11 12-21 22-21 11 1 21 13 20 23z">
          <text:p/>
        </draw:path>
        <draw:path draw:style-name="gr9" draw:text-style-name="P7" draw:layer="layout" svg:width="0.045cm" svg:height="0.046cm" svg:x="4.36cm" svg:y="16.286cm" svg:viewBox="0 0 46 47" svg:d="M46 22c0 12-8 22-18 24-15 3-27-8-28-22 0-13 13-26 26-24 10 1 19 12 20 22z">
          <text:p/>
        </draw:path>
        <draw:path draw:style-name="gr9" draw:text-style-name="P7" draw:layer="layout" svg:width="0.046cm" svg:height="0.046cm" svg:x="6.695cm" svg:y="27.672cm" svg:viewBox="0 0 47 47" svg:d="M47 21c2 12-11 25-23 26-9 0-20-8-23-18-5-12 6-26 18-29 12-2 27 8 28 21z">
          <text:p/>
        </draw:path>
        <draw:path draw:style-name="gr9" draw:text-style-name="P7" draw:layer="layout" svg:width="0.046cm" svg:height="0.046cm" svg:x="4.068cm" svg:y="25.336cm" svg:viewBox="0 0 47 47" svg:d="M21 0c12-1 25 11 26 24 0 9-8 20-18 22-12 3-26-6-29-18-2-12 9-26 21-28z">
          <text:p/>
        </draw:path>
        <draw:path draw:style-name="gr9" draw:text-style-name="P7" draw:layer="layout" svg:width="0.048cm" svg:height="0.048cm" svg:x="6.404cm" svg:y="27.377cm" svg:viewBox="0 0 49 49" svg:d="M49 27c-1 13-12 22-27 22-13-1-24-12-22-26s15-25 27-23c13 1 23 14 22 27z">
          <text:p/>
        </draw:path>
        <draw:path draw:style-name="gr9" draw:text-style-name="P7" draw:layer="layout" svg:width="0.046cm" svg:height="0.044cm" svg:x="6.112cm" svg:y="27.38cm" svg:viewBox="0 0 47 45" svg:d="M25 45c-13 2-25-9-25-22 0-11 9-21 20-23 10-1 24 7 26 18 3 13-6 26-21 27z">
          <text:p/>
        </draw:path>
        <draw:path draw:style-name="gr9" draw:text-style-name="P7" draw:layer="layout" svg:width="0.046cm" svg:height="0.047cm" svg:x="17.788cm" svg:y="20.665cm" svg:viewBox="0 0 47 48" svg:d="M21 48c-13-3-23-16-21-27 3-13 18-23 29-20s19 15 18 25c0 12-15 24-26 22z">
          <text:p/>
        </draw:path>
        <draw:path draw:style-name="gr9" draw:text-style-name="P7" draw:layer="layout" svg:width="0.045cm" svg:height="0.045cm" svg:x="16.329cm" svg:y="25.63cm" svg:viewBox="0 0 46 46" svg:d="M20 46c-12-2-22-16-19-29 2-10 13-19 24-16 15 2 25 15 21 27-3 10-15 19-26 18z">
          <text:p/>
        </draw:path>
        <draw:path draw:style-name="gr9" draw:text-style-name="P7" draw:layer="layout" svg:width="0.048cm" svg:height="0.048cm" svg:x="12.242cm" svg:y="28.255cm" svg:viewBox="0 0 49 49" svg:d="M49 25c-2 14-13 25-26 24-13 0-23-13-23-27s11-23 26-22c14 1 25 13 23 25z">
          <text:p/>
        </draw:path>
        <draw:path draw:style-name="gr9" draw:text-style-name="P7" draw:layer="layout" svg:width="0.047cm" svg:height="0.048cm" svg:x="3.775cm" svg:y="24.751cm" svg:viewBox="0 0 48 49" svg:d="M23 0c12-1 24 9 25 23 2 13-8 26-21 26-15 0-27-9-27-23-1-13 10-25 23-26z">
          <text:p/>
        </draw:path>
        <draw:path draw:style-name="gr9" draw:text-style-name="P7" draw:layer="layout" svg:width="0.047cm" svg:height="0.045cm" svg:x="2.899cm" svg:y="22.71cm" svg:viewBox="0 0 48 46" svg:d="M48 24c-1 13-14 24-27 22s-23-17-20-28c3-10 14-18 24-18 12 0 24 12 23 24z">
          <text:p/>
        </draw:path>
        <draw:path draw:style-name="gr9" draw:text-style-name="P7" draw:layer="layout" svg:width="0.046cm" svg:height="0.043cm" svg:x="3.484cm" svg:y="17.747cm" svg:viewBox="0 0 47 44" svg:d="M46 19c2 10-6 22-17 24-13 4-27-5-29-19-2-9 8-21 18-23 12-3 26 6 28 18z">
          <text:p/>
        </draw:path>
        <draw:path draw:style-name="gr9" draw:text-style-name="P7" draw:layer="layout" svg:width="0.046cm" svg:height="0.046cm" svg:x="11.95cm" svg:y="13.659cm" svg:viewBox="0 0 47 47" svg:d="M25 0c13 2 24 14 22 26s-17 23-28 21c-10-2-19-14-19-24 0-12 13-24 25-23z">
          <text:p/>
        </draw:path>
        <draw:path draw:style-name="gr9" draw:text-style-name="P7" draw:layer="layout" svg:width="0.048cm" svg:height="0.048cm" svg:x="17.497cm" svg:y="23cm" svg:viewBox="0 0 49 49" svg:d="M22 0c14 0 27 10 27 23 1 13-11 24-24 26-12 1-24-10-25-23-1-16 8-26 22-26z">
          <text:p/>
        </draw:path>
        <draw:path draw:style-name="gr9" draw:text-style-name="P7" draw:layer="layout" svg:width="0.044cm" svg:height="0.045cm" svg:x="14.87cm" svg:y="27.089cm" svg:viewBox="0 0 45 46" svg:d="M21 0c10-1 21 8 24 17 2 14-8 28-21 29-9 1-21-8-23-18-3-13 7-27 20-28z">
          <text:p/>
        </draw:path>
        <draw:path draw:style-name="gr9" draw:text-style-name="P7" draw:layer="layout" svg:width="0.046cm" svg:height="0.046cm" svg:x="2.9cm" svg:y="19.498cm" svg:viewBox="0 0 47 47" svg:d="M25 46c-14 1-26-11-25-23 0-9 9-21 19-23 12-3 26 8 28 21 2 12-9 24-22 25z">
          <text:p/>
        </draw:path>
        <draw:path draw:style-name="gr9" draw:text-style-name="P7" draw:layer="layout" svg:width="0.046cm" svg:height="0.046cm" svg:x="17.205cm" svg:y="18.038cm" svg:viewBox="0 0 47 47" svg:d="M47 26c-1 13-14 24-25 21-14-3-24-17-21-28 3-10 15-19 24-19 13 0 24 12 22 26z">
          <text:p/>
        </draw:path>
        <draw:path draw:style-name="gr9" draw:text-style-name="P7" draw:layer="layout" svg:width="0.042cm" svg:height="0.042cm" svg:x="2.902cm" svg:y="23.296cm" svg:viewBox="0 0 43 43" svg:d="M19 0c9-2 21 7 24 19 2 9-8 20-20 23-8 2-20-8-23-18-1-10 8-22 19-24z">
          <text:p/>
        </draw:path>
        <draw:path draw:style-name="gr9" draw:text-style-name="P7" draw:layer="layout" svg:width="0.047cm" svg:height="0.046cm" svg:x="14.576cm" svg:y="14.826cm" svg:viewBox="0 0 48 47" svg:d="M48 26c-2 12-15 23-27 21-13-2-23-16-20-27 2-10 13-20 23-20 13 0 25 13 24 26z">
          <text:p/>
        </draw:path>
        <draw:path draw:style-name="gr9" draw:text-style-name="P7" draw:layer="layout" svg:width="0.046cm" svg:height="0.042cm" svg:x="15.162cm" svg:y="26.798cm" svg:viewBox="0 0 47 43" svg:d="M23 0c11-1 22 7 23 17 2 15-8 26-23 26-11 0-21-7-23-18-2-13 8-25 23-25z">
          <text:p/>
        </draw:path>
        <draw:path draw:style-name="gr9" draw:text-style-name="P7" draw:layer="layout" svg:width="0.044cm" svg:height="0.046cm" svg:x="10.784cm" svg:y="28.548cm" svg:viewBox="0 0 45 47" svg:d="M0 26c-1-14 12-27 25-26 10 1 19 12 20 23s-7 21-17 23c-14 3-27-7-28-20z">
          <text:p/>
        </draw:path>
        <draw:path draw:style-name="gr9" draw:text-style-name="P7" draw:layer="layout" svg:width="0.046cm" svg:height="0.045cm" svg:x="8.155cm" svg:y="28.256cm" svg:viewBox="0 0 47 46" svg:d="M22 0c11-1 22 7 24 19 3 12-8 26-20 27-10 1-23-8-26-18-3-12 8-27 22-28z">
          <text:p/>
        </draw:path>
        <draw:path draw:style-name="gr9" draw:text-style-name="P7" draw:layer="layout" svg:width="0.045cm" svg:height="0.045cm" svg:x="11.075cm" svg:y="28.548cm" svg:viewBox="0 0 46 46" svg:d="M21 46c-13-1-23-14-20-27 3-10 14-20 23-19 14 2 25 16 22 29-2 10-14 18-25 17z">
          <text:p/>
        </draw:path>
        <draw:path draw:style-name="gr9" draw:text-style-name="P7" draw:layer="layout" svg:width="0.047cm" svg:height="0.045cm" svg:x="3.483cm" svg:y="24.46cm" svg:viewBox="0 0 48 46" svg:d="M20 0c13-2 26 8 28 21 1 11-11 25-25 25-9 0-20-10-22-19-3-12 7-25 19-27z">
          <text:p/>
        </draw:path>
        <draw:path draw:style-name="gr9" draw:text-style-name="P7" draw:layer="layout" svg:width="0.046cm" svg:height="0.046cm" svg:x="8.738cm" svg:y="13.659cm" svg:viewBox="0 0 47 47" svg:d="M24 47c-12 0-24-12-24-24 1-10 10-20 19-22 12-4 26 7 28 20 2 12-9 25-23 26z">
          <text:p/>
        </draw:path>
        <draw:path draw:style-name="gr9" draw:text-style-name="P7" draw:layer="layout" svg:width="0.045cm" svg:height="0.046cm" svg:x="8.448cm" svg:y="13.659cm" svg:viewBox="0 0 46 47" svg:d="M46 21c1 10-7 22-17 25-15 3-28-7-29-20-1-11 7-22 17-25 13-5 26 6 29 20z">
          <text:p/>
        </draw:path>
        <draw:path draw:style-name="gr9" draw:text-style-name="P7" draw:layer="layout" svg:width="0.047cm" svg:height="0.046cm" svg:x="17.788cm" svg:y="21.833cm" svg:viewBox="0 0 48 47" svg:d="M48 21c1 12-9 25-23 26-11 2-25-11-25-23 0-10 9-21 19-23 12-3 27 7 29 20z">
          <text:p/>
        </draw:path>
        <draw:path draw:style-name="gr9" draw:text-style-name="P7" draw:layer="layout" svg:width="0.047cm" svg:height="0.046cm" svg:x="9.323cm" svg:y="28.548cm" svg:viewBox="0 0 48 47" svg:d="M27 0c13 2 23 18 20 29s-19 20-30 17c-10-3-18-15-17-24 2-12 16-24 27-22z">
          <text:p/>
        </draw:path>
        <draw:path draw:style-name="gr9" draw:text-style-name="P7" draw:layer="layout" svg:width="0.044cm" svg:height="0.045cm" svg:x="13.411cm" svg:y="27.963cm" svg:viewBox="0 0 45 46" svg:d="M45 23c0 11-8 21-19 23-14 2-26-8-26-21-1-13 12-27 24-25 11 1 20 13 21 23z">
          <text:p/>
        </draw:path>
        <draw:path draw:style-name="gr9" draw:text-style-name="P7" draw:layer="layout" svg:width="0.046cm" svg:height="0.045cm" svg:x="9.907cm" svg:y="28.548cm" svg:viewBox="0 0 47 46" svg:d="M47 23c1 12-11 24-24 23-10 0-21-9-23-18-2-11 9-26 21-28s25 11 26 23z">
          <text:p/>
        </draw:path>
        <draw:path draw:style-name="gr9" draw:text-style-name="P7" draw:layer="layout" svg:width="0.046cm" svg:height="0.046cm" svg:x="13.703cm" svg:y="14.242cm" svg:viewBox="0 0 47 47" svg:d="M47 22c2 11-11 25-23 25-10 1-21-8-23-18-4-11 7-26 19-29 11-2 24 9 27 22z">
          <text:p/>
        </draw:path>
        <draw:path draw:style-name="gr9" draw:text-style-name="P7" draw:layer="layout" svg:width="0.044cm" svg:height="0.046cm" svg:x="5.237cm" svg:y="15.41cm" svg:viewBox="0 0 45 47" svg:d="M45 26c-2 14-15 24-28 21-10-3-18-15-17-26 1-14 13-23 28-20 10 2 18 14 17 25z">
          <text:p/>
        </draw:path>
        <draw:path draw:style-name="gr9" draw:text-style-name="P7" draw:layer="layout" svg:width="0.045cm" svg:height="0.046cm" svg:x="17.789cm" svg:y="20.081cm" svg:viewBox="0 0 46 47" svg:d="M46 26c-1 12-16 23-28 21-9-2-18-13-18-23-1-12 12-25 23-24 14 1 25 14 23 26z">
          <text:p/>
        </draw:path>
        <draw:path draw:style-name="gr9" draw:text-style-name="P7" draw:layer="layout" svg:width="0.041cm" svg:height="0.041cm" svg:x="3.486cm" svg:y="17.457cm" svg:viewBox="0 0 42 42" svg:d="M42 22c-1 12-12 22-23 20-11-1-20-11-19-22s11-21 22-20 21 12 20 22z">
          <text:p/>
        </draw:path>
        <draw:path draw:style-name="gr9" draw:text-style-name="P7" draw:layer="layout" svg:width="0.043cm" svg:height="0.046cm" svg:x="15.454cm" svg:y="26.503cm" svg:viewBox="0 0 44 47" svg:d="M23 0c12 1 22 15 20 28-2 10-13 20-22 19-12 0-24-15-21-27 1-11 14-20 23-20z">
          <text:p/>
        </draw:path>
        <draw:path draw:style-name="gr9" draw:text-style-name="P7" draw:layer="layout" svg:width="0.046cm" svg:height="0.046cm" svg:x="17.788cm" svg:y="22.124cm" svg:viewBox="0 0 47 47" svg:d="M21 47c-13-2-23-16-20-28s17-21 28-18c10 3 19 14 18 23 0 13-13 24-26 23z">
          <text:p/>
        </draw:path>
        <draw:path draw:style-name="gr9" draw:text-style-name="P7" draw:layer="layout" svg:width="0.048cm" svg:height="0.048cm" svg:x="16.62cm" svg:y="17.161cm" svg:viewBox="0 0 49 49" svg:d="M49 25c-1 14-12 26-25 24-14-1-25-13-24-26 0-13 11-23 26-23 14 1 24 11 23 25z">
          <text:p/>
        </draw:path>
        <draw:path draw:style-name="gr9" draw:text-style-name="P7" draw:layer="layout" svg:width="0.044cm" svg:height="0.044cm" svg:x="4.945cm" svg:y="15.703cm" svg:viewBox="0 0 45 45" svg:d="M23 45c-11 0-22-8-23-18-2-14 9-27 23-27s23 11 22 26c-1 12-10 19-22 19z">
          <text:p/>
        </draw:path>
        <draw:path draw:style-name="gr9" draw:text-style-name="P7" draw:layer="layout" svg:width="0.045cm" svg:height="0.045cm" svg:x="17.498cm" svg:y="18.915cm" svg:viewBox="0 0 46 46" svg:d="M46 21c0 12-8 22-19 24-14 2-26-7-27-22 0-11 8-21 18-23 13-2 27 8 28 21z">
          <text:p/>
        </draw:path>
        <draw:path draw:style-name="gr9" draw:text-style-name="P7" draw:layer="layout" svg:width="0.045cm" svg:height="0.043cm" svg:x="17.789cm" svg:y="20.375cm" svg:viewBox="0 0 46 44" svg:d="M46 24c-2 14-16 23-28 19-12-2-20-15-18-24 2-13 17-21 29-18 10 2 18 13 17 23z">
          <text:p/>
        </draw:path>
        <draw:path draw:style-name="gr9" draw:text-style-name="P7" draw:layer="layout" svg:width="0.043cm" svg:height="0.046cm" svg:x="6.989cm" svg:y="14.243cm" svg:viewBox="0 0 44 47" svg:d="M23 0c12 0 23 15 21 27-1 10-13 20-23 20-12-1-24-16-20-28 2-10 13-21 22-19z">
          <text:p/>
        </draw:path>
        <draw:path draw:style-name="gr9" draw:text-style-name="P7" draw:layer="layout" svg:width="0.043cm" svg:height="0.045cm" svg:x="16.039cm" svg:y="25.92cm" svg:viewBox="0 0 44 46" svg:d="M20 46c-12-1-22-15-19-28 2-10 14-19 24-18 12 1 22 15 19 29-2 9-13 18-24 17z">
          <text:p/>
        </draw:path>
        <draw:path draw:style-name="gr9" draw:text-style-name="P7" draw:layer="layout" svg:width="0.044cm" svg:height="0.043cm" svg:x="16.913cm" svg:y="24.754cm" svg:viewBox="0 0 45 44" svg:d="M21 44c-14-1-23-13-20-27 2-11 14-18 24-17 14 1 23 14 20 27-2 11-13 18-24 17z">
          <text:p/>
        </draw:path>
        <draw:path draw:style-name="gr9" draw:text-style-name="P7" draw:layer="layout" svg:width="0.045cm" svg:height="0.043cm" svg:x="15.746cm" svg:y="26.214cm" svg:viewBox="0 0 46 44" svg:d="M46 25c-2 12-16 22-29 19-11-2-19-15-17-24 2-14 15-22 29-19 10 3 18 14 17 24z">
          <text:p/>
        </draw:path>
        <draw:path draw:style-name="gr9" draw:text-style-name="P7" draw:layer="layout" svg:width="0.039cm" svg:height="0.04cm" svg:x="6.991cm" svg:y="27.966cm" svg:viewBox="0 0 40 41" svg:d="M39 17c2 11-6 22-16 23-11 2-22-6-23-17-2-12 6-22 17-23 11-2 21 6 22 17z">
          <text:p/>
        </draw:path>
        <draw:path draw:style-name="gr9" draw:text-style-name="P7" draw:layer="layout" svg:width="0.039cm" svg:height="0.04cm" svg:x="16.042cm" svg:y="15.997cm" svg:viewBox="0 0 40 41" svg:d="M40 18c1 11-7 22-17 23-11 2-22-6-23-17-2-12 8-22 18-24 10-1 20 7 22 18z">
          <text:p/>
        </draw:path>
        <draw:path draw:style-name="gr9" draw:text-style-name="P7" draw:layer="layout" svg:width="0.039cm" svg:height="0.041cm" svg:x="15.457cm" svg:y="15.412cm" svg:viewBox="0 0 40 42" svg:d="M0 20c0-10 11-21 20-20 10 0 19 10 20 20 0 11-10 22-20 22s-21-11-20-22z">
          <text:p/>
        </draw:path>
        <draw:path draw:style-name="gr9" draw:text-style-name="P7" draw:layer="layout" svg:width="0.039cm" svg:height="0.041cm" svg:x="6.408cm" svg:y="27.674cm" svg:viewBox="0 0 40 42" svg:d="M19 42c-10-1-20-11-19-22 0-11 11-20 21-20s19 11 19 21c-1 12-11 21-21 21z">
          <text:p/>
        </draw:path>
        <draw:path draw:style-name="gr9" draw:text-style-name="P7" draw:layer="layout" svg:width="0.041cm" svg:height="0.04cm" svg:x="17.791cm" svg:y="22.713cm" svg:viewBox="0 0 42 41" svg:d="M42 20c0 10-9 20-21 21-9 1-20-9-21-19s9-21 20-22c12 0 22 11 22 20z">
          <text:p/>
        </draw:path>
        <draw:path draw:style-name="gr9" draw:text-style-name="P7" draw:layer="layout" svg:width="0.046cm" svg:height="0.042cm" svg:x="5.528cm" svg:y="15.121cm" svg:viewBox="0 0 47 43" svg:d="M47 20c0 11-9 22-19 23-13 2-27-9-28-20 0-13 12-24 26-23 11 0 20 10 21 20z">
          <text:p/>
        </draw:path>
        <draw:path draw:style-name="gr9" draw:text-style-name="P7" draw:layer="layout" svg:width="0.04cm" svg:height="0.039cm" svg:x="4.654cm" svg:y="26.215cm" svg:viewBox="0 0 41 40" svg:d="M41 19c1 11-8 20-18 21-11 1-23-7-23-17-1-12 8-21 19-23 10-1 21 7 22 19z">
          <text:p/>
        </draw:path>
        <draw:path draw:style-name="gr9" draw:text-style-name="P7" draw:layer="layout" svg:width="0.041cm" svg:height="0.039cm" svg:x="11.953cm" svg:y="28.552cm" svg:viewBox="0 0 42 40" svg:d="M42 21c-1 10-12 20-23 19-9 0-19-10-19-20 0-11 11-21 21-20 12 0 22 10 21 21z">
          <text:p/>
        </draw:path>
        <draw:path draw:style-name="gr9" draw:text-style-name="P7" draw:layer="layout" svg:width="0.043cm" svg:height="0.045cm" svg:x="9.616cm" svg:y="28.548cm" svg:viewBox="0 0 44 46" svg:d="M19 45c-11-1-19-10-19-23s12-25 25-22c13 2 21 15 18 28-2 11-13 18-24 17z">
          <text:p/>
        </draw:path>
        <draw:path draw:style-name="gr9" draw:text-style-name="P7" draw:layer="layout" svg:width="0.039cm" svg:height="0.041cm" svg:x="9.034cm" svg:y="28.551cm" svg:viewBox="0 0 40 42" svg:d="M19 0c11 0 21 9 21 20 0 12-9 22-20 22-10 0-19-9-20-21 0-10 9-20 19-21z">
          <text:p/>
        </draw:path>
        <draw:path draw:style-name="gr9" draw:text-style-name="P7" draw:layer="layout" svg:width="0.045cm" svg:height="0.043cm" svg:x="17.205cm" svg:y="24.171cm" svg:viewBox="0 0 46 44" svg:d="M45 19c1 11-5 21-15 24-14 4-28-5-30-18-3-12 8-23 23-25 11 0 20 8 22 19z">
          <text:p/>
        </draw:path>
        <draw:path draw:style-name="gr9" draw:text-style-name="P7" draw:layer="layout" svg:width="0.041cm" svg:height="0.039cm" svg:x="8.741cm" svg:y="28.552cm" svg:viewBox="0 0 42 40" svg:d="M22 0c11 0 21 10 20 21-1 10-12 20-21 19-11 0-21-10-21-20 0-11 11-21 22-20z">
          <text:p/>
        </draw:path>
        <draw:path draw:style-name="gr9" draw:text-style-name="P7" draw:layer="layout" svg:width="0.041cm" svg:height="0.04cm" svg:x="12.536cm" svg:y="13.663cm" svg:viewBox="0 0 42 41" svg:d="M20 0c12 0 23 11 22 21s-12 20-22 20c-9-1-19-10-20-20s10-21 20-21z">
          <text:p/>
        </draw:path>
        <draw:path draw:style-name="gr9" draw:text-style-name="P7" draw:layer="layout" svg:width="0.041cm" svg:height="0.039cm" svg:x="17.208cm" svg:y="17.749cm" svg:viewBox="0 0 42 40" svg:d="M42 21c-1 10-11 19-21 19-12 0-21-10-21-20 0-11 11-20 22-20 11 1 20 11 20 21z">
          <text:p/>
        </draw:path>
        <draw:path draw:style-name="gr9" draw:text-style-name="P7" draw:layer="layout" svg:width="0.039cm" svg:height="0.04cm" svg:x="12.246cm" svg:y="13.663cm" svg:viewBox="0 0 40 41" svg:d="M23 0c11 1 19 12 17 23s-12 19-23 18c-11-2-18-12-17-23 1-12 11-19 23-18z">
          <text:p/>
        </draw:path>
        <draw:path draw:style-name="gr9" draw:text-style-name="P7" draw:layer="layout" svg:width="0.04cm" svg:height="0.039cm" svg:x="7.281cm" svg:y="13.953cm" svg:viewBox="0 0 41 40" svg:d="M18 0c10-1 22 7 23 17 2 11-6 22-18 23-11 2-22-6-23-17s7-21 18-23z">
          <text:p/>
        </draw:path>
        <draw:path draw:style-name="gr9" draw:text-style-name="P7" draw:layer="layout" svg:width="0.041cm" svg:height="0.039cm" svg:x="17.791cm" svg:y="19.502cm" svg:viewBox="0 0 42 40" svg:d="M21 0c11 0 22 10 21 20 0 10-11 20-21 20s-20-10-21-20 10-21 21-20z">
          <text:p/>
        </draw:path>
        <draw:path draw:style-name="gr9" draw:text-style-name="P7" draw:layer="layout" svg:width="0.044cm" svg:height="0.042cm" svg:x="7.572cm" svg:y="13.952cm" svg:viewBox="0 0 45 43" svg:d="M45 24c0 11-9 19-20 19-15 1-26-10-25-23s15-22 28-20c10 2 18 12 17 24z">
          <text:p/>
        </draw:path>
        <draw:path draw:style-name="gr9" draw:text-style-name="P7" draw:layer="layout" svg:width="0.039cm" svg:height="0.041cm" svg:x="11.661cm" svg:y="28.551cm" svg:viewBox="0 0 40 42" svg:d="M19 42c-10-1-19-11-19-22s10-20 20-20c11 0 20 11 20 21-1 12-11 21-21 21z">
          <text:p/>
        </draw:path>
        <draw:path draw:style-name="gr9" draw:text-style-name="P7" draw:layer="layout" svg:width="0.041cm" svg:height="0.039cm" svg:x="13.119cm" svg:y="13.953cm" svg:viewBox="0 0 42 40" svg:d="M42 19c1 11-9 21-19 21-12 0-23-9-23-19s10-20 20-21c11 0 21 9 22 19z">
          <text:p/>
        </draw:path>
        <draw:path draw:style-name="gr9" draw:text-style-name="P7" draw:layer="layout" svg:width="0.04cm" svg:height="0.041cm" svg:x="5.532cm" svg:y="27.091cm" svg:viewBox="0 0 41 42" svg:d="M19 0c11 0 21 9 22 20 0 9-9 21-21 22-9 1-19-9-20-21 0-11 9-22 19-21z">
          <text:p/>
        </draw:path>
        <draw:path draw:style-name="gr9" draw:text-style-name="P7" draw:layer="layout" svg:width="0.043cm" svg:height="0.043cm" svg:x="3.194cm" svg:y="18.33cm" svg:viewBox="0 0 44 44" svg:d="M44 23c-1 11-8 20-19 21-15 1-25-8-25-22 1-15 12-24 26-22 11 1 18 11 18 23z">
          <text:p/>
        </draw:path>
        <draw:path draw:style-name="gr9" draw:text-style-name="P7" draw:layer="layout" svg:width="0.039cm" svg:height="0.039cm" svg:x="14.289cm" svg:y="14.538cm" svg:viewBox="0 0 40 40" svg:d="M40 22c-1 8-8 17-16 18-14 1-23-8-24-18s9-21 21-22c9 0 19 11 19 22z">
          <text:p/>
        </draw:path>
        <draw:path draw:style-name="gr9" draw:text-style-name="P7" draw:layer="layout" svg:width="0.04cm" svg:height="0.04cm" svg:x="17.5cm" svg:y="18.624cm" svg:viewBox="0 0 41 41" svg:d="M41 20c0 10-9 21-20 21s-21-10-21-20 9-20 20-21c10-1 20 9 21 20z">
          <text:p/>
        </draw:path>
        <draw:path draw:style-name="gr9" draw:text-style-name="P7" draw:layer="layout" svg:width="0.041cm" svg:height="0.04cm" svg:x="17.791cm" svg:y="19.792cm" svg:viewBox="0 0 42 41" svg:d="M18 40c-11-2-19-13-18-22 2-11 13-20 24-18 11 3 19 13 18 23s-14 19-24 17z">
          <text:p/>
        </draw:path>
        <draw:path draw:style-name="gr9" draw:text-style-name="P7" draw:layer="layout" svg:width="0.035cm" svg:height="0.035cm" svg:x="3.198cm" svg:y="24.175cm" svg:viewBox="0 0 36 36" svg:d="M36 15c0 10-5 18-14 20-10 3-23-7-22-17 0-9 10-18 18-18 8-1 17 7 18 15z">
          <text:p/>
        </draw:path>
        <draw:path draw:style-name="gr9" draw:text-style-name="P7" draw:layer="layout" svg:width="0.041cm" svg:height="0.039cm" svg:x="2.903cm" svg:y="18.918cm" svg:viewBox="0 0 42 40" svg:d="M42 22c-2 11-13 19-24 18-10-1-19-11-18-21 0-11 12-20 22-19 11 1 21 11 20 22z">
          <text:p/>
        </draw:path>
        <draw:path draw:style-name="gr9" draw:text-style-name="P7" draw:layer="layout" svg:width="0.039cm" svg:height="0.039cm" svg:x="9.619cm" svg:y="13.369cm" svg:viewBox="0 0 40 40" svg:d="M18 40c-13-1-20-11-17-24 2-8 11-16 19-16 10 0 20 11 20 22s-11 20-22 18z">
          <text:p/>
        </draw:path>
        <draw:path draw:style-name="gr9" draw:text-style-name="P7" draw:layer="layout" svg:width="0.041cm" svg:height="0.039cm" svg:x="7.866cm" svg:y="28.258cm" svg:viewBox="0 0 42 40" svg:d="M42 20c0 10-11 21-21 20-11 0-21-10-21-20 1-10 10-19 20-20 10 0 21 9 22 20z">
          <text:p/>
        </draw:path>
        <draw:path draw:style-name="gr9" draw:text-style-name="P7" draw:layer="layout" svg:width="0.039cm" svg:height="0.038cm" svg:x="17.501cm" svg:y="23.588cm" svg:viewBox="0 0 40 39" svg:d="M23 39c-13 1-22-6-23-18-2-10 8-21 19-21 10-1 21 10 21 20-1 8-10 18-17 19z">
          <text:p/>
        </draw:path>
        <draw:path draw:style-name="gr9" draw:text-style-name="P7" draw:layer="layout" svg:width="0.042cm" svg:height="0.042cm" svg:x="3.194cm" svg:y="23.586cm" svg:viewBox="0 0 43 43" svg:d="M23 43c-11 1-22-7-23-18-2-11 5-22 16-24 14-3 27 7 27 21 0 11-9 20-20 21z">
          <text:p/>
        </draw:path>
        <draw:path draw:style-name="gr9" draw:text-style-name="P7" draw:layer="layout" svg:width="0.04cm" svg:height="0.04cm" svg:x="9.909cm" svg:y="13.369cm" svg:viewBox="0 0 41 41" svg:d="M18 41c-11-2-20-11-18-22 1-11 12-20 22-19 11 2 20 12 19 22 0 11-12 20-23 19z">
          <text:p/>
        </draw:path>
        <draw:path draw:style-name="gr9" draw:text-style-name="P7" draw:layer="layout" svg:width="0.035cm" svg:height="0.035cm" svg:x="9.62cm" svg:y="28.844cm" svg:viewBox="0 0 36 36" svg:d="M36 17c1 8-6 17-14 19-11 1-19-4-21-13-3-11 7-24 17-23 8 0 17 9 18 17z">
          <text:p/>
        </draw:path>
        <draw:path draw:style-name="gr9" draw:text-style-name="P7" draw:layer="layout" svg:width="0.04cm" svg:height="0.042cm" svg:x="4.363cm" svg:y="25.922cm" svg:viewBox="0 0 41 43" svg:d="M19 43c-10 0-19-11-19-22 1-11 12-22 21-21 11 1 20 13 20 23-1 10-11 20-22 20z">
          <text:p/>
        </draw:path>
        <draw:path draw:style-name="gr9" draw:text-style-name="P7" draw:layer="layout" svg:width="0.039cm" svg:height="0.04cm" svg:x="8.159cm" svg:y="13.663cm" svg:viewBox="0 0 40 41" svg:d="M40 22c-1 11-12 20-21 19-12-1-20-11-19-22 0-10 10-20 22-19 11 2 20 12 18 22z">
          <text:p/>
        </draw:path>
        <draw:path draw:style-name="gr9" draw:text-style-name="P7" draw:layer="layout" svg:width="0.039cm" svg:height="0.038cm" svg:x="10.202cm" svg:y="13.37cm" svg:viewBox="0 0 40 39" svg:d="M39 24c-1 10-13 17-25 14-8-2-15-10-14-20 2-11 13-20 23-18 11 3 19 12 16 24z">
          <text:p/>
        </draw:path>
        <draw:path draw:style-name="gr9" draw:text-style-name="P7" draw:layer="layout" svg:width="0.041cm" svg:height="0.039cm" svg:x="17.791cm" svg:y="22.42cm" svg:viewBox="0 0 42 40" svg:d="M42 18c1 11-7 21-20 22-10 1-21-8-22-19 0-10 9-20 19-21 11-2 21 7 23 18z">
          <text:p/>
        </draw:path>
        <draw:path draw:style-name="gr9" draw:text-style-name="P7" draw:layer="layout" svg:width="0.04cm" svg:height="0.04cm" svg:x="10.493cm" svg:y="13.369cm" svg:viewBox="0 0 41 41" svg:d="M41 22c0 11-11 20-22 19-12-1-20-11-19-22 2-11 12-19 23-19 10 1 18 11 18 22z">
          <text:p/>
        </draw:path>
        <draw:path draw:style-name="gr9" draw:text-style-name="P7" draw:layer="layout" svg:width="0.038cm" svg:height="0.038cm" svg:x="10.787cm" svg:y="13.37cm" svg:viewBox="0 0 39 39" svg:d="M39 24c-1 10-13 17-25 14-9-2-15-10-14-20 2-11 12-20 22-18 13 3 19 12 17 24z">
          <text:p/>
        </draw:path>
        <draw:path draw:style-name="gr9" draw:text-style-name="P7" draw:layer="layout" svg:width="0.038cm" svg:height="0.038cm" svg:x="11.077cm" svg:y="13.37cm" svg:viewBox="0 0 39 39" svg:d="M39 20c0 9-8 18-16 19-12 1-23-6-23-17-1-11 7-21 18-22 9-2 21 9 21 20z">
          <text:p/>
        </draw:path>
        <draw:path draw:style-name="gr9" draw:text-style-name="P7" draw:layer="layout" svg:width="0.035cm" svg:height="0.035cm" svg:x="3.198cm" svg:y="17.751cm" svg:viewBox="0 0 36 36" svg:d="M36 16c0 9-5 17-14 19-10 3-23-7-22-17 0-9 10-17 18-18 8 0 17 7 18 16z">
          <text:p/>
        </draw:path>
        <draw:path draw:style-name="gr9" draw:text-style-name="P7" draw:layer="layout" svg:width="0.035cm" svg:height="0.035cm" svg:x="15.459cm" svg:y="26.801cm" svg:viewBox="0 0 36 36" svg:d="M19 36c-9 1-16-4-19-13-2-11 7-23 18-23 7 1 17 10 18 18 0 8-9 17-17 18z">
          <text:p/>
        </draw:path>
        <draw:path draw:style-name="gr9" draw:text-style-name="P7" draw:layer="layout" svg:width="0.038cm" svg:height="0.038cm" svg:x="17.501cm" svg:y="18.334cm" svg:viewBox="0 0 39 39" svg:d="M39 18c1 11-11 23-20 21-11-1-20-11-19-22 1-10 10-18 23-17 8 0 16 10 16 18z">
          <text:p/>
        </draw:path>
        <draw:path draw:style-name="gr9" draw:text-style-name="P7" draw:layer="layout" svg:width="0.042cm" svg:height="0.039cm" svg:x="2.902cm" svg:y="23.004cm" svg:viewBox="0 0 43 40" svg:d="M43 19c0 10-10 20-21 21-10 0-21-10-22-20 0-9 11-20 20-20 12-1 22 9 23 19z">
          <text:p/>
        </draw:path>
        <draw:path draw:style-name="gr9" draw:text-style-name="P7" draw:layer="layout" svg:width="0.039cm" svg:height="0.038cm" svg:x="5.239cm" svg:y="26.799cm" svg:viewBox="0 0 40 39" svg:d="M23 39c-13 1-22-6-23-17-2-10 8-22 19-22 11-1 21 11 21 21-1 8-8 17-17 18z">
          <text:p/>
        </draw:path>
        <draw:path draw:style-name="gr9" draw:text-style-name="P7" draw:layer="layout" svg:width="0.042cm" svg:height="0.039cm" svg:x="6.114cm" svg:y="14.539cm" svg:viewBox="0 0 43 40" svg:d="M43 20c-1 10-12 20-22 20-11-1-22-13-21-22s12-19 23-18c10 0 20 10 20 20z">
          <text:p/>
        </draw:path>
        <draw:path draw:style-name="gr9" draw:text-style-name="P7" draw:layer="layout" svg:width="0.042cm" svg:height="0.042cm" svg:x="6.407cm" svg:y="14.537cm" svg:viewBox="0 0 43 43" svg:d="M43 23c-1 11-10 20-21 20-14 0-24-13-21-26 2-12 13-19 24-17 11 1 19 11 18 23z">
          <text:p/>
        </draw:path>
        <draw:path draw:style-name="gr9" draw:text-style-name="P7" draw:layer="layout" svg:width="0.039cm" svg:height="0.038cm" svg:x="7.575cm" svg:y="28.258cm" svg:viewBox="0 0 40 39" svg:d="M40 22c-1 11-12 18-24 16-8-1-16-11-16-19 1-11 12-21 22-19 12 1 19 10 18 22z">
          <text:p/>
        </draw:path>
        <draw:path draw:style-name="gr9" draw:text-style-name="P7" draw:layer="layout" svg:width="0.04cm" svg:height="0.04cm" svg:x="16.331cm" svg:y="16.289cm" svg:viewBox="0 0 41 41" svg:d="M41 17c1 11-6 22-17 23-10 2-20-5-23-17-3-9 6-21 16-23s23 6 24 17z">
          <text:p/>
        </draw:path>
        <draw:path draw:style-name="gr9" draw:text-style-name="P7" draw:layer="layout" svg:width="0.039cm" svg:height="0.042cm" svg:x="2.612cm" svg:y="21.252cm" svg:viewBox="0 0 40 43" svg:d="M19 0c11-1 21 10 21 21 1 10-9 22-20 22-9-1-20-11-20-21 0-9 9-21 19-22z">
          <text:p/>
        </draw:path>
        <draw:path draw:style-name="gr9" draw:text-style-name="P7" draw:layer="layout" svg:width="0.042cm" svg:height="0.042cm" svg:x="12.828cm" svg:y="13.952cm" svg:viewBox="0 0 43 43" svg:d="M43 25c-1 10-12 19-22 18-11-1-21-11-21-21 0-14 13-24 27-21 11 2 17 12 16 24z">
          <text:p/>
        </draw:path>
        <draw:path draw:style-name="gr9" draw:text-style-name="P7" draw:layer="layout" svg:width="0.035cm" svg:height="0.035cm" svg:x="18.086cm" svg:y="20.963cm" svg:viewBox="0 0 36 36" svg:d="M36 15c1 9-4 17-14 20s-22-8-22-18c0-8 9-17 17-17 8-1 18 7 19 15z">
          <text:p/>
        </draw:path>
        <draw:path draw:style-name="gr9" draw:text-style-name="P7" draw:layer="layout" svg:width="0.039cm" svg:height="0.038cm" svg:x="2.612cm" svg:y="20.962cm" svg:viewBox="0 0 40 39" svg:d="M23 0c9 0 16 8 17 17 1 10-9 23-20 22s-21-12-20-22c1-11 11-18 23-17z">
          <text:p/>
        </draw:path>
        <draw:path draw:style-name="gr9" draw:text-style-name="P7" draw:layer="layout" svg:width="0.041cm" svg:height="0.04cm" svg:x="4.071cm" svg:y="16.581cm" svg:viewBox="0 0 42 41" svg:d="M19 41c-12-2-20-12-19-22 2-11 12-20 22-19 12 2 20 12 20 23-1 10-12 19-23 18z">
          <text:p/>
        </draw:path>
        <draw:path draw:style-name="gr9" draw:text-style-name="P7" draw:layer="layout" svg:width="0.034cm" svg:height="0.035cm" svg:x="16.044cm" svg:y="26.218cm" svg:viewBox="0 0 35 36" svg:d="M35 20c0 8-10 16-19 16-8-1-16-9-16-17-1-9 7-18 15-19 12-1 21 8 20 20z">
          <text:p/>
        </draw:path>
        <draw:path draw:style-name="gr9" draw:text-style-name="P7" draw:layer="layout" svg:width="0.035cm" svg:height="0.035cm" svg:x="6.994cm" svg:y="13.956cm" svg:viewBox="0 0 36 36" svg:d="M34 24c-5 11-18 16-27 8-7-5-9-16-5-23 5-7 16-12 23-8 9 6 13 16 9 23z">
          <text:p/>
        </draw:path>
        <draw:path draw:style-name="gr9" draw:text-style-name="P7" draw:layer="layout" svg:width="0.041cm" svg:height="0.04cm" svg:x="14.58cm" svg:y="27.383cm" svg:viewBox="0 0 42 41" svg:d="M41 17c2 10-6 21-17 23-9 2-20-5-24-16-2-11 7-22 17-24 11-2 22 6 24 17z">
          <text:p/>
        </draw:path>
        <draw:path draw:style-name="gr9" draw:text-style-name="P7" draw:layer="layout" svg:width="0.04cm" svg:height="0.039cm" svg:x="16.625cm" svg:y="25.34cm" svg:viewBox="0 0 41 40" svg:d="M18 0c11-1 21 6 23 16 1 11-6 21-17 24-10 2-22-5-24-17-2-11 6-22 18-23z">
          <text:p/>
        </draw:path>
        <draw:path draw:style-name="gr9" draw:text-style-name="P7" draw:layer="layout" svg:width="0.038cm" svg:height="0.039cm" svg:x="3.78cm" svg:y="25.046cm" svg:viewBox="0 0 39 40" svg:d="M39 23c0 11-10 18-22 17-9-1-17-9-17-17 0-12 10-23 20-23s21 11 19 23z">
          <text:p/>
        </draw:path>
        <draw:path draw:style-name="gr9" draw:text-style-name="P7" draw:layer="layout" svg:width="0.039cm" svg:height="0.041cm" svg:x="2.612cm" svg:y="20.667cm" svg:viewBox="0 0 40 42" svg:d="M40 23c0 10-11 20-21 19s-20-12-19-21c1-11 11-21 22-21 9 0 19 11 18 23z">
          <text:p/>
        </draw:path>
        <draw:path draw:style-name="gr9" draw:text-style-name="P7" draw:layer="layout" svg:width="0.035cm" svg:height="0.035cm" svg:x="18.086cm" svg:y="20.379cm" svg:viewBox="0 0 36 36" svg:d="M17 36c-8-1-17-9-17-17s8-18 16-19c12-1 21 9 20 21-1 8-10 16-19 15z">
          <text:p/>
        </draw:path>
        <draw:path draw:style-name="gr9" draw:text-style-name="P7" draw:layer="layout" svg:width="0.039cm" svg:height="0.039cm" svg:x="2.612cm" svg:y="21.545cm" svg:viewBox="0 0 40 40" svg:d="M40 17c0 12-9 23-20 23-10 0-20-11-20-22 0-10 11-18 23-18 9 1 16 9 17 17z">
          <text:p/>
        </draw:path>
        <draw:path draw:style-name="gr9" draw:text-style-name="P7" draw:layer="layout" svg:width="0.04cm" svg:height="0.039cm" svg:x="15.748cm" svg:y="15.706cm" svg:viewBox="0 0 41 40" svg:d="M41 17c1 11-7 22-18 23-10 2-21-6-23-18-2-9 7-20 17-22 11-1 23 7 24 17z">
          <text:p/>
        </draw:path>
        <draw:path draw:style-name="gr9" draw:text-style-name="P7" draw:layer="layout" svg:width="0.038cm" svg:height="0.039cm" svg:x="12.83cm" svg:y="28.259cm" svg:viewBox="0 0 39 40" svg:d="M38 26c-4 12-17 17-28 13-7-3-12-13-10-22 2-12 12-19 23-16 12 3 18 15 15 25z">
          <text:p/>
        </draw:path>
        <draw:path draw:style-name="gr9" draw:text-style-name="P7" draw:layer="layout" svg:width="0.042cm" svg:height="0.042cm" svg:x="3.779cm" svg:y="17.164cm" svg:viewBox="0 0 43 43" svg:d="M43 22c-1 11-10 21-21 21-14 1-24-13-21-27 2-10 12-17 24-16 11 2 19 12 18 22z">
          <text:p/>
        </draw:path>
        <draw:path draw:style-name="gr9" draw:text-style-name="P7" draw:layer="layout" svg:width="0.039cm" svg:height="0.039cm" svg:x="2.612cm" svg:y="20.377cm" svg:viewBox="0 0 40 40" svg:d="M40 23c-2 12-13 19-25 16-8-2-15-10-15-18 0-10 10-21 21-21s20 12 19 23z">
          <text:p/>
        </draw:path>
        <draw:path draw:style-name="gr9" draw:text-style-name="P7" draw:layer="layout" svg:width="0.039cm" svg:height="0.041cm" svg:x="3.78cm" svg:y="16.872cm" svg:viewBox="0 0 40 42" svg:d="M22 42c-10 2-21-7-22-19-2-10 6-21 17-23 11-1 21 8 23 18 1 11-7 22-18 24z">
          <text:p/>
        </draw:path>
        <draw:path draw:style-name="gr9" draw:text-style-name="P7" draw:layer="layout" svg:width="0.039cm" svg:height="0.038cm" svg:x="16.916cm" svg:y="17.166cm" svg:viewBox="0 0 40 39" svg:d="M40 17c1 11-8 22-19 22-9 0-17-7-20-15-3-11 4-21 17-24 11-2 21 5 22 17z">
          <text:p/>
        </draw:path>
        <draw:path draw:style-name="gr9" draw:text-style-name="P7" draw:layer="layout" svg:width="0.039cm" svg:height="0.04cm" svg:x="2.612cm" svg:y="21.836cm" svg:viewBox="0 0 40 41" svg:d="M19 0c11-1 21 8 21 19 1 12-9 22-20 22-10 0-20-9-20-20 0-10 9-20 19-21z">
          <text:p/>
        </draw:path>
        <draw:path draw:style-name="gr9" draw:text-style-name="P7" draw:layer="layout" svg:width="0.039cm" svg:height="0.041cm" svg:x="4.949cm" svg:y="26.506cm" svg:viewBox="0 0 40 42" svg:d="M40 22c-1 10-11 20-23 20-9-1-19-13-17-24 1-11 11-20 21-18 11 1 20 12 19 22z">
          <text:p/>
        </draw:path>
        <draw:path draw:style-name="gr9" draw:text-style-name="P7" draw:layer="layout" svg:width="0.035cm" svg:height="0.034cm" svg:x="2.614cm" svg:y="19.794cm" svg:viewBox="0 0 36 35" svg:d="M21 0c9 0 15 9 15 19 0 8-9 16-18 16-8 0-17-8-18-16 0-11 10-21 21-19z">
          <text:p/>
        </draw:path>
        <draw:path draw:style-name="gr9" draw:text-style-name="P7" draw:layer="layout" svg:width="0.035cm" svg:height="0.035cm" svg:x="5.824cm" svg:y="27.385cm" svg:viewBox="0 0 36 36" svg:d="M19 0c8 0 17 9 17 16 1 12-9 23-19 20-8-1-17-10-17-19 0-7 10-16 19-17z">
          <text:p/>
        </draw:path>
        <draw:path draw:style-name="gr9" draw:text-style-name="P7" draw:layer="layout" svg:width="0.034cm" svg:height="0.034cm" svg:x="13.416cm" svg:y="13.956cm" svg:viewBox="0 0 35 35" svg:d="M16 35c-8 0-16-8-16-17 0-8 8-18 15-18 12-1 21 10 20 21-1 7-10 14-19 14z">
          <text:p/>
        </draw:path>
        <draw:path draw:style-name="gr9" draw:text-style-name="P7" draw:layer="layout" svg:width="0.034cm" svg:height="0.034cm" svg:x="16.628cm" svg:y="16.584cm" svg:viewBox="0 0 35 35" svg:d="M20 0c7 1 15 10 15 18 1 10-12 19-24 16-8-3-13-11-11-20 3-9 11-15 20-14z">
          <text:p/>
        </draw:path>
        <draw:path draw:style-name="gr9" draw:text-style-name="P7" draw:layer="layout" svg:width="0.033cm" svg:height="0.034cm" svg:x="7.285cm" svg:y="28.261cm" svg:viewBox="0 0 34 35" svg:d="M34 18c1 8-7 17-15 17-11 0-17-5-19-13-2-12 7-22 18-22 8-1 16 8 16 18z">
          <text:p/>
        </draw:path>
        <draw:path draw:style-name="gr9" draw:text-style-name="P7" draw:layer="layout" svg:width="0.039cm" svg:height="0.041cm" svg:x="5.822cm" svg:y="14.829cm" svg:viewBox="0 0 40 42" svg:d="M22 0c10 0 19 12 17 22-1 11-11 21-21 20-11-1-20-14-18-24 1-10 12-19 22-18z">
          <text:p/>
        </draw:path>
        <draw:path draw:style-name="gr9" draw:text-style-name="P7" draw:layer="layout" svg:width="0.035cm" svg:height="0.035cm" svg:x="11.663cm" svg:y="13.372cm" svg:viewBox="0 0 36 36" svg:d="M21 0c7 1 15 11 15 19s-8 16-17 17c-9 0-18-8-19-15 0-11 9-22 21-21z">
          <text:p/>
        </draw:path>
        <draw:path draw:style-name="gr9" draw:text-style-name="P7" draw:layer="layout" svg:width="0.034cm" svg:height="0.034cm" svg:x="2.615cm" svg:y="19.504cm" svg:viewBox="0 0 35 35" svg:d="M19 35c-11 1-20-9-19-21 0-8 9-14 18-14 10 0 18 9 17 18 0 8-8 17-16 17z">
          <text:p/>
        </draw:path>
        <draw:path draw:style-name="gr9" draw:text-style-name="P7" draw:layer="layout" svg:width="0.039cm" svg:height="0.042cm" svg:x="3.196cm" svg:y="18.04cm" svg:viewBox="0 0 40 43" svg:d="M40 23c0 10-11 20-20 20-11-1-21-12-20-23 0-10 11-20 21-20s19 12 19 23z">
          <text:p/>
        </draw:path>
        <draw:path draw:style-name="gr9" draw:text-style-name="P7" draw:layer="layout" svg:width="0.035cm" svg:height="0.035cm" svg:x="9.036cm" svg:y="13.371cm" svg:viewBox="0 0 36 36" svg:d="M17 0c7 0 18 10 19 17 1 9-4 17-14 19-12 2-23-7-22-18 1-7 10-17 17-18z">
          <text:p/>
        </draw:path>
        <draw:path draw:style-name="gr9" draw:text-style-name="P7" draw:layer="layout" svg:width="0.036cm" svg:height="0.035cm" svg:x="14.875cm" svg:y="27.385cm" svg:viewBox="0 0 37 36" svg:d="M20 36c-8 1-17-6-20-14-2-11 8-22 20-22 8 1 17 11 17 18-2 8-10 18-17 18z">
          <text:p/>
        </draw:path>
        <draw:path draw:style-name="gr9" draw:text-style-name="P7" draw:layer="layout" svg:width="0.033cm" svg:height="0.034cm" svg:x="11.373cm" svg:y="13.372cm" svg:viewBox="0 0 34 35" svg:d="M33 25c-7 10-19 13-28 7-6-4-7-15-3-23 3-8 14-11 21-7 9 5 13 16 10 23z">
          <text:p/>
        </draw:path>
        <draw:path draw:style-name="gr9" draw:text-style-name="P7" draw:layer="layout" svg:width="0.035cm" svg:height="0.033cm" svg:x="2.614cm" svg:y="22.131cm" svg:viewBox="0 0 36 34" svg:d="M17 0c10-1 19 7 19 14 0 11-5 19-15 20-10 2-20-7-21-19 0-7 9-15 17-15z">
          <text:p/>
        </draw:path>
        <draw:path draw:style-name="gr9" draw:text-style-name="P7" draw:layer="layout" svg:width="0.034cm" svg:height="0.035cm" svg:x="10.204cm" svg:y="28.844cm" svg:viewBox="0 0 35 36" svg:d="M34 25c-5 11-17 14-27 8-7-5-9-16-4-23 4-9 16-12 23-8 8 6 12 16 8 23z">
          <text:p/>
        </draw:path>
        <draw:path draw:style-name="gr9" draw:text-style-name="P7" draw:layer="layout" svg:width="0.034cm" svg:height="0.034cm" svg:x="13.122cm" svg:y="28.261cm" svg:viewBox="0 0 35 35" svg:d="M35 22c-1 9-10 14-19 13-8-1-16-11-16-18 1-11 14-20 23-16 10 3 13 11 12 21z">
          <text:p/>
        </draw:path>
        <draw:path draw:style-name="gr9" draw:text-style-name="P7" draw:layer="layout" svg:width="0.042cm" svg:height="0.039cm" svg:x="15.164cm" svg:y="15.122cm" svg:viewBox="0 0 43 40" svg:d="M43 22c-1 9-12 19-23 18-10 0-20-11-20-21 1-9 12-19 22-19 11 1 21 11 21 22z">
          <text:p/>
        </draw:path>
        <draw:path draw:style-name="gr9" draw:text-style-name="P7" draw:layer="layout" svg:width="0.034cm" svg:height="0.034cm" svg:x="8.453cm" svg:y="28.555cm" svg:viewBox="0 0 35 35" svg:d="M20 0c9 1 16 9 15 18-1 8-11 17-18 17-10 0-19-14-17-24 3-8 10-12 20-11z">
          <text:p/>
        </draw:path>
        <draw:path draw:style-name="gr9" draw:text-style-name="P7" draw:layer="layout" svg:width="0.034cm" svg:height="0.035cm" svg:x="5.241cm" svg:y="15.124cm" svg:viewBox="0 0 35 36" svg:d="M18 0c8 0 17 8 17 16 1 10-5 18-13 20-11 2-23-8-22-19 0-8 9-16 18-17z">
          <text:p/>
        </draw:path>
        <draw:path draw:style-name="gr9" draw:text-style-name="P7" draw:layer="layout" svg:width="0.033cm" svg:height="0.033cm" svg:x="8.162cm" svg:y="28.554cm" svg:viewBox="0 0 34 34" svg:d="M34 17c0 10-11 19-21 17-9-2-14-9-13-19 0-10 9-16 18-15 9 0 17 9 16 17z">
          <text:p/>
        </draw:path>
        <draw:path draw:style-name="gr9" draw:text-style-name="P7" draw:layer="layout" svg:width="0.034cm" svg:height="0.033cm" svg:x="17.211cm" svg:y="24.466cm" svg:viewBox="0 0 35 34" svg:d="M16 34c-9 1-16-7-16-16 1-9 8-18 15-18 11 0 21 9 20 21 0 7-10 13-19 13z">
          <text:p/>
        </draw:path>
        <draw:path draw:style-name="gr9" draw:text-style-name="P7" draw:layer="layout" svg:width="0.039cm" svg:height="0.041cm" svg:x="3.196cm" svg:y="23.879cm" svg:viewBox="0 0 40 42" svg:d="M40 23c-1 11-12 20-22 19s-19-13-18-22c1-11 11-21 21-20 11 1 20 13 19 23z">
          <text:p/>
        </draw:path>
        <draw:path draw:style-name="gr9" draw:text-style-name="P7" draw:layer="layout" svg:width="0.034cm" svg:height="0.034cm" svg:x="13.708cm" svg:y="27.969cm" svg:viewBox="0 0 35 35" svg:d="M35 17c-1 8-8 18-15 18-11 0-21-9-20-21 1-7 10-13 19-14 9 0 16 8 16 17z">
          <text:p/>
        </draw:path>
        <draw:path draw:style-name="gr9" draw:text-style-name="P7" draw:layer="layout" svg:width="0.034cm" svg:height="0.035cm" svg:x="2.615cm" svg:y="22.422cm" svg:viewBox="0 0 35 36" svg:d="M19 0c8 1 16 11 16 19 0 9-8 17-17 17s-18-7-18-15c-1-11 8-21 19-21z">
          <text:p/>
        </draw:path>
        <draw:path draw:style-name="gr9" draw:text-style-name="P7" draw:layer="layout" svg:width="0.035cm" svg:height="0.034cm" svg:x="10.789cm" svg:y="28.844cm" svg:viewBox="0 0 36 35" svg:d="M20 0c8 1 16 11 16 18 0 10-13 19-23 16-10-2-15-11-12-20 2-10 11-16 19-14z">
          <text:p/>
        </draw:path>
        <draw:path draw:style-name="gr9" draw:text-style-name="P7" draw:layer="layout" svg:width="0.035cm" svg:height="0.035cm" svg:x="18.086cm" svg:y="21.547cm" svg:viewBox="0 0 36 36" svg:d="M16 0c10-1 19 6 20 14 1 11-8 23-20 22-7-1-15-11-16-19 0-7 8-16 16-17z">
          <text:p/>
        </draw:path>
        <draw:path draw:style-name="gr9" draw:text-style-name="P7" draw:layer="layout" svg:width="0.034cm" svg:height="0.034cm" svg:x="7.869cm" svg:y="13.666cm" svg:viewBox="0 0 35 35" svg:d="M18 35c-7-1-17-10-18-17-1-10 12-19 23-18 9 2 14 9 12 20-1 9-9 16-17 15z">
          <text:p/>
        </draw:path>
        <draw:path draw:style-name="gr9" draw:text-style-name="P7" draw:layer="layout" svg:width="0.035cm" svg:height="0.034cm" svg:x="16.627cm" svg:y="25.634cm" svg:viewBox="0 0 36 35" svg:d="M17 35c-9 0-17-8-17-17 1-9 8-18 17-18 11 0 19 9 19 21-1 8-9 14-19 14z">
          <text:p/>
        </draw:path>
        <draw:path draw:style-name="gr9" draw:text-style-name="P7" draw:layer="layout" svg:width="0.034cm" svg:height="0.035cm" svg:x="16.918cm" svg:y="25.048cm" svg:viewBox="0 0 35 36" svg:d="M17 0c7 0 17 8 18 16 1 9-5 18-14 20-12 1-22-7-21-19 1-7 9-16 17-17z">
          <text:p/>
        </draw:path>
        <draw:path draw:style-name="gr9" draw:text-style-name="P7" draw:layer="layout" svg:width="0.034cm" svg:height="0.035cm" svg:x="12.248cm" svg:y="28.555cm" svg:viewBox="0 0 35 36" svg:d="M35 19c-1 9-11 18-17 17-11-1-20-15-17-24s11-13 21-11 15 9 13 18z">
          <text:p/>
        </draw:path>
        <draw:path draw:style-name="gr9" draw:text-style-name="P7" draw:layer="layout" svg:width="0.032cm" svg:height="0.033cm" svg:x="15.752cm" svg:y="26.509cm" svg:viewBox="0 0 33 34" svg:d="M33 17c1 9-5 16-13 17-11 1-21-7-20-17 1-8 10-16 17-17 8 0 16 9 16 17z">
          <text:p/>
        </draw:path>
        <draw:path draw:style-name="gr9" draw:text-style-name="P7" draw:layer="layout" svg:width="0.028cm" svg:height="0.029cm" svg:x="13.712cm" svg:y="13.959cm" svg:viewBox="0 0 29 30" svg:d="M29 14c0 9-7 16-16 16-7 0-14-8-13-16 1-7 4-13 11-14 9-2 17 6 18 14z">
          <text:p/>
        </draw:path>
        <draw:path draw:style-name="gr9" draw:text-style-name="P7" draw:layer="layout" svg:width="0.034cm" svg:height="0.035cm" svg:x="14.583cm" svg:y="14.541cm" svg:viewBox="0 0 35 36" svg:d="M0 18c0-8 6-17 14-18 11-1 21 8 21 19-1 8-9 16-18 17-8 0-16-9-17-18z">
          <text:p/>
        </draw:path>
        <draw:path draw:style-name="gr9" draw:text-style-name="P7" draw:layer="layout" svg:width="0.032cm" svg:height="0.034cm" svg:x="6.119cm" svg:y="27.677cm" svg:viewBox="0 0 33 35" svg:d="M33 16c1 8-5 17-13 19-10 1-18-3-20-13-2-11 6-22 17-22 7 0 15 8 16 16z">
          <text:p/>
        </draw:path>
        <draw:path draw:style-name="gr9" draw:text-style-name="P7" draw:layer="layout" svg:width="0.033cm" svg:height="0.034cm" svg:x="8.745cm" svg:y="13.372cm" svg:viewBox="0 0 34 35" svg:d="M34 20c0 8-8 15-18 15-8 0-16-7-16-16 0-8 7-18 14-19 12-1 20 9 20 20z">
          <text:p/>
        </draw:path>
        <draw:path draw:style-name="gr9" draw:text-style-name="P7" draw:layer="layout" svg:width="0.034cm" svg:height="0.033cm" svg:x="16.334cm" svg:y="25.926cm" svg:viewBox="0 0 35 34" svg:d="M17 0c10 0 18 7 18 16 0 10-5 17-13 18-12 2-22-7-22-18 1-8 9-15 17-16z">
          <text:p/>
        </draw:path>
        <draw:path draw:style-name="gr9" draw:text-style-name="P7" draw:layer="layout" svg:width="0.029cm" svg:height="0.028cm" svg:x="12.834cm" svg:y="28.557cm" svg:viewBox="0 0 30 29" svg:d="M17 29c-8 0-17-7-17-15s8-15 16-14c7 0 11 4 14 11 2 8-6 17-13 18z">
          <text:p/>
        </draw:path>
        <draw:path draw:style-name="gr9" draw:text-style-name="P7" draw:layer="layout" svg:width="0.028cm" svg:height="0.03cm" svg:x="16.338cm" svg:y="26.22cm" svg:viewBox="0 0 29 31" svg:d="M29 18c0 8-9 15-17 13s-11-7-12-13c-1-10 7-18 15-18 8 1 15 9 14 18z">
          <text:p/>
        </draw:path>
        <draw:path draw:style-name="gr9" draw:text-style-name="P7" draw:layer="layout" svg:width="0.034cm" svg:height="0.034cm" svg:x="14.291cm" svg:y="27.677cm" svg:viewBox="0 0 35 35" svg:d="M18 0c7-1 16 8 17 16 2 9-4 18-13 19-12 1-23-7-22-18 1-7 11-16 18-17z">
          <text:p/>
        </draw:path>
        <draw:path draw:style-name="gr9" draw:text-style-name="P7" draw:layer="layout" svg:width="0.033cm" svg:height="0.032cm" svg:x="15.169cm" svg:y="27.095cm" svg:viewBox="0 0 34 33" svg:d="M34 16c0 8-7 16-15 17-10 1-17-4-19-13-2-11 6-21 18-20 8 0 15 8 16 16z">
          <text:p/>
        </draw:path>
        <draw:path draw:style-name="gr9" draw:text-style-name="P7" draw:layer="layout" svg:width="0.033cm" svg:height="0.034cm" svg:x="9.33cm" svg:y="13.372cm" svg:viewBox="0 0 34 35" svg:d="M0 20c0-9 6-19 14-20 10-1 21 9 20 20 0 8-9 15-18 15-8 1-16-7-16-15z">
          <text:p/>
        </draw:path>
        <draw:path draw:style-name="gr9" draw:text-style-name="P7" draw:layer="layout" svg:width="0.034cm" svg:height="0.033cm" svg:x="6.701cm" svg:y="27.97cm" svg:viewBox="0 0 35 34" svg:d="M18 34c-9 0-17-10-18-17-1-10 10-19 22-17 9 2 14 9 12 18-1 9-9 17-16 16z">
          <text:p/>
        </draw:path>
        <draw:path draw:style-name="gr9" draw:text-style-name="P7" draw:layer="layout" svg:width="0.034cm" svg:height="0.034cm" svg:x="12.832cm" svg:y="13.666cm" svg:viewBox="0 0 35 35" svg:d="M35 19c-1 8-11 16-17 16-10 0-20-13-17-24 3-8 11-13 21-11 9 2 15 10 13 19z">
          <text:p/>
        </draw:path>
        <draw:path draw:style-name="gr9" draw:text-style-name="P7" draw:layer="layout" svg:width="0.03cm" svg:height="0.029cm" svg:x="6.412cm" svg:y="27.971cm" svg:viewBox="0 0 31 30" svg:d="M31 18c-2 8-11 14-20 11-6-3-10-7-11-13 0-9 9-16 18-16 8 1 14 9 13 18z">
          <text:p/>
        </draw:path>
        <draw:path draw:style-name="gr9" draw:text-style-name="P7" draw:layer="layout" svg:width="0.034cm" svg:height="0.032cm" svg:x="14cm" svg:y="14.25cm" svg:viewBox="0 0 35 33" svg:d="M19 0c9 1 16 10 16 17-1 10-13 18-23 16-9-3-13-10-12-20 2-9 10-14 19-13z">
          <text:p/>
        </draw:path>
        <draw:path draw:style-name="gr9" draw:text-style-name="P7" draw:layer="layout" svg:width="0.034cm" svg:height="0.034cm" svg:x="6.41cm" svg:y="14.249cm" svg:viewBox="0 0 35 35" svg:d="M35 15c0 11-6 18-15 20-10 1-20-7-20-20 0-7 9-15 17-15s19 8 18 15z">
          <text:p/>
        </draw:path>
        <draw:path draw:style-name="gr9" draw:text-style-name="P7" draw:layer="layout" svg:width="0.034cm" svg:height="0.034cm" svg:x="4.366cm" svg:y="16cm" svg:viewBox="0 0 35 35" svg:d="M20 35c-10 1-18-4-20-12-1-12 9-24 19-23 7 1 16 10 16 17 1 9-6 17-15 18z">
          <text:p/>
        </draw:path>
        <draw:path draw:style-name="gr9" draw:text-style-name="P7" draw:layer="layout" svg:width="0.034cm" svg:height="0.033cm" svg:x="18.087cm" svg:y="20.671cm" svg:viewBox="0 0 35 34" svg:d="M35 20c0 7-10 15-18 14-8 0-17-8-17-15-1-11 9-21 21-19 9 2 14 10 14 20z">
          <text:p/>
        </draw:path>
        <draw:path draw:style-name="gr9" draw:text-style-name="P7" draw:layer="layout" svg:width="0.033cm" svg:height="0.034cm" svg:x="17.795cm" svg:y="19.21cm" svg:viewBox="0 0 34 35" svg:d="M33 25c-4 8-11 12-21 10-11-3-15-15-9-26 3-8 16-11 22-7 7 5 11 16 8 23z">
          <text:p/>
        </draw:path>
        <draw:path draw:style-name="gr9" draw:text-style-name="P7" draw:layer="layout" svg:width="0.033cm" svg:height="0.034cm" svg:x="4.075cm" svg:y="25.634cm" svg:viewBox="0 0 34 35" svg:d="M33 25c-3 8-11 12-20 9-10-2-14-10-13-20 3-11 17-18 25-12 7 4 11 15 8 23z">
          <text:p/>
        </draw:path>
        <draw:path draw:style-name="gr9" draw:text-style-name="P7" draw:layer="layout" svg:width="0.028cm" svg:height="0.029cm" svg:x="11.375cm" svg:y="28.848cm" svg:viewBox="0 0 29 30" svg:d="M29 13c1 8-6 17-14 17-7 0-15-9-15-17 1-7 5-11 12-13 8-2 17 4 17 13z">
          <text:p/>
        </draw:path>
        <draw:path draw:style-name="gr9" draw:text-style-name="P7" draw:layer="layout" svg:width="0.034cm" svg:height="0.035cm" svg:x="3.782cm" svg:y="25.343cm" svg:viewBox="0 0 35 36" svg:d="M0 19c-1-9 5-18 15-19s18 3 20 13c2 9-7 22-17 23-6 0-17-10-18-17z">
          <text:p/>
        </draw:path>
        <draw:path draw:style-name="gr9" draw:text-style-name="P7" draw:layer="layout" svg:width="0.034cm" svg:height="0.034cm" svg:x="18.087cm" svg:y="21.256cm" svg:viewBox="0 0 35 35" svg:d="M21 0c8 2 14 9 14 19 0 7-10 16-18 16s-17-9-17-16c-1-12 9-20 21-19z">
          <text:p/>
        </draw:path>
        <draw:path draw:style-name="gr9" draw:text-style-name="P7" draw:layer="layout" svg:width="0.034cm" svg:height="0.034cm" svg:x="17.503cm" svg:y="23.882cm" svg:viewBox="0 0 35 35" svg:d="M35 16c1 9-5 18-15 19-12 1-21-7-20-19 1-7 10-15 17-16 9 0 18 9 18 16z">
          <text:p/>
        </draw:path>
        <draw:path draw:style-name="gr9" draw:text-style-name="P7" draw:layer="layout" svg:width="0.032cm" svg:height="0.034cm" svg:x="2.907cm" svg:y="18.627cm" svg:viewBox="0 0 33 35" svg:d="M15 35c-9 0-16-8-15-16 0-9 7-18 14-19 12 0 20 9 19 21 0 8-8 14-18 14z">
          <text:p/>
        </draw:path>
        <draw:path draw:style-name="gr9" draw:text-style-name="P7" draw:layer="layout" svg:width="0.028cm" svg:height="0.029cm" svg:x="17.214cm" svg:y="17.171cm" svg:viewBox="0 0 29 30" svg:d="M17 0c8 2 14 10 11 20-4 6-8 10-14 10-8 0-15-8-14-16 0-10 9-16 17-14z">
          <text:p/>
        </draw:path>
        <draw:path draw:style-name="gr9" draw:text-style-name="P7" draw:layer="layout" svg:width="0.033cm" svg:height="0.035cm" svg:x="3.49cm" svg:y="17.167cm" svg:viewBox="0 0 34 36" svg:d="M34 17c1 9-6 18-15 19s-16-4-19-13c-2-11 6-23 17-23 7 0 16 8 17 17z">
          <text:p/>
        </draw:path>
        <draw:path draw:style-name="gr9" draw:text-style-name="P7" draw:layer="layout" svg:width="0.034cm" svg:height="0.033cm" svg:x="16.918cm" svg:y="16.876cm" svg:viewBox="0 0 35 34" svg:d="M35 17c0 9-8 17-16 17-11 1-20-8-19-19 1-8 10-15 18-15 9 0 18 9 17 17z">
          <text:p/>
        </draw:path>
        <draw:path draw:style-name="gr9" draw:text-style-name="P7" draw:layer="layout" svg:width="0.028cm" svg:height="0.03cm" svg:x="2.325cm" svg:y="20.965cm" svg:viewBox="0 0 29 31" svg:d="M29 18c0 8-9 15-18 13-6-2-10-7-11-13-1-10 7-18 15-18 7 0 15 9 14 18z">
          <text:p/>
        </draw:path>
        <draw:path draw:style-name="gr9" draw:text-style-name="P7" draw:layer="layout" svg:width="0.033cm" svg:height="0.035cm" svg:x="9.913cm" svg:y="28.844cm" svg:viewBox="0 0 34 36" svg:d="M34 17c1 9-5 18-13 19-10 0-18-4-20-13-3-10 7-23 17-23 8 0 16 9 16 17z">
          <text:p/>
        </draw:path>
        <draw:path draw:style-name="gr9" draw:text-style-name="P7" draw:layer="layout" svg:width="0.035cm" svg:height="0.033cm" svg:x="4.951cm" svg:y="15.415cm" svg:viewBox="0 0 36 34" svg:d="M19 0c8 1 16 9 17 18 0 10-13 18-24 15-9-1-14-10-11-19 2-9 11-16 18-14z">
          <text:p/>
        </draw:path>
        <draw:path draw:style-name="gr9" draw:text-style-name="P7" draw:layer="layout" svg:width="0.034cm" svg:height="0.035cm" svg:x="17.795cm" svg:y="18.92cm" svg:viewBox="0 0 35 36" svg:d="M35 18c0 7-8 17-15 18-12 2-20-8-20-20 1-9 10-16 18-16 8 2 17 11 17 18z">
          <text:p/>
        </draw:path>
        <draw:path draw:style-name="gr9" draw:text-style-name="P7" draw:layer="layout" svg:width="0.034cm" svg:height="0.034cm" svg:x="4.657cm" svg:y="15.709cm" svg:viewBox="0 0 35 35" svg:d="M35 14c1 11-4 19-12 21-10 2-22-8-23-19 0-7 9-16 17-16 10-1 18 6 18 14z">
          <text:p/>
        </draw:path>
        <draw:path draw:style-name="gr9" draw:text-style-name="P7" draw:layer="layout" svg:width="0.034cm" svg:height="0.034cm" svg:x="10.496cm" svg:y="28.845cm" svg:viewBox="0 0 35 35" svg:d="M35 20c-1 9-10 16-18 15s-17-9-17-16c-1-10 11-21 21-19 9 1 14 11 14 20z">
          <text:p/>
        </draw:path>
        <draw:path draw:style-name="gr9" draw:text-style-name="P7" draw:layer="layout" svg:width="0.033cm" svg:height="0.033cm" svg:x="4.075cm" svg:y="16.293cm" svg:viewBox="0 0 34 34" svg:d="M16 0c10-1 17 5 18 13 2 12-8 23-18 21-7-1-16-10-16-18-1-7 8-16 16-16z">
          <text:p/>
        </draw:path>
        <draw:path draw:style-name="gr9" draw:text-style-name="P7" draw:layer="layout" svg:width="0.033cm" svg:height="0.034cm" svg:x="3.49cm" svg:y="24.759cm" svg:viewBox="0 0 34 35" svg:d="M34 17c0 8-6 17-15 18-10 1-20-8-19-19 0-9 8-16 17-16s17 7 17 17z">
          <text:p/>
        </draw:path>
        <draw:path draw:style-name="gr9" draw:text-style-name="P7" draw:layer="layout" svg:width="0.033cm" svg:height="0.034cm" svg:x="2.907cm" svg:y="23.59cm" svg:viewBox="0 0 34 35" svg:d="M34 16c1 7-8 18-15 19-12 2-20-8-19-20 1-9 8-16 18-15 7 0 16 10 16 16z">
          <text:p/>
        </draw:path>
        <draw:path draw:style-name="gr9" draw:text-style-name="P7" draw:layer="layout" svg:width="0.034cm" svg:height="0.033cm" svg:x="5.535cm" svg:y="14.833cm" svg:viewBox="0 0 35 34" svg:d="M18 34c-9 1-17-6-18-14-1-10 4-17 12-19 11-3 23 7 23 17 0 7-8 16-17 16z">
          <text:p/>
        </draw:path>
        <draw:path draw:style-name="gr9" draw:text-style-name="P7" draw:layer="layout" svg:width="0.035cm" svg:height="0.034cm" svg:x="14.875cm" svg:y="14.832cm" svg:viewBox="0 0 36 35" svg:d="M21 35c-9 0-18-5-21-13-2-9 9-22 19-22 7 0 16 10 16 17 2 9-6 17-14 18z">
          <text:p/>
        </draw:path>
        <draw:path draw:style-name="gr9" draw:text-style-name="P7" draw:layer="layout" svg:width="0.03cm" svg:height="0.029cm" svg:x="18.089cm" svg:y="22.132cm" svg:viewBox="0 0 31 30" svg:d="M18 30c-9 2-17-5-18-13 0-7 8-16 15-17 9 0 16 9 16 17s-6 10-13 13z">
          <text:p/>
        </draw:path>
        <draw:path draw:style-name="gr9" draw:text-style-name="P7" draw:layer="layout" svg:width="0.034cm" svg:height="0.034cm" svg:x="17.795cm" svg:y="23.006cm" svg:viewBox="0 0 35 35" svg:d="M35 16c0 7-7 17-14 19-9 2-18-3-20-13-3-11 5-23 16-22 8 0 17 8 18 16z">
          <text:p/>
        </draw:path>
        <draw:path draw:style-name="gr9" draw:text-style-name="P7" draw:layer="layout" svg:width="0.034cm" svg:height="0.033cm" svg:x="17.503cm" svg:y="18.044cm" svg:viewBox="0 0 35 34" svg:d="M35 15c1 10-4 17-14 19-11 2-22-6-21-18 0-7 8-15 16-16 8 0 18 7 19 15z">
          <text:p/>
        </draw:path>
        <draw:path draw:style-name="gr9" draw:text-style-name="P7" draw:layer="layout" svg:width="0.029cm" svg:height="0.028cm" svg:x="18.09cm" svg:y="19.506cm" svg:viewBox="0 0 30 29" svg:d="M30 12c0 7-8 17-16 17-7 0-15-10-14-17 0-7 5-11 11-12 9-2 19 4 19 12z">
          <text:p/>
        </draw:path>
        <draw:path draw:style-name="gr9" draw:text-style-name="P7" draw:layer="layout" svg:width="0.035cm" svg:height="0.033cm" svg:x="2.615cm" svg:y="20.088cm" svg:viewBox="0 0 36 34" svg:d="M36 17c-1 8-10 18-18 17-10 0-20-12-17-22 2-8 10-12 19-12 10 1 16 9 16 17z">
          <text:p/>
        </draw:path>
        <draw:path draw:style-name="gr9" draw:text-style-name="P7" draw:layer="layout" svg:width="0.033cm" svg:height="0.033cm" svg:x="17.212cm" svg:y="17.461cm" svg:viewBox="0 0 34 34" svg:d="M34 15c1 11-9 20-21 19-8-1-13-9-13-19 0-8 8-15 16-15s18 8 18 15z">
          <text:p/>
        </draw:path>
        <draw:path draw:style-name="gr9" draw:text-style-name="P7" draw:layer="layout" svg:width="0.028cm" svg:height="0.029cm" svg:x="4.368cm" svg:y="15.711cm" svg:viewBox="0 0 29 30" svg:d="M29 9c2 12-6 21-16 21-5-1-12-7-13-13-1-10 7-19 16-17 6 1 10 7 13 9z">
          <text:p/>
        </draw:path>
        <draw:path draw:style-name="gr9" draw:text-style-name="P7" draw:layer="layout" svg:width="0.028cm" svg:height="0.027cm" svg:x="16.63cm" svg:y="16.295cm" svg:viewBox="0 0 29 28" svg:d="M20 0c2 3 8 7 9 13 2 8-7 16-17 15-6-2-12-8-12-14 0-9 7-16 20-14z">
          <text:p/>
        </draw:path>
        <draw:path draw:style-name="gr9" draw:text-style-name="P7" draw:layer="layout" svg:width="0.03cm" svg:height="0.03cm" svg:x="16.046cm" svg:y="15.711cm" svg:viewBox="0 0 31 31" svg:d="M31 13c0 6-9 18-15 18-7 0-16-12-16-18 1-7 7-11 13-13 8-2 17 5 18 13z">
          <text:p/>
        </draw:path>
        <draw:path draw:style-name="gr9" draw:text-style-name="P7" draw:layer="layout" svg:width="0.029cm" svg:height="0.029cm" svg:x="17.506cm" svg:y="24.177cm" svg:viewBox="0 0 30 30" svg:d="M12 30c-8-1-15-13-11-19 3-5 9-9 14-11 7-1 16 9 15 16 0 9-10 16-18 14z">
          <text:p/>
        </draw:path>
        <draw:path draw:style-name="gr9" draw:text-style-name="P7" draw:layer="layout" svg:width="0.029cm" svg:height="0.026cm" svg:x="18.09cm" svg:y="20.091cm" svg:viewBox="0 0 30 27" svg:d="M30 13c-3 12-12 16-21 13-6-2-11-10-9-15 4-9 11-14 19-10 5 3 8 8 11 12z">
          <text:p/>
        </draw:path>
        <draw:path draw:style-name="gr9" draw:text-style-name="P7" draw:layer="layout" svg:width="0.03cm" svg:height="0.029cm" svg:x="18.09cm" svg:y="19.797cm" svg:viewBox="0 0 31 30" svg:d="M13 0c7-1 18 8 18 15s-11 16-18 15c-7 0-11-6-13-12-2-8 5-18 13-18z">
          <text:p/>
        </draw:path>
        <draw:path draw:style-name="gr9" draw:text-style-name="P7" draw:layer="layout" svg:width="0.03cm" svg:height="0.03cm" svg:x="11.666cm" svg:y="28.847cm" svg:viewBox="0 0 31 31" svg:d="M31 14c0 7-8 17-15 17s-18-11-16-17c2-5 8-11 13-13 7-3 17 5 18 13z">
          <text:p/>
        </draw:path>
        <draw:path draw:style-name="gr9" draw:text-style-name="P7" draw:layer="layout" svg:width="0.029cm" svg:height="0.03cm" svg:x="11.083cm" svg:y="28.847cm" svg:viewBox="0 0 30 31" svg:d="M30 17c-1 9-10 16-19 13-5-2-9-9-11-14-2-6 8-16 14-16 8 0 16 9 16 17z">
          <text:p/>
        </draw:path>
        <draw:path draw:style-name="gr9" draw:text-style-name="P7" draw:layer="layout" svg:width="0.029cm" svg:height="0.028cm" svg:x="6.996cm" svg:y="28.264cm" svg:viewBox="0 0 30 29" svg:d="M30 12c1 8-7 17-14 17-9 1-16-9-16-17 0-7 6-10 13-12 8-2 17 5 17 12z">
          <text:p/>
        </draw:path>
        <draw:path draw:style-name="gr9" draw:text-style-name="P7" draw:layer="layout" svg:width="0.026cm" svg:height="0.029cm" svg:x="6.706cm" svg:y="13.959cm" svg:viewBox="0 0 27 30" svg:d="M27 15c0 8-11 18-17 14-5-3-10-9-10-14 0-4 5-11 9-14 7-4 18 7 18 14z">
          <text:p/>
        </draw:path>
        <draw:path draw:style-name="gr9" draw:text-style-name="P7" draw:layer="layout" svg:width="0.028cm" svg:height="0.026cm" svg:x="15.462cm" svg:y="27.098cm" svg:viewBox="0 0 29 27" svg:d="M29 13c-1 11-9 16-18 14-7-2-12-6-11-13 0-10 9-16 18-13 5 2 8 9 11 12z">
          <text:p/>
        </draw:path>
        <draw:path draw:style-name="gr9" draw:text-style-name="P7" draw:layer="layout" svg:width="0.028cm" svg:height="0.029cm" svg:x="2.619cm" svg:y="19.214cm" svg:viewBox="0 0 29 30" svg:d="M0 10c4-3 8-9 15-10s15 11 13 19c-2 6-7 10-15 11-8 0-15-9-13-20z">
          <text:p/>
        </draw:path>
        <draw:path draw:style-name="gr9" draw:text-style-name="P7" draw:layer="layout" svg:width="0.027cm" svg:height="0.025cm" svg:x="5.246cm" svg:y="27.099cm" svg:viewBox="0 0 28 26" svg:d="M28 12c0 10-7 15-16 14-8-1-12-5-12-13-1-8 7-14 16-13 7 0 11 5 12 12z">
          <text:p/>
        </draw:path>
        <draw:path draw:style-name="gr9" draw:text-style-name="P7" draw:layer="layout" svg:width="0.028cm" svg:height="0.028cm" svg:x="8.457cm" svg:y="13.376cm" svg:viewBox="0 0 29 29" svg:d="M29 19c-4 2-8 9-13 10-10 2-17-8-16-17 0-6 7-12 14-12 8-1 16 8 15 19z">
          <text:p/>
        </draw:path>
        <draw:path draw:style-name="gr9" draw:text-style-name="P7" draw:layer="layout" svg:width="0.03cm" svg:height="0.028cm" svg:x="3.784cm" svg:y="16.587cm" svg:viewBox="0 0 31 29" svg:d="M30 12c3 8-5 17-13 17-8 1-18-7-17-14 3-5 7-11 12-14 7-4 16 3 18 11z">
          <text:p/>
        </draw:path>
        <draw:path draw:style-name="gr9" draw:text-style-name="P7" draw:layer="layout" svg:width="0.029cm" svg:height="0.028cm" svg:x="16.921cm" svg:y="25.345cm" svg:viewBox="0 0 30 29" svg:d="M30 17c-3 2-6 9-12 11-8 3-19-5-18-14 2-7 6-12 13-14 9-2 17 5 17 17z">
          <text:p/>
        </draw:path>
        <draw:path draw:style-name="gr9" draw:text-style-name="P7" draw:layer="layout" svg:width="0.029cm" svg:height="0.029cm" svg:x="4.368cm" svg:y="26.221cm" svg:viewBox="0 0 30 30" svg:d="M12 0c7-1 17 5 18 14 0 8-9 18-16 16-5-1-10-6-13-10-4-7 2-18 11-20z">
          <text:p/>
        </draw:path>
        <draw:path draw:style-name="gr9" draw:text-style-name="P7" draw:layer="layout" svg:width="0.03cm" svg:height="0.029cm" svg:x="18.089cm" svg:y="22.426cm" svg:viewBox="0 0 31 30" svg:d="M17 30c-8 0-17-8-17-16 0-7 10-16 17-14 6 2 11 7 13 12 3 8-4 17-13 18z">
          <text:p/>
        </draw:path>
        <draw:path draw:style-name="gr9" draw:text-style-name="P7" draw:layer="layout" svg:width="0.029cm" svg:height="0.031cm" svg:x="14.878cm" svg:y="14.544cm" svg:viewBox="0 0 30 32" svg:d="M30 14c1 7-7 18-15 18s-17-11-15-18c2-5 7-10 12-13 8-3 18 5 18 13z">
          <text:p/>
        </draw:path>
        <draw:path draw:style-name="gr9" draw:text-style-name="P7" draw:layer="layout" svg:width="0.028cm" svg:height="0.028cm" svg:x="7.58cm" svg:y="13.668cm" svg:viewBox="0 0 29 29" svg:d="M29 10c1 11-6 19-16 19-6 0-12-6-13-12-1-10 6-18 15-17 5 1 10 7 14 10z">
          <text:p/>
        </draw:path>
        <draw:path draw:style-name="gr9" draw:text-style-name="P7" draw:layer="layout" svg:width="0.026cm" svg:height="0.028cm" svg:x="17.798cm" svg:y="23.593cm" svg:viewBox="0 0 27 29" svg:d="M14 0c9 1 15 8 13 18-3 6-9 12-14 11-7-1-12-6-13-13-1-9 6-17 14-16z">
          <text:p/>
        </draw:path>
        <draw:path draw:style-name="gr9" draw:text-style-name="P7" draw:layer="layout" svg:width="0.029cm" svg:height="0.029cm" svg:x="17.506cm" svg:y="17.754cm" svg:viewBox="0 0 30 30" svg:d="M12 30c-7 0-14-10-12-17s5-13 12-13c8-1 18 7 18 15s-10 16-18 15z">
          <text:p/>
        </draw:path>
        <draw:path draw:style-name="gr9" draw:text-style-name="P7" draw:layer="layout" svg:width="0.028cm" svg:height="0.026cm" svg:x="18.09cm" svg:y="21.844cm" svg:viewBox="0 0 29 27" svg:d="M20 0c2 3 8 7 9 13 2 8-7 15-16 14-8-1-12-6-13-13-1-8 7-15 20-14z">
          <text:p/>
        </draw:path>
        <draw:path draw:style-name="gr9" draw:text-style-name="P7" draw:layer="layout" svg:width="0.029cm" svg:height="0.027cm" svg:x="2.618cm" svg:y="22.718cm" svg:viewBox="0 0 30 28" svg:d="M30 17c-3 3-7 8-12 10-8 4-19-5-18-13 1-7 5-13 13-14 9-2 17 6 17 17z">
          <text:p/>
        </draw:path>
        <draw:path draw:style-name="gr9" draw:text-style-name="P7" draw:layer="layout" svg:width="0.028cm" svg:height="0.026cm" svg:x="3.201cm" svg:y="17.464cm" svg:viewBox="0 0 29 27" svg:d="M29 14c-2 3-5 10-10 12-8 4-17-1-19-11-2-5 4-11 10-14 9-3 16 1 19 13z">
          <text:p/>
        </draw:path>
        <draw:path draw:style-name="gr9" draw:text-style-name="P7" draw:layer="layout" svg:width="0.029cm" svg:height="0.03cm" svg:x="4.953cm" svg:y="26.804cm" svg:viewBox="0 0 30 31" svg:d="M17 30c-7 2-17-5-17-13-1-8 8-19 14-17 6 1 12 6 15 12 4 6-3 16-12 18z">
          <text:p/>
        </draw:path>
        <draw:path draw:style-name="gr9" draw:text-style-name="P7" draw:layer="layout" svg:width="0.026cm" svg:height="0.029cm" svg:x="8.748cm" svg:y="28.848cm" svg:viewBox="0 0 27 30" svg:d="M27 10c1 12-6 21-15 19-6-1-11-5-12-12-1-9 6-19 14-17 6 3 10 8 13 10z">
          <text:p/>
        </draw:path>
        <draw:path draw:style-name="gr9" draw:text-style-name="P7" draw:layer="layout" svg:width="0.028cm" svg:height="0.029cm" svg:x="13.418cm" svg:y="28.264cm" svg:viewBox="0 0 29 30" svg:d="M19 30c-13 0-20-8-19-16 1-6 9-13 14-14 9 0 17 10 15 18-2 5-7 9-10 12z">
          <text:p/>
        </draw:path>
        <draw:path draw:style-name="gr9" draw:text-style-name="P7" draw:layer="layout" svg:width="0.029cm" svg:height="0.03cm" svg:x="5.828cm" svg:y="14.543cm" svg:viewBox="0 0 30 31" svg:d="M30 17c0 9-10 17-19 13-4-2-9-7-11-13-2-7 8-17 15-17s16 10 15 17z">
          <text:p/>
        </draw:path>
        <draw:path draw:style-name="gr9" draw:text-style-name="P7" draw:layer="layout" svg:width="0.029cm" svg:height="0.03cm" svg:x="9.04cm" svg:y="28.847cm" svg:viewBox="0 0 30 31" svg:d="M28 21c-6 9-15 12-21 8-7-5-10-16-4-22 4-6 9-9 15-6 11 4 15 13 10 20z">
          <text:p/>
        </draw:path>
        <draw:path draw:style-name="gr9" draw:text-style-name="P7" draw:layer="layout" svg:width="0.029cm" svg:height="0.028cm" svg:x="2.909cm" svg:y="18.338cm" svg:viewBox="0 0 30 29" svg:d="M30 15c-4 6-8 12-12 14-8 3-18-6-18-14s11-17 18-14c5 3 8 9 12 14z">
          <text:p/>
        </draw:path>
        <draw:path draw:style-name="gr9" draw:text-style-name="P7" draw:layer="layout" svg:width="0.026cm" svg:height="0.03cm" svg:x="15.756cm" svg:y="26.804cm" svg:viewBox="0 0 27 31" svg:d="M14 31c-12-3-16-12-14-20 3-8 9-12 15-10 10 3 15 12 10 19-2 5-8 8-11 11z">
          <text:p/>
        </draw:path>
        <draw:path draw:style-name="gr9" draw:text-style-name="P7" draw:layer="layout" svg:width="0.028cm" svg:height="0.03cm" svg:x="9.333cm" svg:y="28.848cm" svg:viewBox="0 0 29 31" svg:d="M29 14c-4 6-6 13-11 16-5 4-18-5-18-14 0-8 10-18 16-15 5 3 9 8 13 13z">
          <text:p/>
        </draw:path>
        <draw:path draw:style-name="gr9" draw:text-style-name="P7" draw:layer="layout" svg:width="0.03cm" svg:height="0.028cm" svg:x="3.784cm" svg:y="25.638cm" svg:viewBox="0 0 31 29" svg:d="M17 0c8 0 16 9 13 17-2 6-6 12-13 12-8 1-17-8-17-15s10-15 17-14z">
          <text:p/>
        </draw:path>
        <draw:path draw:style-name="gr9" draw:text-style-name="P7" draw:layer="layout" svg:width="0.029cm" svg:height="0.03cm" svg:x="2.618cm" svg:y="23.009cm" svg:viewBox="0 0 30 31" svg:d="M0 14c0-7 10-16 17-13 6 1 12 6 13 13 0 8-8 17-16 17-7 0-16-9-14-17z">
          <text:p/>
        </draw:path>
        <draw:path draw:style-name="gr9" draw:text-style-name="P7" draw:layer="layout" svg:width="0.029cm" svg:height="0.03cm" svg:x="4.953cm" svg:y="15.127cm" svg:viewBox="0 0 30 31" svg:d="M30 18c-2 9-13 16-20 11-4-4-9-9-10-14-2-7 8-15 16-15s15 10 14 18z">
          <text:p/>
        </draw:path>
        <draw:path draw:style-name="gr9" draw:text-style-name="P7" draw:layer="layout" svg:width="0.028cm" svg:height="0.026cm" svg:x="16.047cm" svg:y="26.513cm" svg:viewBox="0 0 29 27" svg:d="M29 11c-1 13-9 18-19 16-6-2-11-6-10-15 0-8 9-14 18-11 5 2 8 8 11 10z">
          <text:p/>
        </draw:path>
        <draw:path draw:style-name="gr9" draw:text-style-name="P7" draw:layer="layout" svg:width="0.028cm" svg:height="0.027cm" svg:x="3.202cm" svg:y="24.47cm" svg:viewBox="0 0 29 28" svg:d="M29 12c-2 12-10 18-18 15-8-2-11-7-11-14-1-9 9-15 18-12 5 2 8 9 11 11z">
          <text:p/>
        </draw:path>
        <draw:path draw:style-name="gr9" draw:text-style-name="P7" draw:layer="layout" svg:width="0.028cm" svg:height="0.031cm" svg:x="2.618cm" svg:y="18.922cm" svg:viewBox="0 0 29 32" svg:d="M12 0c11 0 19 11 17 19-3 7-8 11-15 13-8 0-17-12-13-19 2-5 8-9 11-13z">
          <text:p/>
        </draw:path>
        <draw:path draw:style-name="gr9" draw:text-style-name="P7" draw:layer="layout" svg:width="0.026cm" svg:height="0.028cm" svg:x="9.918cm" svg:y="13.084cm" svg:viewBox="0 0 27 29" svg:d="M27 15c0 8-11 17-17 14-4-3-10-9-10-14 0-4 6-11 10-14 7-4 17 7 17 14z">
          <text:p/>
        </draw:path>
        <draw:path draw:style-name="gr9" draw:text-style-name="P7" draw:layer="layout" svg:width="0.03cm" svg:height="0.028cm" svg:x="10.206cm" svg:y="13.084cm" svg:viewBox="0 0 31 29" svg:d="M31 18c-4 3-7 9-12 11-9 3-19-5-19-14 1-7 5-13 12-14 8-3 19 7 19 17z">
          <text:p/>
        </draw:path>
        <draw:path draw:style-name="gr9" draw:text-style-name="P7" draw:layer="layout" svg:width="0.03cm" svg:height="0.028cm" svg:x="12.251cm" svg:y="13.376cm" svg:viewBox="0 0 31 29" svg:d="M14 29c-7 0-16-11-13-18 3-5 9-10 14-11 7-2 16 7 16 14 0 9-9 16-17 15z">
          <text:p/>
        </draw:path>
        <draw:path draw:style-name="gr9" draw:text-style-name="P7" draw:layer="layout" svg:width="0.028cm" svg:height="0.028cm" svg:x="10.792cm" svg:y="13.084cm" svg:viewBox="0 0 29 29" svg:d="M29 20c-4 3-8 8-13 9-8 2-17-7-16-16 1-6 8-13 14-13 9 0 16 9 15 20z">
          <text:p/>
        </draw:path>
        <draw:path draw:style-name="gr9" draw:text-style-name="P7" draw:layer="layout" svg:width="0.026cm" svg:height="0.028cm" svg:x="3.494cm" svg:y="25.053cm" svg:viewBox="0 0 27 29" svg:d="M14 0c11 3 15 12 11 21-3 5-7 9-14 8-9-2-14-13-10-20 4-4 10-7 13-9z">
          <text:p/>
        </draw:path>
        <draw:path draw:style-name="gr9" draw:text-style-name="P7" draw:layer="layout" svg:width="0.026cm" svg:height="0.029cm" svg:x="17.214cm" svg:y="24.761cm" svg:viewBox="0 0 27 30" svg:d="M26 21c-2 6-8 10-14 8-10-4-14-12-10-20 3-6 8-10 15-9 8 2 13 14 9 21z">
          <text:p/>
        </draw:path>
        <draw:path draw:style-name="gr9" draw:text-style-name="P7" draw:layer="layout" svg:width="0.026cm" svg:height="0.027cm" svg:x="11.96cm" svg:y="13.376cm" svg:viewBox="0 0 27 28" svg:d="M27 18c-3 3-7 8-12 9-7 4-16-6-15-15 1-6 7-11 13-12 7-2 14 7 14 18z">
          <text:p/>
        </draw:path>
        <draw:path draw:style-name="gr9" draw:text-style-name="P7" draw:layer="layout" svg:width="0.031cm" svg:height="0.03cm" svg:x="15.46cm" svg:y="15.127cm" svg:viewBox="0 0 32 31" svg:d="M18 31c-7 0-18-8-18-15s12-18 18-16c5 2 10 7 13 13 3 7-5 17-13 18z">
          <text:p/>
        </draw:path>
        <draw:path draw:style-name="gr9" draw:text-style-name="P7" draw:layer="layout" svg:width="0.027cm" svg:height="0.025cm" svg:x="14.296cm" svg:y="14.253cm" svg:viewBox="0 0 28 26" svg:d="M28 14c0 7-5 12-11 12-10 1-18-5-17-13 2-7 4-12 12-13 9-1 16 4 16 14z">
          <text:p/>
        </draw:path>
        <draw:path draw:style-name="gr9" draw:text-style-name="P7" draw:layer="layout" svg:width="0.027cm" svg:height="0.028cm" svg:x="8.164cm" svg:y="13.376cm" svg:viewBox="0 0 28 29" svg:d="M17 29c-8 2-19-8-17-15 2-5 7-10 11-13 6-3 13 1 15 8 4 7-1 18-9 20z">
          <text:p/>
        </draw:path>
        <draw:path draw:style-name="gr9" draw:text-style-name="P7" draw:layer="layout" svg:width="0.027cm" svg:height="0.028cm" svg:x="10.501cm" svg:y="13.084cm" svg:viewBox="0 0 28 29" svg:d="M28 16c-1 7-11 16-18 13-5-3-10-9-10-14s6-12 10-14c7-4 18 7 18 15z">
          <text:p/>
        </draw:path>
        <draw:path draw:style-name="gr9" draw:text-style-name="P7" draw:layer="layout" svg:width="0.027cm" svg:height="0.029cm" svg:x="5.537cm" svg:y="27.388cm" svg:viewBox="0 0 28 30" svg:d="M0 16c0-9 8-17 17-16 6 2 11 7 11 14-1 5-5 11-9 15-6 3-18-6-19-13z">
          <text:p/>
        </draw:path>
        <draw:path draw:style-name="gr9" draw:text-style-name="P7" draw:layer="layout" svg:width="0.026cm" svg:height="0.027cm" svg:x="2.326cm" svg:y="21.55cm" svg:viewBox="0 0 27 28" svg:d="M27 8c1 14-5 22-13 20-7-1-13-4-14-11-1-10 5-18 15-17 5 1 9 6 12 8z">
          <text:p/>
        </draw:path>
        <draw:path draw:style-name="gr9" draw:text-style-name="P7" draw:layer="layout" svg:width="0.025cm" svg:height="0.025cm" svg:x="2.91cm" svg:y="23.887cm" svg:viewBox="0 0 26 26" svg:d="M26 12c-1 9-5 14-12 14-8 0-17-9-13-16s9-12 15-9c5 2 8 8 10 11z">
          <text:p/>
        </draw:path>
        <draw:path draw:style-name="gr9" draw:text-style-name="P7" draw:layer="layout" svg:width="0.019cm" svg:height="0.02cm" svg:x="2.914cm" svg:y="24.474cm" svg:viewBox="0 0 20 21" svg:d="M20 9c-2 4-4 10-6 12-5 3-14-3-14-10-1-3 2-8 6-10 7-2 13 2 14 8z">
          <text:p/>
        </draw:path>
        <draw:path draw:style-name="gr9" draw:text-style-name="P7" draw:layer="layout" svg:width="0.026cm" svg:height="0.023cm" svg:x="2.326cm" svg:y="21.262cm" svg:viewBox="0 0 27 24" svg:d="M27 11c-2 10-7 14-13 13-10-1-17-12-13-17 4-4 12-8 17-7 4 0 6 9 9 11z">
          <text:p/>
        </draw:path>
        <draw:path draw:style-name="gr9" draw:text-style-name="P7" draw:layer="layout" svg:width="0.019cm" svg:height="0.019cm" svg:x="18.386cm" svg:y="21.263cm" svg:viewBox="0 0 20 20" svg:d="M20 12c-3 7-11 10-16 6-2-2-4-7-4-12 1-6 8-8 14-5 6 2 7 5 6 11z">
          <text:p/>
        </draw:path>
        <draw:path draw:style-name="gr9" draw:text-style-name="P7" draw:layer="layout" svg:width="0.025cm" svg:height="0.025cm" svg:x="7.875cm" svg:y="28.558cm" svg:viewBox="0 0 26 26" svg:d="M14 26c-10-2-14-5-14-12 0-10 10-17 17-13 6 3 11 9 8 15-2 5-8 7-11 10z">
          <text:p/>
        </draw:path>
        <draw:path draw:style-name="gr9" draw:text-style-name="P7" draw:layer="layout" svg:width="0.02cm" svg:height="0.019cm" svg:x="5.541cm" svg:y="27.686cm" svg:viewBox="0 0 21 20" svg:d="M20 12c-4 8-9 10-15 6-3-2-5-7-5-12 1-5 9-8 15-5 6 1 7 5 5 11z">
          <text:p/>
        </draw:path>
        <draw:path draw:style-name="gr9" draw:text-style-name="P7" draw:layer="layout" svg:width="0.019cm" svg:height="0.018cm" svg:x="17.802cm" svg:y="18.342cm" svg:viewBox="0 0 20 19" svg:d="M7 0c6 3 10 4 12 6 4 6-1 13-9 13-3 0-7-3-10-4 2-5 4-10 7-15z">
          <text:p/>
        </draw:path>
        <draw:path draw:style-name="gr9" draw:text-style-name="P7" draw:layer="layout" svg:width="0.025cm" svg:height="0.023cm" svg:x="14.587cm" svg:y="27.684cm" svg:viewBox="0 0 26 24" svg:d="M26 11c-3 8-5 14-13 13-8 0-17-13-11-18 3-4 10-7 15-6 4 0 7 8 9 11z">
          <text:p/>
        </draw:path>
        <draw:path draw:style-name="gr9" draw:text-style-name="P7" draw:layer="layout" svg:width="0.02cm" svg:height="0.017cm" svg:x="18.385cm" svg:y="21.555cm" svg:viewBox="0 0 21 18" svg:d="M21 14c-5 1-10 4-15 3-6 0-7-5-5-10 3-7 9-9 15-6 3 2 3 8 5 13z">
          <text:p/>
        </draw:path>
        <draw:path draw:style-name="gr9" draw:text-style-name="P7" draw:layer="layout" svg:width="0.021cm" svg:height="0.018cm" svg:x="2.329cm" svg:y="22.723cm" svg:viewBox="0 0 22 19" svg:d="M21 14c-3 2-7 5-10 5-8 0-14-7-9-12 3-3 7-7 11-7 4-1 11 9 8 14z">
          <text:p/>
        </draw:path>
        <draw:path draw:style-name="gr9" draw:text-style-name="P7" draw:layer="layout" svg:width="0.018cm" svg:height="0.02cm" svg:x="17.802cm" svg:y="18.051cm" svg:viewBox="0 0 19 21" svg:d="M0 11c2-4 3-8 6-10 6-4 14 2 13 8 0 4-2 8-5 11-6 4-13-3-14-9z">
          <text:p/>
        </draw:path>
        <draw:path draw:style-name="gr9" draw:text-style-name="P7" draw:layer="layout" svg:width="0.025cm" svg:height="0.024cm" svg:x="2.91cm" svg:y="18.049cm" svg:viewBox="0 0 26 25" svg:d="M26 12c-1 9-5 13-12 13-8 1-16-9-13-17 4-5 9-10 16-7 4 2 7 7 9 11z">
          <text:p/>
        </draw:path>
        <draw:path draw:style-name="gr9" draw:text-style-name="P7" draw:layer="layout" svg:width="0.02cm" svg:height="0.021cm" svg:x="2.33cm" svg:y="21.847cm" svg:viewBox="0 0 21 22" svg:d="M21 10c-3 4-4 8-7 11-4 4-14-4-14-10 0-3 4-9 7-10 6-3 12 1 14 9z">
          <text:p/>
        </draw:path>
        <draw:path draw:style-name="gr9" draw:text-style-name="P7" draw:layer="layout" svg:width="0.021cm" svg:height="0.019cm" svg:x="18.385cm" svg:y="21.847cm" svg:viewBox="0 0 22 20" svg:d="M10 0c4 2 9 3 11 6 3 4-3 14-10 14-3 0-8-3-10-7-3-6 1-12 9-13z">
          <text:p/>
        </draw:path>
        <draw:path draw:style-name="gr9" draw:text-style-name="P7" draw:layer="layout" svg:width="0.019cm" svg:height="0.02cm" svg:x="2.33cm" svg:y="22.137cm" svg:viewBox="0 0 20 21" svg:d="M20 10c-2 4-4 9-7 10-5 3-14-3-13-9 0-4 3-8 6-10 5-4 12 1 14 9z">
          <text:p/>
        </draw:path>
        <draw:path draw:style-name="gr9" draw:text-style-name="P7" draw:layer="layout" svg:width="0.028cm" svg:height="0.025cm" svg:x="7.29cm" svg:y="13.669cm" svg:viewBox="0 0 29 26" svg:d="M29 15c-7 4-11 9-17 10-8 2-14-8-11-17 1-5 9-11 15-7 4 3 7 8 13 14z">
          <text:p/>
        </draw:path>
        <draw:path draw:style-name="gr9" draw:text-style-name="P7" draw:layer="layout" svg:width="0.02cm" svg:height="0.016cm" svg:x="6.125cm" svg:y="27.976cm" svg:viewBox="0 0 21 17" svg:d="M20 17c-5 0-10 1-16 0-2 0-5-8-3-11 1-3 7-5 11-6 5 0 12 9 8 17z">
          <text:p/>
        </draw:path>
        <draw:path draw:style-name="gr9" draw:text-style-name="P7" draw:layer="layout" svg:width="0.024cm" svg:height="0.026cm" svg:x="14.004cm" svg:y="27.972cm" svg:viewBox="0 0 25 27" svg:d="M25 15c-2 8-10 13-15 11-6-2-12-4-10-13 1-8 12-16 17-12 4 4 5 10 8 14z">
          <text:p/>
        </draw:path>
        <draw:path draw:style-name="gr9" draw:text-style-name="P7" draw:layer="layout" svg:width="0.021cm" svg:height="0.019cm" svg:x="14.589cm" svg:y="27.975cm" svg:viewBox="0 0 22 20" svg:d="M9 0c5 4 10 5 12 8 4 6-1 13-9 12-3 0-7-3-12-4 4-5 6-10 9-16z">
          <text:p/>
        </draw:path>
        <draw:path draw:style-name="gr9" draw:text-style-name="P7" draw:layer="layout" svg:width="0.018cm" svg:height="0.02cm" svg:x="9.922cm" svg:y="29.144cm" svg:viewBox="0 0 19 21" svg:d="M4 0c6 2 11 3 13 7 4 5 1 11-6 14-4 1-11 0-11-5-1-4 2-11 4-16z">
          <text:p/>
        </draw:path>
        <draw:path draw:style-name="gr9" draw:text-style-name="P7" draw:layer="layout" svg:width="0.019cm" svg:height="0.021cm" svg:x="15.759cm" svg:y="27.101cm" svg:viewBox="0 0 20 22" svg:d="M20 12c-1 6-10 12-14 9-3-2-5-7-6-11 0-7 8-12 13-9 3 2 4 7 7 11z">
          <text:p/>
        </draw:path>
        <draw:path draw:style-name="gr9" draw:text-style-name="P7" draw:layer="layout" svg:width="0.018cm" svg:height="0.02cm" svg:x="10.212cm" svg:y="29.144cm" svg:viewBox="0 0 19 21" svg:d="M19 13c-1 6-9 11-14 7-3-2-5-6-5-9 0-8 9-13 13-10 3 2 4 8 6 12z">
          <text:p/>
        </draw:path>
        <draw:path draw:style-name="gr9" draw:text-style-name="P7" draw:layer="layout" svg:width="0.02cm" svg:height="0.019cm" svg:x="10.505cm" svg:y="29.145cm" svg:viewBox="0 0 21 20" svg:d="M21 12c-3 7-15 10-18 6-3-3-4-8-3-11 1-4 8-8 9-7 5 3 9 9 12 12z">
          <text:p/>
        </draw:path>
        <draw:path draw:style-name="gr9" draw:text-style-name="P7" draw:layer="layout" svg:width="0.018cm" svg:height="0.021cm" svg:x="10.797cm" svg:y="29.144cm" svg:viewBox="0 0 19 22" svg:d="M19 11c-2 4-3 8-6 10-4 3-14-4-13-9 1-3 3-9 6-11 5-3 12 2 13 10z">
          <text:p/>
        </draw:path>
        <draw:path draw:style-name="gr9" draw:text-style-name="P7" draw:layer="layout" svg:width="0.018cm" svg:height="0.02cm" svg:x="4.958cm" svg:y="27.102cm" svg:viewBox="0 0 19 21" svg:d="M19 8c-1 4-1 9-4 11-4 5-11 0-13-7-3-4-2-8 4-11 7-3 12 0 13 7z">
          <text:p/>
        </draw:path>
        <draw:path draw:style-name="gr9" draw:text-style-name="P7" draw:layer="layout" svg:width="0.02cm" svg:height="0.019cm" svg:x="2.329cm" svg:y="20.095cm" svg:viewBox="0 0 21 20" svg:d="M11 20c-8-2-14-10-9-15 2-2 7-5 10-5 6-1 12 8 8 13-1 3-6 5-9 7z">
          <text:p/>
        </draw:path>
        <draw:path draw:style-name="gr9" draw:text-style-name="P7" draw:layer="layout" svg:width="0.02cm" svg:height="0.018cm" svg:x="11.963cm" svg:y="13.089cm" svg:viewBox="0 0 21 19" svg:d="M7 0c6 2 11 3 13 7 4 5-1 12-9 12-4 0-7-3-11-4 3-5 5-11 7-15z">
          <text:p/>
        </draw:path>
        <draw:path draw:style-name="gr9" draw:text-style-name="P7" draw:layer="layout" svg:width="0.019cm" svg:height="0.02cm" svg:x="18.386cm" svg:y="20.093cm" svg:viewBox="0 0 20 21" svg:d="M6 0c6 3 11 5 13 8 4 5-1 13-9 13-4 0-10-5-10-6 1-5 4-10 6-15z">
          <text:p/>
        </draw:path>
        <draw:path draw:style-name="gr9" draw:text-style-name="P7" draw:layer="layout" svg:width="0.018cm" svg:height="0.02cm" svg:x="11.089cm" svg:y="29.144cm" svg:viewBox="0 0 19 21" svg:d="M19 14c-4 3-9 5-15 7-1-3-4-7-4-10 0-9 7-14 13-10 2 3 3 8 6 13z">
          <text:p/>
        </draw:path>
        <draw:path draw:style-name="gr9" draw:text-style-name="P7" draw:layer="layout" svg:width="0.019cm" svg:height="0.021cm" svg:x="2.33cm" svg:y="19.51cm" svg:viewBox="0 0 20 22" svg:d="M20 11c-2 3-4 8-7 11-5 2-14-5-13-10 0-3 3-7 6-10 5-5 12 1 14 9z">
          <text:p/>
        </draw:path>
        <draw:path draw:style-name="gr9" draw:text-style-name="P7" draw:layer="layout" svg:width="0.02cm" svg:height="0.019cm" svg:x="9.337cm" svg:y="29.144cm" svg:viewBox="0 0 21 20" svg:d="M8 0c5 3 10 4 11 7 5 6-1 14-8 13-3 0-11-4-11-5 1-6 5-10 8-15z">
          <text:p/>
        </draw:path>
        <draw:path draw:style-name="gr9" draw:text-style-name="P7" draw:layer="layout" svg:width="0.028cm" svg:height="0.025cm" svg:x="2.326cm" svg:y="20.676cm" svg:viewBox="0 0 29 26" svg:d="M29 13c-5 5-9 10-13 13-8 2-13-4-15-10-3-7 5-18 14-15 5 2 9 7 14 12z">
          <text:p/>
        </draw:path>
        <draw:path draw:style-name="gr9" draw:text-style-name="P7" draw:layer="layout" svg:width="0.021cm" svg:height="0.019cm" svg:x="18.385cm" svg:y="20.678cm" svg:viewBox="0 0 22 20" svg:d="M10 0c4 2 9 3 11 6 3 5-3 14-9 14-4 0-9-3-11-6-3-6 2-13 9-14z">
          <text:p/>
        </draw:path>
        <draw:path draw:style-name="gr9" draw:text-style-name="P7" draw:layer="layout" svg:width="0.019cm" svg:height="0.019cm" svg:x="15.175cm" svg:y="27.393cm" svg:viewBox="0 0 20 20" svg:d="M20 9c-2 4-3 8-6 10-5 2-14-3-14-9 1-3 3-8 6-9 7-4 13 1 14 8z">
          <text:p/>
        </draw:path>
        <draw:path draw:style-name="gr9" draw:text-style-name="P7" draw:layer="layout" svg:width="0.021cm" svg:height="0.019cm" svg:x="17.801cm" svg:y="23.89cm" svg:viewBox="0 0 22 20" svg:d="M11 0c3 2 8 3 10 7 3 5-3 13-9 13-5-1-9-3-11-6-3-5 2-13 10-14z">
          <text:p/>
        </draw:path>
        <draw:path draw:style-name="gr9" draw:text-style-name="P7" draw:layer="layout" svg:width="0.021cm" svg:height="0.017cm" svg:x="9.336cm" svg:y="13.09cm" svg:viewBox="0 0 22 18" svg:d="M9 18c-7-1-11-8-8-13 3-3 7-5 11-5 6 0 12 10 9 13s-8 4-12 5z">
          <text:p/>
        </draw:path>
        <draw:path draw:style-name="gr9" draw:text-style-name="P7" draw:layer="layout" svg:width="0.02cm" svg:height="0.018cm" svg:x="8.751cm" svg:y="13.089cm" svg:viewBox="0 0 21 19" svg:d="M8 0c5 2 9 3 12 7 4 5-1 12-9 12-3 0-7-3-11-4 3-5 5-11 8-15z">
          <text:p/>
        </draw:path>
        <draw:path draw:style-name="gr9" draw:text-style-name="P7" draw:layer="layout" svg:width="0.018cm" svg:height="0.019cm" svg:x="12.549cm" svg:y="13.381cm" svg:viewBox="0 0 19 20" svg:d="M3 20c-1-5-3-10-3-15 0-1 8-5 11-5 7 3 10 9 6 15-3 2-7 3-14 5z">
          <text:p/>
        </draw:path>
        <draw:path draw:style-name="gr9" draw:text-style-name="P7" draw:layer="layout" svg:width="0.025cm" svg:height="0.025cm" svg:x="17.799cm" svg:y="18.633cm" svg:viewBox="0 0 26 26" svg:d="M26 12c-2 4-4 10-10 13-6 4-16-4-16-13 0-8 5-11 11-12s14 4 15 12z">
          <text:p/>
        </draw:path>
        <draw:path draw:style-name="gr9" draw:text-style-name="P7" draw:layer="layout" svg:width="0.02cm" svg:height="0.02cm" svg:x="7.293cm" svg:y="28.56cm" svg:viewBox="0 0 21 21" svg:d="M21 9c-3 5-6 10-8 11-7 4-14-1-13-7 0-4 3-9 5-13 5 3 10 6 16 9z">
          <text:p/>
        </draw:path>
        <draw:path draw:style-name="gr9" draw:text-style-name="P7" draw:layer="layout" svg:width="0.018cm" svg:height="0.019cm" svg:x="6.71cm" svg:y="28.27cm" svg:viewBox="0 0 19 20" svg:d="M4 20c-2-6-4-11-4-16 0-2 7-4 11-4 8 1 11 8 6 13-2 3-8 5-13 7z">
          <text:p/>
        </draw:path>
        <draw:path draw:style-name="gr9" draw:text-style-name="P7" draw:layer="layout" svg:width="0.02cm" svg:height="0.019cm" svg:x="17.217cm" svg:y="25.349cm" svg:viewBox="0 0 21 20" svg:d="M10 20c-8-1-12-8-8-13 2-4 6-6 10-7 6 0 12 11 9 15-2 3-6 3-11 5z">
          <text:p/>
        </draw:path>
        <draw:path draw:style-name="gr9" draw:text-style-name="P7" draw:layer="layout" svg:width="0.02cm" svg:height="0.02cm" svg:x="3.497cm" svg:y="25.348cm" svg:viewBox="0 0 21 21" svg:d="M7 0c5 3 11 5 13 7 4 7-1 14-10 14-3 0-7-3-10-5 2-5 4-11 7-16z">
          <text:p/>
        </draw:path>
        <draw:path draw:style-name="gr9" draw:text-style-name="P7" draw:layer="layout" svg:width="0.021cm" svg:height="0.018cm" svg:x="14.589cm" svg:y="14.256cm" svg:viewBox="0 0 22 19" svg:d="M22 16c-6 2-12 4-16 3-5 0-8-6-5-11 3-6 10-10 15-6 2 3 3 8 6 14z">
          <text:p/>
        </draw:path>
        <draw:path draw:style-name="gr9" draw:text-style-name="P7" draw:layer="layout" svg:width="0.02cm" svg:height="0.02cm" svg:x="13.131cm" svg:y="28.56cm" svg:viewBox="0 0 21 21" svg:d="M21 9c-4 5-5 10-8 11-7 3-13-1-13-7 0-4 3-9 5-13 5 3 10 6 16 9z">
          <text:p/>
        </draw:path>
        <draw:path draw:style-name="gr9" draw:text-style-name="P7" draw:layer="layout" svg:width="0.02cm" svg:height="0.02cm" svg:x="4.082cm" svg:y="16.009cm" svg:viewBox="0 0 21 21" svg:d="M7 21c-3-6-5-11-7-16 0-1 7-5 11-5 8 0 13 8 9 13-2 3-8 4-13 8z">
          <text:p/>
        </draw:path>
        <draw:path draw:style-name="gr9" draw:text-style-name="P7" draw:layer="layout" svg:width="0.02cm" svg:height="0.02cm" svg:x="16.343cm" svg:y="26.516cm" svg:viewBox="0 0 21 21" svg:d="M21 13c-5 3-10 6-16 8-2-3-5-8-5-12 0-7 8-11 14-8 3 2 4 7 7 12z">
          <text:p/>
        </draw:path>
        <draw:path draw:style-name="gr9" draw:text-style-name="P7" draw:layer="layout" svg:width="0.019cm" svg:height="0.02cm" svg:x="5.25cm" svg:y="14.839cm" svg:viewBox="0 0 20 21" svg:d="M20 14c-6 2-10 5-15 7-2-3-5-7-5-11 0-7 7-12 12-9 4 2 5 7 8 13z">
          <text:p/>
        </draw:path>
        <draw:path draw:style-name="gr9" draw:text-style-name="P7" draw:layer="layout" svg:width="0.024cm" svg:height="0.025cm" svg:x="4.664cm" svg:y="26.514cm" svg:viewBox="0 0 25 26" svg:d="M25 11c-2 11-13 18-18 14s-7-11-7-17c-1-4 10-10 15-7 4 2 8 7 10 10z">
          <text:p/>
        </draw:path>
        <draw:path draw:style-name="gr9" draw:text-style-name="P7" draw:layer="layout" svg:width="0.026cm" svg:height="0.025cm" svg:x="16.34cm" svg:y="16.006cm" svg:viewBox="0 0 27 26" svg:d="M27 11c-3 5-6 11-11 14-6 4-16-3-16-13 0-7 4-11 11-12s11 4 16 11z">
          <text:p/>
        </draw:path>
        <draw:path draw:style-name="gr9" draw:text-style-name="P7" draw:layer="layout" svg:width="0.02cm" svg:height="0.018cm" svg:x="2.623cm" svg:y="23.307cm" svg:viewBox="0 0 21 19" svg:d="M21 13c-5 3-8 6-12 6-7 1-11-6-8-14 1-2 8-6 9-5 4 3 8 8 11 13z">
          <text:p/>
        </draw:path>
        <draw:path draw:style-name="gr9" draw:text-style-name="P7" draw:layer="layout" svg:width="0.019cm" svg:height="0.02cm" svg:x="4.372cm" svg:y="26.516cm" svg:viewBox="0 0 20 21" svg:d="M0 13c3-5 4-10 7-12 6-4 13 1 13 8 0 4-3 8-4 12-6-2-11-6-16-8z">
          <text:p/>
        </draw:path>
        <draw:path draw:style-name="gr9" draw:text-style-name="P7" draw:layer="layout" svg:width="0.028cm" svg:height="0.024cm" svg:x="4.079cm" svg:y="25.93cm" svg:viewBox="0 0 29 25" svg:d="M29 15c-6 5-10 9-15 10-9 3-16-8-13-16 1-5 10-11 15-8 5 4 8 8 13 14z">
          <text:p/>
        </draw:path>
        <draw:path draw:style-name="gr9" draw:text-style-name="P7" draw:layer="layout" svg:width="0.028cm" svg:height="0.024cm" svg:x="15.172cm" svg:y="14.837cm" svg:viewBox="0 0 29 25" svg:d="M29 13c-6 5-9 10-15 12-4 3-12-3-13-8-3-8 5-19 13-16 6 1 9 7 15 12z">
          <text:p/>
        </draw:path>
        <draw:path draw:style-name="gr9" draw:text-style-name="P7" draw:layer="layout" svg:width="0.024cm" svg:height="0.025cm" svg:x="12.545cm" svg:y="28.557cm" svg:viewBox="0 0 25 26" svg:d="M25 17c-3 3-6 7-11 9-4 2-15-3-14-8s4-13 8-17c5-4 16 4 17 16z">
          <text:p/>
        </draw:path>
        <draw:path draw:style-name="gr9" draw:text-style-name="P7" draw:layer="layout" svg:width="0.016cm" svg:height="0.019cm" svg:x="16.635cm" svg:y="25.932cm" svg:viewBox="0 0 17 20" svg:d="M16 0c0 6 2 11 1 18 0 1-8 3-11 2-6-1-8-10-3-15 2-3 7-3 13-5z">
          <text:p/>
        </draw:path>
        <draw:path draw:style-name="gr9" draw:text-style-name="P7" draw:layer="layout" svg:width="0.02cm" svg:height="0.019cm" svg:x="17.217cm" svg:y="16.882cm" svg:viewBox="0 0 21 20" svg:d="M21 13c-2 7-7 9-15 5-5-2-7-5-5-10 4-6 12-11 16-6 3 2 3 7 4 11z">
          <text:p/>
        </draw:path>
        <draw:path draw:style-name="gr9" draw:text-style-name="P7" draw:layer="layout" svg:width="0.025cm" svg:height="0.026cm" svg:x="3.494cm" svg:y="16.879cm" svg:viewBox="0 0 26 27" svg:d="M12 0c8 3 14 6 14 15 0 7-11 14-18 11-5-1-10-11-7-15 3-5 8-8 11-11z">
          <text:p/>
        </draw:path>
        <draw:path draw:style-name="gr9" draw:text-style-name="P7" draw:layer="layout" svg:width="0.02cm" svg:height="0.019cm" svg:x="3.497cm" svg:y="16.592cm" svg:viewBox="0 0 21 20" svg:d="M21 12c-5 4-10 7-15 8-1 0-5-8-6-11 0-6 7-11 14-8 3 2 4 6 7 11z">
          <text:p/>
        </draw:path>
        <draw:path draw:style-name="gr9" draw:text-style-name="P7" draw:layer="layout" svg:width="0.023cm" svg:height="0.016cm" svg:x="13.717cm" svg:y="13.673cm" svg:viewBox="0 0 24 17" svg:d="M24 16c-10 0-15 2-22 1-1 0-3-9-2-12 1-2 8-6 10-5 4 3 8 8 14 16z">
          <text:p/>
        </draw:path>
        <draw:path draw:style-name="gr9" draw:text-style-name="P7" draw:layer="layout" svg:width="0.024cm" svg:height="0.027cm" svg:x="4.664cm" svg:y="15.421cm" svg:viewBox="0 0 25 28" svg:d="M11 28c-4-6-10-10-11-15-2-9 8-15 17-12 5 1 10 10 7 15-2 4-7 7-13 12z">
          <text:p/>
        </draw:path>
        <draw:path draw:style-name="gr9" draw:text-style-name="P7" draw:layer="layout" svg:width="0.027cm" svg:height="0.025cm" svg:x="15.756cm" svg:y="15.421cm" svg:viewBox="0 0 28 26" svg:d="M28 12c-7 6-10 11-15 14-7 3-15-7-13-16 0-5 8-12 13-9 4 2 8 7 15 11z">
          <text:p/>
        </draw:path>
        <draw:path draw:style-name="gr9" draw:text-style-name="P7" draw:layer="layout" svg:width="0.026cm" svg:height="0.024cm" svg:x="17.799cm" svg:y="23.303cm" svg:viewBox="0 0 27 25" svg:d="M27 13c-2 3-5 10-9 11-5 1-12-2-16-6-5-5 2-17 10-18 7-2 13 3 15 13z">
          <text:p/>
        </draw:path>
        <draw:path draw:style-name="gr9" draw:text-style-name="P7" draw:layer="layout" svg:width="0.025cm" svg:height="0.024cm" svg:x="6.122cm" svg:y="14.253cm" svg:viewBox="0 0 26 25" svg:d="M26 12c-1 10-6 14-14 13-8 0-15-11-11-17 3-6 9-10 16-7 4 2 7 8 9 11z">
          <text:p/>
        </draw:path>
        <draw:path draw:style-name="gr9" draw:text-style-name="P7" draw:layer="layout" svg:width="0.024cm" svg:height="0.028cm" svg:x="13.128cm" svg:y="13.666cm" svg:viewBox="0 0 25 29" svg:d="M12 0c5 6 10 9 12 15 3 7-5 15-15 14-6-1-11-8-9-13s6-10 12-16z">
          <text:p/>
        </draw:path>
        <draw:path draw:style-name="gr9" draw:text-style-name="P7" draw:layer="layout" svg:width="0.021cm" svg:height="0.02cm" svg:x="17.511cm" svg:y="17.468cm" svg:viewBox="0 0 22 21" svg:d="M22 13c-6 3-10 6-13 8-6 0-10-8-8-14 2-3 8-7 9-7 4 4 7 9 12 13z">
          <text:p/>
        </draw:path>
        <draw:path draw:style-name="gr9" draw:text-style-name="P7" draw:layer="layout" svg:width="0.019cm" svg:height="0.016cm" svg:x="4.667cm" svg:y="15.133cm" svg:viewBox="0 0 20 17" svg:d="M19 14c-5 1-10 3-16 3-1 0-4-6-3-10 0-3 6-6 9-7 3 0 7 3 10 5 1 1 0 4 0 9z">
          <text:p/>
        </draw:path>
        <draw:path draw:style-name="gr9" draw:text-style-name="P7" draw:layer="layout" svg:width="0.018cm" svg:height="0.017cm" svg:x="14.301cm" svg:y="13.965cm" svg:viewBox="0 0 19 18" svg:d="M6 18c-2-3-6-6-6-9-2-7 6-11 13-7 4 2 8 6 3 11-2 3-7 3-10 5z">
          <text:p/>
        </draw:path>
        <draw:path draw:style-name="gr9" draw:text-style-name="P7" draw:layer="layout" svg:width="0.018cm" svg:height="0.018cm" svg:x="9.045cm" svg:y="13.089cm" svg:viewBox="0 0 19 19" svg:d="M19 11c-4 3-6 7-9 8-3 0-8-3-9-5-5-7 4-16 10-13 3 2 4 6 8 10z">
          <text:p/>
        </draw:path>
        <draw:path draw:style-name="gr9" draw:text-style-name="P7" draw:layer="layout" svg:width="0.018cm" svg:height="0.018cm" svg:x="14.007cm" svg:y="13.965cm" svg:viewBox="0 0 19 19" svg:d="M19 11c-2 7-7 10-14 6-3-2-6-7-5-10 2-7 9-9 15-5 2 1 3 6 4 9z">
          <text:p/>
        </draw:path>
        <draw:path draw:style-name="gr9" draw:text-style-name="P7" draw:layer="layout" svg:width="0.016cm" svg:height="0.019cm" svg:x="9.629cm" svg:y="29.144cm" svg:viewBox="0 0 17 20" svg:d="M15 0c0 6 2 11 1 17-1 2-8 4-11 3-6-1-7-10-3-15 2-3 6-3 13-5z">
          <text:p/>
        </draw:path>
        <draw:path draw:style-name="gr9" draw:text-style-name="P7" draw:layer="layout" svg:width="0.016cm" svg:height="0.018cm" svg:x="6.42cm" svg:y="13.965cm" svg:viewBox="0 0 17 19" svg:d="M10 0c2 4 6 6 7 9 1 6-8 13-14 8-2-2-4-8-3-11 0-2 7-3 10-6z">
          <text:p/>
        </draw:path>
        <draw:path draw:style-name="gr9" draw:text-style-name="P7" draw:layer="layout" svg:width="0.018cm" svg:height="0.019cm" svg:x="5.834cm" svg:y="27.687cm" svg:viewBox="0 0 19 20" svg:d="M19 5c-3 6-3 11-6 13-4 4-13-1-13-8 0-3 3-11 4-10 6 0 10 3 15 5z">
          <text:p/>
        </draw:path>
        <draw:path draw:style-name="gr9" draw:text-style-name="P7" draw:layer="layout" svg:width="0.017cm" svg:height="0.017cm" svg:x="9.629cm" svg:y="13.089cm" svg:viewBox="0 0 18 18" svg:d="M7 18c-3-3-7-6-7-10 0-6 8-11 14-7 3 2 5 9 4 12s-8 3-11 5z">
          <text:p/>
        </draw:path>
        <draw:path draw:style-name="gr9" draw:text-style-name="P7" draw:layer="layout" svg:width="0.019cm" svg:height="0.017cm" svg:x="16.927cm" svg:y="25.643cm" svg:viewBox="0 0 20 18" svg:d="M17 14c-3 1-8 4-13 4-1 0-4-8-4-11 0-6 7-8 15-6 5 2 7 5 2 13z">
          <text:p/>
        </draw:path>
        <draw:path draw:style-name="gr9" draw:text-style-name="P7" draw:layer="layout" svg:width="0.017cm" svg:height="0.021cm" svg:x="14.884cm" svg:y="27.685cm" svg:viewBox="0 0 18 22" svg:d="M18 11c-2 7-9 13-13 10-3-3-5-7-5-10-2-8 6-13 12-10 2 2 3 7 6 10z">
          <text:p/>
        </draw:path>
        <draw:path draw:style-name="gr9" draw:text-style-name="P7" draw:layer="layout" svg:width="0.019cm" svg:height="0.017cm" svg:x="3.789cm" svg:y="16.299cm" svg:viewBox="0 0 20 18" svg:d="M20 16c-5 1-10 3-15 2-6 0-7-6-3-10 3-7 9-10 13-6 2 2 3 7 5 14z">
          <text:p/>
        </draw:path>
        <draw:path draw:style-name="gr9" draw:text-style-name="P7" draw:layer="layout" svg:width="0.02cm" svg:height="0.018cm" svg:x="16.926cm" svg:y="16.299cm" svg:viewBox="0 0 21 19" svg:d="M21 15c-5 2-10 4-15 4-6-1-7-7-5-11 4-8 9-10 14-6 3 2 4 7 6 13z">
          <text:p/>
        </draw:path>
        <draw:path draw:style-name="gr9" draw:text-style-name="P7" draw:layer="layout" svg:width="0.017cm" svg:height="0.018cm" svg:x="18.095cm" svg:y="23.014cm" svg:viewBox="0 0 18 19" svg:d="M18 10c-3 4-5 8-9 9-5 1-11-7-9-13 3-5 7-7 11-5 3 2 5 6 7 9z">
          <text:p/>
        </draw:path>
        <draw:path draw:style-name="gr9" draw:text-style-name="P7" draw:layer="layout" svg:width="0.019cm" svg:height="0.021cm" svg:x="17.218cm" svg:y="25.057cm" svg:viewBox="0 0 20 22" svg:d="M14 0c2 4 6 7 6 11-1 8-8 13-14 9-2-3-5-8-6-11 0-5 9-10 14-9z">
          <text:p/>
        </draw:path>
        <draw:path draw:style-name="gr9" draw:text-style-name="P7" draw:layer="layout" svg:width="0.016cm" svg:height="0.02cm" svg:x="18.097cm" svg:y="19.218cm" svg:viewBox="0 0 17 21" svg:d="M3 0c7 4 12 5 13 7 3 6-1 11-6 13-6 3-10 0-10-4 0-5 2-10 3-16z">
          <text:p/>
        </draw:path>
        <draw:path draw:style-name="gr9" draw:text-style-name="P7" draw:layer="layout" svg:width="0.02cm" svg:height="0.018cm" svg:x="5.833cm" svg:y="14.257cm" svg:viewBox="0 0 21 19" svg:d="M21 12c-5 3-8 7-13 7-6 0-10-7-7-14 2-2 8-6 10-5 3 3 6 7 10 12z">
          <text:p/>
        </draw:path>
        <draw:path draw:style-name="gr9" draw:text-style-name="P7" draw:layer="layout" svg:width="0.019cm" svg:height="0.019cm" svg:x="16.634cm" svg:y="16.009cm" svg:viewBox="0 0 20 20" svg:d="M20 8c-1 4-2 10-4 11-7 4-11-1-14-7-3-5-2-9 4-11 8-2 13 0 14 7z">
          <text:p/>
        </draw:path>
        <draw:path draw:style-name="gr9" draw:text-style-name="P7" draw:layer="layout" svg:width="0.02cm" svg:height="0.019cm" svg:x="4.372cm" svg:y="15.424cm" svg:viewBox="0 0 21 20" svg:d="M21 7c-2 5-3 10-5 12-6 3-12-1-15-7-2-6-1-10 5-11 8-2 13 0 15 6z">
          <text:p/>
        </draw:path>
        <draw:path draw:style-name="gr9" draw:text-style-name="P7" draw:layer="layout" svg:width="0.018cm" svg:height="0.02cm" svg:x="2.33cm" svg:y="19.801cm" svg:viewBox="0 0 19 21" svg:d="M14 0c2 5 5 9 5 13 0 7-7 10-13 7-3-2-7-8-6-9 3-5 9-7 14-11z">
          <text:p/>
        </draw:path>
        <draw:path draw:style-name="gr9" draw:text-style-name="P7" draw:layer="layout" svg:width="0.022cm" svg:height="0.016cm" svg:x="11.089cm" svg:y="13.09cm" svg:viewBox="0 0 23 17" svg:d="M23 15c-9 1-15 2-20 1-2 0-4-8-3-11 1-2 7-6 8-5 5 3 9 7 15 15z">
          <text:p/>
        </draw:path>
        <draw:path draw:style-name="gr9" draw:text-style-name="P7" draw:layer="layout" svg:width="0.023cm" svg:height="0.018cm" svg:x="11.375cm" svg:y="13.089cm" svg:viewBox="0 0 24 19" svg:d="M0 12c8-5 12-10 17-12 1 0 7 7 7 10s-4 9-5 9c-6-1-10-3-19-7z">
          <text:p/>
        </draw:path>
        <draw:path draw:style-name="gr9" draw:text-style-name="P7" draw:layer="layout" svg:width="0.019cm" svg:height="0.018cm" svg:x="11.672cm" svg:y="13.089cm" svg:viewBox="0 0 20 19" svg:d="M20 13c-5 2-8 5-11 6-7 0-11-7-7-14 3-5 7-7 11-4 3 2 5 8 7 12z">
          <text:p/>
        </draw:path>
        <draw:path draw:style-name="gr9" draw:text-style-name="P7" draw:layer="layout" svg:width="0.018cm" svg:height="0.02cm" svg:x="14.007cm" svg:y="28.269cm" svg:viewBox="0 0 19 21" svg:d="M14 0c2 5 5 8 5 11 0 8-7 13-12 8-4-2-7-6-7-9-1-5 9-11 14-10z">
          <text:p/>
        </draw:path>
        <draw:path draw:style-name="gr9" draw:text-style-name="P7" draw:layer="layout" svg:width="0.018cm" svg:height="0.019cm" svg:x="13.717cm" svg:y="28.27cm" svg:viewBox="0 0 19 20" svg:d="M19 5c1 10-7 17-13 14-3-1-6-5-6-10-1-3 3-9 4-9 6 1 11 3 15 5z">
          <text:p/>
        </draw:path>
        <draw:path draw:style-name="gr9" draw:text-style-name="P7" draw:layer="layout" svg:width="0.019cm" svg:height="0.018cm" svg:x="16.052cm" svg:y="15.424cm" svg:viewBox="0 0 20 19" svg:d="M9 0c3 2 9 3 11 5 2 4-4 15-9 14-3 0-7-3-9-6-4-6 0-12 7-13z">
          <text:p/>
        </draw:path>
        <draw:path draw:style-name="gr9" draw:text-style-name="P7" draw:layer="layout" svg:width="0.02cm" svg:height="0.019cm" svg:x="16.343cm" svg:y="15.716cm" svg:viewBox="0 0 21 20" svg:d="M5 0c10-1 18 8 15 12-2 3-6 6-9 8-3 0-11-5-11-6 1-5 4-9 5-14z">
          <text:p/>
        </draw:path>
        <draw:path draw:style-name="gr9" draw:text-style-name="P7" draw:layer="layout" svg:width="0.019cm" svg:height="0.017cm" svg:x="4.083cm" svg:y="26.227cm" svg:viewBox="0 0 20 18" svg:d="M18 14c-3 1-9 4-14 4-2-2-5-8-4-11 2-7 8-8 15-5 5 2 6 5 3 12z">
          <text:p/>
        </draw:path>
        <draw:path draw:style-name="gr9" draw:text-style-name="P7" draw:layer="layout" svg:width="0.02cm" svg:height="0.017cm" svg:x="2.329cm" svg:y="20.389cm" svg:viewBox="0 0 21 18" svg:d="M11 18c-7-2-14-9-9-12 2-4 6-6 10-6 6-1 12 7 8 12-1 3-6 4-9 6z">
          <text:p/>
        </draw:path>
        <draw:path draw:style-name="gr9" draw:text-style-name="P7" draw:layer="layout" svg:width="0.021cm" svg:height="0.017cm" svg:x="18.385cm" svg:y="20.388cm" svg:viewBox="0 0 22 18" svg:d="M11 0c3 2 8 3 10 7 3 4-3 11-10 11-3 0-8-2-10-5-3-5 2-12 10-13z">
          <text:p/>
        </draw:path>
        <draw:path draw:style-name="gr9" draw:text-style-name="P7" draw:layer="layout" svg:width="0.02cm" svg:height="0.018cm" svg:x="13.422cm" svg:y="28.561cm" svg:viewBox="0 0 21 19" svg:d="M21 13c-2 6-7 8-15 6-6-2-7-6-5-11 5-6 9-10 15-6 3 1 3 7 5 11z">
          <text:p/>
        </draw:path>
        <draw:path draw:style-name="gr9" draw:text-style-name="P7" draw:layer="layout" svg:width="0.018cm" svg:height="0.019cm" svg:x="5.25cm" svg:y="27.392cm" svg:viewBox="0 0 19 20" svg:d="M6 20c-6-3-7-9-5-15 2-5 5-6 10-4 6 3 10 8 6 15-1 2-7 3-11 4z">
          <text:p/>
        </draw:path>
        <draw:path draw:style-name="gr9" draw:text-style-name="P7" draw:layer="layout" svg:width="0.017cm" svg:height="0.018cm" svg:x="8.462cm" svg:y="28.853cm" svg:viewBox="0 0 18 19" svg:d="M8 0c3 3 9 5 10 8 1 7-10 14-15 10-2-2-4-7-3-12 0-2 5-4 8-6z">
          <text:p/>
        </draw:path>
        <draw:path draw:style-name="gr9" draw:text-style-name="P7" draw:layer="layout" svg:width="0.019cm" svg:height="0.02cm" svg:x="2.624cm" svg:y="18.635cm" svg:viewBox="0 0 20 21" svg:d="M20 12c-5 4-10 6-15 9-2-4-5-8-5-12-1-7 5-11 13-8 3 1 4 6 7 11z">
          <text:p/>
        </draw:path>
        <draw:path draw:style-name="gr9" draw:text-style-name="P7" draw:layer="layout" svg:width="0.016cm" svg:height="0.021cm" svg:x="3.791cm" svg:y="25.932cm" svg:viewBox="0 0 17 22" svg:d="M17 10c-1 3-2 9-4 11-5 3-14-4-13-10 0-3 2-7 5-10 5-3 11 2 12 9z">
          <text:p/>
        </draw:path>
        <draw:path draw:style-name="gr9" draw:text-style-name="P7" draw:layer="layout" svg:width="0.019cm" svg:height="0.019cm" svg:x="17.512cm" svg:y="24.474cm" svg:viewBox="0 0 20 20" svg:d="M5 20c-1-4-4-10-5-15 0-1 6-5 9-5 5 1 9 4 10 7 3 5-4 14-14 13z">
          <text:p/>
        </draw:path>
        <draw:path draw:style-name="gr9" draw:text-style-name="P7" draw:layer="layout" svg:width="0.019cm" svg:height="0.02cm" svg:x="7.584cm" svg:y="28.56cm" svg:viewBox="0 0 20 21" svg:d="M20 13c-1 7-6 10-13 7-6-1-8-5-6-9 3-7 11-13 14-10s4 7 5 12z">
          <text:p/>
        </draw:path>
        <draw:path draw:style-name="gr9" draw:text-style-name="P7" draw:layer="layout" svg:width="0.017cm" svg:height="0.016cm" svg:x="16.052cm" svg:y="26.81cm" svg:viewBox="0 0 18 17" svg:d="M18 9c-2 2-5 7-8 8-7 1-12-8-9-13 2-3 9-5 12-4 2 0 3 6 5 9z">
          <text:p/>
        </draw:path>
        <draw:path draw:style-name="gr9" draw:text-style-name="P7" draw:layer="layout" svg:width="0.017cm" svg:height="0.018cm" svg:x="3.208cm" svg:y="17.177cm" svg:viewBox="0 0 18 19" svg:d="M10 0c2 3 6 5 8 8 2 6-8 14-13 9-3-2-6-7-4-10 0-3 6-4 9-7z">
          <text:p/>
        </draw:path>
        <draw:path draw:style-name="gr9" draw:text-style-name="P7" draw:layer="layout" svg:width="0.02cm" svg:height="0.015cm" svg:x="11.963cm" svg:y="28.855cm" svg:viewBox="0 0 21 16" svg:d="M21 3c-2 5-3 11-5 12-6 3-13 1-15-6-2-5-1-9 4-9 6 0 11 2 16 3z">
          <text:p/>
        </draw:path>
        <draw:path draw:style-name="gr9" draw:text-style-name="P7" draw:layer="layout" svg:width="0.018cm" svg:height="0.02cm" svg:x="2.624cm" svg:y="18.341cm" svg:viewBox="0 0 19 21" svg:d="M5 0c5 3 9 5 12 8 5 5 1 10-6 12-4 2-10 1-11-3 0-5 4-10 5-17z">
          <text:p/>
        </draw:path>
        <draw:path draw:style-name="gr9" draw:text-style-name="P7" draw:layer="layout" svg:width="0.02cm" svg:height="0.017cm" svg:x="4.666cm" svg:y="26.811cm" svg:viewBox="0 0 21 18" svg:d="M9 18c-7-1-11-8-8-14 2-3 7-5 10-4 7 0 12 9 9 13-3 2-7 3-11 5z">
          <text:p/>
        </draw:path>
        <draw:path draw:style-name="gr9" draw:text-style-name="P7" draw:layer="layout" svg:width="0.015cm" svg:height="0.017cm" svg:x="12.258cm" svg:y="28.853cm" svg:viewBox="0 0 16 18" svg:d="M5 18c-2-4-5-7-5-10 0-8 9-11 14-6 2 3 3 9 2 11-2 2-7 3-11 5z">
          <text:p/>
        </draw:path>
        <draw:path draw:style-name="gr9" draw:text-style-name="P7" draw:layer="layout" svg:width="0.02cm" svg:height="0.017cm" svg:x="12.548cm" svg:y="28.854cm" svg:viewBox="0 0 21 18" svg:d="M21 7c-4 4-5 9-8 10-6 3-13-1-13-8 0-3 5-9 6-9 5 0 9 3 15 7z">
          <text:p/>
        </draw:path>
        <draw:path draw:style-name="gr9" draw:text-style-name="P7" draw:layer="layout" svg:width="0.018cm" svg:height="0.018cm" svg:x="15.176cm" svg:y="14.549cm" svg:viewBox="0 0 19 19" svg:d="M19 10c-1 6-7 11-13 8-3-2-6-6-6-9-1-5 8-11 13-9 3 1 4 7 6 10z">
          <text:p/>
        </draw:path>
        <draw:path draw:style-name="gr9" draw:text-style-name="P7" draw:layer="layout" svg:width="0.017cm" svg:height="0.019cm" svg:x="2.624cm" svg:y="23.598cm" svg:viewBox="0 0 18 20" svg:d="M9 0c3 3 7 5 9 9 2 5-7 13-12 10-4-2-6-8-6-11s6-5 9-8z">
          <text:p/>
        </draw:path>
        <draw:path draw:style-name="gr9" draw:text-style-name="P7" draw:layer="layout" svg:width="0.02cm" svg:height="0.02cm" svg:x="2.33cm" svg:y="22.43cm" svg:viewBox="0 0 21 21" svg:d="M21 11c-3 8-9 13-14 8-3-2-5-6-7-10-1-4 10-12 14-8 3 2 4 7 7 10z">
          <text:p/>
        </draw:path>
        <draw:path draw:style-name="gr9" draw:text-style-name="P7" draw:layer="layout" svg:width="0.018cm" svg:height="0.018cm" svg:x="5.542cm" svg:y="14.55cm" svg:viewBox="0 0 19 19" svg:d="M19 12c-2 6-7 9-14 5-3-2-6-8-5-10 2-6 8-9 15-6 2 1 3 6 4 11z">
          <text:p/>
        </draw:path>
        <draw:path draw:style-name="gr9" draw:text-style-name="P7" draw:layer="layout" svg:width="0.018cm" svg:height="0.019cm" svg:x="7.002cm" svg:y="13.672cm" svg:viewBox="0 0 19 20" svg:d="M7 20c-7-3-9-7-6-14 2-5 5-7 11-5s8 8 6 14c-1 2-8 4-11 5z">
          <text:p/>
        </draw:path>
        <draw:path draw:style-name="gr9" draw:text-style-name="P7" draw:layer="layout" svg:width="0.021cm" svg:height="0.019cm" svg:x="14.299cm" svg:y="27.976cm" svg:viewBox="0 0 22 20" svg:d="M22 15c-6 2-12 5-17 5-5-1-6-7-4-12 3-7 9-11 14-5 3 2 4 7 7 12z">
          <text:p/>
        </draw:path>
        <draw:path draw:style-name="gr9" draw:text-style-name="P7" draw:layer="layout" svg:width="0.017cm" svg:height="0.021cm" svg:x="18.096cm" svg:y="23.306cm" svg:viewBox="0 0 18 22" svg:d="M18 11c-2 4-3 8-5 10-6 3-13-2-13-8 0-4 2-9 5-12 4-3 12 3 13 10z">
          <text:p/>
        </draw:path>
        <draw:path draw:style-name="gr9" draw:text-style-name="P7" draw:layer="layout" svg:width="0.019cm" svg:height="0.017cm" svg:x="3.207cm" svg:y="24.767cm" svg:viewBox="0 0 20 18" svg:d="M13 18c-4-1-10-1-12-4-4-5 1-15 8-14 3 0 7 3 9 7 3 5 0 9-5 11z">
          <text:p/>
        </draw:path>
        <draw:path draw:style-name="gr9" draw:text-style-name="P7" draw:layer="layout" svg:width="0.02cm" svg:height="0.019cm" svg:x="13.422cm" svg:y="13.673cm" svg:viewBox="0 0 21 20" svg:d="M21 13c-2 7-7 8-15 6-6-3-7-6-5-11 5-6 9-11 16-6 2 1 2 7 4 11z">
          <text:p/>
        </draw:path>
        <draw:path draw:style-name="gr9" draw:text-style-name="P7" draw:layer="layout" svg:width="0.019cm" svg:height="0.019cm" svg:x="17.512cm" svg:y="24.766cm" svg:viewBox="0 0 20 20" svg:d="M20 7c-3 6-4 10-7 12-7 2-13-1-13-9 0-3 3-7 5-10 4 2 10 5 15 7z">
          <text:p/>
        </draw:path>
        <draw:path draw:style-name="gr9" draw:text-style-name="P7" draw:layer="layout" svg:width="0.017cm" svg:height="0.02cm" svg:x="3.208cm" svg:y="25.057cm" svg:viewBox="0 0 18 21" svg:d="M4 0c5 2 11 3 13 6 2 5-2 11-8 14-4 2-8 0-9-5 0-5 2-10 4-15z">
          <text:p/>
        </draw:path>
        <draw:path draw:style-name="gr9" draw:text-style-name="P7" draw:layer="layout" svg:width="0.018cm" svg:height="0.018cm" svg:x="12.84cm" svg:y="13.381cm" svg:viewBox="0 0 19 19" svg:d="M8 0c3 2 9 2 10 4 2 7 0 13-6 15-2 1-7-2-10-5-4-6-1-12 6-14z">
          <text:p/>
        </draw:path>
        <draw:path draw:style-name="gr9" draw:text-style-name="P7" draw:layer="layout" svg:width="0.02cm" svg:height="0.02cm" svg:x="7.878cm" svg:y="13.38cm" svg:viewBox="0 0 21 21" svg:d="M21 13c-6 3-11 6-16 8-2-3-5-7-5-11 0-7 6-12 13-9 2 2 5 7 8 12z">
          <text:p/>
        </draw:path>
        <draw:path draw:style-name="gr9" draw:text-style-name="P7" draw:layer="layout" svg:width="0.018cm" svg:height="0.02cm" svg:x="7.585cm" svg:y="13.38cm" svg:viewBox="0 0 19 21" svg:d="M19 12c-1 7-8 12-12 8-3-3-6-7-7-10-1-6 10-12 14-9 3 2 3 7 5 11z">
          <text:p/>
        </draw:path>
        <draw:path draw:style-name="gr9" draw:text-style-name="P7" draw:layer="layout" svg:width="0.018cm" svg:height="0.017cm" svg:x="18.096cm" svg:y="18.928cm" svg:viewBox="0 0 19 18" svg:d="M0 7c3-2 6-6 9-7 6-1 13 10 8 14-2 3-8 5-11 4s-4-6-6-11z">
          <text:p/>
        </draw:path>
        <draw:path draw:style-name="gr9" draw:text-style-name="P7" draw:layer="layout" svg:width="0.019cm" svg:height="0.019cm" svg:x="8.168cm" svg:y="28.853cm" svg:viewBox="0 0 20 20" svg:d="M20 8c-2 5-3 9-6 11-4 3-14-4-14-10 1-3 4-7 6-8 6-3 13 1 14 7z">
          <text:p/>
        </draw:path>
        <draw:path draw:style-name="gr9" draw:text-style-name="P7" draw:layer="layout" svg:width="0.019cm" svg:height="0.018cm" svg:x="16.927cm" svg:y="16.593cm" svg:viewBox="0 0 20 19" svg:d="M6 19c-2-4-5-8-6-14 0-1 7-5 10-5s7 3 9 6c4 6-5 14-13 13z">
          <text:p/>
        </draw:path>
        <draw:path draw:style-name="gr9" draw:text-style-name="P7" draw:layer="layout" svg:width="0.02cm" svg:height="0.018cm" svg:x="18.095cm" svg:y="22.723cm" svg:viewBox="0 0 21 19" svg:d="M21 12c-5 4-9 7-12 7-7 0-11-7-8-13 1-3 7-6 8-6 4 3 8 8 12 12z">
          <text:p/>
        </draw:path>
        <draw:polygon draw:style-name="gr9" draw:text-style-name="P7" draw:layer="layout" svg:width="0.004cm" svg:height="0.004cm" svg:x="4.67cm" svg:y="14.847cm" svg:viewBox="0 0 5 5" draw:points="0,0 5,0 2,5">
          <text:p/>
        </draw:polygon>
        <draw:path draw:style-name="gr9" draw:text-style-name="P7" draw:layer="layout" svg:width="0.006cm" svg:height="0.007cm" svg:x="15.473cm" svg:y="27.689cm" svg:viewBox="0 0 7 8" svg:d="M7 7c-1 0-5 1-5 1-4-6-3-9 4-8 1 1 1 5 1 7z">
          <text:p/>
        </draw:path>
        <draw:path draw:style-name="gr9" draw:text-style-name="P7" draw:layer="layout" svg:width="0.006cm" svg:height="0.009cm" svg:x="18.686cm" svg:y="21.268cm" svg:viewBox="0 0 7 10" svg:d="M7 5c-1 1-3 4-4 5-4-4-4-7 1-10 0 2 2 3 3 5z">
          <text:p/>
        </draw:path>
        <draw:path draw:style-name="gr9" draw:text-style-name="P7" draw:layer="layout" svg:width="0.007cm" svg:height="0.007cm" svg:x="11.676cm" svg:y="12.801cm" svg:viewBox="0 0 8 8" svg:d="M8 6c-2 2-4 3-6 2-3-6-2-9 5-7 0 0 0 3 1 5z">
          <text:p/>
        </draw:path>
        <draw:polygon draw:style-name="gr9" draw:text-style-name="P7" draw:layer="layout" svg:width="0.004cm" svg:height="0.003cm" svg:x="18.391cm" svg:y="22.149cm" svg:viewBox="0 0 5 4" draw:points="0,1 5,0 5,4">
          <text:p/>
        </draw:polygon>
        <draw:polygon draw:style-name="gr9" draw:text-style-name="P7" draw:layer="layout" svg:width="0.004cm" svg:height="0.007cm" svg:x="16.06cm" svg:y="14.847cm" svg:viewBox="0 0 5 8" draw:points="1,8 0,0 5,2">
          <text:p/>
        </draw:polygon>
        <draw:path draw:style-name="gr9" draw:text-style-name="P7" draw:layer="layout" svg:width="0.015cm" svg:height="0.017cm" svg:x="15.468cm" svg:y="14.84cm" svg:viewBox="0 0 16 18" svg:d="M6 18c-5-1-7-5-5-10 2-3 4-7 7-8 5-1 10 9 8 14-2 3-6 3-10 4z">
          <text:p/>
        </draw:path>
        <draw:path draw:style-name="gr9" draw:text-style-name="P7" draw:layer="layout" svg:width="0.006cm" svg:height="0.008cm" svg:x="9.05cm" svg:y="12.8cm" svg:viewBox="0 0 7 9" svg:d="M5 0c1 1 4 3 2 5 0 2-2 3-4 4-4-4-4-8 2-9z">
          <text:p/>
        </draw:path>
        <draw:polygon draw:style-name="gr9" draw:text-style-name="P7" draw:layer="layout" svg:width="0.005cm" svg:height="0.003cm" svg:x="9.925cm" svg:y="12.801cm" svg:viewBox="0 0 6 4" draw:points="6,4 0,1 6,0">
          <text:p/>
        </draw:polygon>
        <draw:polygon draw:style-name="gr9" draw:text-style-name="P7" draw:layer="layout" svg:width="0.004cm" svg:height="0.003cm" svg:x="11.972cm" svg:y="12.801cm" svg:viewBox="0 0 5 4" draw:points="0,1 5,0 4,4">
          <text:p/>
        </draw:polygon>
        <draw:polygon draw:style-name="gr9" draw:text-style-name="P7" draw:layer="layout" svg:width="0.006cm" svg:height="0.003cm" svg:x="9.345cm" svg:y="12.801cm" svg:viewBox="0 0 7 4" draw:points="0,1 7,0 5,4">
          <text:p/>
        </draw:polygon>
        <draw:path draw:style-name="gr9" draw:text-style-name="P7" draw:layer="layout" svg:width="0.006cm" svg:height="0.007cm" svg:x="9.635cm" svg:y="12.8cm" svg:viewBox="0 0 7 8" svg:d="M2 8c-1-2-2-4-2-6 1-1 3-1 6-2 0 2 1 4 1 6 0 0-4 2-5 2z">
          <text:p/>
        </draw:path>
        <draw:path draw:style-name="gr9" draw:text-style-name="P7" draw:layer="layout" svg:width="0.005cm" svg:height="0.006cm" svg:x="16.931cm" svg:y="25.942cm" svg:viewBox="0 0 6 7" svg:d="M5 7c-3-1-5-1-5-3 0-1 1-3 2-4 2 0 4 1 4 2s-1 2-1 5z">
          <text:p/>
        </draw:path>
        <draw:path draw:style-name="gr9" draw:text-style-name="P7" draw:layer="layout" svg:width="0.004cm" svg:height="0.006cm" svg:x="2.043cm" svg:y="21.269cm" svg:viewBox="0 0 5 7" svg:d="M5 6c-1 0-3 1-4 1-1-1-2-5-1-5 4-3 5-2 5 4z">
          <text:p/>
        </draw:path>
        <draw:path draw:style-name="gr9" draw:text-style-name="P7" draw:layer="layout" svg:width="0.005cm" svg:height="0.006cm" svg:x="14.889cm" svg:y="14.264cm" svg:viewBox="0 0 6 7" svg:d="M2 0c1 0 4 2 4 2 0 2-1 4-1 5-2 0-5-1-5-1 0-2 1-4 2-6z">
          <text:p/>
        </draw:path>
        <draw:path draw:style-name="gr9" draw:text-style-name="P7" draw:layer="layout" svg:width="0.006cm" svg:height="0.01cm" svg:x="18.685cm" svg:y="21.849cm" svg:viewBox="0 0 7 11" svg:d="M7 5c-1 2-2 4-3 6-1-2-4-4-4-6s3-3 4-5c1 2 2 3 3 5z">
          <text:p/>
        </draw:path>
        <draw:polygon draw:style-name="gr9" draw:text-style-name="P7" draw:layer="layout" svg:width="0.007cm" svg:height="0.005cm" svg:x="6.132cm" svg:y="28.274cm" svg:viewBox="0 0 8 6" draw:points="0,1 8,0 6,6">
          <text:p/>
        </draw:polygon>
        <draw:path draw:style-name="gr9" draw:text-style-name="P7" draw:layer="layout" svg:width="0.006cm" svg:height="0.007cm" svg:x="12.262cm" svg:y="29.152cm" svg:viewBox="0 0 7 8" svg:d="M3 0c1 1 3 1 3 2 2 2 0 4-1 6-1 0-5-1-5-1 0-3 2-5 3-7z">
          <text:p/>
        </draw:path>
        <draw:path draw:style-name="gr9" draw:text-style-name="P7" draw:layer="layout" svg:width="0.017cm" svg:height="0.014cm" svg:x="18.386cm" svg:y="20.974cm" svg:viewBox="0 0 18 15" svg:d="M18 5c-2 3-3 8-5 9-4 4-15-3-13-7 1-3 5-7 8-7 3-1 6 4 10 5z">
          <text:p/>
        </draw:path>
        <draw:path draw:style-name="gr9" draw:text-style-name="P7" draw:layer="layout" svg:width="0.005cm" svg:height="0.007cm" svg:x="11.677cm" svg:y="29.152cm" svg:viewBox="0 0 6 8" svg:d="M3 0c1 1 3 1 3 2 0 2 0 4-1 6-1 0-5-1-5-1 0-3 2-5 3-7z">
          <text:p/>
        </draw:path>
        <draw:polygon draw:style-name="gr9" draw:text-style-name="P7" draw:layer="layout" svg:width="0.005cm" svg:height="0.005cm" svg:x="4.967cm" svg:y="14.845cm" svg:viewBox="0 0 6 6" draw:points="4,0 6,6 0,6">
          <text:p/>
        </draw:polygon>
        <draw:path draw:style-name="gr9" draw:text-style-name="P7" draw:layer="layout" svg:width="0.009cm" svg:height="0.005cm" svg:x="9.343cm" svg:y="29.443cm" svg:viewBox="0 0 10 6" svg:d="M10 4c-1 1-3 2-5 2s-3-2-5-4c2-1 5-2 6-2 2 1 3 2 4 4z">
          <text:p/>
        </draw:path>
        <draw:polygon draw:style-name="gr9" draw:text-style-name="P7" draw:layer="layout" svg:width="0.005cm" svg:height="0.005cm" svg:x="3.502cm" svg:y="25.647cm" svg:viewBox="0 0 6 6" draw:points="6,0 6,6 0,4">
          <text:p/>
        </draw:polygon>
        <draw:polygon draw:style-name="gr9" draw:text-style-name="P7" draw:layer="layout" svg:width="0.005cm" svg:height="0.004cm" svg:x="6.714cm" svg:y="28.572cm" svg:viewBox="0 0 6 5" draw:points="0,3 6,0 5,5">
          <text:p/>
        </draw:polygon>
        <draw:polygon draw:style-name="gr9" draw:text-style-name="P7" draw:layer="layout" svg:width="0.003cm" svg:height="0.005cm" svg:x="2.341cm" svg:y="23.895cm" svg:viewBox="0 0 4 6" draw:points="0,5 3,0 4,6">
          <text:p/>
        </draw:polygon>
        <draw:polygon draw:style-name="gr9" draw:text-style-name="P7" draw:layer="layout" svg:width="0.005cm" svg:height="0.005cm" svg:x="18.39cm" svg:y="22.435cm" svg:viewBox="0 0 6 6" draw:points="6,0 6,6 0,4">
          <text:p/>
        </draw:polygon>
        <draw:path draw:style-name="gr9" draw:text-style-name="P7" draw:layer="layout" svg:width="0.004cm" svg:height="0.006cm" svg:x="2.628cm" svg:y="23.896cm" svg:viewBox="0 0 5 7" svg:d="M1 0c2 1 4 1 4 3 0 1-1 3-1 4-1-1-4-1-4-2s1-2 1-5z">
          <text:p/>
        </draw:path>
        <draw:path draw:style-name="gr9" draw:text-style-name="P7" draw:layer="layout" svg:width="0.017cm" svg:height="0.014cm" svg:x="15.759cm" svg:y="15.135cm" svg:viewBox="0 0 18 15" svg:d="M8 15c-3-3-7-5-8-7-1-5 11-10 15-8 2 2 4 9 3 10-2 3-6 3-10 5z">
          <text:p/>
        </draw:path>
        <draw:path draw:style-name="gr9" draw:text-style-name="P7" draw:layer="layout" svg:width="0.008cm" svg:height="0.005cm" svg:x="9.926cm" svg:y="29.443cm" svg:viewBox="0 0 9 6" svg:d="M0 4c0-1 2-4 3-4s3 1 6 2c-2 1-3 4-3 4-2 0-4 0-6-2z">
          <text:p/>
        </draw:path>
        <draw:polygon draw:style-name="gr9" draw:text-style-name="P7" draw:layer="layout" svg:width="0.005cm" svg:height="0.005cm" svg:x="4.382cm" svg:y="27.107cm" svg:viewBox="0 0 6 6" draw:points="3,0 6,6 0,6">
          <text:p/>
        </draw:polygon>
        <draw:polygon draw:style-name="gr9" draw:text-style-name="P7" draw:layer="layout" svg:width="0.005cm" svg:height="0.004cm" svg:x="18.39cm" svg:y="19.224cm" svg:viewBox="0 0 6 5" draw:points="0,3 6,0 6,5">
          <text:p/>
        </draw:polygon>
        <draw:polygon draw:style-name="gr9" draw:text-style-name="P7" draw:layer="layout" svg:width="0.006cm" svg:height="0.005cm" svg:x="2.92cm" svg:y="25.062cm" svg:viewBox="0 0 7 6" draw:points="0,2 7,0 6,6">
          <text:p/>
        </draw:polygon>
        <draw:path draw:style-name="gr9" draw:text-style-name="P7" draw:layer="layout" svg:width="0.006cm" svg:height="0.004cm" svg:x="18.391cm" svg:y="18.937cm" svg:viewBox="0 0 7 5" svg:d="M0 4c1-1 1-4 3-4 1 0 3 0 4 2 0 1-1 3-1 3-2 0-3-1-6-1z">
          <text:p/>
        </draw:path>
        <draw:path draw:style-name="gr9" draw:text-style-name="P7" draw:layer="layout" svg:width="0.005cm" svg:height="0.007cm" svg:x="9.051cm" svg:y="29.152cm" svg:viewBox="0 0 6 8" svg:d="M1 0c2 1 5 1 5 2 0 2-1 4-1 6-2-1-5-1-5-2 0-2 1-4 1-6z">
          <text:p/>
        </draw:path>
        <draw:polygon draw:style-name="gr9" draw:text-style-name="P7" draw:layer="layout" svg:width="0.006cm" svg:height="0.006cm" svg:x="6.713cm" svg:y="13.385cm" svg:viewBox="0 0 7 7" draw:points="7,0 7,7 0,4">
          <text:p/>
        </draw:polygon>
        <draw:path draw:style-name="gr9" draw:text-style-name="P7" draw:layer="layout" svg:width="0.007cm" svg:height="0.009cm" svg:x="3.212cm" svg:y="16.889cm" svg:viewBox="0 0 8 10" svg:d="M4 0c1 2 4 3 4 5-2 1-3 3-4 5-1-2-4-4-4-6 2-1 3-2 4-4z">
          <text:p/>
        </draw:path>
        <draw:polygon draw:style-name="gr9" draw:text-style-name="P7" draw:layer="layout" svg:width="0.003cm" svg:height="0.004cm" svg:x="18.391cm" svg:y="18.639cm" svg:viewBox="0 0 4 5" draw:points="4,0 4,5 0,3">
          <text:p/>
        </draw:polygon>
        <draw:path draw:style-name="gr9" draw:text-style-name="P7" draw:layer="layout" svg:width="0.007cm" svg:height="0.009cm" svg:x="18.1cm" svg:y="18.638cm" svg:viewBox="0 0 8 10" svg:d="M8 5c-2 2-4 4-5 5-1-1-3-3-3-6 0-1 2-3 4-4 2 1 3 3 4 5z">
          <text:p/>
        </draw:path>
        <draw:path draw:style-name="gr9" draw:text-style-name="P7" draw:layer="layout" svg:width="0.005cm" svg:height="0.008cm" svg:x="17.516cm" svg:y="16.891cm" svg:viewBox="0 0 6 9" svg:d="M6 5c-1 2-2 3-3 4-2-2-3-3-3-6 1-1 3-2 4-3 1 1 2 3 2 5z">
          <text:p/>
        </draw:path>
        <draw:path draw:style-name="gr9" draw:text-style-name="P7" draw:layer="layout" svg:width="0.005cm" svg:height="0.006cm" svg:x="8.466cm" svg:y="29.154cm" svg:viewBox="0 0 6 7" svg:d="M5 7c-3-1-5-1-5-2s1-4 2-5c1 0 4 1 4 1 0 3-1 4-1 6z">
          <text:p/>
        </draw:path>
        <draw:polygon draw:style-name="gr9" draw:text-style-name="P7" draw:layer="layout" svg:width="0.005cm" svg:height="0.004cm" svg:x="8.179cm" svg:y="29.155cm" svg:viewBox="0 0 6 5" draw:points="3,5 0,0 6,0">
          <text:p/>
        </draw:polygon>
        <draw:path draw:style-name="gr9" draw:text-style-name="P7" draw:layer="layout" svg:width="0.007cm" svg:height="0.005cm" svg:x="2.92cm" svg:y="17.182cm" svg:viewBox="0 0 8 6" svg:d="M8 1c0 1-1 5-2 5-2 0-4-1-6-3 1-1 2-3 2-3 2 0 4 1 6 1z">
          <text:p/>
        </draw:path>
        <draw:polygon draw:style-name="gr9" draw:text-style-name="P7" draw:layer="layout" svg:width="0.004cm" svg:height="0.003cm" svg:x="17.81cm" svg:y="24.478cm" svg:viewBox="0 0 5 4" draw:points="0,2 5,0 5,4">
          <text:p/>
        </draw:polygon>
        <draw:polygon draw:style-name="gr9" draw:text-style-name="P7" draw:layer="layout" svg:width="0.005cm" svg:height="0.005cm" svg:x="7.882cm" svg:y="29.155cm" svg:viewBox="0 0 6 6" draw:points="2,6 0,0 6,0">
          <text:p/>
        </draw:polygon>
        <draw:polygon draw:style-name="gr9" draw:text-style-name="P7" draw:layer="layout" svg:width="0.005cm" svg:height="0.005cm" svg:x="16.644cm" svg:y="26.523cm" svg:viewBox="0 0 6 6" draw:points="3,6 0,0 6,1">
          <text:p/>
        </draw:polygon>
        <draw:path draw:style-name="gr9" draw:text-style-name="P7" draw:layer="layout" svg:width="0.006cm" svg:height="0.006cm" svg:x="4.088cm" svg:y="26.817cm" svg:viewBox="0 0 7 7" svg:d="M0 4c0-1 2-4 2-4 2 0 4 2 5 2 0 1-1 5-1 5-2 0-4-2-6-3z">
          <text:p/>
        </draw:path>
        <draw:path draw:style-name="gr9" draw:text-style-name="P7" draw:layer="layout" svg:width="0.009cm" svg:height="0.005cm" svg:x="17.808cm" svg:y="17.181cm" svg:viewBox="0 0 10 6" svg:d="M10 4c-3 0-4 2-6 1-1 0-3-2-4-3 4-4 7-3 10 2z">
          <text:p/>
        </draw:path>
        <draw:path draw:style-name="gr9" draw:text-style-name="P7" draw:layer="layout" svg:width="0.005cm" svg:height="0.008cm" svg:x="2.628cm" svg:y="17.476cm" svg:viewBox="0 0 6 9" svg:d="M6 5c-1 1-2 3-3 4-2-3-3-4-3-5 0-2 3-3 4-4 1 2 1 3 2 5z">
          <text:p/>
        </draw:path>
        <draw:path draw:style-name="gr9" draw:text-style-name="P7" draw:layer="layout" svg:width="0.006cm" svg:height="0.007cm" svg:x="18.101cm" svg:y="18.057cm" svg:viewBox="0 0 7 8" svg:d="M2 0c2 1 5 2 5 2 0 2-2 3-3 6-1-1-4-1-4-3 0-1 2-3 2-5z">
          <text:p/>
        </draw:path>
        <draw:path draw:style-name="gr9" draw:text-style-name="P7" draw:layer="layout" svg:width="0.004cm" svg:height="0.006cm" svg:x="2.628cm" svg:y="18.057cm" svg:viewBox="0 0 5 7" svg:d="M5 5c-1 2-2 2-4 2 0-2-2-4-1-5 4-4 5-3 5 3z">
          <text:p/>
        </draw:path>
        <draw:path draw:style-name="gr9" draw:text-style-name="P7" draw:layer="layout" svg:width="0.006cm" svg:height="0.005cm" svg:x="17.81cm" svg:y="24.775cm" svg:viewBox="0 0 7 6" svg:d="M0 4c0-2 1-4 1-4 3 0 4 1 6 1-1 1-1 5-2 5s-4-1-5-2z">
          <text:p/>
        </draw:path>
        <draw:path draw:style-name="gr9" draw:text-style-name="P7" draw:layer="layout" svg:width="0.009cm" svg:height="0.005cm" svg:x="17.808cm" svg:y="17.766cm" svg:viewBox="0 0 10 6" svg:d="M4 6c-2-1-3-2-4-3 1 0 3-3 5-3 1 1 2 3 5 4-3 1-4 2-6 2z">
          <text:p/>
        </draw:path>
        <draw:path draw:style-name="gr9" draw:text-style-name="P7" draw:layer="layout" svg:width="0.017cm" svg:height="0.015cm" svg:x="2.913cm" svg:y="17.761cm" svg:viewBox="0 0 18 16" svg:d="M18 6c-1 4-2 8-4 9-4 3-16-3-14-7 1-4 6-6 9-7 5-2 8 0 9 5z">
          <text:p/>
        </draw:path>
        <draw:polygon draw:style-name="gr9" draw:text-style-name="P7" draw:layer="layout" svg:width="0.005cm" svg:height="0.003cm" svg:x="6.714cm" svg:y="13.684cm" svg:viewBox="0 0 6 4" draw:points="0,2 6,0 5,4">
          <text:p/>
        </draw:polygon>
        <draw:path draw:style-name="gr9" draw:text-style-name="P7" draw:layer="layout" svg:width="0.006cm" svg:height="0.005cm" svg:x="2.921cm" svg:y="24.775cm" svg:viewBox="0 0 7 6" svg:d="M0 4c1-2 1-4 3-4 1 0 3 1 4 1 0 1-1 5-1 5-2 0-3-1-6-2z">
          <text:p/>
        </draw:path>
        <draw:polygon draw:style-name="gr9" draw:text-style-name="P7" draw:layer="layout" svg:width="0.004cm" svg:height="0.004cm" svg:x="6.135cm" svg:y="13.683cm" svg:viewBox="0 0 5 5" draw:points="5,4 0,5 0,0">
          <text:p/>
        </draw:polygon>
        <draw:polygon draw:style-name="gr9" draw:text-style-name="P7" draw:layer="layout" svg:width="0.004cm" svg:height="0.004cm" svg:x="5.553cm" svg:y="14.266cm" svg:viewBox="0 0 5 5" draw:points="1,5 0,0 5,0">
          <text:p/>
        </draw:polygon>
        <draw:path draw:style-name="gr9" draw:text-style-name="P7" draw:layer="layout" svg:width="0.005cm" svg:height="0.006cm" svg:x="5.254cm" svg:y="14.265cm" svg:viewBox="0 0 6 7" svg:d="M5 7c-2 0-5-2-5-3s1-3 2-4c1 0 4 1 4 2s-1 3-1 5z">
          <text:p/>
        </draw:path>
        <draw:polygon draw:style-name="gr9" draw:text-style-name="P7" draw:layer="layout" svg:width="0.004cm" svg:height="0.003cm" svg:x="4.089cm" svg:y="15.428cm" svg:viewBox="0 0 5 4" draw:points="0,4 0,0 5,1">
          <text:p/>
        </draw:polygon>
        <draw:path draw:style-name="gr9" draw:text-style-name="P7" draw:layer="layout" svg:width="0.006cm" svg:height="0.009cm" svg:x="18.101cm" svg:y="23.895cm" svg:viewBox="0 0 7 10" svg:d="M7 6c-2 1-3 2-4 4-4-4-4-8 1-10 1 2 1 3 3 6z">
          <text:p/>
        </draw:path>
        <draw:path draw:style-name="gr9" draw:text-style-name="P7" draw:layer="layout" svg:width="0.01cm" svg:height="0.004cm" svg:x="15.763cm" svg:y="27.402cm" svg:viewBox="0 0 11 5" svg:d="M5 5c-1-2-3-3-5-4 3 0 4-1 6-1 1 0 2 2 5 3-3 0-5 2-6 2z">
          <text:p/>
        </draw:path>
        <draw:polygon draw:style-name="gr9" draw:text-style-name="P7" draw:layer="layout" svg:width="0.004cm" svg:height="0.003cm" svg:x="18.391cm" svg:y="22.734cm" svg:viewBox="0 0 5 4" draw:points="0,1 5,0 5,4">
          <text:p/>
        </draw:polygon>
        <draw:path draw:style-name="gr9" draw:text-style-name="P7" draw:layer="layout" svg:width="0.005cm" svg:height="0.008cm" svg:x="18.686cm" svg:y="20.684cm" svg:viewBox="0 0 6 9" svg:d="M1 0c1 0 5 2 5 3s-1 3-3 6c-1-2-3-3-3-3 0-2 1-3 1-6z">
          <text:p/>
        </draw:path>
        <draw:path draw:style-name="gr9" draw:text-style-name="P7" draw:layer="layout" svg:width="0.006cm" svg:height="0.004cm" svg:x="4.088cm" svg:y="15.725cm" svg:viewBox="0 0 7 5" svg:d="M0 4c0-1 2-4 2-4 2 0 3 2 5 2-1 1-1 3-2 3s-3 0-5-1z">
          <text:p/>
        </draw:path>
        <draw:path draw:style-name="gr9" draw:text-style-name="P7" draw:layer="layout" svg:width="0.004cm" svg:height="0.006cm" svg:x="2.043cm" svg:y="20.684cm" svg:viewBox="0 0 5 7" svg:d="M5 6c-1 0-3 1-4 1-1-1-2-5-1-5 4-3 5-2 5 4z">
          <text:p/>
        </draw:path>
        <draw:polygon draw:style-name="gr9" draw:text-style-name="P7" draw:layer="layout" svg:width="0.004cm" svg:height="0.006cm" svg:x="11.391cm" svg:y="29.153cm" svg:viewBox="0 0 5 7" draw:points="0,7 2,0 5,7">
          <text:p/>
        </draw:polygon>
        <draw:path draw:style-name="gr9" draw:text-style-name="P7" draw:layer="layout" svg:width="0.005cm" svg:height="0.01cm" svg:x="18.686cm" svg:y="20.1cm" svg:viewBox="0 0 6 11" svg:d="M3 0c0 3 3 5 3 6 0 2-3 3-4 5-1-2-2-4-2-5 0-2 2-3 3-6z">
          <text:p/>
        </draw:path>
        <draw:polygon draw:style-name="gr9" draw:text-style-name="P7" draw:layer="layout" svg:width="0.003cm" svg:height="0.003cm" svg:x="3.504cm" svg:y="16.013cm" svg:viewBox="0 0 4 4" draw:points="0,4 0,0 4,2">
          <text:p/>
        </draw:polygon>
        <draw:polygon draw:style-name="gr9" draw:text-style-name="P7" draw:layer="layout" svg:width="0.006cm" svg:height="0.004cm" svg:x="14.599cm" svg:y="28.274cm" svg:viewBox="0 0 7 5" draw:points="0,0 7,3 0,5">
          <text:p/>
        </draw:polygon>
        <draw:polygon draw:style-name="gr9" draw:text-style-name="P7" draw:layer="layout" svg:width="0.003cm" svg:height="0.005cm" svg:x="4.67cm" svg:y="27.108cm" svg:viewBox="0 0 4 6" draw:points="2,0 4,6 0,5">
          <text:p/>
        </draw:polygon>
        <draw:path draw:style-name="gr9" draw:text-style-name="P7" draw:layer="layout" svg:width="0.009cm" svg:height="0.005cm" svg:x="18.389cm" svg:y="23.02cm" svg:viewBox="0 0 10 6" svg:d="M4 6c-1-1-3-2-4-4 2-1 3-2 5-2 1 0 4 2 5 4-2 1-4 2-6 2z">
          <text:p/>
        </draw:path>
        <draw:polygon draw:style-name="gr9" draw:text-style-name="P7" draw:layer="layout" svg:width="0.004cm" svg:height="0.004cm" svg:x="3.502cm" svg:y="16.31cm" svg:viewBox="0 0 5 5" draw:points="5,0 5,5 0,2">
          <text:p/>
        </draw:polygon>
        <draw:path draw:style-name="gr9" draw:text-style-name="P7" draw:layer="layout" svg:width="0.005cm" svg:height="0.01cm" svg:x="16.059cm" svg:y="27.107cm" svg:viewBox="0 0 6 11" svg:d="M6 5l-4 6c-3-5-3-8 2-11z">
          <text:p/>
        </draw:path>
        <draw:polygon draw:style-name="gr9" draw:text-style-name="P7" draw:layer="layout" svg:width="0.004cm" svg:height="0.004cm" svg:x="2.341cm" svg:y="23.317cm" svg:viewBox="0 0 5 5" draw:points="0,0 5,0 3,5">
          <text:p/>
        </draw:polygon>
        <draw:polygon draw:style-name="gr9" draw:text-style-name="P7" draw:layer="layout" svg:width="0.005cm" svg:height="0.005cm" svg:x="18.392cm" svg:y="19.522cm" svg:viewBox="0 0 6 6" draw:points="0,0 6,3 0,6">
          <text:p/>
        </draw:polygon>
        <draw:path draw:style-name="gr9" draw:text-style-name="P7" draw:layer="layout" svg:width="0.007cm" svg:height="0.005cm" svg:x="6.132cm" svg:y="13.97cm" svg:viewBox="0 0 8 6" svg:d="M6 0c1 1 1 2 2 5-2 0-3 1-6 1-1 0-1-4-2-5 2 0 5-1 6-1z">
          <text:p/>
        </draw:path>
        <draw:path draw:style-name="gr9" draw:text-style-name="P7" draw:layer="layout" svg:width="0.017cm" svg:height="0.015cm" svg:x="17.802cm" svg:y="24.185cm" svg:viewBox="0 0 18 16" svg:d="M18 9c-1 5-4 8-9 6-4-3-7-5-9-8 4-2 10-5 15-7 1 3 2 6 3 9z">
          <text:p/>
        </draw:path>
        <draw:path draw:style-name="gr9" draw:text-style-name="P7" draw:layer="layout" svg:width="0.017cm" svg:height="0.014cm" svg:x="2.915cm" svg:y="24.185cm" svg:viewBox="0 0 18 15" svg:d="M10 0c3 2 7 4 8 7 2 4-9 10-13 8-2-3-6-8-5-10 3-2 7-3 10-5z">
          <text:p/>
        </draw:path>
        <draw:path draw:style-name="gr9" draw:text-style-name="P7" draw:layer="layout" svg:width="0.007cm" svg:height="0.005cm" svg:x="14.597cm" svg:y="13.97cm" svg:viewBox="0 0 8 6" svg:d="M8 1c-1 1-1 5-2 5-3 0-4-1-6-3 1-1 1-3 2-3 3 0 4 1 6 1z">
          <text:p/>
        </draw:path>
        <draw:path draw:style-name="gr9" draw:text-style-name="P7" draw:layer="layout" svg:width="0.007cm" svg:height="0.005cm" svg:x="18.391cm" svg:y="19.808cm" svg:viewBox="0 0 8 6" svg:d="M8 3c-1 1-1 3-2 3-2 0-3-1-6-1 0-1 1-5 1-5 3 0 5 1 7 3z">
          <text:p/>
        </draw:path>
        <draw:path draw:style-name="gr9" draw:text-style-name="P7" draw:layer="layout" svg:width="0.007cm" svg:height="0.005cm" svg:x="12.552cm" svg:y="13.098cm" svg:viewBox="0 0 8 6" svg:d="M8 3c-2 2-4 3-5 3s-1-4-3-5c3 0 4-1 6-1 0 0 2 2 2 3z">
          <text:p/>
        </draw:path>
        <draw:path draw:style-name="gr9" draw:text-style-name="P7" draw:layer="layout" svg:width="0.004cm" svg:height="0.008cm" svg:x="2.043cm" svg:y="20.102cm" svg:viewBox="0 0 5 9" svg:d="M2 0c2 1 3 3 3 4 0 3-1 4-3 5-1-1-2-4-2-5s1-3 2-4z">
          <text:p/>
        </draw:path>
        <draw:path draw:style-name="gr9" draw:text-style-name="P7" draw:layer="layout" svg:width="0.006cm" svg:height="0.01cm" svg:x="3.797cm" svg:y="16.011cm" svg:viewBox="0 0 7 11" svg:d="M5 0c0 3 2 5 2 6-1 1-4 3-5 5-4-5-3-8 3-11z">
          <text:p/>
        </draw:path>
        <draw:path draw:style-name="gr9" draw:text-style-name="P7" draw:layer="layout" svg:width="0.009cm" svg:height="0.007cm" svg:x="10.804cm" svg:y="29.442cm" svg:viewBox="0 0 10 8" svg:d="M10 5c-3 1-4 3-5 3-2 0-3-2-5-4 2-2 4-4 5-4s2 4 5 5z">
          <text:p/>
        </draw:path>
        <draw:path draw:style-name="gr9" draw:text-style-name="P7" draw:layer="layout" svg:width="0.009cm" svg:height="0.006cm" svg:x="11.091cm" svg:y="29.443cm" svg:viewBox="0 0 10 7" svg:d="M10 4c-2 1-4 3-5 3s-2-2-5-3c3-1 4-4 6-4 1 0 2 3 4 4z">
          <text:p/>
        </draw:path>
        <draw:polygon draw:style-name="gr9" draw:text-style-name="P7" draw:layer="layout" svg:width="0.006cm" svg:height="0.004cm" svg:x="11.389cm" svg:y="29.444cm" svg:viewBox="0 0 7 5" draw:points="0,1 7,0 5,5">
          <text:p/>
        </draw:polygon>
        <draw:polygon draw:style-name="gr9" draw:text-style-name="P7" draw:layer="layout" svg:width="0.003cm" svg:height="0.003cm" svg:x="13.721cm" svg:y="28.573cm" svg:viewBox="0 0 4 4" draw:points="1,4 0,0 4,0">
          <text:p/>
        </draw:polygon>
        <draw:polygon draw:style-name="gr9" draw:text-style-name="P7" draw:layer="layout" svg:width="0.004cm" svg:height="0.005cm" svg:x="7.01cm" svg:y="28.572cm" svg:viewBox="0 0 5 6" draw:points="1,6 0,0 5,1">
          <text:p/>
        </draw:polygon>
        <draw:polygon draw:style-name="gr9" draw:text-style-name="P7" draw:layer="layout" svg:width="0.005cm" svg:height="0.003cm" svg:x="14.017cm" svg:y="28.572cm" svg:viewBox="0 0 6 4" draw:points="0,1 6,0 4,4">
          <text:p/>
        </draw:polygon>
        <draw:polygon draw:style-name="gr9" draw:text-style-name="P7" draw:layer="layout" svg:width="0.004cm" svg:height="0.004cm" svg:x="6.425cm" svg:y="28.571cm" svg:viewBox="0 0 5 5" draw:points="3,0 5,5 0,5">
          <text:p/>
        </draw:polygon>
        <draw:path draw:style-name="gr9" draw:text-style-name="P7" draw:layer="layout" svg:width="0.008cm" svg:height="0.009cm" svg:x="7.007cm" svg:y="28.857cm" svg:viewBox="0 0 9 10" svg:d="M9 5c-1 1-3 5-5 5-1 0-3-4-4-5 2-1 3-5 4-5 3 0 4 4 5 5z">
          <text:p/>
        </draw:path>
        <draw:polygon draw:style-name="gr9" draw:text-style-name="P7" draw:layer="layout" svg:width="0.004cm" svg:height="0.004cm" svg:x="7.297cm" svg:y="28.86cm" svg:viewBox="0 0 5 5" draw:points="3,5 0,0 5,0">
          <text:p/>
        </draw:polygon>
        <draw:path draw:style-name="gr9" draw:text-style-name="P7" draw:layer="layout" svg:width="0.008cm" svg:height="0.007cm" svg:x="7.592cm" svg:y="28.857cm" svg:viewBox="0 0 9 8" svg:d="M4 0c1 2 4 3 5 4-3 1-4 4-5 4-2 0-3-3-4-5 2-1 3-2 4-3z">
          <text:p/>
        </draw:path>
        <draw:polygon draw:style-name="gr9" draw:text-style-name="P7" draw:layer="layout" svg:width="0.004cm" svg:height="0.005cm" svg:x="7.882cm" svg:y="28.858cm" svg:viewBox="0 0 5 6" draw:points="2,0 5,6 0,5">
          <text:p/>
        </draw:polygon>
        <draw:path draw:style-name="gr9" draw:text-style-name="P7" draw:layer="layout" svg:width="0.008cm" svg:height="0.009cm" svg:x="12.846cm" svg:y="28.857cm" svg:viewBox="0 0 9 10" svg:d="M9 5c-2 1-3 5-5 5s-5-5-4-5c2-7 6-7 9 0z">
          <text:p/>
        </draw:path>
        <draw:polygon draw:style-name="gr9" draw:text-style-name="P7" draw:layer="layout" svg:width="0.004cm" svg:height="0.005cm" svg:x="13.135cm" svg:y="28.858cm" svg:viewBox="0 0 5 6" draw:points="4,0 5,6 0,5">
          <text:p/>
        </draw:polygon>
        <draw:path draw:style-name="gr9" draw:text-style-name="P7" draw:layer="layout" svg:width="0.008cm" svg:height="0.006cm" svg:x="13.431cm" svg:y="28.858cm" svg:viewBox="0 0 9 7" svg:d="M9 3c-1 1-4 5-5 4-6-3-6-6 1-7 0-1 3 2 4 3z">
          <text:p/>
        </draw:path>
        <draw:polygon draw:style-name="gr9" draw:text-style-name="P7" draw:layer="layout" svg:width="0.004cm" svg:height="0.006cm" svg:x="14.305cm" svg:y="28.273cm" svg:viewBox="0 0 5 7" draw:points="3,0 5,7 0,5">
          <text:p/>
        </draw:polygon>
        <draw:path draw:style-name="gr9" draw:text-style-name="P7" draw:layer="layout" svg:width="0.008cm" svg:height="0.007cm" svg:x="6.423cm" svg:y="28.273cm" svg:viewBox="0 0 9 8" svg:d="M5 0c1 1 4 4 4 5s-4 3-5 3c-5-2-5-5 1-8z">
          <text:p/>
        </draw:path>
        <draw:path draw:style-name="gr9" draw:text-style-name="P7" draw:layer="layout" svg:width="0.008cm" svg:height="0.007cm" svg:x="9.634cm" svg:y="29.442cm" svg:viewBox="0 0 9 8" svg:d="M9 5c-1 1-3 4-4 3-1 0-4-2-5-5 1-1 4-3 5-3 2 0 3 2 4 5z">
          <text:p/>
        </draw:path>
        <draw:path draw:style-name="gr9" draw:text-style-name="P7" draw:layer="layout" svg:width="0.008cm" svg:height="0.007cm" svg:x="10.219cm" svg:y="29.442cm" svg:viewBox="0 0 9 8" svg:d="M4 0c2 1 3 3 5 5-2 1-3 3-6 3-1 0-2-3-3-5 1-1 3-2 4-3z">
          <text:p/>
        </draw:path>
        <draw:polygon draw:style-name="gr9" draw:text-style-name="P7" draw:layer="layout" svg:width="0.006cm" svg:height="0.004cm" svg:x="10.509cm" svg:y="29.444cm" svg:viewBox="0 0 7 5" draw:points="7,2 0,5 2,0">
          <text:p/>
        </draw:polygon>
        <draw:polygon draw:style-name="gr9" draw:text-style-name="P7" draw:layer="layout" svg:width="0.003cm" svg:height="0.003cm" svg:x="2.341cm" svg:y="18.64cm" svg:viewBox="0 0 4 4" draw:points="2,4 0,0 4,2">
          <text:p/>
        </draw:polygon>
        <draw:polygon draw:style-name="gr9" draw:text-style-name="P7" draw:layer="layout" svg:width="0.004cm" svg:height="0.004cm" svg:x="2.628cm" svg:y="24.479cm" svg:viewBox="0 0 5 5" draw:points="3,5 0,0 5,0">
          <text:p/>
        </draw:polygon>
        <draw:path draw:style-name="gr9" draw:text-style-name="P7" draw:layer="layout" svg:width="0.007cm" svg:height="0.007cm" svg:x="18.1cm" svg:y="18.35cm" svg:viewBox="0 0 8 8" svg:d="M8 5c-1 1-3 2-5 3-1-1-3-2-3-4 0-1 3-2 4-4 1 2 3 4 4 5z">
          <text:p/>
        </draw:path>
        <draw:polygon draw:style-name="gr9" draw:text-style-name="P7" draw:layer="layout" svg:width="0.004cm" svg:height="0.005cm" svg:x="2.34cm" svg:y="18.352cm" svg:viewBox="0 0 5 6" draw:points="0,2 5,0 4,6">
          <text:p/>
        </draw:polygon>
        <draw:path draw:style-name="gr9" draw:text-style-name="P7" draw:layer="layout" svg:width="0.008cm" svg:height="0.008cm" svg:x="18.099cm" svg:y="17.765cm" svg:viewBox="0 0 9 9" svg:d="M9 4c-1 2-3 5-5 5-1 0-2-3-4-5 2-2 3-4 5-4 1 0 3 3 4 4z">
          <text:p/>
        </draw:path>
        <draw:path draw:style-name="gr9" draw:text-style-name="P7" draw:layer="layout" svg:width="0.007cm" svg:height="0.006cm" svg:x="2.627cm" svg:y="17.766cm" svg:viewBox="0 0 8 7" svg:d="M8 5c-1 1-3 3-4 2-1 0-3-2-4-3 1-2 3-4 5-4 1 0 2 2 3 5z">
          <text:p/>
        </draw:path>
        <draw:path draw:style-name="gr9" draw:text-style-name="P7" draw:layer="layout" svg:width="0.007cm" svg:height="0.007cm" svg:x="17.515cm" svg:y="17.181cm" svg:viewBox="0 0 8 8" svg:d="M4 8c-2-1-3-4-4-5 1-1 4-3 5-3s2 2 3 4c-1 1-2 3-4 4z">
          <text:p/>
        </draw:path>
        <draw:polygon draw:style-name="gr9" draw:text-style-name="P7" draw:layer="layout" svg:width="0.004cm" svg:height="0.003cm" svg:x="17.229cm" svg:y="16.597cm" svg:viewBox="0 0 5 4" draw:points="3,0 5,4 0,4">
          <text:p/>
        </draw:polygon>
        <draw:polygon draw:style-name="gr9" draw:text-style-name="P7" draw:layer="layout" svg:width="0.005cm" svg:height="0.004cm" svg:x="17.515cm" svg:y="25.063cm" svg:viewBox="0 0 6 5" draw:points="0,1 6,0 6,5">
          <text:p/>
        </draw:polygon>
        <draw:path draw:style-name="gr9" draw:text-style-name="P7" draw:layer="layout" svg:width="0.006cm" svg:height="0.007cm" svg:x="3.212cm" svg:y="16.596cm" svg:viewBox="0 0 7 8" svg:d="M7 4c-1 2-2 3-4 4-1-1-3-4-3-5s3-2 4-3c1 1 2 3 3 4z">
          <text:p/>
        </draw:path>
        <draw:polygon draw:style-name="gr9" draw:text-style-name="P7" draw:layer="layout" svg:width="0.005cm" svg:height="0.003cm" svg:x="17.23cm" svg:y="16.31cm" svg:viewBox="0 0 6 4" draw:points="6,2 0,4 2,0">
          <text:p/>
        </draw:polygon>
        <draw:polygon draw:style-name="gr9" draw:text-style-name="P7" draw:layer="layout" svg:width="0.003cm" svg:height="0.004cm" svg:x="16.931cm" svg:y="16.013cm" svg:viewBox="0 0 4 5" draw:points="0,2 4,0 4,5">
          <text:p/>
        </draw:polygon>
        <draw:path draw:style-name="gr9" draw:text-style-name="P7" draw:layer="layout" svg:width="0.007cm" svg:height="0.006cm" svg:x="16.643cm" svg:y="15.724cm" svg:viewBox="0 0 8 7" svg:d="M8 3c-1 1-3 4-5 4-1 0-2-3-3-4 1-2 2-4 3-3 3 0 4 2 5 3z">
          <text:p/>
        </draw:path>
        <draw:path draw:style-name="gr9" draw:text-style-name="P7" draw:layer="layout" svg:width="0.007cm" svg:height="0.007cm" svg:x="3.796cm" svg:y="15.723cm" svg:viewBox="0 0 8 8" svg:d="M4 0c2 1 4 4 4 5s-4 4-4 3c-5-2-5-6 0-8z">
          <text:p/>
        </draw:path>
        <draw:polygon draw:style-name="gr9" draw:text-style-name="P7" draw:layer="layout" svg:width="0.004cm" svg:height="0.004cm" svg:x="3.213cm" svg:y="25.359cm" svg:viewBox="0 0 5 5" draw:points="3,0 5,5 0,5">
          <text:p/>
        </draw:polygon>
        <draw:polygon draw:style-name="gr9" draw:text-style-name="P7" draw:layer="layout" svg:width="0.004cm" svg:height="0.004cm" svg:x="17.517cm" svg:y="25.359cm" svg:viewBox="0 0 5 5" draw:points="3,0 5,5 0,5">
          <text:p/>
        </draw:polygon>
        <draw:polygon draw:style-name="gr9" draw:text-style-name="P7" draw:layer="layout" svg:width="0.004cm" svg:height="0.005cm" svg:x="16.347cm" svg:y="15.139cm" svg:viewBox="0 0 5 6" draw:points="2,0 5,6 0,5">
          <text:p/>
        </draw:polygon>
        <draw:path draw:style-name="gr9" draw:text-style-name="P7" draw:layer="layout" svg:width="0.008cm" svg:height="0.009cm" svg:x="16.058cm" svg:y="15.138cm" svg:viewBox="0 0 9 10" svg:d="M9 5c-2 2-3 5-6 5-1 0-3-4-3-5 3-7 6-7 9 0z">
          <text:p/>
        </draw:path>
        <draw:polygon draw:style-name="gr9" draw:text-style-name="P7" draw:layer="layout" svg:width="0.004cm" svg:height="0.004cm" svg:x="2.34cm" svg:y="23.02cm" svg:viewBox="0 0 5 5" draw:points="3,0 5,5 0,4">
          <text:p/>
        </draw:polygon>
        <draw:polygon draw:style-name="gr9" draw:text-style-name="P7" draw:layer="layout" svg:width="0.004cm" svg:height="0.004cm" svg:x="2.043cm" svg:y="22.734cm" svg:viewBox="0 0 5 5" draw:points="3,5 0,0 5,1">
          <text:p/>
        </draw:polygon>
        <draw:polygon draw:style-name="gr9" draw:text-style-name="P7" draw:layer="layout" svg:width="0.004cm" svg:height="0.005cm" svg:x="2.043cm" svg:y="22.435cm" svg:viewBox="0 0 5 6" draw:points="2,0 5,6 0,5">
          <text:p/>
        </draw:polygon>
        <draw:polygon draw:style-name="gr9" draw:text-style-name="P7" draw:layer="layout" svg:width="0.004cm" svg:height="0.004cm" svg:x="18.687cm" svg:y="22.149cm" svg:viewBox="0 0 5 5" draw:points="1,5 0,0 5,0">
          <text:p/>
        </draw:polygon>
        <draw:polygon draw:style-name="gr9" draw:text-style-name="P7" draw:layer="layout" svg:width="0.004cm" svg:height="0.005cm" svg:x="2.341cm" svg:y="23.605cm" svg:viewBox="0 0 5 6" draw:points="5,4 0,6 2,0">
          <text:p/>
        </draw:polygon>
        <draw:path draw:style-name="gr9" draw:text-style-name="P7" draw:layer="layout" svg:width="0.009cm" svg:height="0.008cm" svg:x="18.099cm" svg:y="23.603cm" svg:viewBox="0 0 10 9" svg:d="M5 0c1 2 2 3 5 6-3 1-5 4-6 3-6-2-6-6 1-9z">
          <text:p/>
        </draw:path>
        <draw:polygon draw:style-name="gr9" draw:text-style-name="P7" draw:layer="layout" svg:width="0.004cm" svg:height="0.004cm" svg:x="2.043cm" svg:y="22.147cm" svg:viewBox="0 0 5 5" draw:points="4,0 5,5 0,5">
          <text:p/>
        </draw:polygon>
        <draw:polygon draw:style-name="gr9" draw:text-style-name="P7" draw:layer="layout" svg:width="0.004cm" svg:height="0.004cm" svg:x="2.043cm" svg:y="21.852cm" svg:viewBox="0 0 5 5" draw:points="3,5 0,0 5,1">
          <text:p/>
        </draw:polygon>
        <draw:path draw:style-name="gr9" draw:text-style-name="P7" draw:layer="layout" svg:width="0.007cm" svg:height="0.007cm" svg:x="18.685cm" svg:y="21.562cm" svg:viewBox="0 0 8 8" svg:d="M8 5c-1 1-3 2-4 3-1-1-4-3-4-4s3-3 5-4c1 1 2 3 3 5z">
          <text:p/>
        </draw:path>
        <draw:polygon draw:style-name="gr9" draw:text-style-name="P7" draw:layer="layout" svg:width="0.005cm" svg:height="0.004cm" svg:x="2.042cm" svg:y="21.564cm" svg:viewBox="0 0 6 5" draw:points="0,1 6,0 5,5">
          <text:p/>
        </draw:polygon>
        <draw:path draw:style-name="gr9" draw:text-style-name="P7" draw:layer="layout" svg:width="0.008cm" svg:height="0.007cm" svg:x="18.684cm" svg:y="20.977cm" svg:viewBox="0 0 9 8" svg:d="M9 4c-2 1-4 4-5 4s-3-3-4-5c2-1 3-3 5-3 1 0 2 2 4 4z">
          <text:p/>
        </draw:path>
        <draw:path draw:style-name="gr9" draw:text-style-name="P7" draw:layer="layout" svg:width="0.008cm" svg:height="0.006cm" svg:x="2.041cm" svg:y="20.978cm" svg:viewBox="0 0 9 7" svg:d="M9 4c-1 1-4 3-5 3s-2-2-4-3c2-2 3-5 5-4 1 0 3 3 4 4z">
          <text:p/>
        </draw:path>
        <draw:path draw:style-name="gr9" draw:text-style-name="P7" draw:layer="layout" svg:width="0.008cm" svg:height="0.007cm" svg:x="18.684cm" svg:y="20.392cm" svg:viewBox="0 0 9 8" svg:d="M9 5c-2 1-4 4-5 3-2 0-3-2-4-3 1-3 3-5 4-5 2 0 3 4 5 5z">
          <text:p/>
        </draw:path>
        <draw:path draw:style-name="gr9" draw:text-style-name="P7" draw:layer="layout" svg:width="0.008cm" svg:height="0.007cm" svg:x="2.041cm" svg:y="20.393cm" svg:viewBox="0 0 9 8" svg:d="M9 5c-3 1-4 3-5 3-2 0-3-3-4-5 2-1 3-3 4-3 2 0 4 2 5 5z">
          <text:p/>
        </draw:path>
        <draw:path draw:style-name="gr9" draw:text-style-name="P7" draw:layer="layout" svg:width="0.009cm" svg:height="0.007cm" svg:x="2.041cm" svg:y="19.807cm" svg:viewBox="0 0 10 8" svg:d="M5 0l5 4c-1 1-4 5-5 4-7-3-7-5 0-8z">
          <text:p/>
        </draw:path>
        <draw:path draw:style-name="gr9" draw:text-style-name="P7" draw:layer="layout" svg:width="0.007cm" svg:height="0.007cm" svg:x="2.627cm" svg:y="24.189cm" svg:viewBox="0 0 8 8" svg:d="M8 4c-1 1-3 4-4 4-6-3-5-6 1-8 0 0 2 3 3 4z">
          <text:p/>
        </draw:path>
        <draw:path draw:style-name="gr9" draw:text-style-name="P7" draw:layer="layout" svg:width="0.009cm" svg:height="0.007cm" svg:x="18.099cm" svg:y="24.189cm" svg:viewBox="0 0 10 8" svg:d="M5 0c1 1 2 2 5 4-3 1-5 5-6 4-6-3-6-6 1-8z">
          <text:p/>
        </draw:path>
        <draw:polygon draw:style-name="gr9" draw:text-style-name="P7" draw:layer="layout" svg:width="0.005cm" svg:height="0.004cm" svg:x="2.042cm" svg:y="19.522cm" svg:viewBox="0 0 6 5" draw:points="0,1 6,0 5,5">
          <text:p/>
        </draw:polygon>
        <draw:polygon draw:style-name="gr9" draw:text-style-name="P7" draw:layer="layout" svg:width="0.003cm" svg:height="0.003cm" svg:x="2.341cm" svg:y="19.225cm" svg:viewBox="0 0 4 4" draw:points="2,4 0,0 4,0">
          <text:p/>
        </draw:polygon>
        <draw:polygon draw:style-name="gr9" draw:text-style-name="P7" draw:layer="layout" svg:width="0.004cm" svg:height="0.005cm" svg:x="2.042cm" svg:y="19.224cm" svg:viewBox="0 0 5 6" draw:points="0,3 5,0 5,6">
          <text:p/>
        </draw:polygon>
        <draw:polygon draw:style-name="gr9" draw:text-style-name="P7" draw:layer="layout" svg:width="0.004cm" svg:height="0.004cm" svg:x="2.34cm" svg:y="18.936cm" svg:viewBox="0 0 5 5" draw:points="4,0 5,5 0,5">
          <text:p/>
        </draw:polygon>
        <draw:polygon draw:style-name="gr9" draw:text-style-name="P7" draw:layer="layout" svg:width="0.004cm" svg:height="0.004cm" svg:x="13.134cm" svg:y="13.386cm" svg:viewBox="0 0 5 5" draw:points="0,1 5,0 5,5">
          <text:p/>
        </draw:polygon>
        <draw:polygon draw:style-name="gr9" draw:text-style-name="P7" draw:layer="layout" svg:width="0.004cm" svg:height="0.004cm" svg:x="7.296cm" svg:y="13.386cm" svg:viewBox="0 0 5 5" draw:points="0,1 5,0 4,5">
          <text:p/>
        </draw:polygon>
        <draw:path draw:style-name="gr9" draw:text-style-name="P7" draw:layer="layout" svg:width="0.007cm" svg:height="0.007cm" svg:x="7.008cm" svg:y="13.384cm" svg:viewBox="0 0 8 8" svg:d="M5 0c1 1 3 3 3 5-1 1-3 3-4 3-5-2-5-6 1-8z">
          <text:p/>
        </draw:path>
        <draw:polygon draw:style-name="gr9" draw:text-style-name="P7" draw:layer="layout" svg:width="0.005cm" svg:height="0.004cm" svg:x="13.135cm" svg:y="13.098cm" svg:viewBox="0 0 6 5" draw:points="4,0 6,5 0,4">
          <text:p/>
        </draw:polygon>
        <draw:path draw:style-name="gr9" draw:text-style-name="P7" draw:layer="layout" svg:width="0.007cm" svg:height="0.008cm" svg:x="12.847cm" svg:y="13.096cm" svg:viewBox="0 0 8 9" svg:d="M8 4c-2 3-3 4-4 5-1-1-5-3-4-5 0-1 3-2 4-4 1 2 2 3 4 4z">
          <text:p/>
        </draw:path>
        <draw:path draw:style-name="gr9" draw:text-style-name="P7" draw:layer="layout" svg:width="0.007cm" svg:height="0.007cm" svg:x="12.262cm" svg:y="13.097cm" svg:viewBox="0 0 8 8" svg:d="M4 0c2 1 4 3 4 5-4 5-7 4-8-2 0-1 2-2 4-3z">
          <text:p/>
        </draw:path>
        <draw:polygon draw:style-name="gr9" draw:text-style-name="P7" draw:layer="layout" svg:width="0.004cm" svg:height="0.005cm" svg:x="8.467cm" svg:y="13.099cm" svg:viewBox="0 0 5 6" draw:points="2,6 0,0 5,0">
          <text:p/>
        </draw:polygon>
        <draw:polygon draw:style-name="gr9" draw:text-style-name="P7" draw:layer="layout" svg:width="0.004cm" svg:height="0.004cm" svg:x="8.18cm" svg:y="13.098cm" svg:viewBox="0 0 5 5" draw:points="5,4 0,5 0,0">
          <text:p/>
        </draw:polygon>
        <draw:polygon draw:style-name="gr9" draw:text-style-name="P7" draw:layer="layout" svg:width="0.005cm" svg:height="0.004cm" svg:x="7.882cm" svg:y="13.098cm" svg:viewBox="0 0 6 5" draw:points="4,0 6,5 0,4">
          <text:p/>
        </draw:polygon>
        <draw:path draw:style-name="gr9" draw:text-style-name="P7" draw:layer="layout" svg:width="0.006cm" svg:height="0.007cm" svg:x="7.593cm" svg:y="13.097cm" svg:viewBox="0 0 7 8" svg:d="M3 8c-1-2-3-3-3-5 0-1 2-2 4-3 1 1 4 2 3 3 0 3-3 3-4 5z">
          <text:p/>
        </draw:path>
        <draw:path draw:style-name="gr9" draw:text-style-name="P7" draw:layer="layout" svg:width="0.007cm" svg:height="0.006cm" svg:x="4.966cm" svg:y="27.401cm" svg:viewBox="0 0 8 7" svg:d="M8 3c-1 2-2 4-5 4-1 0-2-2-3-4 1-2 3-4 4-3 2 0 3 2 4 3z">
          <text:p/>
        </draw:path>
        <draw:path draw:style-name="gr9" draw:text-style-name="P7" draw:layer="layout" svg:width="0.007cm" svg:height="0.007cm" svg:x="15.473cm" svg:y="27.4cm" svg:viewBox="0 0 8 8" svg:d="M5 0c1 1 3 4 3 5s-3 4-5 3c-4-2-4-5 2-8z">
          <text:p/>
        </draw:path>
        <draw:polygon draw:style-name="gr9" draw:text-style-name="P7" draw:layer="layout" svg:width="0.003cm" svg:height="0.003cm" svg:x="11.391cm" svg:y="12.802cm" svg:viewBox="0 0 4 4" draw:points="1,4 0,0 4,0">
          <text:p/>
        </draw:polygon>
        <draw:polygon draw:style-name="gr9" draw:text-style-name="P7" draw:layer="layout" svg:width="0.003cm" svg:height="0.004cm" svg:x="11.093cm" svg:y="12.801cm" svg:viewBox="0 0 4 5" draw:points="4,0 4,5 0,4">
          <text:p/>
        </draw:polygon>
        <draw:polygon draw:style-name="gr9" draw:text-style-name="P7" draw:layer="layout" svg:width="0.003cm" svg:height="0.004cm" svg:x="10.806cm" svg:y="12.8cm" svg:viewBox="0 0 4 5" draw:points="3,0 4,5 0,5">
          <text:p/>
        </draw:polygon>
        <draw:polygon draw:style-name="gr9" draw:text-style-name="P7" draw:layer="layout" svg:width="0.004cm" svg:height="0.004cm" svg:x="5.255cm" svg:y="27.69cm" svg:viewBox="0 0 5 5" draw:points="5,3 0,5 1,0">
          <text:p/>
        </draw:polygon>
        <draw:polygon draw:style-name="gr9" draw:text-style-name="P7" draw:layer="layout" svg:width="0.003cm" svg:height="0.004cm" svg:x="10.221cm" svg:y="12.8cm" svg:viewBox="0 0 4 5" draw:points="3,0 4,5 0,5">
          <text:p/>
        </draw:polygon>
        <draw:polygon draw:style-name="gr9" draw:text-style-name="P7" draw:layer="layout" svg:width="0.003cm" svg:height="0.004cm" svg:x="8.467cm" svg:y="12.801cm" svg:viewBox="0 0 4 5" draw:points="3,0 4,5 0,4">
          <text:p/>
        </draw:polygon>
        <draw:polygon draw:style-name="gr9" draw:text-style-name="P7" draw:layer="layout" svg:width="0.004cm" svg:height="0.003cm" svg:x="5.553cm" svg:y="27.987cm" svg:viewBox="0 0 5 4" draw:points="5,3 0,4 1,0">
          <text:p/>
        </draw:polygon>
        <draw:polygon draw:style-name="gr9" draw:text-style-name="P7" draw:layer="layout" svg:width="0.004cm" svg:height="0.006cm" svg:x="5.84cm" svg:y="27.985cm" svg:viewBox="0 0 5 7" draw:points="3,0 5,7 0,7">
          <text:p/>
        </draw:polygon>
        <draw:polygon draw:style-name="gr9" draw:text-style-name="P7" draw:layer="layout" svg:width="0.004cm" svg:height="0.006cm" svg:x="14.89cm" svg:y="27.985cm" svg:viewBox="0 0 5 7" draw:points="2,0 5,7 0,5">
          <text:p/>
        </draw:polygon>
        <draw:path draw:style-name="gr9" draw:text-style-name="P7" draw:layer="layout" svg:width="0.007cm" svg:height="0.008cm" svg:x="4.381cm" svg:y="15.138cm" svg:viewBox="0 0 8 9" svg:d="M8 5c-1 2-4 5-5 4-1 0-3-4-3-4 2-7 6-7 8 0z">
          <text:p/>
        </draw:path>
        <draw:path draw:style-name="gr9" draw:text-style-name="P7" draw:layer="layout" svg:width="0.006cm" svg:height="0.007cm" svg:x="3.212cm" svg:y="25.646cm" svg:viewBox="0 0 7 8" svg:d="M7 4c-1 1-2 3-3 4-1-1-4-3-4-4s3-3 4-4z">
          <text:p/>
        </draw:path>
        <draw:polygon draw:style-name="gr9" draw:text-style-name="P7" draw:layer="layout" svg:width="0.004cm" svg:height="0.003cm" svg:x="17.228cm" svg:y="25.648cm" svg:viewBox="0 0 5 4" draw:points="0,2 5,0 5,4">
          <text:p/>
        </draw:polygon>
        <draw:path draw:style-name="gr9" draw:text-style-name="P7" draw:layer="layout" svg:width="0.008cm" svg:height="0.007cm" svg:x="15.472cm" svg:y="14.554cm" svg:viewBox="0 0 9 8" svg:d="M9 5c-1 1-3 3-4 3-2 0-4-2-5-4 2-2 3-4 5-4s3 2 4 5z">
          <text:p/>
        </draw:path>
        <draw:path draw:style-name="gr9" draw:text-style-name="P7" draw:layer="layout" svg:width="0.009cm" svg:height="0.007cm" svg:x="5.253cm" svg:y="14.554cm" svg:viewBox="0 0 10 8" svg:d="M5 0c1 1 2 3 5 4-3 2-4 4-5 4s-3-2-5-5c2-1 4-2 5-3z">
          <text:p/>
        </draw:path>
        <draw:path draw:style-name="gr9" draw:text-style-name="P7" draw:layer="layout" svg:width="0.007cm" svg:height="0.007cm" svg:x="4.966cm" svg:y="14.554cm" svg:viewBox="0 0 8 8" svg:d="M8 4c-1 2-3 4-4 4s-2-4-4-5c2-1 3-3 5-3 1 0 2 2 3 4z">
          <text:p/>
        </draw:path>
        <draw:path draw:style-name="gr9" draw:text-style-name="P7" draw:layer="layout" svg:width="0.008cm" svg:height="0.007cm" svg:x="3.795cm" svg:y="26.231cm" svg:viewBox="0 0 9 8" svg:d="M9 5c-1 1-2 3-4 3-1 0-2-3-5-4 3-1 4-4 6-4 1 0 2 3 3 5z">
          <text:p/>
        </draw:path>
        <draw:path draw:style-name="gr9" draw:text-style-name="P7" draw:layer="layout" svg:width="0.009cm" svg:height="0.007cm" svg:x="16.642cm" svg:y="26.231cm" svg:viewBox="0 0 10 8" svg:d="M10 5c-3 1-4 3-5 3-1-1-2-3-5-5 3-1 4-3 5-3s3 2 5 5z">
          <text:p/>
        </draw:path>
        <draw:path draw:style-name="gr9" draw:text-style-name="P7" draw:layer="layout" svg:width="0.007cm" svg:height="0.007cm" svg:x="16.93cm" svg:y="26.231cm" svg:viewBox="0 0 8 8" svg:d="M4 0c1 1 2 2 4 5-2 1-3 3-5 3-1 0-2-2-3-5 1-1 3-2 4-3z">
          <text:p/>
        </draw:path>
        <draw:path draw:style-name="gr9" draw:text-style-name="P7" draw:layer="layout" svg:width="0.008cm" svg:height="0.009cm" svg:x="14.888cm" svg:y="13.968cm" svg:viewBox="0 0 9 10" svg:d="M5 0c2 3 4 4 4 6 0 1-4 5-4 4-7-3-7-6 0-10z">
          <text:p/>
        </draw:path>
        <draw:path draw:style-name="gr9" draw:text-style-name="P7" draw:layer="layout" svg:width="0.007cm" svg:height="0.009cm" svg:x="5.838cm" svg:y="13.968cm" svg:viewBox="0 0 8 10" svg:d="M5 0c1 2 4 5 3 6-2 5-6 5-8-1 0-2 2-3 5-5z">
          <text:p/>
        </draw:path>
        <draw:polygon draw:style-name="gr9" draw:text-style-name="P7" draw:layer="layout" svg:width="0.004cm" svg:height="0.004cm" svg:x="14.306cm" svg:y="13.683cm" svg:viewBox="0 0 5 5" draw:points="5,2 0,5 0,0">
          <text:p/>
        </draw:polygon>
        <draw:polygon draw:style-name="gr9" draw:text-style-name="P7" draw:layer="layout" svg:width="0.003cm" svg:height="0.003cm" svg:x="14.018cm" svg:y="13.684cm" svg:viewBox="0 0 4 4" draw:points="1,4 0,0 4,0">
          <text:p/>
        </draw:polygon>
        <draw:polygon draw:style-name="gr9" draw:text-style-name="P7" draw:layer="layout" svg:width="0.004cm" svg:height="0.004cm" svg:x="6.425cm" svg:y="13.682cm" svg:viewBox="0 0 5 5" draw:points="3,0 5,5 0,5">
          <text:p/>
        </draw:polygon>
        <draw:path draw:style-name="gr9" draw:text-style-name="P7" draw:layer="layout" svg:width="0.007cm" svg:height="0.006cm" svg:x="4.381cm" svg:y="26.816cm" svg:viewBox="0 0 8 7" svg:d="M8 4c-1 1-4 3-5 3s-2-2-3-3c1-1 2-4 3-4 3 0 4 3 5 4z">
          <text:p/>
        </draw:path>
        <draw:polygon draw:style-name="gr9" draw:text-style-name="P7" draw:layer="layout" svg:width="0.004cm" svg:height="0.005cm" svg:x="16.347cm" svg:y="26.816cm" svg:viewBox="0 0 5 6" draw:points="2,0 5,6 0,5">
          <text:p/>
        </draw:polygon>
        <draw:polygon draw:style-name="gr9" draw:text-style-name="P7" draw:layer="layout" svg:width="0.005cm" svg:height="0.004cm" svg:x="13.72cm" svg:y="13.385cm" svg:viewBox="0 0 6 5" draw:points="4,0 6,5 0,4">
          <text:p/>
        </draw:polygon>
        <draw:polygon draw:style-name="gr9" draw:text-style-name="P7" draw:layer="layout" svg:width="0.004cm" svg:height="0.005cm" svg:x="13.432cm" svg:y="13.384cm" svg:viewBox="0 0 5 6" draw:points="4,0 5,6 0,5">
          <text:p/>
        </draw:polyg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  <style:font-face style:name="Roboto1" svg:font-family="Roboto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1cm" fo:margin-right="1cm" fo:page-width="20.988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97" style:page-layout-name="PM0" draw:style-name="Mdp1"/>
    <style:master-page style:name="master-page3" style:page-layout-name="PM0" draw:style-name="Mdp1"/>
    <style:master-page style:name="master-page36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6-05-24T00:32:07.193491463</dc:date>
    <meta:editing-duration>PT2H4M4S</meta:editing-duration>
    <meta:editing-cycles>11</meta:editing-cycles>
    <meta:generator>LibreOffice/7.3.7.2$Linux_X86_64 LibreOffice_project/30$Build-2</meta:generator>
    <meta:document-statistic meta:object-count="2561"/>
  </office:meta>
</office:document-meta>
</file>