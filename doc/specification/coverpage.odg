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7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5cm" fo:min-width="16.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8.0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30pt" fo:font-weight="350" style:font-size-asian="30pt" style:font-weight-asian="350" style:font-name-complex="Roboto1" style:font-size-complex="30pt" style:font-weight-complex="350"/>
    </style:style>
    <style:style style:name="T2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3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7.494cm" svg:height="2.871cm" svg:x="2.178cm" svg:y="5.827cm">
          <draw:text-box>
            <text:p text:style-name="P2"><text:span text:style-name="T1">CMTAT ACE Specification</text:span></text:p>
          </draw:text-box>
        </draw:frame>
        <draw:frame draw:style-name="gr4" draw:text-style-name="P4" draw:layer="layout" svg:width="16.3cm" svg:height="1.305cm" svg:x="2.35cm" svg:y="8.1cm">
          <draw:text-box>
            <text:p text:style-name="P2"><text:span text:style-name="T2">CMTAT Functional Specifications to integrate </text:span></text:p>
            <text:p text:style-name="P2"><text:span text:style-name="T2">Chainlink ACE (Automated Compliance Engine)</text:span></text:p>
          </draw:text-box>
        </draw:frame>
        <draw:polygon draw:style-name="gr5" draw:text-style-name="P5" draw:layer="layout" svg:width="20.999cm" svg:height="17.253cm" svg:x="0cm" svg:y="12.447cm" svg:viewBox="0 0 21000 17254" draw:points="0,17254 21000,17254 21000,0 0,0">
          <text:p/>
        </draw:polygon>
        <draw:frame draw:style-name="gr6" draw:text-style-name="P4" draw:layer="layout" svg:width="18.413cm" svg:height="1.957cm" svg:x="6.715cm" svg:y="9.207cm">
          <draw:text-box>
            <text:p text:style-name="P2"><text:span text:style-name="T2"><text:line-break/></text:span><text:span text:style-name="T2"/></text:p>
          </draw:text-box>
        </draw:frame>
        <draw:frame draw:style-name="gr7" draw:text-style-name="P6" draw:layer="layout" svg:width="8.016cm" svg:height="1.588cm" svg:x="2.27cm" svg:y="9.842cm">
          <draw:text-box>
            <text:p text:style-name="P2"><text:span text:style-name="T3">CMTAT Chainlink ACE: v0.2.0</text:span><text:span text:style-name="T3"><text:line-break/></text:span><text:span text:style-name="T3">First published: June 2026</text:span></text:p>
          </draw:text-box>
        </draw:frame>
        <draw:line draw:style-name="gr8" draw:text-style-name="P1" draw:layer="layout" svg:x1="0.017cm" svg:y1="15.901cm" svg:x2="13.8cm" svg:y2="15.85cm">
          <text:p/>
        </draw:line>
        <draw:path draw:style-name="gr9" draw:text-style-name="P7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9" draw:text-style-name="P7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9" draw:text-style-name="P7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9" draw:text-style-name="P7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9" draw:text-style-name="P7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9" draw:text-style-name="P7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9" draw:text-style-name="P7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9" draw:text-style-name="P7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9" draw:text-style-name="P7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9" draw:text-style-name="P7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9" draw:text-style-name="P7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9" draw:text-style-name="P7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9" draw:text-style-name="P7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9" draw:text-style-name="P7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9" draw:text-style-name="P7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9" draw:text-style-name="P7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9" draw:text-style-name="P7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9" draw:text-style-name="P7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9" draw:text-style-name="P7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9" draw:text-style-name="P7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9" draw:text-style-name="P7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9" draw:text-style-name="P7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9" draw:text-style-name="P7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9" draw:text-style-name="P7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9" draw:text-style-name="P7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9" draw:text-style-name="P7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9" draw:text-style-name="P7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9" draw:text-style-name="P7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9" draw:text-style-name="P7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9" draw:text-style-name="P7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9" draw:text-style-name="P7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9" draw:text-style-name="P7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9" draw:text-style-name="P7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9" draw:text-style-name="P7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9" draw:text-style-name="P7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9" draw:text-style-name="P7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9" draw:text-style-name="P7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9" draw:text-style-name="P7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9" draw:text-style-name="P7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9" draw:text-style-name="P7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9" draw:text-style-name="P7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9" draw:text-style-name="P7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9" draw:text-style-name="P7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9" draw:text-style-name="P7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9" draw:text-style-name="P7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9" draw:text-style-name="P7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9" draw:text-style-name="P7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9" draw:text-style-name="P7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9" draw:text-style-name="P7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9" draw:text-style-name="P7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9" draw:text-style-name="P7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9" draw:text-style-name="P7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9" draw:text-style-name="P7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9" draw:text-style-name="P7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9" draw:text-style-name="P7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9" draw:text-style-name="P7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9" draw:text-style-name="P7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9" draw:text-style-name="P7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9" draw:text-style-name="P7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9" draw:text-style-name="P7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9" draw:text-style-name="P7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9" draw:text-style-name="P7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9" draw:text-style-name="P7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9" draw:text-style-name="P7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9" draw:text-style-name="P7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9" draw:text-style-name="P7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9" draw:text-style-name="P7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9" draw:text-style-name="P7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9" draw:text-style-name="P7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9" draw:text-style-name="P7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9" draw:text-style-name="P7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9" draw:text-style-name="P7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9" draw:text-style-name="P7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9" draw:text-style-name="P7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9" draw:text-style-name="P7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9" draw:text-style-name="P7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9" draw:text-style-name="P7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9" draw:text-style-name="P7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9" draw:text-style-name="P7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9" draw:text-style-name="P7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9" draw:text-style-name="P7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9" draw:text-style-name="P7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9" draw:text-style-name="P7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9" draw:text-style-name="P7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9" draw:text-style-name="P7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9" draw:text-style-name="P7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9" draw:text-style-name="P7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9" draw:text-style-name="P7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9" draw:text-style-name="P7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9" draw:text-style-name="P7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9" draw:text-style-name="P7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9" draw:text-style-name="P7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9" draw:text-style-name="P7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9" draw:text-style-name="P7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9" draw:text-style-name="P7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9" draw:text-style-name="P7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9" draw:text-style-name="P7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9" draw:text-style-name="P7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9" draw:text-style-name="P7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9" draw:text-style-name="P7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9" draw:text-style-name="P7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9" draw:text-style-name="P7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9" draw:text-style-name="P7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9" draw:text-style-name="P7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9" draw:text-style-name="P7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9" draw:text-style-name="P7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9" draw:text-style-name="P7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9" draw:text-style-name="P7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9" draw:text-style-name="P7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9" draw:text-style-name="P7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9" draw:text-style-name="P7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9" draw:text-style-name="P7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9" draw:text-style-name="P7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9" draw:text-style-name="P7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9" draw:text-style-name="P7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9" draw:text-style-name="P7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9" draw:text-style-name="P7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9" draw:text-style-name="P7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9" draw:text-style-name="P7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9" draw:text-style-name="P7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9" draw:text-style-name="P7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9" draw:text-style-name="P7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9" draw:text-style-name="P7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9" draw:text-style-name="P7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9" draw:text-style-name="P7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9" draw:text-style-name="P7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9" draw:text-style-name="P7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9" draw:text-style-name="P7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9" draw:text-style-name="P7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9" draw:text-style-name="P7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9" draw:text-style-name="P7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9" draw:text-style-name="P7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9" draw:text-style-name="P7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9" draw:text-style-name="P7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9" draw:text-style-name="P7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9" draw:text-style-name="P7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9" draw:text-style-name="P7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9" draw:text-style-name="P7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9" draw:text-style-name="P7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9" draw:text-style-name="P7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9" draw:text-style-name="P7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9" draw:text-style-name="P7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9" draw:text-style-name="P7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9" draw:text-style-name="P7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9" draw:text-style-name="P7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9" draw:text-style-name="P7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9" draw:text-style-name="P7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9" draw:text-style-name="P7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9" draw:text-style-name="P7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9" draw:text-style-name="P7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9" draw:text-style-name="P7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9" draw:text-style-name="P7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9" draw:text-style-name="P7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9" draw:text-style-name="P7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9" draw:text-style-name="P7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9" draw:text-style-name="P7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9" draw:text-style-name="P7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9" draw:text-style-name="P7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9" draw:text-style-name="P7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9" draw:text-style-name="P7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9" draw:text-style-name="P7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9" draw:text-style-name="P7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9" draw:text-style-name="P7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9" draw:text-style-name="P7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9" draw:text-style-name="P7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9" draw:text-style-name="P7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9" draw:text-style-name="P7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9" draw:text-style-name="P7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9" draw:text-style-name="P7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9" draw:text-style-name="P7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9" draw:text-style-name="P7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9" draw:text-style-name="P7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9" draw:text-style-name="P7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9" draw:text-style-name="P7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9" draw:text-style-name="P7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9" draw:text-style-name="P7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9" draw:text-style-name="P7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9" draw:text-style-name="P7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9" draw:text-style-name="P7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9" draw:text-style-name="P7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9" draw:text-style-name="P7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9" draw:text-style-name="P7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9" draw:text-style-name="P7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9" draw:text-style-name="P7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9" draw:text-style-name="P7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9" draw:text-style-name="P7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9" draw:text-style-name="P7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9" draw:text-style-name="P7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9" draw:text-style-name="P7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9" draw:text-style-name="P7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9" draw:text-style-name="P7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9" draw:text-style-name="P7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9" draw:text-style-name="P7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9" draw:text-style-name="P7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9" draw:text-style-name="P7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9" draw:text-style-name="P7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9" draw:text-style-name="P7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9" draw:text-style-name="P7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9" draw:text-style-name="P7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9" draw:text-style-name="P7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9" draw:text-style-name="P7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9" draw:text-style-name="P7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9" draw:text-style-name="P7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9" draw:text-style-name="P7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9" draw:text-style-name="P7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9" draw:text-style-name="P7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9" draw:text-style-name="P7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9" draw:text-style-name="P7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9" draw:text-style-name="P7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9" draw:text-style-name="P7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9" draw:text-style-name="P7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9" draw:text-style-name="P7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9" draw:text-style-name="P7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9" draw:text-style-name="P7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9" draw:text-style-name="P7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9" draw:text-style-name="P7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9" draw:text-style-name="P7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9" draw:text-style-name="P7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9" draw:text-style-name="P7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9" draw:text-style-name="P7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9" draw:text-style-name="P7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9" draw:text-style-name="P7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9" draw:text-style-name="P7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9" draw:text-style-name="P7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9" draw:text-style-name="P7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9" draw:text-style-name="P7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9" draw:text-style-name="P7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9" draw:text-style-name="P7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9" draw:text-style-name="P7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9" draw:text-style-name="P7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9" draw:text-style-name="P7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9" draw:text-style-name="P7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9" draw:text-style-name="P7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9" draw:text-style-name="P7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9" draw:text-style-name="P7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9" draw:text-style-name="P7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9" draw:text-style-name="P7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9" draw:text-style-name="P7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9" draw:text-style-name="P7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9" draw:text-style-name="P7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9" draw:text-style-name="P7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9" draw:text-style-name="P7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9" draw:text-style-name="P7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9" draw:text-style-name="P7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9" draw:text-style-name="P7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9" draw:text-style-name="P7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9" draw:text-style-name="P7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9" draw:text-style-name="P7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9" draw:text-style-name="P7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9" draw:text-style-name="P7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9" draw:text-style-name="P7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9" draw:text-style-name="P7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9" draw:text-style-name="P7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9" draw:text-style-name="P7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9" draw:text-style-name="P7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9" draw:text-style-name="P7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9" draw:text-style-name="P7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9" draw:text-style-name="P7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9" draw:text-style-name="P7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9" draw:text-style-name="P7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9" draw:text-style-name="P7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9" draw:text-style-name="P7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9" draw:text-style-name="P7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9" draw:text-style-name="P7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9" draw:text-style-name="P7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9" draw:text-style-name="P7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9" draw:text-style-name="P7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9" draw:text-style-name="P7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9" draw:text-style-name="P7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9" draw:text-style-name="P7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9" draw:text-style-name="P7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9" draw:text-style-name="P7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9" draw:text-style-name="P7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9" draw:text-style-name="P7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9" draw:text-style-name="P7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9" draw:text-style-name="P7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9" draw:text-style-name="P7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9" draw:text-style-name="P7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9" draw:text-style-name="P7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9" draw:text-style-name="P7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9" draw:text-style-name="P7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9" draw:text-style-name="P7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9" draw:text-style-name="P7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9" draw:text-style-name="P7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9" draw:text-style-name="P7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9" draw:text-style-name="P7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9" draw:text-style-name="P7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9" draw:text-style-name="P7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9" draw:text-style-name="P7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9" draw:text-style-name="P7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9" draw:text-style-name="P7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9" draw:text-style-name="P7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9" draw:text-style-name="P7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9" draw:text-style-name="P7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9" draw:text-style-name="P7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9" draw:text-style-name="P7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9" draw:text-style-name="P7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9" draw:text-style-name="P7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9" draw:text-style-name="P7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9" draw:text-style-name="P7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9" draw:text-style-name="P7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9" draw:text-style-name="P7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9" draw:text-style-name="P7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9" draw:text-style-name="P7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9" draw:text-style-name="P7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9" draw:text-style-name="P7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9" draw:text-style-name="P7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9" draw:text-style-name="P7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9" draw:text-style-name="P7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9" draw:text-style-name="P7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9" draw:text-style-name="P7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9" draw:text-style-name="P7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9" draw:text-style-name="P7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9" draw:text-style-name="P7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9" draw:text-style-name="P7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9" draw:text-style-name="P7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9" draw:text-style-name="P7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9" draw:text-style-name="P7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9" draw:text-style-name="P7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9" draw:text-style-name="P7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9" draw:text-style-name="P7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9" draw:text-style-name="P7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9" draw:text-style-name="P7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9" draw:text-style-name="P7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9" draw:text-style-name="P7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9" draw:text-style-name="P7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9" draw:text-style-name="P7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9" draw:text-style-name="P7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9" draw:text-style-name="P7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9" draw:text-style-name="P7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9" draw:text-style-name="P7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9" draw:text-style-name="P7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9" draw:text-style-name="P7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9" draw:text-style-name="P7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9" draw:text-style-name="P7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9" draw:text-style-name="P7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9" draw:text-style-name="P7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9" draw:text-style-name="P7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9" draw:text-style-name="P7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9" draw:text-style-name="P7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9" draw:text-style-name="P7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9" draw:text-style-name="P7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9" draw:text-style-name="P7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9" draw:text-style-name="P7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9" draw:text-style-name="P7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9" draw:text-style-name="P7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9" draw:text-style-name="P7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9" draw:text-style-name="P7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9" draw:text-style-name="P7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9" draw:text-style-name="P7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9" draw:text-style-name="P7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9" draw:text-style-name="P7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9" draw:text-style-name="P7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9" draw:text-style-name="P7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9" draw:text-style-name="P7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9" draw:text-style-name="P7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9" draw:text-style-name="P7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9" draw:text-style-name="P7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9" draw:text-style-name="P7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9" draw:text-style-name="P7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9" draw:text-style-name="P7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9" draw:text-style-name="P7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9" draw:text-style-name="P7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9" draw:text-style-name="P7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9" draw:text-style-name="P7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9" draw:text-style-name="P7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9" draw:text-style-name="P7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9" draw:text-style-name="P7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9" draw:text-style-name="P7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9" draw:text-style-name="P7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9" draw:text-style-name="P7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9" draw:text-style-name="P7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9" draw:text-style-name="P7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9" draw:text-style-name="P7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9" draw:text-style-name="P7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9" draw:text-style-name="P7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9" draw:text-style-name="P7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9" draw:text-style-name="P7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9" draw:text-style-name="P7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9" draw:text-style-name="P7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9" draw:text-style-name="P7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9" draw:text-style-name="P7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9" draw:text-style-name="P7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9" draw:text-style-name="P7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9" draw:text-style-name="P7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9" draw:text-style-name="P7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9" draw:text-style-name="P7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9" draw:text-style-name="P7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9" draw:text-style-name="P7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9" draw:text-style-name="P7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9" draw:text-style-name="P7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9" draw:text-style-name="P7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9" draw:text-style-name="P7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9" draw:text-style-name="P7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9" draw:text-style-name="P7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9" draw:text-style-name="P7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9" draw:text-style-name="P7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9" draw:text-style-name="P7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9" draw:text-style-name="P7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9" draw:text-style-name="P7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9" draw:text-style-name="P7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9" draw:text-style-name="P7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9" draw:text-style-name="P7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9" draw:text-style-name="P7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9" draw:text-style-name="P7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9" draw:text-style-name="P7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9" draw:text-style-name="P7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9" draw:text-style-name="P7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9" draw:text-style-name="P7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9" draw:text-style-name="P7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9" draw:text-style-name="P7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9" draw:text-style-name="P7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9" draw:text-style-name="P7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9" draw:text-style-name="P7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9" draw:text-style-name="P7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9" draw:text-style-name="P7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9" draw:text-style-name="P7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9" draw:text-style-name="P7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9" draw:text-style-name="P7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9" draw:text-style-name="P7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9" draw:text-style-name="P7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9" draw:text-style-name="P7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9" draw:text-style-name="P7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9" draw:text-style-name="P7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9" draw:text-style-name="P7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9" draw:text-style-name="P7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9" draw:text-style-name="P7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9" draw:text-style-name="P7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9" draw:text-style-name="P7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9" draw:text-style-name="P7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9" draw:text-style-name="P7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9" draw:text-style-name="P7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9" draw:text-style-name="P7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9" draw:text-style-name="P7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9" draw:text-style-name="P7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9" draw:text-style-name="P7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9" draw:text-style-name="P7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9" draw:text-style-name="P7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9" draw:text-style-name="P7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9" draw:text-style-name="P7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9" draw:text-style-name="P7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9" draw:text-style-name="P7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9" draw:text-style-name="P7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9" draw:text-style-name="P7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9" draw:text-style-name="P7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9" draw:text-style-name="P7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9" draw:text-style-name="P7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9" draw:text-style-name="P7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9" draw:text-style-name="P7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9" draw:text-style-name="P7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9" draw:text-style-name="P7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9" draw:text-style-name="P7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9" draw:text-style-name="P7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9" draw:text-style-name="P7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9" draw:text-style-name="P7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9" draw:text-style-name="P7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9" draw:text-style-name="P7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9" draw:text-style-name="P7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9" draw:text-style-name="P7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9" draw:text-style-name="P7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9" draw:text-style-name="P7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9" draw:text-style-name="P7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9" draw:text-style-name="P7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9" draw:text-style-name="P7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9" draw:text-style-name="P7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9" draw:text-style-name="P7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9" draw:text-style-name="P7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9" draw:text-style-name="P7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9" draw:text-style-name="P7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9" draw:text-style-name="P7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9" draw:text-style-name="P7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9" draw:text-style-name="P7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9" draw:text-style-name="P7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9" draw:text-style-name="P7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9" draw:text-style-name="P7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9" draw:text-style-name="P7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9" draw:text-style-name="P7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9" draw:text-style-name="P7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9" draw:text-style-name="P7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9" draw:text-style-name="P7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9" draw:text-style-name="P7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9" draw:text-style-name="P7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9" draw:text-style-name="P7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9" draw:text-style-name="P7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9" draw:text-style-name="P7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9" draw:text-style-name="P7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9" draw:text-style-name="P7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9" draw:text-style-name="P7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9" draw:text-style-name="P7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9" draw:text-style-name="P7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9" draw:text-style-name="P7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9" draw:text-style-name="P7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9" draw:text-style-name="P7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9" draw:text-style-name="P7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9" draw:text-style-name="P7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9" draw:text-style-name="P7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9" draw:text-style-name="P7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9" draw:text-style-name="P7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9" draw:text-style-name="P7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9" draw:text-style-name="P7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9" draw:text-style-name="P7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9" draw:text-style-name="P7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9" draw:text-style-name="P7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9" draw:text-style-name="P7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9" draw:text-style-name="P7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9" draw:text-style-name="P7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9" draw:text-style-name="P7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9" draw:text-style-name="P7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9" draw:text-style-name="P7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9" draw:text-style-name="P7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9" draw:text-style-name="P7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9" draw:text-style-name="P7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9" draw:text-style-name="P7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9" draw:text-style-name="P7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9" draw:text-style-name="P7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9" draw:text-style-name="P7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9" draw:text-style-name="P7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9" draw:text-style-name="P7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9" draw:text-style-name="P7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9" draw:text-style-name="P7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9" draw:text-style-name="P7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9" draw:text-style-name="P7" draw:layer="layout" svg:width="0.188cm" svg:height="0.188cm" svg:x="13.922cm" svg:y="19.427cm" svg:viewBox="0 0 189 189" svg:d="M95 189c-52 0-95-42-95-94s43-95 95-95 94 42 94 94c0 53-41 95-94 95z">
          <text:p/>
        </draw:path>
        <draw:path draw:style-name="gr9" draw:text-style-name="P7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9" draw:text-style-name="P7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9" draw:text-style-name="P7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9" draw:text-style-name="P7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9" draw:text-style-name="P7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9" draw:text-style-name="P7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9" draw:text-style-name="P7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9" draw:text-style-name="P7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9" draw:text-style-name="P7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9" draw:text-style-name="P7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9" draw:text-style-name="P7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9" draw:text-style-name="P7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9" draw:text-style-name="P7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9" draw:text-style-name="P7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9" draw:text-style-name="P7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9" draw:text-style-name="P7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9" draw:text-style-name="P7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9" draw:text-style-name="P7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9" draw:text-style-name="P7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9" draw:text-style-name="P7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9" draw:text-style-name="P7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9" draw:text-style-name="P7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9" draw:text-style-name="P7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9" draw:text-style-name="P7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9" draw:text-style-name="P7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9" draw:text-style-name="P7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9" draw:text-style-name="P7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9" draw:text-style-name="P7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9" draw:text-style-name="P7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9" draw:text-style-name="P7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9" draw:text-style-name="P7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9" draw:text-style-name="P7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9" draw:text-style-name="P7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9" draw:text-style-name="P7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9" draw:text-style-name="P7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9" draw:text-style-name="P7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9" draw:text-style-name="P7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9" draw:text-style-name="P7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9" draw:text-style-name="P7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9" draw:text-style-name="P7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9" draw:text-style-name="P7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9" draw:text-style-name="P7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9" draw:text-style-name="P7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9" draw:text-style-name="P7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9" draw:text-style-name="P7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9" draw:text-style-name="P7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9" draw:text-style-name="P7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9" draw:text-style-name="P7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9" draw:text-style-name="P7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9" draw:text-style-name="P7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9" draw:text-style-name="P7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9" draw:text-style-name="P7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9" draw:text-style-name="P7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9" draw:text-style-name="P7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9" draw:text-style-name="P7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9" draw:text-style-name="P7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9" draw:text-style-name="P7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9" draw:text-style-name="P7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9" draw:text-style-name="P7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9" draw:text-style-name="P7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9" draw:text-style-name="P7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9" draw:text-style-name="P7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9" draw:text-style-name="P7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9" draw:text-style-name="P7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9" draw:text-style-name="P7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9" draw:text-style-name="P7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9" draw:text-style-name="P7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9" draw:text-style-name="P7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9" draw:text-style-name="P7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9" draw:text-style-name="P7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9" draw:text-style-name="P7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9" draw:text-style-name="P7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9" draw:text-style-name="P7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9" draw:text-style-name="P7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9" draw:text-style-name="P7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9" draw:text-style-name="P7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9" draw:text-style-name="P7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9" draw:text-style-name="P7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9" draw:text-style-name="P7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9" draw:text-style-name="P7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9" draw:text-style-name="P7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9" draw:text-style-name="P7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9" draw:text-style-name="P7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9" draw:text-style-name="P7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9" draw:text-style-name="P7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9" draw:text-style-name="P7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9" draw:text-style-name="P7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9" draw:text-style-name="P7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9" draw:text-style-name="P7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9" draw:text-style-name="P7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9" draw:text-style-name="P7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9" draw:text-style-name="P7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9" draw:text-style-name="P7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9" draw:text-style-name="P7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9" draw:text-style-name="P7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9" draw:text-style-name="P7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9" draw:text-style-name="P7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9" draw:text-style-name="P7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9" draw:text-style-name="P7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9" draw:text-style-name="P7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9" draw:text-style-name="P7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9" draw:text-style-name="P7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9" draw:text-style-name="P7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9" draw:text-style-name="P7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9" draw:text-style-name="P7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9" draw:text-style-name="P7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9" draw:text-style-name="P7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9" draw:text-style-name="P7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9" draw:text-style-name="P7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9" draw:text-style-name="P7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9" draw:text-style-name="P7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9" draw:text-style-name="P7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9" draw:text-style-name="P7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9" draw:text-style-name="P7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9" draw:text-style-name="P7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9" draw:text-style-name="P7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9" draw:text-style-name="P7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9" draw:text-style-name="P7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9" draw:text-style-name="P7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9" draw:text-style-name="P7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9" draw:text-style-name="P7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9" draw:text-style-name="P7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9" draw:text-style-name="P7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9" draw:text-style-name="P7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9" draw:text-style-name="P7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9" draw:text-style-name="P7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9" draw:text-style-name="P7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9" draw:text-style-name="P7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9" draw:text-style-name="P7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9" draw:text-style-name="P7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9" draw:text-style-name="P7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9" draw:text-style-name="P7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9" draw:text-style-name="P7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9" draw:text-style-name="P7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9" draw:text-style-name="P7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9" draw:text-style-name="P7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9" draw:text-style-name="P7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9" draw:text-style-name="P7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9" draw:text-style-name="P7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9" draw:text-style-name="P7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9" draw:text-style-name="P7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9" draw:text-style-name="P7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9" draw:text-style-name="P7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9" draw:text-style-name="P7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9" draw:text-style-name="P7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9" draw:text-style-name="P7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9" draw:text-style-name="P7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9" draw:text-style-name="P7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9" draw:text-style-name="P7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9" draw:text-style-name="P7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9" draw:text-style-name="P7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9" draw:text-style-name="P7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9" draw:text-style-name="P7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9" draw:text-style-name="P7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9" draw:text-style-name="P7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9" draw:text-style-name="P7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9" draw:text-style-name="P7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9" draw:text-style-name="P7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9" draw:text-style-name="P7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9" draw:text-style-name="P7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9" draw:text-style-name="P7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9" draw:text-style-name="P7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9" draw:text-style-name="P7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9" draw:text-style-name="P7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9" draw:text-style-name="P7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9" draw:text-style-name="P7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9" draw:text-style-name="P7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9" draw:text-style-name="P7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9" draw:text-style-name="P7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9" draw:text-style-name="P7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9" draw:text-style-name="P7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9" draw:text-style-name="P7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9" draw:text-style-name="P7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9" draw:text-style-name="P7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9" draw:text-style-name="P7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9" draw:text-style-name="P7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9" draw:text-style-name="P7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9" draw:text-style-name="P7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9" draw:text-style-name="P7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9" draw:text-style-name="P7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9" draw:text-style-name="P7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9" draw:text-style-name="P7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9" draw:text-style-name="P7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9" draw:text-style-name="P7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9" draw:text-style-name="P7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9" draw:text-style-name="P7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9" draw:text-style-name="P7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9" draw:text-style-name="P7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9" draw:text-style-name="P7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9" draw:text-style-name="P7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9" draw:text-style-name="P7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9" draw:text-style-name="P7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9" draw:text-style-name="P7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9" draw:text-style-name="P7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9" draw:text-style-name="P7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9" draw:text-style-name="P7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9" draw:text-style-name="P7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9" draw:text-style-name="P7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9" draw:text-style-name="P7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9" draw:text-style-name="P7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9" draw:text-style-name="P7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9" draw:text-style-name="P7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9" draw:text-style-name="P7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9" draw:text-style-name="P7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9" draw:text-style-name="P7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9" draw:text-style-name="P7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9" draw:text-style-name="P7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9" draw:text-style-name="P7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9" draw:text-style-name="P7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9" draw:text-style-name="P7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9" draw:text-style-name="P7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9" draw:text-style-name="P7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9" draw:text-style-name="P7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9" draw:text-style-name="P7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9" draw:text-style-name="P7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9" draw:text-style-name="P7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9" draw:text-style-name="P7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9" draw:text-style-name="P7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9" draw:text-style-name="P7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9" draw:text-style-name="P7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9" draw:text-style-name="P7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9" draw:text-style-name="P7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9" draw:text-style-name="P7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9" draw:text-style-name="P7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9" draw:text-style-name="P7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9" draw:text-style-name="P7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9" draw:text-style-name="P7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9" draw:text-style-name="P7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9" draw:text-style-name="P7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9" draw:text-style-name="P7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9" draw:text-style-name="P7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9" draw:text-style-name="P7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9" draw:text-style-name="P7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9" draw:text-style-name="P7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9" draw:text-style-name="P7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9" draw:text-style-name="P7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9" draw:text-style-name="P7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9" draw:text-style-name="P7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9" draw:text-style-name="P7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9" draw:text-style-name="P7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9" draw:text-style-name="P7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9" draw:text-style-name="P7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9" draw:text-style-name="P7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9" draw:text-style-name="P7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9" draw:text-style-name="P7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9" draw:text-style-name="P7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9" draw:text-style-name="P7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9" draw:text-style-name="P7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9" draw:text-style-name="P7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9" draw:text-style-name="P7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9" draw:text-style-name="P7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9" draw:text-style-name="P7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9" draw:text-style-name="P7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9" draw:text-style-name="P7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9" draw:text-style-name="P7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9" draw:text-style-name="P7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9" draw:text-style-name="P7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9" draw:text-style-name="P7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9" draw:text-style-name="P7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9" draw:text-style-name="P7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9" draw:text-style-name="P7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9" draw:text-style-name="P7" draw:layer="layout" svg:width="0.157cm" svg:height="0.157cm" svg:x="13.937cm" svg:y="24.113cm" svg:viewBox="0 0 158 158" svg:d="M158 79c0 44-34 79-78 79-42 0-80-37-80-79s38-80 80-79 78 33 78 79z">
          <text:p/>
        </draw:path>
        <draw:path draw:style-name="gr9" draw:text-style-name="P7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9" draw:text-style-name="P7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9" draw:text-style-name="P7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9" draw:text-style-name="P7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9" draw:text-style-name="P7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9" draw:text-style-name="P7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9" draw:text-style-name="P7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9" draw:text-style-name="P7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9" draw:text-style-name="P7" draw:layer="layout" svg:width="0.155cm" svg:height="0.155cm" svg:x="9.853cm" svg:y="25.865cm" svg:viewBox="0 0 156 156" svg:d="M156 76c1 43-34 79-77 80s-78-32-79-76c-1-43 33-79 75-80s80 33 81 76z">
          <text:p/>
        </draw:path>
        <draw:path draw:style-name="gr9" draw:text-style-name="P7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9" draw:text-style-name="P7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9" draw:text-style-name="P7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9" draw:text-style-name="P7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9" draw:text-style-name="P7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9" draw:text-style-name="P7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9" draw:text-style-name="P7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9" draw:text-style-name="P7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9" draw:text-style-name="P7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9" draw:text-style-name="P7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9" draw:text-style-name="P7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9" draw:text-style-name="P7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9" draw:text-style-name="P7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9" draw:text-style-name="P7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9" draw:text-style-name="P7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9" draw:text-style-name="P7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9" draw:text-style-name="P7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9" draw:text-style-name="P7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9" draw:text-style-name="P7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9" draw:text-style-name="P7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9" draw:text-style-name="P7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9" draw:text-style-name="P7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9" draw:text-style-name="P7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9" draw:text-style-name="P7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9" draw:text-style-name="P7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9" draw:text-style-name="P7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9" draw:text-style-name="P7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9" draw:text-style-name="P7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9" draw:text-style-name="P7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9" draw:text-style-name="P7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9" draw:text-style-name="P7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9" draw:text-style-name="P7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9" draw:text-style-name="P7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9" draw:text-style-name="P7" draw:layer="layout" svg:width="0.151cm" svg:height="0.151cm" svg:x="6.059cm" svg:y="23.824cm" svg:viewBox="0 0 152 152" svg:d="M152 73c2 39-31 75-71 79s-81-35-81-77c0-39 35-74 75-75s75 33 77 73z">
          <text:p/>
        </draw:path>
        <draw:path draw:style-name="gr9" draw:text-style-name="P7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9" draw:text-style-name="P7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9" draw:text-style-name="P7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9" draw:text-style-name="P7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9" draw:text-style-name="P7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9" draw:text-style-name="P7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9" draw:text-style-name="P7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9" draw:text-style-name="P7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9" draw:text-style-name="P7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9" draw:text-style-name="P7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9" draw:text-style-name="P7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9" draw:text-style-name="P7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9" draw:text-style-name="P7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9" draw:text-style-name="P7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9" draw:text-style-name="P7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9" draw:text-style-name="P7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9" draw:text-style-name="P7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9" draw:text-style-name="P7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9" draw:text-style-name="P7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9" draw:text-style-name="P7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9" draw:text-style-name="P7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9" draw:text-style-name="P7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9" draw:text-style-name="P7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9" draw:text-style-name="P7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9" draw:text-style-name="P7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9" draw:text-style-name="P7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9" draw:text-style-name="P7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9" draw:text-style-name="P7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9" draw:text-style-name="P7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9" draw:text-style-name="P7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9" draw:text-style-name="P7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9" draw:text-style-name="P7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9" draw:text-style-name="P7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9" draw:text-style-name="P7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9" draw:text-style-name="P7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9" draw:text-style-name="P7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9" draw:text-style-name="P7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9" draw:text-style-name="P7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9" draw:text-style-name="P7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9" draw:text-style-name="P7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9" draw:text-style-name="P7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9" draw:text-style-name="P7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9" draw:text-style-name="P7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9" draw:text-style-name="P7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9" draw:text-style-name="P7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9" draw:text-style-name="P7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9" draw:text-style-name="P7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9" draw:text-style-name="P7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9" draw:text-style-name="P7" draw:layer="layout" svg:width="0.148cm" svg:height="0.147cm" svg:x="9.273cm" svg:y="15.944cm" svg:viewBox="0 0 149 148" svg:d="M149 73c1 39-34 74-74 75s-75-32-75-72c-1-39 33-75 72-76s75 34 77 73z">
          <text:p/>
        </draw:path>
        <draw:path draw:style-name="gr9" draw:text-style-name="P7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9" draw:text-style-name="P7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9" draw:text-style-name="P7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9" draw:text-style-name="P7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9" draw:text-style-name="P7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9" draw:text-style-name="P7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9" draw:text-style-name="P7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9" draw:text-style-name="P7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9" draw:text-style-name="P7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9" draw:text-style-name="P7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9" draw:text-style-name="P7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9" draw:text-style-name="P7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9" draw:text-style-name="P7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9" draw:text-style-name="P7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9" draw:text-style-name="P7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9" draw:text-style-name="P7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9" draw:text-style-name="P7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9" draw:text-style-name="P7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9" draw:text-style-name="P7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9" draw:text-style-name="P7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9" draw:text-style-name="P7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9" draw:text-style-name="P7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9" draw:text-style-name="P7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9" draw:text-style-name="P7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9" draw:text-style-name="P7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9" draw:text-style-name="P7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9" draw:text-style-name="P7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9" draw:text-style-name="P7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9" draw:text-style-name="P7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9" draw:text-style-name="P7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9" draw:text-style-name="P7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9" draw:text-style-name="P7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9" draw:text-style-name="P7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9" draw:text-style-name="P7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9" draw:text-style-name="P7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9" draw:text-style-name="P7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9" draw:text-style-name="P7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9" draw:text-style-name="P7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9" draw:text-style-name="P7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9" draw:text-style-name="P7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9" draw:text-style-name="P7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9" draw:text-style-name="P7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9" draw:text-style-name="P7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9" draw:text-style-name="P7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9" draw:text-style-name="P7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9" draw:text-style-name="P7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9" draw:text-style-name="P7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9" draw:text-style-name="P7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9" draw:text-style-name="P7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9" draw:text-style-name="P7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9" draw:text-style-name="P7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9" draw:text-style-name="P7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9" draw:text-style-name="P7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9" draw:text-style-name="P7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9" draw:text-style-name="P7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9" draw:text-style-name="P7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9" draw:text-style-name="P7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9" draw:text-style-name="P7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9" draw:text-style-name="P7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9" draw:text-style-name="P7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9" draw:text-style-name="P7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9" draw:text-style-name="P7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9" draw:text-style-name="P7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9" draw:text-style-name="P7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9" draw:text-style-name="P7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9" draw:text-style-name="P7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9" draw:text-style-name="P7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9" draw:text-style-name="P7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9" draw:text-style-name="P7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9" draw:text-style-name="P7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9" draw:text-style-name="P7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9" draw:text-style-name="P7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9" draw:text-style-name="P7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9" draw:text-style-name="P7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9" draw:text-style-name="P7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9" draw:text-style-name="P7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9" draw:text-style-name="P7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9" draw:text-style-name="P7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9" draw:text-style-name="P7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9" draw:text-style-name="P7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9" draw:text-style-name="P7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9" draw:text-style-name="P7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9" draw:text-style-name="P7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9" draw:text-style-name="P7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9" draw:text-style-name="P7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9" draw:text-style-name="P7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9" draw:text-style-name="P7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9" draw:text-style-name="P7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9" draw:text-style-name="P7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9" draw:text-style-name="P7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9" draw:text-style-name="P7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9" draw:text-style-name="P7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9" draw:text-style-name="P7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9" draw:text-style-name="P7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9" draw:text-style-name="P7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9" draw:text-style-name="P7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9" draw:text-style-name="P7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9" draw:text-style-name="P7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9" draw:text-style-name="P7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9" draw:text-style-name="P7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9" draw:text-style-name="P7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9" draw:text-style-name="P7" draw:layer="layout" svg:width="0.138cm" svg:height="0.14cm" svg:x="15.116cm" svg:y="18.868cm" svg:viewBox="0 0 139 141" svg:d="M139 67c1 40-29 72-67 74-37 1-71-31-72-70s29-70 68-71 70 28 71 67z">
          <text:p/>
        </draw:path>
        <draw:path draw:style-name="gr9" draw:text-style-name="P7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9" draw:text-style-name="P7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9" draw:text-style-name="P7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9" draw:text-style-name="P7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9" draw:text-style-name="P7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9" draw:text-style-name="P7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9" draw:text-style-name="P7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9" draw:text-style-name="P7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9" draw:text-style-name="P7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9" draw:text-style-name="P7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9" draw:text-style-name="P7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9" draw:text-style-name="P7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9" draw:text-style-name="P7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9" draw:text-style-name="P7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9" draw:text-style-name="P7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9" draw:text-style-name="P7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9" draw:text-style-name="P7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9" draw:text-style-name="P7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9" draw:text-style-name="P7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9" draw:text-style-name="P7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9" draw:text-style-name="P7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9" draw:text-style-name="P7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9" draw:text-style-name="P7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9" draw:text-style-name="P7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9" draw:text-style-name="P7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9" draw:text-style-name="P7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9" draw:text-style-name="P7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9" draw:text-style-name="P7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9" draw:text-style-name="P7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9" draw:text-style-name="P7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9" draw:text-style-name="P7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9" draw:text-style-name="P7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9" draw:text-style-name="P7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9" draw:text-style-name="P7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9" draw:text-style-name="P7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9" draw:text-style-name="P7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9" draw:text-style-name="P7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9" draw:text-style-name="P7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9" draw:text-style-name="P7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9" draw:text-style-name="P7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9" draw:text-style-name="P7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9" draw:text-style-name="P7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9" draw:text-style-name="P7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9" draw:text-style-name="P7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9" draw:text-style-name="P7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9" draw:text-style-name="P7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9" draw:text-style-name="P7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9" draw:text-style-name="P7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9" draw:text-style-name="P7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9" draw:text-style-name="P7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9" draw:text-style-name="P7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9" draw:text-style-name="P7" draw:layer="layout" svg:width="0.133cm" svg:height="0.134cm" svg:x="5.193cm" svg:y="18.87cm" svg:viewBox="0 0 134 135" svg:d="M64 135c-38-2-65-32-64-69 0-36 30-66 67-66s70 35 67 72-34 64-70 63z">
          <text:p/>
        </draw:path>
        <draw:path draw:style-name="gr9" draw:text-style-name="P7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9" draw:text-style-name="P7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9" draw:text-style-name="P7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9" draw:text-style-name="P7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9" draw:text-style-name="P7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9" draw:text-style-name="P7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9" draw:text-style-name="P7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9" draw:text-style-name="P7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9" draw:text-style-name="P7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9" draw:text-style-name="P7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9" draw:text-style-name="P7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9" draw:text-style-name="P7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9" draw:text-style-name="P7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9" draw:text-style-name="P7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9" draw:text-style-name="P7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9" draw:text-style-name="P7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9" draw:text-style-name="P7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9" draw:text-style-name="P7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9" draw:text-style-name="P7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9" draw:text-style-name="P7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9" draw:text-style-name="P7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9" draw:text-style-name="P7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9" draw:text-style-name="P7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9" draw:text-style-name="P7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9" draw:text-style-name="P7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9" draw:text-style-name="P7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9" draw:text-style-name="P7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9" draw:text-style-name="P7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9" draw:text-style-name="P7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9" draw:text-style-name="P7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9" draw:text-style-name="P7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9" draw:text-style-name="P7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9" draw:text-style-name="P7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9" draw:text-style-name="P7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9" draw:text-style-name="P7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9" draw:text-style-name="P7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9" draw:text-style-name="P7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9" draw:text-style-name="P7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9" draw:text-style-name="P7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9" draw:text-style-name="P7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9" draw:text-style-name="P7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9" draw:text-style-name="P7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9" draw:text-style-name="P7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9" draw:text-style-name="P7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9" draw:text-style-name="P7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9" draw:text-style-name="P7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9" draw:text-style-name="P7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9" draw:text-style-name="P7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9" draw:text-style-name="P7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9" draw:text-style-name="P7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9" draw:text-style-name="P7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9" draw:text-style-name="P7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9" draw:text-style-name="P7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9" draw:text-style-name="P7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9" draw:text-style-name="P7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9" draw:text-style-name="P7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9" draw:text-style-name="P7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9" draw:text-style-name="P7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9" draw:text-style-name="P7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9" draw:text-style-name="P7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9" draw:text-style-name="P7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9" draw:text-style-name="P7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9" draw:text-style-name="P7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9" draw:text-style-name="P7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9" draw:text-style-name="P7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9" draw:text-style-name="P7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9" draw:text-style-name="P7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9" draw:text-style-name="P7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9" draw:text-style-name="P7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9" draw:text-style-name="P7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9" draw:text-style-name="P7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9" draw:text-style-name="P7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9" draw:text-style-name="P7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9" draw:text-style-name="P7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9" draw:text-style-name="P7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9" draw:text-style-name="P7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9" draw:text-style-name="P7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9" draw:text-style-name="P7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9" draw:text-style-name="P7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9" draw:text-style-name="P7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9" draw:text-style-name="P7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9" draw:text-style-name="P7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9" draw:text-style-name="P7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9" draw:text-style-name="P7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9" draw:text-style-name="P7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9" draw:text-style-name="P7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9" draw:text-style-name="P7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9" draw:text-style-name="P7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9" draw:text-style-name="P7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9" draw:text-style-name="P7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9" draw:text-style-name="P7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9" draw:text-style-name="P7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9" draw:text-style-name="P7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9" draw:text-style-name="P7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9" draw:text-style-name="P7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9" draw:text-style-name="P7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9" draw:text-style-name="P7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9" draw:text-style-name="P7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9" draw:text-style-name="P7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9" draw:text-style-name="P7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9" draw:text-style-name="P7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9" draw:text-style-name="P7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9" draw:text-style-name="P7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9" draw:text-style-name="P7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9" draw:text-style-name="P7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9" draw:text-style-name="P7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9" draw:text-style-name="P7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9" draw:text-style-name="P7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9" draw:text-style-name="P7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9" draw:text-style-name="P7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9" draw:text-style-name="P7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9" draw:text-style-name="P7" draw:layer="layout" svg:width="0.122cm" svg:height="0.122cm" svg:x="4.907cm" svg:y="18.876cm" svg:viewBox="0 0 123 123" svg:d="M123 65c-1 34-29 59-64 58s-60-29-59-64 29-60 65-59c34 2 59 30 58 65z">
          <text:p/>
        </draw:path>
        <draw:path draw:style-name="gr9" draw:text-style-name="P7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9" draw:text-style-name="P7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9" draw:text-style-name="P7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9" draw:text-style-name="P7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9" draw:text-style-name="P7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9" draw:text-style-name="P7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9" draw:text-style-name="P7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9" draw:text-style-name="P7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9" draw:text-style-name="P7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9" draw:text-style-name="P7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9" draw:text-style-name="P7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9" draw:text-style-name="P7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9" draw:text-style-name="P7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9" draw:text-style-name="P7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9" draw:text-style-name="P7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9" draw:text-style-name="P7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9" draw:text-style-name="P7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9" draw:text-style-name="P7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9" draw:text-style-name="P7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9" draw:text-style-name="P7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9" draw:text-style-name="P7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9" draw:text-style-name="P7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9" draw:text-style-name="P7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9" draw:text-style-name="P7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9" draw:text-style-name="P7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9" draw:text-style-name="P7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9" draw:text-style-name="P7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9" draw:text-style-name="P7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9" draw:text-style-name="P7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9" draw:text-style-name="P7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9" draw:text-style-name="P7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9" draw:text-style-name="P7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9" draw:text-style-name="P7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9" draw:text-style-name="P7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9" draw:text-style-name="P7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9" draw:text-style-name="P7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9" draw:text-style-name="P7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9" draw:text-style-name="P7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9" draw:text-style-name="P7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9" draw:text-style-name="P7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9" draw:text-style-name="P7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9" draw:text-style-name="P7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9" draw:text-style-name="P7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9" draw:text-style-name="P7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9" draw:text-style-name="P7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9" draw:text-style-name="P7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9" draw:text-style-name="P7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9" draw:text-style-name="P7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9" draw:text-style-name="P7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9" draw:text-style-name="P7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9" draw:text-style-name="P7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9" draw:text-style-name="P7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9" draw:text-style-name="P7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9" draw:text-style-name="P7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9" draw:text-style-name="P7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9" draw:text-style-name="P7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9" draw:text-style-name="P7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9" draw:text-style-name="P7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9" draw:text-style-name="P7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9" draw:text-style-name="P7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9" draw:text-style-name="P7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9" draw:text-style-name="P7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9" draw:text-style-name="P7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9" draw:text-style-name="P7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9" draw:text-style-name="P7" draw:layer="layout" svg:width="0.116cm" svg:height="0.116cm" svg:x="10.164cm" svg:y="15.084cm" svg:viewBox="0 0 117 117" svg:d="M0 56c1-33 27-57 59-56 30 0 58 27 58 59s-32 61-64 58-55-29-53-61z">
          <text:p/>
        </draw:path>
        <draw:path draw:style-name="gr9" draw:text-style-name="P7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9" draw:text-style-name="P7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9" draw:text-style-name="P7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9" draw:text-style-name="P7" draw:layer="layout" svg:width="0.118cm" svg:height="0.118cm" svg:x="7.827cm" svg:y="15.667cm" svg:viewBox="0 0 119 119" svg:d="M62 0c34 1 58 27 57 60s-26 59-59 59-63-32-60-65c4-32 30-55 62-54z">
          <text:p/>
        </draw:path>
        <draw:path draw:style-name="gr9" draw:text-style-name="P7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9" draw:text-style-name="P7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9" draw:text-style-name="P7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9" draw:text-style-name="P7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9" draw:text-style-name="P7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9" draw:text-style-name="P7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9" draw:text-style-name="P7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9" draw:text-style-name="P7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9" draw:text-style-name="P7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9" draw:text-style-name="P7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9" draw:text-style-name="P7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9" draw:text-style-name="P7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9" draw:text-style-name="P7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9" draw:text-style-name="P7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9" draw:text-style-name="P7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9" draw:text-style-name="P7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9" draw:text-style-name="P7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9" draw:text-style-name="P7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9" draw:text-style-name="P7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9" draw:text-style-name="P7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9" draw:text-style-name="P7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9" draw:text-style-name="P7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9" draw:text-style-name="P7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9" draw:text-style-name="P7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9" draw:text-style-name="P7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9" draw:text-style-name="P7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9" draw:text-style-name="P7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9" draw:text-style-name="P7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9" draw:text-style-name="P7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9" draw:text-style-name="P7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9" draw:text-style-name="P7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9" draw:text-style-name="P7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9" draw:text-style-name="P7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9" draw:text-style-name="P7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9" draw:text-style-name="P7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9" draw:text-style-name="P7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9" draw:text-style-name="P7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9" draw:text-style-name="P7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9" draw:text-style-name="P7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9" draw:text-style-name="P7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9" draw:text-style-name="P7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9" draw:text-style-name="P7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9" draw:text-style-name="P7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9" draw:text-style-name="P7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9" draw:text-style-name="P7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9" draw:text-style-name="P7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9" draw:text-style-name="P7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9" draw:text-style-name="P7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9" draw:text-style-name="P7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9" draw:text-style-name="P7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9" draw:text-style-name="P7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9" draw:text-style-name="P7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9" draw:text-style-name="P7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9" draw:text-style-name="P7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9" draw:text-style-name="P7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9" draw:text-style-name="P7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9" draw:text-style-name="P7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9" draw:text-style-name="P7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9" draw:text-style-name="P7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9" draw:text-style-name="P7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9" draw:text-style-name="P7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9" draw:text-style-name="P7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9" draw:text-style-name="P7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9" draw:text-style-name="P7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9" draw:text-style-name="P7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9" draw:text-style-name="P7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9" draw:text-style-name="P7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9" draw:text-style-name="P7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9" draw:text-style-name="P7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9" draw:text-style-name="P7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9" draw:text-style-name="P7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9" draw:text-style-name="P7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9" draw:text-style-name="P7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9" draw:text-style-name="P7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9" draw:text-style-name="P7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9" draw:text-style-name="P7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9" draw:text-style-name="P7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9" draw:text-style-name="P7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9" draw:text-style-name="P7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9" draw:text-style-name="P7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9" draw:text-style-name="P7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9" draw:text-style-name="P7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9" draw:text-style-name="P7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9" draw:text-style-name="P7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9" draw:text-style-name="P7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9" draw:text-style-name="P7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9" draw:text-style-name="P7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9" draw:text-style-name="P7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9" draw:text-style-name="P7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9" draw:text-style-name="P7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9" draw:text-style-name="P7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9" draw:text-style-name="P7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9" draw:text-style-name="P7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9" draw:text-style-name="P7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9" draw:text-style-name="P7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9" draw:text-style-name="P7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9" draw:text-style-name="P7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9" draw:text-style-name="P7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9" draw:text-style-name="P7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9" draw:text-style-name="P7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9" draw:text-style-name="P7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9" draw:text-style-name="P7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9" draw:text-style-name="P7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9" draw:text-style-name="P7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9" draw:text-style-name="P7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9" draw:text-style-name="P7" draw:layer="layout" svg:width="0.106cm" svg:height="0.105cm" svg:x="11.336cm" svg:y="27.059cm" svg:viewBox="0 0 107 106" svg:d="M56 0c31 1 52 24 51 55s-25 52-56 51c-29-1-52-27-51-56s26-51 56-50z">
          <text:p/>
        </draw:path>
        <draw:path draw:style-name="gr9" draw:text-style-name="P7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9" draw:text-style-name="P7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9" draw:text-style-name="P7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9" draw:text-style-name="P7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9" draw:text-style-name="P7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9" draw:text-style-name="P7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9" draw:text-style-name="P7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9" draw:text-style-name="P7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9" draw:text-style-name="P7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9" draw:text-style-name="P7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9" draw:text-style-name="P7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9" draw:text-style-name="P7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9" draw:text-style-name="P7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9" draw:text-style-name="P7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9" draw:text-style-name="P7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9" draw:text-style-name="P7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9" draw:text-style-name="P7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9" draw:text-style-name="P7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9" draw:text-style-name="P7" draw:layer="layout" svg:width="0.105cm" svg:height="0.105cm" svg:x="9.294cm" svg:y="27.059cm" svg:viewBox="0 0 106 106" svg:d="M106 52c0 30-23 54-53 54s-53-24-53-53c-1-30 22-53 52-53s54 22 54 52z">
          <text:p/>
        </draw:path>
        <draw:path draw:style-name="gr9" draw:text-style-name="P7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9" draw:text-style-name="P7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9" draw:text-style-name="P7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9" draw:text-style-name="P7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9" draw:text-style-name="P7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9" draw:text-style-name="P7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9" draw:text-style-name="P7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9" draw:text-style-name="P7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9" draw:text-style-name="P7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9" draw:text-style-name="P7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9" draw:text-style-name="P7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9" draw:text-style-name="P7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9" draw:text-style-name="P7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9" draw:text-style-name="P7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9" draw:text-style-name="P7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9" draw:text-style-name="P7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9" draw:text-style-name="P7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9" draw:text-style-name="P7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9" draw:text-style-name="P7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9" draw:text-style-name="P7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9" draw:text-style-name="P7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9" draw:text-style-name="P7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9" draw:text-style-name="P7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9" draw:text-style-name="P7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9" draw:text-style-name="P7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9" draw:text-style-name="P7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9" draw:text-style-name="P7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9" draw:text-style-name="P7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9" draw:text-style-name="P7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9" draw:text-style-name="P7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9" draw:text-style-name="P7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9" draw:text-style-name="P7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9" draw:text-style-name="P7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9" draw:text-style-name="P7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9" draw:text-style-name="P7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9" draw:text-style-name="P7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9" draw:text-style-name="P7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9" draw:text-style-name="P7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9" draw:text-style-name="P7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9" draw:text-style-name="P7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9" draw:text-style-name="P7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9" draw:text-style-name="P7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9" draw:text-style-name="P7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9" draw:text-style-name="P7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9" draw:text-style-name="P7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9" draw:text-style-name="P7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9" draw:text-style-name="P7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9" draw:text-style-name="P7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9" draw:text-style-name="P7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9" draw:text-style-name="P7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9" draw:text-style-name="P7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9" draw:text-style-name="P7" draw:layer="layout" svg:width="0.101cm" svg:height="0.101cm" svg:x="6.084cm" svg:y="16.258cm" svg:viewBox="0 0 102 102" svg:d="M102 53c-1 28-24 49-51 49-28-1-51-23-51-51s29-54 56-51 48 27 46 53z">
          <text:p/>
        </draw:path>
        <draw:path draw:style-name="gr9" draw:text-style-name="P7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9" draw:text-style-name="P7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9" draw:text-style-name="P7" draw:layer="layout" svg:width="0.097cm" svg:height="0.099cm" svg:x="4.919cm" svg:y="24.434cm" svg:viewBox="0 0 98 100" svg:d="M52 100c-25 2-50-21-52-48s19-50 46-52 51 19 52 46c2 34-24 50-46 54z">
          <text:p/>
        </draw:path>
        <draw:path draw:style-name="gr9" draw:text-style-name="P7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9" draw:text-style-name="P7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9" draw:text-style-name="P7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9" draw:text-style-name="P7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9" draw:text-style-name="P7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9" draw:text-style-name="P7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9" draw:text-style-name="P7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9" draw:text-style-name="P7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9" draw:text-style-name="P7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9" draw:text-style-name="P7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9" draw:text-style-name="P7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9" draw:text-style-name="P7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9" draw:text-style-name="P7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9" draw:text-style-name="P7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9" draw:text-style-name="P7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9" draw:text-style-name="P7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9" draw:text-style-name="P7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9" draw:text-style-name="P7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9" draw:text-style-name="P7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9" draw:text-style-name="P7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9" draw:text-style-name="P7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9" draw:text-style-name="P7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9" draw:text-style-name="P7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9" draw:text-style-name="P7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9" draw:text-style-name="P7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9" draw:text-style-name="P7" draw:layer="layout" svg:width="0.099cm" svg:height="0.098cm" svg:x="13.676cm" svg:y="15.676cm" svg:viewBox="0 0 100 99" svg:d="M100 48c2 25-22 50-49 51s-50-21-51-48 20-49 47-51c27-1 51 21 53 48z">
          <text:p/>
        </draw:path>
        <draw:path draw:style-name="gr9" draw:text-style-name="P7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9" draw:text-style-name="P7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9" draw:text-style-name="P7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9" draw:text-style-name="P7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9" draw:text-style-name="P7" draw:layer="layout" svg:width="0.1cm" svg:height="0.097cm" svg:x="9.88cm" svg:y="27.354cm" svg:viewBox="0 0 101 98" svg:d="M52 98c-27 1-50-20-52-48-1-26 21-49 48-50s51 20 53 47c1 26-22 50-49 51z">
          <text:p/>
        </draw:path>
        <draw:path draw:style-name="gr9" draw:text-style-name="P7" draw:layer="layout" svg:width="0.098cm" svg:height="0.096cm" svg:x="5.21cm" svg:y="17.137cm" svg:viewBox="0 0 99 97" svg:d="M47 0c28-1 52 20 52 47 0 22-14 49-49 50-28 1-49-20-50-48s20-49 47-49z">
          <text:p/>
        </draw:path>
        <draw:path draw:style-name="gr9" draw:text-style-name="P7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9" draw:text-style-name="P7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9" draw:text-style-name="P7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9" draw:text-style-name="P7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9" draw:text-style-name="P7" draw:layer="layout" svg:width="0.095cm" svg:height="0.098cm" svg:x="16.597cm" svg:y="20.055cm" svg:viewBox="0 0 96 99" svg:d="M47 0c22 1 51 19 49 50 0 28-25 50-51 49-24-2-44-22-45-48s21-51 47-51z">
          <text:p/>
        </draw:path>
        <draw:path draw:style-name="gr9" draw:text-style-name="P7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9" draw:text-style-name="P7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9" draw:text-style-name="P7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9" draw:text-style-name="P7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9" draw:text-style-name="P7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9" draw:text-style-name="P7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9" draw:text-style-name="P7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9" draw:text-style-name="P7" draw:layer="layout" svg:width="0.097cm" svg:height="0.099cm" svg:x="11.632cm" svg:y="14.8cm" svg:viewBox="0 0 98 100" svg:d="M52 0c27 2 47 25 46 53-1 26-26 50-51 47-28-2-48-25-47-52s25-50 52-48z">
          <text:p/>
        </draw:path>
        <draw:path draw:style-name="gr9" draw:text-style-name="P7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9" draw:text-style-name="P7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9" draw:text-style-name="P7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9" draw:text-style-name="P7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9" draw:text-style-name="P7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9" draw:text-style-name="P7" draw:layer="layout" svg:width="0.097cm" svg:height="0.095cm" svg:x="15.72cm" svg:y="17.721cm" svg:viewBox="0 0 98 96" svg:d="M98 46c1 26-22 50-49 50-26 0-46-19-49-44s19-50 46-52c28-1 51 20 52 46z">
          <text:p/>
        </draw:path>
        <draw:path draw:style-name="gr9" draw:text-style-name="P7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9" draw:text-style-name="P7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9" draw:text-style-name="P7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9" draw:text-style-name="P7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9" draw:text-style-name="P7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9" draw:text-style-name="P7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9" draw:text-style-name="P7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9" draw:text-style-name="P7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9" draw:text-style-name="P7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9" draw:text-style-name="P7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9" draw:text-style-name="P7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9" draw:text-style-name="P7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9" draw:text-style-name="P7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9" draw:text-style-name="P7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9" draw:text-style-name="P7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9" draw:text-style-name="P7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9" draw:text-style-name="P7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9" draw:text-style-name="P7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9" draw:text-style-name="P7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9" draw:text-style-name="P7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9" draw:text-style-name="P7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9" draw:text-style-name="P7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9" draw:text-style-name="P7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9" draw:text-style-name="P7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9" draw:text-style-name="P7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9" draw:text-style-name="P7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9" draw:text-style-name="P7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9" draw:text-style-name="P7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9" draw:text-style-name="P7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9" draw:text-style-name="P7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9" draw:text-style-name="P7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9" draw:text-style-name="P7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9" draw:text-style-name="P7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9" draw:text-style-name="P7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9" draw:text-style-name="P7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9" draw:text-style-name="P7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9" draw:text-style-name="P7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9" draw:text-style-name="P7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9" draw:text-style-name="P7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9" draw:text-style-name="P7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9" draw:text-style-name="P7" draw:layer="layout" svg:width="0.09cm" svg:height="0.089cm" svg:x="3.754cm" svg:y="22.104cm" svg:viewBox="0 0 91 90" svg:d="M91 44c0 23-21 45-44 46s-46-21-47-44c0-25 19-46 45-46 25-1 46 20 46 44z">
          <text:p/>
        </draw:path>
        <draw:path draw:style-name="gr9" draw:text-style-name="P7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9" draw:text-style-name="P7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9" draw:text-style-name="P7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9" draw:text-style-name="P7" draw:layer="layout" svg:width="0.092cm" svg:height="0.092cm" svg:x="15.722cm" svg:y="17.432cm" svg:viewBox="0 0 93 93" svg:d="M49 0c26 2 45 23 44 47s-22 46-47 46-49-27-46-52c3-24 25-42 49-41z">
          <text:p/>
        </draw:path>
        <draw:path draw:style-name="gr9" draw:text-style-name="P7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9" draw:text-style-name="P7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9" draw:text-style-name="P7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9" draw:text-style-name="P7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9" draw:text-style-name="P7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9" draw:text-style-name="P7" draw:layer="layout" svg:width="0.092cm" svg:height="0.092cm" svg:x="8.716cm" svg:y="27.357cm" svg:viewBox="0 0 93 93" svg:d="M47 0c25 1 46 22 46 45 0 24-21 46-46 48-26 1-49-24-47-50s21-43 47-43z">
          <text:p/>
        </draw:path>
        <draw:path draw:style-name="gr9" draw:text-style-name="P7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9" draw:text-style-name="P7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9" draw:text-style-name="P7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9" draw:text-style-name="P7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9" draw:text-style-name="P7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9" draw:text-style-name="P7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9" draw:text-style-name="P7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9" draw:text-style-name="P7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9" draw:text-style-name="P7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9" draw:text-style-name="P7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9" draw:text-style-name="P7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9" draw:text-style-name="P7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9" draw:text-style-name="P7" draw:layer="layout" svg:width="0.09cm" svg:height="0.089cm" svg:x="16.6cm" svg:y="22.689cm" svg:viewBox="0 0 91 90" svg:d="M44 0c25 0 47 20 47 43 0 24-23 47-46 47s-44-21-45-46c0-25 19-44 44-44z">
          <text:p/>
        </draw:path>
        <draw:path draw:style-name="gr9" draw:text-style-name="P7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9" draw:text-style-name="P7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9" draw:text-style-name="P7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9" draw:text-style-name="P7" draw:layer="layout" svg:width="0.09cm" svg:height="0.09cm" svg:x="6.382cm" svg:y="15.681cm" svg:viewBox="0 0 91 91" svg:d="M45 0c25 0 46 19 46 45 0 24-22 46-45 46s-45-21-46-45c0-24 20-46 45-46z">
          <text:p/>
        </draw:path>
        <draw:path draw:style-name="gr9" draw:text-style-name="P7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9" draw:text-style-name="P7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9" draw:text-style-name="P7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9" draw:text-style-name="P7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9" draw:text-style-name="P7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9" draw:text-style-name="P7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9" draw:text-style-name="P7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9" draw:text-style-name="P7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9" draw:text-style-name="P7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9" draw:text-style-name="P7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9" draw:text-style-name="P7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9" draw:text-style-name="P7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9" draw:text-style-name="P7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9" draw:text-style-name="P7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9" draw:text-style-name="P7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9" draw:text-style-name="P7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9" draw:text-style-name="P7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9" draw:text-style-name="P7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9" draw:text-style-name="P7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9" draw:text-style-name="P7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9" draw:text-style-name="P7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9" draw:text-style-name="P7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9" draw:text-style-name="P7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9" draw:text-style-name="P7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9" draw:text-style-name="P7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9" draw:text-style-name="P7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9" draw:text-style-name="P7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9" draw:text-style-name="P7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9" draw:text-style-name="P7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9" draw:text-style-name="P7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9" draw:text-style-name="P7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9" draw:text-style-name="P7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9" draw:text-style-name="P7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9" draw:text-style-name="P7" draw:layer="layout" svg:width="0.089cm" svg:height="0.089cm" svg:x="4.63cm" svg:y="24.438cm" svg:viewBox="0 0 90 90" svg:d="M47 0c23 0 43 21 43 46s-19 44-45 44c-25-1-46-23-45-46s23-44 47-44z">
          <text:p/>
        </draw:path>
        <draw:path draw:style-name="gr9" draw:text-style-name="P7" draw:layer="layout" svg:width="0.087cm" svg:height="0.084cm" svg:x="4.34cm" svg:y="18.019cm" svg:viewBox="0 0 88 85" svg:d="M88 42c0 25-22 45-48 43-23-1-40-20-40-43s18-41 41-42c25-3 46 17 47 42z">
          <text:p/>
        </draw:path>
        <draw:path draw:style-name="gr9" draw:text-style-name="P7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9" draw:text-style-name="P7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9" draw:text-style-name="P7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9" draw:text-style-name="P7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9" draw:text-style-name="P7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9" draw:text-style-name="P7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9" draw:text-style-name="P7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9" draw:text-style-name="P7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9" draw:text-style-name="P7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9" draw:text-style-name="P7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9" draw:text-style-name="P7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9" draw:text-style-name="P7" draw:layer="layout" svg:width="0.086cm" svg:height="0.084cm" svg:x="3.756cm" svg:y="22.691cm" svg:viewBox="0 0 87 85" svg:d="M41 0c22-2 42 14 46 38 3 22-19 47-43 47-23 0-43-19-44-41s18-43 41-44z">
          <text:p/>
        </draw:path>
        <draw:path draw:style-name="gr9" draw:text-style-name="P7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9" draw:text-style-name="P7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9" draw:text-style-name="P7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9" draw:text-style-name="P7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9" draw:text-style-name="P7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9" draw:text-style-name="P7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9" draw:text-style-name="P7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9" draw:text-style-name="P7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9" draw:text-style-name="P7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9" draw:text-style-name="P7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9" draw:text-style-name="P7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9" draw:text-style-name="P7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9" draw:text-style-name="P7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9" draw:text-style-name="P7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9" draw:text-style-name="P7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9" draw:text-style-name="P7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9" draw:text-style-name="P7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9" draw:text-style-name="P7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9" draw:text-style-name="P7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9" draw:text-style-name="P7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9" draw:text-style-name="P7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9" draw:text-style-name="P7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9" draw:text-style-name="P7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9" draw:text-style-name="P7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9" draw:text-style-name="P7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9" draw:text-style-name="P7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9" draw:text-style-name="P7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9" draw:text-style-name="P7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9" draw:text-style-name="P7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9" draw:text-style-name="P7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9" draw:text-style-name="P7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9" draw:text-style-name="P7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9" draw:text-style-name="P7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9" draw:text-style-name="P7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9" draw:text-style-name="P7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9" draw:text-style-name="P7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9" draw:text-style-name="P7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9" draw:text-style-name="P7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9" draw:text-style-name="P7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9" draw:text-style-name="P7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9" draw:text-style-name="P7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9" draw:text-style-name="P7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9" draw:text-style-name="P7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9" draw:text-style-name="P7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9" draw:text-style-name="P7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9" draw:text-style-name="P7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9" draw:text-style-name="P7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9" draw:text-style-name="P7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9" draw:text-style-name="P7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9" draw:text-style-name="P7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9" draw:text-style-name="P7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9" draw:text-style-name="P7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9" draw:text-style-name="P7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9" draw:text-style-name="P7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9" draw:text-style-name="P7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9" draw:text-style-name="P7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9" draw:text-style-name="P7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9" draw:text-style-name="P7" draw:layer="layout" svg:width="0.081cm" svg:height="0.08cm" svg:x="16.312cm" svg:y="18.021cm" svg:viewBox="0 0 82 81" svg:d="M38 0c24-1 43 16 44 39s-16 41-40 42c-23 1-41-15-42-38s16-42 38-43z">
          <text:p/>
        </draw:path>
        <draw:path draw:style-name="gr9" draw:text-style-name="P7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9" draw:text-style-name="P7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9" draw:text-style-name="P7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9" draw:text-style-name="P7" draw:layer="layout" svg:width="0.081cm" svg:height="0.08cm" svg:x="7.262cm" svg:y="27.071cm" svg:viewBox="0 0 82 81" svg:d="M37 0c23-1 43 16 45 38 1 22-15 42-39 43-23 2-41-13-43-36s14-43 37-45z">
          <text:p/>
        </draw:path>
        <draw:path draw:style-name="gr9" draw:text-style-name="P7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9" draw:text-style-name="P7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9" draw:text-style-name="P7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9" draw:text-style-name="P7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9" draw:text-style-name="P7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9" draw:text-style-name="P7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9" draw:text-style-name="P7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9" draw:text-style-name="P7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9" draw:text-style-name="P7" draw:layer="layout" svg:width="0.08cm" svg:height="0.079cm" svg:x="6.388cm" svg:y="15.394cm" svg:viewBox="0 0 81 80" svg:d="M81 38c1 21-19 42-41 42s-41-19-40-41c0-20 16-37 36-39 24-1 43 16 45 38z">
          <text:p/>
        </draw:path>
        <draw:path draw:style-name="gr9" draw:text-style-name="P7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9" draw:text-style-name="P7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9" draw:text-style-name="P7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9" draw:text-style-name="P7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9" draw:text-style-name="P7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9" draw:text-style-name="P7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9" draw:text-style-name="P7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9" draw:text-style-name="P7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9" draw:text-style-name="P7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9" draw:text-style-name="P7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9" draw:text-style-name="P7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9" draw:text-style-name="P7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9" draw:text-style-name="P7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9" draw:text-style-name="P7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9" draw:text-style-name="P7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9" draw:text-style-name="P7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9" draw:text-style-name="P7" draw:layer="layout" svg:width="0.079cm" svg:height="0.079cm" svg:x="10.181cm" svg:y="14.226cm" svg:viewBox="0 0 80 80" svg:d="M80 41c-1 24-19 40-42 39-20-2-36-17-38-37s17-42 39-43 41 18 41 41z">
          <text:p/>
        </draw:path>
        <draw:path draw:style-name="gr9" draw:text-style-name="P7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9" draw:text-style-name="P7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9" draw:text-style-name="P7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9" draw:text-style-name="P7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9" draw:text-style-name="P7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9" draw:text-style-name="P7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9" draw:text-style-name="P7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9" draw:text-style-name="P7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9" draw:text-style-name="P7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9" draw:text-style-name="P7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9" draw:text-style-name="P7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9" draw:text-style-name="P7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9" draw:text-style-name="P7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9" draw:text-style-name="P7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9" draw:text-style-name="P7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9" draw:text-style-name="P7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9" draw:text-style-name="P7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9" draw:text-style-name="P7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9" draw:text-style-name="P7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9" draw:text-style-name="P7" draw:layer="layout" svg:width="0.076cm" svg:height="0.077cm" svg:x="7.556cm" svg:y="27.363cm" svg:viewBox="0 0 77 78" svg:d="M41 0c24 3 39 24 35 48-3 20-23 32-45 29-19-3-34-24-31-43s24-36 41-34z">
          <text:p/>
        </draw:path>
        <draw:path draw:style-name="gr9" draw:text-style-name="P7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9" draw:text-style-name="P7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9" draw:text-style-name="P7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9" draw:text-style-name="P7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9" draw:text-style-name="P7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9" draw:text-style-name="P7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9" draw:text-style-name="P7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9" draw:text-style-name="P7" draw:layer="layout" svg:width="0.075cm" svg:height="0.074cm" svg:x="17.191cm" svg:y="20.651cm" svg:viewBox="0 0 76 75" svg:d="M37 0c19-1 37 15 39 36 0 21-17 38-37 39-19 1-37-16-39-36s17-38 37-39z">
          <text:p/>
        </draw:path>
        <draw:path draw:style-name="gr9" draw:text-style-name="P7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9" draw:text-style-name="P7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9" draw:text-style-name="P7" draw:layer="layout" svg:width="0.075cm" svg:height="0.073cm" svg:x="17.191cm" svg:y="21.527cm" svg:viewBox="0 0 76 74" svg:d="M76 39c-2 21-19 36-40 35s-38-19-36-39 21-37 40-35c20 1 36 19 36 39z">
          <text:p/>
        </draw:path>
        <draw:path draw:style-name="gr9" draw:text-style-name="P7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9" draw:text-style-name="P7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9" draw:text-style-name="P7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9" draw:text-style-name="P7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9" draw:text-style-name="P7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9" draw:text-style-name="P7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9" draw:text-style-name="P7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9" draw:text-style-name="P7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9" draw:text-style-name="P7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9" draw:text-style-name="P7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9" draw:text-style-name="P7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9" draw:text-style-name="P7" draw:layer="layout" svg:width="0.075cm" svg:height="0.073cm" svg:x="3.469cm" svg:y="22.404cm" svg:viewBox="0 0 76 74" svg:d="M76 38c-2 21-21 38-41 36s-36-20-35-40c2-20 19-35 40-34s37 19 36 38z">
          <text:p/>
        </draw:path>
        <draw:path draw:style-name="gr9" draw:text-style-name="P7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9" draw:text-style-name="P7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9" draw:text-style-name="P7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9" draw:text-style-name="P7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9" draw:text-style-name="P7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9" draw:text-style-name="P7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9" draw:text-style-name="P7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9" draw:text-style-name="P7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9" draw:text-style-name="P7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9" draw:text-style-name="P7" draw:layer="layout" svg:width="0.072cm" svg:height="0.071cm" svg:x="3.471cm" svg:y="22.697cm" svg:viewBox="0 0 73 72" svg:d="M34 72c-20-1-36-21-34-40s22-35 40-32 32 19 33 36c0 19-19 37-39 36z">
          <text:p/>
        </draw:path>
        <draw:path draw:style-name="gr9" draw:text-style-name="P7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9" draw:text-style-name="P7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9" draw:text-style-name="P7" draw:layer="layout" svg:width="0.071cm" svg:height="0.072cm" svg:x="4.64cm" svg:y="16.856cm" svg:viewBox="0 0 72 73" svg:d="M37 73c-19 1-37-16-37-36 0-18 15-34 32-37s38 15 40 35c2 18-15 38-35 38z">
          <text:p/>
        </draw:path>
        <draw:path draw:style-name="gr9" draw:text-style-name="P7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9" draw:text-style-name="P7" draw:layer="layout" svg:width="0.074cm" svg:height="0.072cm" svg:x="17.19cm" svg:y="20.361cm" svg:viewBox="0 0 75 73" svg:d="M0 34c3-20 21-35 41-34 21 1 36 17 34 38-1 21-18 37-38 35s-38-19-37-39z">
          <text:p/>
        </draw:path>
        <draw:path draw:style-name="gr9" draw:text-style-name="P7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9" draw:text-style-name="P7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9" draw:text-style-name="P7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9" draw:text-style-name="P7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9" draw:text-style-name="P7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9" draw:text-style-name="P7" draw:layer="layout" svg:width="0.072cm" svg:height="0.071cm" svg:x="9.31cm" svg:y="27.95cm" svg:viewBox="0 0 73 72" svg:d="M73 35c1 19-16 37-36 37-17 0-34-15-37-32s15-38 35-40c18-2 37 15 38 35z">
          <text:p/>
        </draw:path>
        <draw:path draw:style-name="gr9" draw:text-style-name="P7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9" draw:text-style-name="P7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9" draw:text-style-name="P7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9" draw:text-style-name="P7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9" draw:text-style-name="P7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9" draw:text-style-name="P7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9" draw:text-style-name="P7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9" draw:text-style-name="P7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9" draw:text-style-name="P7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9" draw:text-style-name="P7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9" draw:text-style-name="P7" draw:layer="layout" svg:width="0.073cm" svg:height="0.072cm" svg:x="17.191cm" svg:y="20.944cm" svg:viewBox="0 0 74 73" svg:d="M74 40c-1 20-18 34-38 33s-38-19-36-39 20-35 40-34 37 19 34 40z">
          <text:p/>
        </draw:path>
        <draw:path draw:style-name="gr9" draw:text-style-name="P7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9" draw:text-style-name="P7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9" draw:text-style-name="P7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9" draw:text-style-name="P7" draw:layer="layout" svg:width="0.074cm" svg:height="0.072cm" svg:x="3.47cm" svg:y="19.776cm" svg:viewBox="0 0 75 73" svg:d="M35 73c-20-1-37-20-35-39 1-20 17-35 38-34s38 18 37 37-19 37-40 36z">
          <text:p/>
        </draw:path>
        <draw:path draw:style-name="gr9" draw:text-style-name="P7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9" draw:text-style-name="P7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9" draw:text-style-name="P7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9" draw:text-style-name="P7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9" draw:text-style-name="P7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9" draw:text-style-name="P7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9" draw:text-style-name="P7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9" draw:text-style-name="P7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9" draw:text-style-name="P7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9" draw:text-style-name="P7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9" draw:text-style-name="P7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9" draw:text-style-name="P7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9" draw:text-style-name="P7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9" draw:text-style-name="P7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9" draw:text-style-name="P7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9" draw:text-style-name="P7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9" draw:text-style-name="P7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9" draw:text-style-name="P7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9" draw:text-style-name="P7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9" draw:text-style-name="P7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9" draw:text-style-name="P7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9" draw:text-style-name="P7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9" draw:text-style-name="P7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9" draw:text-style-name="P7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9" draw:text-style-name="P7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9" draw:text-style-name="P7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9" draw:text-style-name="P7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9" draw:text-style-name="P7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9" draw:text-style-name="P7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9" draw:text-style-name="P7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9" draw:text-style-name="P7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9" draw:text-style-name="P7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9" draw:text-style-name="P7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9" draw:text-style-name="P7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9" draw:text-style-name="P7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9" draw:text-style-name="P7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9" draw:text-style-name="P7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9" draw:text-style-name="P7" draw:layer="layout" svg:width="0.069cm" svg:height="0.069cm" svg:x="3.765cm" svg:y="23.573cm" svg:viewBox="0 0 70 70" svg:d="M70 32c1 21-15 38-36 38-18-1-33-16-34-34s12-34 30-36c21-2 38 11 40 32z">
          <text:p/>
        </draw:path>
        <draw:path draw:style-name="gr9" draw:text-style-name="P7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9" draw:text-style-name="P7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9" draw:text-style-name="P7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9" draw:text-style-name="P7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9" draw:text-style-name="P7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9" draw:text-style-name="P7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9" draw:text-style-name="P7" draw:layer="layout" svg:width="0.064cm" svg:height="0.064cm" svg:x="3.183cm" svg:y="20.073cm" svg:viewBox="0 0 65 65" svg:d="M35 0c19 1 32 16 30 34-1 16-18 32-35 31-17-2-31-19-30-36s17-30 35-29z">
          <text:p/>
        </draw:path>
        <draw:path draw:style-name="gr9" draw:text-style-name="P7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9" draw:text-style-name="P7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9" draw:text-style-name="P7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9" draw:text-style-name="P7" draw:layer="layout" svg:width="0.064cm" svg:height="0.064cm" svg:x="5.52cm" svg:y="15.694cm" svg:viewBox="0 0 65 65" svg:d="M65 32c0 17-17 33-34 33-18 0-32-17-31-35s14-30 31-30c18 0 35 15 34 32z">
          <text:p/>
        </draw:path>
        <draw:path draw:style-name="gr9" draw:text-style-name="P7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9" draw:text-style-name="P7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9" draw:text-style-name="P7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9" draw:text-style-name="P7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9" draw:text-style-name="P7" draw:layer="layout" svg:width="0.064cm" svg:height="0.066cm" svg:x="14.86cm" svg:y="26.493cm" svg:viewBox="0 0 65 67" svg:d="M33 0c17 0 32 16 32 33 0 18-15 34-32 34-18-1-33-17-33-34s16-33 33-33z">
          <text:p/>
        </draw:path>
        <draw:path draw:style-name="gr9" draw:text-style-name="P7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9" draw:text-style-name="P7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9" draw:text-style-name="P7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9" draw:text-style-name="P7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9" draw:text-style-name="P7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9" draw:text-style-name="P7" draw:layer="layout" svg:width="0.065cm" svg:height="0.064cm" svg:x="12.817cm" svg:y="27.662cm" svg:viewBox="0 0 66 65" svg:d="M32 0c16-1 33 15 34 33 0 17-14 32-32 32-18 1-34-13-34-31s16-34 32-34z">
          <text:p/>
        </draw:path>
        <draw:path draw:style-name="gr9" draw:text-style-name="P7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9" draw:text-style-name="P7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9" draw:text-style-name="P7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9" draw:text-style-name="P7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9" draw:text-style-name="P7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9" draw:text-style-name="P7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9" draw:text-style-name="P7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9" draw:text-style-name="P7" draw:layer="layout" svg:width="0.064cm" svg:height="0.064cm" svg:x="5.81cm" svg:y="15.4cm" svg:viewBox="0 0 65 65" svg:d="M31 0c17-1 33 15 34 32s-13 33-32 33c-18 0-33-15-33-32s15-33 31-33z">
          <text:p/>
        </draw:path>
        <draw:path draw:style-name="gr9" draw:text-style-name="P7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9" draw:text-style-name="P7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9" draw:text-style-name="P7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9" draw:text-style-name="P7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9" draw:text-style-name="P7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9" draw:text-style-name="P7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9" draw:text-style-name="P7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9" draw:text-style-name="P7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9" draw:text-style-name="P7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9" draw:text-style-name="P7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9" draw:text-style-name="P7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9" draw:text-style-name="P7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9" draw:text-style-name="P7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9" draw:text-style-name="P7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9" draw:text-style-name="P7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9" draw:text-style-name="P7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9" draw:text-style-name="P7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9" draw:text-style-name="P7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9" draw:text-style-name="P7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9" draw:text-style-name="P7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9" draw:text-style-name="P7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9" draw:text-style-name="P7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9" draw:text-style-name="P7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9" draw:text-style-name="P7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9" draw:text-style-name="P7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9" draw:text-style-name="P7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9" draw:text-style-name="P7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9" draw:text-style-name="P7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9" draw:text-style-name="P7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9" draw:text-style-name="P7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9" draw:text-style-name="P7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9" draw:text-style-name="P7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9" draw:text-style-name="P7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9" draw:text-style-name="P7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9" draw:text-style-name="P7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9" draw:text-style-name="P7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9" draw:text-style-name="P7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9" draw:text-style-name="P7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9" draw:text-style-name="P7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9" draw:text-style-name="P7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9" draw:text-style-name="P7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9" draw:text-style-name="P7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9" draw:text-style-name="P7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9" draw:text-style-name="P7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9" draw:text-style-name="P7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9" draw:text-style-name="P7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9" draw:text-style-name="P7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9" draw:text-style-name="P7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9" draw:text-style-name="P7" draw:layer="layout" svg:width="0.061cm" svg:height="0.061cm" svg:x="12.235cm" svg:y="27.956cm" svg:viewBox="0 0 62 62" svg:d="M30 62c-16 0-32-18-30-34s16-28 31-28 30 12 31 28c1 17-15 34-32 34z">
          <text:p/>
        </draw:path>
        <draw:path draw:style-name="gr9" draw:text-style-name="P7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9" draw:text-style-name="P7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9" draw:text-style-name="P7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9" draw:text-style-name="P7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9" draw:text-style-name="P7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9" draw:text-style-name="P7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9" draw:text-style-name="P7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9" draw:text-style-name="P7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9" draw:text-style-name="P7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9" draw:text-style-name="P7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9" draw:text-style-name="P7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9" draw:text-style-name="P7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9" draw:text-style-name="P7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9" draw:text-style-name="P7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9" draw:text-style-name="P7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9" draw:text-style-name="P7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9" draw:text-style-name="P7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9" draw:text-style-name="P7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9" draw:text-style-name="P7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9" draw:text-style-name="P7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9" draw:text-style-name="P7" draw:layer="layout" svg:width="0.059cm" svg:height="0.061cm" svg:x="15.738cm" svg:y="16.279cm" svg:viewBox="0 0 60 62" svg:d="M33 62c-17 1-33-14-33-31 0-16 12-30 28-31s30 9 32 25c3 18-9 35-27 37z">
          <text:p/>
        </draw:path>
        <draw:path draw:style-name="gr9" draw:text-style-name="P7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9" draw:text-style-name="P7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9" draw:text-style-name="P7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9" draw:text-style-name="P7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9" draw:text-style-name="P7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9" draw:text-style-name="P7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9" draw:text-style-name="P7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9" draw:text-style-name="P7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9" draw:text-style-name="P7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9" draw:text-style-name="P7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9" draw:text-style-name="P7" draw:layer="layout" svg:width="0.059cm" svg:height="0.057cm" svg:x="3.186cm" svg:y="22.704cm" svg:viewBox="0 0 60 58" svg:d="M32 0c17 1 29 17 28 32-2 15-17 28-33 26s-28-17-27-31c2-15 17-28 32-27z">
          <text:p/>
        </draw:path>
        <draw:path draw:style-name="gr9" draw:text-style-name="P7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9" draw:text-style-name="P7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9" draw:text-style-name="P7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9" draw:text-style-name="P7" draw:layer="layout" svg:width="0.059cm" svg:height="0.058cm" svg:x="16.032cm" svg:y="16.572cm" svg:viewBox="0 0 60 59" svg:d="M60 27c2 14-10 30-25 32s-30-7-34-23 12-35 29-36c13-1 28 12 30 27z">
          <text:p/>
        </draw:path>
        <draw:path draw:style-name="gr9" draw:text-style-name="P7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9" draw:text-style-name="P7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9" draw:text-style-name="P7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9" draw:text-style-name="P7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9" draw:text-style-name="P7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9" draw:text-style-name="P7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9" draw:text-style-name="P7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9" draw:text-style-name="P7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9" draw:text-style-name="P7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9" draw:text-style-name="P7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9" draw:text-style-name="P7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9" draw:text-style-name="P7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9" draw:text-style-name="P7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9" draw:text-style-name="P7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9" draw:text-style-name="P7" draw:layer="layout" svg:width="0.057cm" svg:height="0.056cm" svg:x="14.28cm" svg:y="27.083cm" svg:viewBox="0 0 58 57" svg:d="M58 29c1 16-13 28-29 28-15 0-29-12-29-27s13-30 29-30c15 0 29 14 29 29z">
          <text:p/>
        </draw:path>
        <draw:path draw:style-name="gr9" draw:text-style-name="P7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9" draw:text-style-name="P7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9" draw:text-style-name="P7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9" draw:text-style-name="P7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9" draw:text-style-name="P7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9" draw:text-style-name="P7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9" draw:text-style-name="P7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9" draw:text-style-name="P7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9" draw:text-style-name="P7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9" draw:text-style-name="P7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9" draw:text-style-name="P7" draw:layer="layout" svg:width="0.055cm" svg:height="0.055cm" svg:x="15.157cm" svg:y="26.499cm" svg:viewBox="0 0 56 56" svg:d="M56 26c1 17-12 30-28 30-15-1-26-10-28-24-2-16 9-30 25-32s30 9 31 26z">
          <text:p/>
        </draw:path>
        <draw:path draw:style-name="gr9" draw:text-style-name="P7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9" draw:text-style-name="P7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9" draw:text-style-name="P7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9" draw:text-style-name="P7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9" draw:text-style-name="P7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9" draw:text-style-name="P7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9" draw:text-style-name="P7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9" draw:text-style-name="P7" draw:layer="layout" svg:width="0.053cm" svg:height="0.055cm" svg:x="6.692cm" svg:y="14.531cm" svg:viewBox="0 0 54 56" svg:d="M54 28c0 15-15 30-29 28s-25-14-25-27 11-27 24-29c14-2 30 12 30 28z">
          <text:p/>
        </draw:path>
        <draw:path draw:style-name="gr9" draw:text-style-name="P7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9" draw:text-style-name="P7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9" draw:text-style-name="P7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9" draw:text-style-name="P7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9" draw:text-style-name="P7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9" draw:text-style-name="P7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9" draw:text-style-name="P7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9" draw:text-style-name="P7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9" draw:text-style-name="P7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9" draw:text-style-name="P7" draw:layer="layout" svg:width="0.053cm" svg:height="0.054cm" svg:x="2.896cm" svg:y="20.37cm" svg:viewBox="0 0 54 55" svg:d="M54 27c1 12-10 26-23 28-14 3-30-10-31-26s14-30 29-29c14 1 25 12 25 27z">
          <text:p/>
        </draw:path>
        <draw:path draw:style-name="gr9" draw:text-style-name="P7" draw:layer="layout" svg:width="0.053cm" svg:height="0.052cm" svg:x="2.896cm" svg:y="20.662cm" svg:viewBox="0 0 54 53" svg:d="M24 0c13-1 27 9 29 22 2 15-9 30-25 31-13 1-26-9-28-21-3-15 8-31 24-32z">
          <text:p/>
        </draw:path>
        <draw:path draw:style-name="gr9" draw:text-style-name="P7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9" draw:text-style-name="P7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9" draw:text-style-name="P7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9" draw:text-style-name="P7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9" draw:text-style-name="P7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9" draw:text-style-name="P7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9" draw:text-style-name="P7" draw:layer="layout" svg:width="0.053cm" svg:height="0.052cm" svg:x="2.896cm" svg:y="21.247cm" svg:viewBox="0 0 54 53" svg:d="M24 0c13-1 27 8 29 21 2 15-9 31-25 32-13 1-26-9-28-22-3-15 8-30 24-31z">
          <text:p/>
        </draw:path>
        <draw:path draw:style-name="gr9" draw:text-style-name="P7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9" draw:text-style-name="P7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9" draw:text-style-name="P7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9" draw:text-style-name="P7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9" draw:text-style-name="P7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9" draw:text-style-name="P7" draw:layer="layout" svg:width="0.055cm" svg:height="0.054cm" svg:x="3.189cm" svg:y="18.91cm" svg:viewBox="0 0 56 55" svg:d="M55 26c2 14-12 29-27 29-13 1-25-9-28-22-3-14 8-31 23-33s31 10 32 26z">
          <text:p/>
        </draw:path>
        <draw:path draw:style-name="gr9" draw:text-style-name="P7" draw:layer="layout" svg:width="0.052cm" svg:height="0.052cm" svg:x="2.897cm" svg:y="21.831cm" svg:viewBox="0 0 53 53" svg:d="M29 53c-16 1-29-11-29-28 0-13 9-24 23-25s27 8 30 20c2 15-9 32-24 33z">
          <text:p/>
        </draw:path>
        <draw:path draw:style-name="gr9" draw:text-style-name="P7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9" draw:text-style-name="P7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9" draw:text-style-name="P7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9" draw:text-style-name="P7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9" draw:text-style-name="P7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9" draw:text-style-name="P7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9" draw:text-style-name="P7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9" draw:text-style-name="P7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9" draw:text-style-name="P7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9" draw:text-style-name="P7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9" draw:text-style-name="P7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9" draw:text-style-name="P7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9" draw:text-style-name="P7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9" draw:text-style-name="P7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9" draw:text-style-name="P7" draw:layer="layout" svg:width="0.049cm" svg:height="0.049cm" svg:x="2.898cm" svg:y="22.122cm" svg:viewBox="0 0 50 50" svg:d="M24 0c12-1 25 11 26 25 2 13-9 24-23 25s-26-9-27-22c0-14 10-25 24-28z">
          <text:p/>
        </draw:path>
        <draw:path draw:style-name="gr9" draw:text-style-name="P7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9" draw:text-style-name="P7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9" draw:text-style-name="P7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9" draw:text-style-name="P7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9" draw:text-style-name="P7" draw:layer="layout" svg:width="0.048cm" svg:height="0.049cm" svg:x="13.408cm" svg:y="14.241cm" svg:viewBox="0 0 49 50" svg:d="M49 23c1 14-9 27-22 27-14 0-26-11-27-24-2-12 11-25 24-26s24 9 25 23z">
          <text:p/>
        </draw:path>
        <draw:path draw:style-name="gr9" draw:text-style-name="P7" draw:layer="layout" svg:width="0.049cm" svg:height="0.049cm" svg:x="5.235cm" svg:y="26.502cm" svg:viewBox="0 0 50 50" svg:d="M26 0c13 1 25 14 24 26-2 14-13 24-27 24s-24-12-23-27 12-24 26-23z">
          <text:p/>
        </draw:path>
        <draw:path draw:style-name="gr9" draw:text-style-name="P7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9" draw:text-style-name="P7" draw:layer="layout" svg:width="0.049cm" svg:height="0.049cm" svg:x="2.898cm" svg:y="22.416cm" svg:viewBox="0 0 50 50" svg:d="M24 0c14-1 26 11 26 24 1 13-9 25-22 26s-26-10-28-23c-1-13 9-26 24-27z">
          <text:p/>
        </draw:path>
        <draw:path draw:style-name="gr9" draw:text-style-name="P7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9" draw:text-style-name="P7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9" draw:text-style-name="P7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9" draw:text-style-name="P7" draw:layer="layout" svg:width="0.048cm" svg:height="0.049cm" svg:x="3.192cm" svg:y="23.291cm" svg:viewBox="0 0 49 50" svg:d="M49 28c-1 13-12 23-26 22-13 0-25-12-23-26s13-25 26-24 25 15 23 28z">
          <text:p/>
        </draw:path>
        <draw:path draw:style-name="gr9" draw:text-style-name="P7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9" draw:text-style-name="P7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9" draw:text-style-name="P7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9" draw:text-style-name="P7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9" draw:text-style-name="P7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9" draw:text-style-name="P7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9" draw:text-style-name="P7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9" draw:text-style-name="P7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9" draw:text-style-name="P7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9" draw:text-style-name="P7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9" draw:text-style-name="P7" draw:layer="layout" svg:width="0.053cm" svg:height="0.052cm" svg:x="8.735cm" svg:y="28.253cm" svg:viewBox="0 0 54 53" svg:d="M25 0c14-1 27 9 28 22 2 16-9 30-25 31-13 1-25-9-28-22-3-15 8-30 25-31z">
          <text:p/>
        </draw:path>
        <draw:path draw:style-name="gr9" draw:text-style-name="P7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9" draw:text-style-name="P7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9" draw:text-style-name="P7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9" draw:text-style-name="P7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9" draw:text-style-name="P7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9" draw:text-style-name="P7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9" draw:text-style-name="P7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9" draw:text-style-name="P7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9" draw:text-style-name="P7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9" draw:text-style-name="P7" draw:layer="layout" svg:width="0.046cm" svg:height="0.045cm" svg:x="2.9cm" svg:y="19.206cm" svg:viewBox="0 0 47 46" svg:d="M0 23c-1-10 9-21 20-23 13-2 26 8 27 21 1 10-9 23-18 25-13 2-28-9-29-23z">
          <text:p/>
        </draw:path>
        <draw:path draw:style-name="gr9" draw:text-style-name="P7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9" draw:text-style-name="P7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9" draw:text-style-name="P7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9" draw:text-style-name="P7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9" draw:text-style-name="P7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9" draw:text-style-name="P7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9" draw:text-style-name="P7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9" draw:text-style-name="P7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9" draw:text-style-name="P7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9" draw:text-style-name="P7" draw:layer="layout" svg:width="0.046cm" svg:height="0.045cm" svg:x="12.534cm" svg:y="28.256cm" svg:viewBox="0 0 47 46" svg:d="M47 23c0 10-10 20-21 23-12 2-26-10-26-22s8-22 19-24c13-2 27 9 28 23z">
          <text:p/>
        </draw:path>
        <draw:path draw:style-name="gr9" draw:text-style-name="P7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9" draw:text-style-name="P7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9" draw:text-style-name="P7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9" draw:text-style-name="P7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9" draw:text-style-name="P7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9" draw:text-style-name="P7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9" draw:text-style-name="P7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9" draw:text-style-name="P7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9" draw:text-style-name="P7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9" draw:text-style-name="P7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9" draw:text-style-name="P7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9" draw:text-style-name="P7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9" draw:text-style-name="P7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9" draw:text-style-name="P7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9" draw:text-style-name="P7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9" draw:text-style-name="P7" draw:layer="layout" svg:width="0.046cm" svg:height="0.046cm" svg:x="4.068cm" svg:y="25.336cm" svg:viewBox="0 0 47 47" svg:d="M21 0c12-1 25 11 26 24 0 9-8 20-18 22-12 3-26-6-29-18-2-12 9-26 21-28z">
          <text:p/>
        </draw:path>
        <draw:path draw:style-name="gr9" draw:text-style-name="P7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9" draw:text-style-name="P7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9" draw:text-style-name="P7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9" draw:text-style-name="P7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9" draw:text-style-name="P7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9" draw:text-style-name="P7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9" draw:text-style-name="P7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9" draw:text-style-name="P7" draw:layer="layout" svg:width="0.046cm" svg:height="0.043cm" svg:x="3.484cm" svg:y="17.747cm" svg:viewBox="0 0 47 44" svg:d="M46 19c2 10-6 22-17 24-13 4-27-5-29-19-2-9 8-21 18-23 12-3 26 6 28 18z">
          <text:p/>
        </draw:path>
        <draw:path draw:style-name="gr9" draw:text-style-name="P7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9" draw:text-style-name="P7" draw:layer="layout" svg:width="0.048cm" svg:height="0.048cm" svg:x="17.497cm" svg:y="23cm" svg:viewBox="0 0 49 49" svg:d="M22 0c14 0 27 10 27 23 1 13-11 24-24 26-12 1-24-10-25-23-1-16 8-26 22-26z">
          <text:p/>
        </draw:path>
        <draw:path draw:style-name="gr9" draw:text-style-name="P7" draw:layer="layout" svg:width="0.044cm" svg:height="0.045cm" svg:x="14.87cm" svg:y="27.089cm" svg:viewBox="0 0 45 46" svg:d="M21 0c10-1 21 8 24 17 2 14-8 28-21 29-9 1-21-8-23-18-3-13 7-27 20-28z">
          <text:p/>
        </draw:path>
        <draw:path draw:style-name="gr9" draw:text-style-name="P7" draw:layer="layout" svg:width="0.046cm" svg:height="0.046cm" svg:x="2.9cm" svg:y="19.498cm" svg:viewBox="0 0 47 47" svg:d="M25 46c-14 1-26-11-25-23 0-9 9-21 19-23 12-3 26 8 28 21 2 12-9 24-22 25z">
          <text:p/>
        </draw:path>
        <draw:path draw:style-name="gr9" draw:text-style-name="P7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9" draw:text-style-name="P7" draw:layer="layout" svg:width="0.042cm" svg:height="0.042cm" svg:x="2.902cm" svg:y="23.296cm" svg:viewBox="0 0 43 43" svg:d="M19 0c9-2 21 7 24 19 2 9-8 20-20 23-8 2-20-8-23-18-1-10 8-22 19-24z">
          <text:p/>
        </draw:path>
        <draw:path draw:style-name="gr9" draw:text-style-name="P7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9" draw:text-style-name="P7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9" draw:text-style-name="P7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9" draw:text-style-name="P7" draw:layer="layout" svg:width="0.046cm" svg:height="0.045cm" svg:x="8.155cm" svg:y="28.256cm" svg:viewBox="0 0 47 46" svg:d="M22 0c11-1 22 7 24 19 3 12-8 26-20 27-10 1-23-8-26-18-3-12 8-27 22-28z">
          <text:p/>
        </draw:path>
        <draw:path draw:style-name="gr9" draw:text-style-name="P7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9" draw:text-style-name="P7" draw:layer="layout" svg:width="0.047cm" svg:height="0.045cm" svg:x="3.483cm" svg:y="24.46cm" svg:viewBox="0 0 48 46" svg:d="M20 0c13-2 26 8 28 21 1 11-11 25-25 25-9 0-20-10-22-19-3-12 7-25 19-27z">
          <text:p/>
        </draw:path>
        <draw:path draw:style-name="gr9" draw:text-style-name="P7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9" draw:text-style-name="P7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9" draw:text-style-name="P7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9" draw:text-style-name="P7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9" draw:text-style-name="P7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9" draw:text-style-name="P7" draw:layer="layout" svg:width="0.046cm" svg:height="0.045cm" svg:x="9.907cm" svg:y="28.548cm" svg:viewBox="0 0 47 46" svg:d="M47 23c1 12-11 24-24 23-10 0-21-9-23-18-2-11 9-26 21-28s25 11 26 23z">
          <text:p/>
        </draw:path>
        <draw:path draw:style-name="gr9" draw:text-style-name="P7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9" draw:text-style-name="P7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9" draw:text-style-name="P7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9" draw:text-style-name="P7" draw:layer="layout" svg:width="0.041cm" svg:height="0.041cm" svg:x="3.486cm" svg:y="17.457cm" svg:viewBox="0 0 42 42" svg:d="M42 22c-1 12-12 22-23 20-11-1-20-11-19-22s11-21 22-20 21 12 20 22z">
          <text:p/>
        </draw:path>
        <draw:path draw:style-name="gr9" draw:text-style-name="P7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9" draw:text-style-name="P7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9" draw:text-style-name="P7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9" draw:text-style-name="P7" draw:layer="layout" svg:width="0.044cm" svg:height="0.044cm" svg:x="4.945cm" svg:y="15.703cm" svg:viewBox="0 0 45 45" svg:d="M23 45c-11 0-22-8-23-18-2-14 9-27 23-27s23 11 22 26c-1 12-10 19-22 19z">
          <text:p/>
        </draw:path>
        <draw:path draw:style-name="gr9" draw:text-style-name="P7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9" draw:text-style-name="P7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9" draw:text-style-name="P7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9" draw:text-style-name="P7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9" draw:text-style-name="P7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9" draw:text-style-name="P7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9" draw:text-style-name="P7" draw:layer="layout" svg:width="0.039cm" svg:height="0.04cm" svg:x="6.991cm" svg:y="27.966cm" svg:viewBox="0 0 40 41" svg:d="M39 17c2 11-6 22-16 23-11 2-22-6-23-17-2-12 6-22 17-23 11-2 21 6 22 17z">
          <text:p/>
        </draw:path>
        <draw:path draw:style-name="gr9" draw:text-style-name="P7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9" draw:text-style-name="P7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9" draw:text-style-name="P7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9" draw:text-style-name="P7" draw:layer="layout" svg:width="0.041cm" svg:height="0.04cm" svg:x="17.791cm" svg:y="22.713cm" svg:viewBox="0 0 42 41" svg:d="M42 20c0 10-9 20-21 21-9 1-20-9-21-19s9-21 20-22c12 0 22 11 22 20z">
          <text:p/>
        </draw:path>
        <draw:path draw:style-name="gr9" draw:text-style-name="P7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9" draw:text-style-name="P7" draw:layer="layout" svg:width="0.04cm" svg:height="0.039cm" svg:x="4.654cm" svg:y="26.215cm" svg:viewBox="0 0 41 40" svg:d="M41 19c1 11-8 20-18 21-11 1-23-7-23-17-1-12 8-21 19-23 10-1 21 7 22 19z">
          <text:p/>
        </draw:path>
        <draw:path draw:style-name="gr9" draw:text-style-name="P7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9" draw:text-style-name="P7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9" draw:text-style-name="P7" draw:layer="layout" svg:width="0.039cm" svg:height="0.041cm" svg:x="9.034cm" svg:y="28.551cm" svg:viewBox="0 0 40 42" svg:d="M19 0c11 0 21 9 21 20 0 12-9 22-20 22-10 0-19-9-20-21 0-10 9-20 19-21z">
          <text:p/>
        </draw:path>
        <draw:path draw:style-name="gr9" draw:text-style-name="P7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9" draw:text-style-name="P7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9" draw:text-style-name="P7" draw:layer="layout" svg:width="0.041cm" svg:height="0.04cm" svg:x="12.536cm" svg:y="13.663cm" svg:viewBox="0 0 42 41" svg:d="M20 0c12 0 23 11 22 21s-12 20-22 20c-9-1-19-10-20-20s10-21 20-21z">
          <text:p/>
        </draw:path>
        <draw:path draw:style-name="gr9" draw:text-style-name="P7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9" draw:text-style-name="P7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9" draw:text-style-name="P7" draw:layer="layout" svg:width="0.04cm" svg:height="0.039cm" svg:x="7.281cm" svg:y="13.953cm" svg:viewBox="0 0 41 40" svg:d="M18 0c10-1 22 7 23 17 2 11-6 22-18 23-11 2-22-6-23-17s7-21 18-23z">
          <text:p/>
        </draw:path>
        <draw:path draw:style-name="gr9" draw:text-style-name="P7" draw:layer="layout" svg:width="0.041cm" svg:height="0.039cm" svg:x="17.791cm" svg:y="19.502cm" svg:viewBox="0 0 42 40" svg:d="M21 0c11 0 22 10 21 20 0 10-11 20-21 20s-20-10-21-20 10-21 21-20z">
          <text:p/>
        </draw:path>
        <draw:path draw:style-name="gr9" draw:text-style-name="P7" draw:layer="layout" svg:width="0.044cm" svg:height="0.042cm" svg:x="7.572cm" svg:y="13.952cm" svg:viewBox="0 0 45 43" svg:d="M45 24c0 11-9 19-20 19-15 1-26-10-25-23s15-22 28-20c10 2 18 12 17 24z">
          <text:p/>
        </draw:path>
        <draw:path draw:style-name="gr9" draw:text-style-name="P7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9" draw:text-style-name="P7" draw:layer="layout" svg:width="0.041cm" svg:height="0.039cm" svg:x="13.119cm" svg:y="13.953cm" svg:viewBox="0 0 42 40" svg:d="M42 19c1 11-9 21-19 21-12 0-23-9-23-19s10-20 20-21c11 0 21 9 22 19z">
          <text:p/>
        </draw:path>
        <draw:path draw:style-name="gr9" draw:text-style-name="P7" draw:layer="layout" svg:width="0.04cm" svg:height="0.041cm" svg:x="5.532cm" svg:y="27.091cm" svg:viewBox="0 0 41 42" svg:d="M19 0c11 0 21 9 22 20 0 9-9 21-21 22-9 1-19-9-20-21 0-11 9-22 19-21z">
          <text:p/>
        </draw:path>
        <draw:path draw:style-name="gr9" draw:text-style-name="P7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9" draw:text-style-name="P7" draw:layer="layout" svg:width="0.039cm" svg:height="0.039cm" svg:x="14.289cm" svg:y="14.538cm" svg:viewBox="0 0 40 40" svg:d="M40 22c-1 8-8 17-16 18-14 1-23-8-24-18s9-21 21-22c9 0 19 11 19 22z">
          <text:p/>
        </draw:path>
        <draw:path draw:style-name="gr9" draw:text-style-name="P7" draw:layer="layout" svg:width="0.04cm" svg:height="0.04cm" svg:x="17.5cm" svg:y="18.624cm" svg:viewBox="0 0 41 41" svg:d="M41 20c0 10-9 21-20 21s-21-10-21-20 9-20 20-21c10-1 20 9 21 20z">
          <text:p/>
        </draw:path>
        <draw:path draw:style-name="gr9" draw:text-style-name="P7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9" draw:text-style-name="P7" draw:layer="layout" svg:width="0.035cm" svg:height="0.035cm" svg:x="3.198cm" svg:y="24.175cm" svg:viewBox="0 0 36 36" svg:d="M36 15c0 10-5 18-14 20-10 3-23-7-22-17 0-9 10-18 18-18 8-1 17 7 18 15z">
          <text:p/>
        </draw:path>
        <draw:path draw:style-name="gr9" draw:text-style-name="P7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9" draw:text-style-name="P7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9" draw:text-style-name="P7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9" draw:text-style-name="P7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9" draw:text-style-name="P7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9" draw:text-style-name="P7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9" draw:text-style-name="P7" draw:layer="layout" svg:width="0.035cm" svg:height="0.035cm" svg:x="9.62cm" svg:y="28.844cm" svg:viewBox="0 0 36 36" svg:d="M36 17c1 8-6 17-14 19-11 1-19-4-21-13-3-11 7-24 17-23 8 0 17 9 18 17z">
          <text:p/>
        </draw:path>
        <draw:path draw:style-name="gr9" draw:text-style-name="P7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9" draw:text-style-name="P7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9" draw:text-style-name="P7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9" draw:text-style-name="P7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9" draw:text-style-name="P7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9" draw:text-style-name="P7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9" draw:text-style-name="P7" draw:layer="layout" svg:width="0.038cm" svg:height="0.038cm" svg:x="11.077cm" svg:y="13.37cm" svg:viewBox="0 0 39 39" svg:d="M39 20c0 9-8 18-16 19-12 1-23-6-23-17-1-11 7-21 18-22 9-2 21 9 21 20z">
          <text:p/>
        </draw:path>
        <draw:path draw:style-name="gr9" draw:text-style-name="P7" draw:layer="layout" svg:width="0.035cm" svg:height="0.035cm" svg:x="3.198cm" svg:y="17.751cm" svg:viewBox="0 0 36 36" svg:d="M36 16c0 9-5 17-14 19-10 3-23-7-22-17 0-9 10-17 18-18 8 0 17 7 18 16z">
          <text:p/>
        </draw:path>
        <draw:path draw:style-name="gr9" draw:text-style-name="P7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9" draw:text-style-name="P7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9" draw:text-style-name="P7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9" draw:text-style-name="P7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9" draw:text-style-name="P7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9" draw:text-style-name="P7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9" draw:text-style-name="P7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9" draw:text-style-name="P7" draw:layer="layout" svg:width="0.04cm" svg:height="0.04cm" svg:x="16.331cm" svg:y="16.289cm" svg:viewBox="0 0 41 41" svg:d="M41 17c1 11-6 22-17 23-10 2-20-5-23-17-3-9 6-21 16-23s23 6 24 17z">
          <text:p/>
        </draw:path>
        <draw:path draw:style-name="gr9" draw:text-style-name="P7" draw:layer="layout" svg:width="0.039cm" svg:height="0.042cm" svg:x="2.612cm" svg:y="21.252cm" svg:viewBox="0 0 40 43" svg:d="M19 0c11-1 21 10 21 21 1 10-9 22-20 22-9-1-20-11-20-21 0-9 9-21 19-22z">
          <text:p/>
        </draw:path>
        <draw:path draw:style-name="gr9" draw:text-style-name="P7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9" draw:text-style-name="P7" draw:layer="layout" svg:width="0.035cm" svg:height="0.035cm" svg:x="18.086cm" svg:y="20.963cm" svg:viewBox="0 0 36 36" svg:d="M36 15c1 9-4 17-14 20s-22-8-22-18c0-8 9-17 17-17 8-1 18 7 19 15z">
          <text:p/>
        </draw:path>
        <draw:path draw:style-name="gr9" draw:text-style-name="P7" draw:layer="layout" svg:width="0.039cm" svg:height="0.038cm" svg:x="2.612cm" svg:y="20.962cm" svg:viewBox="0 0 40 39" svg:d="M23 0c9 0 16 8 17 17 1 10-9 23-20 22s-21-12-20-22c1-11 11-18 23-17z">
          <text:p/>
        </draw:path>
        <draw:path draw:style-name="gr9" draw:text-style-name="P7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9" draw:text-style-name="P7" draw:layer="layout" svg:width="0.034cm" svg:height="0.035cm" svg:x="16.044cm" svg:y="26.218cm" svg:viewBox="0 0 35 36" svg:d="M35 20c0 8-10 16-19 16-8-1-16-9-16-17-1-9 7-18 15-19 12-1 21 8 20 20z">
          <text:p/>
        </draw:path>
        <draw:path draw:style-name="gr9" draw:text-style-name="P7" draw:layer="layout" svg:width="0.035cm" svg:height="0.035cm" svg:x="6.994cm" svg:y="13.956cm" svg:viewBox="0 0 36 36" svg:d="M34 24c-5 11-18 16-27 8-7-5-9-16-5-23 5-7 16-12 23-8 9 6 13 16 9 23z">
          <text:p/>
        </draw:path>
        <draw:path draw:style-name="gr9" draw:text-style-name="P7" draw:layer="layout" svg:width="0.041cm" svg:height="0.04cm" svg:x="14.58cm" svg:y="27.383cm" svg:viewBox="0 0 42 41" svg:d="M41 17c2 10-6 21-17 23-9 2-20-5-24-16-2-11 7-22 17-24 11-2 22 6 24 17z">
          <text:p/>
        </draw:path>
        <draw:path draw:style-name="gr9" draw:text-style-name="P7" draw:layer="layout" svg:width="0.04cm" svg:height="0.039cm" svg:x="16.625cm" svg:y="25.34cm" svg:viewBox="0 0 41 40" svg:d="M18 0c11-1 21 6 23 16 1 11-6 21-17 24-10 2-22-5-24-17-2-11 6-22 18-23z">
          <text:p/>
        </draw:path>
        <draw:path draw:style-name="gr9" draw:text-style-name="P7" draw:layer="layout" svg:width="0.038cm" svg:height="0.039cm" svg:x="3.78cm" svg:y="25.046cm" svg:viewBox="0 0 39 40" svg:d="M39 23c0 11-10 18-22 17-9-1-17-9-17-17 0-12 10-23 20-23s21 11 19 23z">
          <text:p/>
        </draw:path>
        <draw:path draw:style-name="gr9" draw:text-style-name="P7" draw:layer="layout" svg:width="0.039cm" svg:height="0.041cm" svg:x="2.612cm" svg:y="20.667cm" svg:viewBox="0 0 40 42" svg:d="M40 23c0 10-11 20-21 19s-20-12-19-21c1-11 11-21 22-21 9 0 19 11 18 23z">
          <text:p/>
        </draw:path>
        <draw:path draw:style-name="gr9" draw:text-style-name="P7" draw:layer="layout" svg:width="0.035cm" svg:height="0.035cm" svg:x="18.086cm" svg:y="20.379cm" svg:viewBox="0 0 36 36" svg:d="M17 36c-8-1-17-9-17-17s8-18 16-19c12-1 21 9 20 21-1 8-10 16-19 15z">
          <text:p/>
        </draw:path>
        <draw:path draw:style-name="gr9" draw:text-style-name="P7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9" draw:text-style-name="P7" draw:layer="layout" svg:width="0.04cm" svg:height="0.039cm" svg:x="15.748cm" svg:y="15.706cm" svg:viewBox="0 0 41 40" svg:d="M41 17c1 11-7 22-18 23-10 2-21-6-23-18-2-9 7-20 17-22 11-1 23 7 24 17z">
          <text:p/>
        </draw:path>
        <draw:path draw:style-name="gr9" draw:text-style-name="P7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9" draw:text-style-name="P7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9" draw:text-style-name="P7" draw:layer="layout" svg:width="0.039cm" svg:height="0.039cm" svg:x="2.612cm" svg:y="20.377cm" svg:viewBox="0 0 40 40" svg:d="M40 23c-2 12-13 19-25 16-8-2-15-10-15-18 0-10 10-21 21-21s20 12 19 23z">
          <text:p/>
        </draw:path>
        <draw:path draw:style-name="gr9" draw:text-style-name="P7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9" draw:text-style-name="P7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9" draw:text-style-name="P7" draw:layer="layout" svg:width="0.039cm" svg:height="0.04cm" svg:x="2.612cm" svg:y="21.836cm" svg:viewBox="0 0 40 41" svg:d="M19 0c11-1 21 8 21 19 1 12-9 22-20 22-10 0-20-9-20-20 0-10 9-20 19-21z">
          <text:p/>
        </draw:path>
        <draw:path draw:style-name="gr9" draw:text-style-name="P7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9" draw:text-style-name="P7" draw:layer="layout" svg:width="0.035cm" svg:height="0.034cm" svg:x="2.614cm" svg:y="19.794cm" svg:viewBox="0 0 36 35" svg:d="M21 0c9 0 15 9 15 19 0 8-9 16-18 16-8 0-17-8-18-16 0-11 10-21 21-19z">
          <text:p/>
        </draw:path>
        <draw:path draw:style-name="gr9" draw:text-style-name="P7" draw:layer="layout" svg:width="0.035cm" svg:height="0.035cm" svg:x="5.824cm" svg:y="27.385cm" svg:viewBox="0 0 36 36" svg:d="M19 0c8 0 17 9 17 16 1 12-9 23-19 20-8-1-17-10-17-19 0-7 10-16 19-17z">
          <text:p/>
        </draw:path>
        <draw:path draw:style-name="gr9" draw:text-style-name="P7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9" draw:text-style-name="P7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9" draw:text-style-name="P7" draw:layer="layout" svg:width="0.033cm" svg:height="0.034cm" svg:x="7.285cm" svg:y="28.261cm" svg:viewBox="0 0 34 35" svg:d="M34 18c1 8-7 17-15 17-11 0-17-5-19-13-2-12 7-22 18-22 8-1 16 8 16 18z">
          <text:p/>
        </draw:path>
        <draw:path draw:style-name="gr9" draw:text-style-name="P7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9" draw:text-style-name="P7" draw:layer="layout" svg:width="0.035cm" svg:height="0.035cm" svg:x="11.663cm" svg:y="13.372cm" svg:viewBox="0 0 36 36" svg:d="M21 0c7 1 15 11 15 19s-8 16-17 17c-9 0-18-8-19-15 0-11 9-22 21-21z">
          <text:p/>
        </draw:path>
        <draw:path draw:style-name="gr9" draw:text-style-name="P7" draw:layer="layout" svg:width="0.034cm" svg:height="0.034cm" svg:x="2.615cm" svg:y="19.504cm" svg:viewBox="0 0 35 35" svg:d="M19 35c-11 1-20-9-19-21 0-8 9-14 18-14 10 0 18 9 17 18 0 8-8 17-16 17z">
          <text:p/>
        </draw:path>
        <draw:path draw:style-name="gr9" draw:text-style-name="P7" draw:layer="layout" svg:width="0.039cm" svg:height="0.042cm" svg:x="3.196cm" svg:y="18.04cm" svg:viewBox="0 0 40 43" svg:d="M40 23c0 10-11 20-20 20-11-1-21-12-20-23 0-10 11-20 21-20s19 12 19 23z">
          <text:p/>
        </draw:path>
        <draw:path draw:style-name="gr9" draw:text-style-name="P7" draw:layer="layout" svg:width="0.035cm" svg:height="0.035cm" svg:x="9.036cm" svg:y="13.371cm" svg:viewBox="0 0 36 36" svg:d="M17 0c7 0 18 10 19 17 1 9-4 17-14 19-12 2-23-7-22-18 1-7 10-17 17-18z">
          <text:p/>
        </draw:path>
        <draw:path draw:style-name="gr9" draw:text-style-name="P7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9" draw:text-style-name="P7" draw:layer="layout" svg:width="0.033cm" svg:height="0.034cm" svg:x="11.373cm" svg:y="13.372cm" svg:viewBox="0 0 34 35" svg:d="M33 25c-7 10-19 13-28 7-6-4-7-15-3-23 3-8 14-11 21-7 9 5 13 16 10 23z">
          <text:p/>
        </draw:path>
        <draw:path draw:style-name="gr9" draw:text-style-name="P7" draw:layer="layout" svg:width="0.035cm" svg:height="0.033cm" svg:x="2.614cm" svg:y="22.131cm" svg:viewBox="0 0 36 34" svg:d="M17 0c10-1 19 7 19 14 0 11-5 19-15 20-10 2-20-7-21-19 0-7 9-15 17-15z">
          <text:p/>
        </draw:path>
        <draw:path draw:style-name="gr9" draw:text-style-name="P7" draw:layer="layout" svg:width="0.034cm" svg:height="0.035cm" svg:x="10.204cm" svg:y="28.844cm" svg:viewBox="0 0 35 36" svg:d="M34 25c-5 11-17 14-27 8-7-5-9-16-4-23 4-9 16-12 23-8 8 6 12 16 8 23z">
          <text:p/>
        </draw:path>
        <draw:path draw:style-name="gr9" draw:text-style-name="P7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9" draw:text-style-name="P7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9" draw:text-style-name="P7" draw:layer="layout" svg:width="0.034cm" svg:height="0.034cm" svg:x="8.453cm" svg:y="28.555cm" svg:viewBox="0 0 35 35" svg:d="M20 0c9 1 16 9 15 18-1 8-11 17-18 17-10 0-19-14-17-24 3-8 10-12 20-11z">
          <text:p/>
        </draw:path>
        <draw:path draw:style-name="gr9" draw:text-style-name="P7" draw:layer="layout" svg:width="0.034cm" svg:height="0.035cm" svg:x="5.241cm" svg:y="15.124cm" svg:viewBox="0 0 35 36" svg:d="M18 0c8 0 17 8 17 16 1 10-5 18-13 20-11 2-23-8-22-19 0-8 9-16 18-17z">
          <text:p/>
        </draw:path>
        <draw:path draw:style-name="gr9" draw:text-style-name="P7" draw:layer="layout" svg:width="0.033cm" svg:height="0.033cm" svg:x="8.162cm" svg:y="28.554cm" svg:viewBox="0 0 34 34" svg:d="M34 17c0 10-11 19-21 17-9-2-14-9-13-19 0-10 9-16 18-15 9 0 17 9 16 17z">
          <text:p/>
        </draw:path>
        <draw:path draw:style-name="gr9" draw:text-style-name="P7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9" draw:text-style-name="P7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9" draw:text-style-name="P7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9" draw:text-style-name="P7" draw:layer="layout" svg:width="0.034cm" svg:height="0.035cm" svg:x="2.615cm" svg:y="22.422cm" svg:viewBox="0 0 35 36" svg:d="M19 0c8 1 16 11 16 19 0 9-8 17-17 17s-18-7-18-15c-1-11 8-21 19-21z">
          <text:p/>
        </draw:path>
        <draw:path draw:style-name="gr9" draw:text-style-name="P7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9" draw:text-style-name="P7" draw:layer="layout" svg:width="0.035cm" svg:height="0.035cm" svg:x="18.086cm" svg:y="21.547cm" svg:viewBox="0 0 36 36" svg:d="M16 0c10-1 19 6 20 14 1 11-8 23-20 22-7-1-15-11-16-19 0-7 8-16 16-17z">
          <text:p/>
        </draw:path>
        <draw:path draw:style-name="gr9" draw:text-style-name="P7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9" draw:text-style-name="P7" draw:layer="layout" svg:width="0.035cm" svg:height="0.034cm" svg:x="16.627cm" svg:y="25.634cm" svg:viewBox="0 0 36 35" svg:d="M17 35c-9 0-17-8-17-17 1-9 8-18 17-18 11 0 19 9 19 21-1 8-9 14-19 14z">
          <text:p/>
        </draw:path>
        <draw:path draw:style-name="gr9" draw:text-style-name="P7" draw:layer="layout" svg:width="0.034cm" svg:height="0.035cm" svg:x="16.918cm" svg:y="25.048cm" svg:viewBox="0 0 35 36" svg:d="M17 0c7 0 17 8 18 16 1 9-5 18-14 20-12 1-22-7-21-19 1-7 9-16 17-17z">
          <text:p/>
        </draw:path>
        <draw:path draw:style-name="gr9" draw:text-style-name="P7" draw:layer="layout" svg:width="0.034cm" svg:height="0.035cm" svg:x="12.248cm" svg:y="28.555cm" svg:viewBox="0 0 35 36" svg:d="M35 19c-1 9-11 18-17 17-11-1-20-15-17-24s11-13 21-11 15 9 13 18z">
          <text:p/>
        </draw:path>
        <draw:path draw:style-name="gr9" draw:text-style-name="P7" draw:layer="layout" svg:width="0.032cm" svg:height="0.033cm" svg:x="15.752cm" svg:y="26.509cm" svg:viewBox="0 0 33 34" svg:d="M33 17c1 9-5 16-13 17-11 1-21-7-20-17 1-8 10-16 17-17 8 0 16 9 16 17z">
          <text:p/>
        </draw:path>
        <draw:path draw:style-name="gr9" draw:text-style-name="P7" draw:layer="layout" svg:width="0.028cm" svg:height="0.029cm" svg:x="13.712cm" svg:y="13.959cm" svg:viewBox="0 0 29 30" svg:d="M29 14c0 9-7 16-16 16-7 0-14-8-13-16 1-7 4-13 11-14 9-2 17 6 18 14z">
          <text:p/>
        </draw:path>
        <draw:path draw:style-name="gr9" draw:text-style-name="P7" draw:layer="layout" svg:width="0.034cm" svg:height="0.035cm" svg:x="14.583cm" svg:y="14.541cm" svg:viewBox="0 0 35 36" svg:d="M0 18c0-8 6-17 14-18 11-1 21 8 21 19-1 8-9 16-18 17-8 0-16-9-17-18z">
          <text:p/>
        </draw:path>
        <draw:path draw:style-name="gr9" draw:text-style-name="P7" draw:layer="layout" svg:width="0.032cm" svg:height="0.034cm" svg:x="6.119cm" svg:y="27.677cm" svg:viewBox="0 0 33 35" svg:d="M33 16c1 8-5 17-13 19-10 1-18-3-20-13-2-11 6-22 17-22 7 0 15 8 16 16z">
          <text:p/>
        </draw:path>
        <draw:path draw:style-name="gr9" draw:text-style-name="P7" draw:layer="layout" svg:width="0.033cm" svg:height="0.034cm" svg:x="8.745cm" svg:y="13.372cm" svg:viewBox="0 0 34 35" svg:d="M34 20c0 8-8 15-18 15-8 0-16-7-16-16 0-8 7-18 14-19 12-1 20 9 20 20z">
          <text:p/>
        </draw:path>
        <draw:path draw:style-name="gr9" draw:text-style-name="P7" draw:layer="layout" svg:width="0.034cm" svg:height="0.033cm" svg:x="16.334cm" svg:y="25.926cm" svg:viewBox="0 0 35 34" svg:d="M17 0c10 0 18 7 18 16 0 10-5 17-13 18-12 2-22-7-22-18 1-8 9-15 17-16z">
          <text:p/>
        </draw:path>
        <draw:path draw:style-name="gr9" draw:text-style-name="P7" draw:layer="layout" svg:width="0.029cm" svg:height="0.028cm" svg:x="12.834cm" svg:y="28.557cm" svg:viewBox="0 0 30 29" svg:d="M17 29c-8 0-17-7-17-15s8-15 16-14c7 0 11 4 14 11 2 8-6 17-13 18z">
          <text:p/>
        </draw:path>
        <draw:path draw:style-name="gr9" draw:text-style-name="P7" draw:layer="layout" svg:width="0.028cm" svg:height="0.03cm" svg:x="16.338cm" svg:y="26.22cm" svg:viewBox="0 0 29 31" svg:d="M29 18c0 8-9 15-17 13s-11-7-12-13c-1-10 7-18 15-18 8 1 15 9 14 18z">
          <text:p/>
        </draw:path>
        <draw:path draw:style-name="gr9" draw:text-style-name="P7" draw:layer="layout" svg:width="0.034cm" svg:height="0.034cm" svg:x="14.291cm" svg:y="27.677cm" svg:viewBox="0 0 35 35" svg:d="M18 0c7-1 16 8 17 16 2 9-4 18-13 19-12 1-23-7-22-18 1-7 11-16 18-17z">
          <text:p/>
        </draw:path>
        <draw:path draw:style-name="gr9" draw:text-style-name="P7" draw:layer="layout" svg:width="0.033cm" svg:height="0.032cm" svg:x="15.169cm" svg:y="27.095cm" svg:viewBox="0 0 34 33" svg:d="M34 16c0 8-7 16-15 17-10 1-17-4-19-13-2-11 6-21 18-20 8 0 15 8 16 16z">
          <text:p/>
        </draw:path>
        <draw:path draw:style-name="gr9" draw:text-style-name="P7" draw:layer="layout" svg:width="0.033cm" svg:height="0.034cm" svg:x="9.33cm" svg:y="13.372cm" svg:viewBox="0 0 34 35" svg:d="M0 20c0-9 6-19 14-20 10-1 21 9 20 20 0 8-9 15-18 15-8 1-16-7-16-15z">
          <text:p/>
        </draw:path>
        <draw:path draw:style-name="gr9" draw:text-style-name="P7" draw:layer="layout" svg:width="0.034cm" svg:height="0.033cm" svg:x="6.701cm" svg:y="27.97cm" svg:viewBox="0 0 35 34" svg:d="M18 34c-9 0-17-10-18-17-1-10 10-19 22-17 9 2 14 9 12 18-1 9-9 17-16 16z">
          <text:p/>
        </draw:path>
        <draw:path draw:style-name="gr9" draw:text-style-name="P7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9" draw:text-style-name="P7" draw:layer="layout" svg:width="0.03cm" svg:height="0.029cm" svg:x="6.412cm" svg:y="27.971cm" svg:viewBox="0 0 31 30" svg:d="M31 18c-2 8-11 14-20 11-6-3-10-7-11-13 0-9 9-16 18-16 8 1 14 9 13 18z">
          <text:p/>
        </draw:path>
        <draw:path draw:style-name="gr9" draw:text-style-name="P7" draw:layer="layout" svg:width="0.034cm" svg:height="0.032cm" svg:x="14cm" svg:y="14.25cm" svg:viewBox="0 0 35 33" svg:d="M19 0c9 1 16 10 16 17-1 10-13 18-23 16-9-3-13-10-12-20 2-9 10-14 19-13z">
          <text:p/>
        </draw:path>
        <draw:path draw:style-name="gr9" draw:text-style-name="P7" draw:layer="layout" svg:width="0.034cm" svg:height="0.034cm" svg:x="6.41cm" svg:y="14.249cm" svg:viewBox="0 0 35 35" svg:d="M35 15c0 11-6 18-15 20-10 1-20-7-20-20 0-7 9-15 17-15s19 8 18 15z">
          <text:p/>
        </draw:path>
        <draw:path draw:style-name="gr9" draw:text-style-name="P7" draw:layer="layout" svg:width="0.034cm" svg:height="0.034cm" svg:x="4.366cm" svg:y="16cm" svg:viewBox="0 0 35 35" svg:d="M20 35c-10 1-18-4-20-12-1-12 9-24 19-23 7 1 16 10 16 17 1 9-6 17-15 18z">
          <text:p/>
        </draw:path>
        <draw:path draw:style-name="gr9" draw:text-style-name="P7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9" draw:text-style-name="P7" draw:layer="layout" svg:width="0.033cm" svg:height="0.034cm" svg:x="17.795cm" svg:y="19.21cm" svg:viewBox="0 0 34 35" svg:d="M33 25c-4 8-11 12-21 10-11-3-15-15-9-26 3-8 16-11 22-7 7 5 11 16 8 23z">
          <text:p/>
        </draw:path>
        <draw:path draw:style-name="gr9" draw:text-style-name="P7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9" draw:text-style-name="P7" draw:layer="layout" svg:width="0.028cm" svg:height="0.029cm" svg:x="11.375cm" svg:y="28.848cm" svg:viewBox="0 0 29 30" svg:d="M29 13c1 8-6 17-14 17-7 0-15-9-15-17 1-7 5-11 12-13 8-2 17 4 17 13z">
          <text:p/>
        </draw:path>
        <draw:path draw:style-name="gr9" draw:text-style-name="P7" draw:layer="layout" svg:width="0.034cm" svg:height="0.035cm" svg:x="3.782cm" svg:y="25.343cm" svg:viewBox="0 0 35 36" svg:d="M0 19c-1-9 5-18 15-19s18 3 20 13c2 9-7 22-17 23-6 0-17-10-18-17z">
          <text:p/>
        </draw:path>
        <draw:path draw:style-name="gr9" draw:text-style-name="P7" draw:layer="layout" svg:width="0.034cm" svg:height="0.034cm" svg:x="18.087cm" svg:y="21.256cm" svg:viewBox="0 0 35 35" svg:d="M21 0c8 2 14 9 14 19 0 7-10 16-18 16s-17-9-17-16c-1-12 9-20 21-19z">
          <text:p/>
        </draw:path>
        <draw:path draw:style-name="gr9" draw:text-style-name="P7" draw:layer="layout" svg:width="0.034cm" svg:height="0.034cm" svg:x="17.503cm" svg:y="23.882cm" svg:viewBox="0 0 35 35" svg:d="M35 16c1 9-5 18-15 19-12 1-21-7-20-19 1-7 10-15 17-16 9 0 18 9 18 16z">
          <text:p/>
        </draw:path>
        <draw:path draw:style-name="gr9" draw:text-style-name="P7" draw:layer="layout" svg:width="0.032cm" svg:height="0.034cm" svg:x="2.907cm" svg:y="18.627cm" svg:viewBox="0 0 33 35" svg:d="M15 35c-9 0-16-8-15-16 0-9 7-18 14-19 12 0 20 9 19 21 0 8-8 14-18 14z">
          <text:p/>
        </draw:path>
        <draw:path draw:style-name="gr9" draw:text-style-name="P7" draw:layer="layout" svg:width="0.028cm" svg:height="0.029cm" svg:x="17.214cm" svg:y="17.171cm" svg:viewBox="0 0 29 30" svg:d="M17 0c8 2 14 10 11 20-4 6-8 10-14 10-8 0-15-8-14-16 0-10 9-16 17-14z">
          <text:p/>
        </draw:path>
        <draw:path draw:style-name="gr9" draw:text-style-name="P7" draw:layer="layout" svg:width="0.033cm" svg:height="0.035cm" svg:x="3.49cm" svg:y="17.167cm" svg:viewBox="0 0 34 36" svg:d="M34 17c1 9-6 18-15 19s-16-4-19-13c-2-11 6-23 17-23 7 0 16 8 17 17z">
          <text:p/>
        </draw:path>
        <draw:path draw:style-name="gr9" draw:text-style-name="P7" draw:layer="layout" svg:width="0.034cm" svg:height="0.033cm" svg:x="16.918cm" svg:y="16.876cm" svg:viewBox="0 0 35 34" svg:d="M35 17c0 9-8 17-16 17-11 1-20-8-19-19 1-8 10-15 18-15 9 0 18 9 17 17z">
          <text:p/>
        </draw:path>
        <draw:path draw:style-name="gr9" draw:text-style-name="P7" draw:layer="layout" svg:width="0.028cm" svg:height="0.03cm" svg:x="2.325cm" svg:y="20.965cm" svg:viewBox="0 0 29 31" svg:d="M29 18c0 8-9 15-18 13-6-2-10-7-11-13-1-10 7-18 15-18 7 0 15 9 14 18z">
          <text:p/>
        </draw:path>
        <draw:path draw:style-name="gr9" draw:text-style-name="P7" draw:layer="layout" svg:width="0.033cm" svg:height="0.035cm" svg:x="9.913cm" svg:y="28.844cm" svg:viewBox="0 0 34 36" svg:d="M34 17c1 9-5 18-13 19-10 0-18-4-20-13-3-10 7-23 17-23 8 0 16 9 16 17z">
          <text:p/>
        </draw:path>
        <draw:path draw:style-name="gr9" draw:text-style-name="P7" draw:layer="layout" svg:width="0.035cm" svg:height="0.033cm" svg:x="4.951cm" svg:y="15.415cm" svg:viewBox="0 0 36 34" svg:d="M19 0c8 1 16 9 17 18 0 10-13 18-24 15-9-1-14-10-11-19 2-9 11-16 18-14z">
          <text:p/>
        </draw:path>
        <draw:path draw:style-name="gr9" draw:text-style-name="P7" draw:layer="layout" svg:width="0.034cm" svg:height="0.035cm" svg:x="17.795cm" svg:y="18.92cm" svg:viewBox="0 0 35 36" svg:d="M35 18c0 7-8 17-15 18-12 2-20-8-20-20 1-9 10-16 18-16 8 2 17 11 17 18z">
          <text:p/>
        </draw:path>
        <draw:path draw:style-name="gr9" draw:text-style-name="P7" draw:layer="layout" svg:width="0.034cm" svg:height="0.034cm" svg:x="4.657cm" svg:y="15.709cm" svg:viewBox="0 0 35 35" svg:d="M35 14c1 11-4 19-12 21-10 2-22-8-23-19 0-7 9-16 17-16 10-1 18 6 18 14z">
          <text:p/>
        </draw:path>
        <draw:path draw:style-name="gr9" draw:text-style-name="P7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9" draw:text-style-name="P7" draw:layer="layout" svg:width="0.033cm" svg:height="0.033cm" svg:x="4.075cm" svg:y="16.293cm" svg:viewBox="0 0 34 34" svg:d="M16 0c10-1 17 5 18 13 2 12-8 23-18 21-7-1-16-10-16-18-1-7 8-16 16-16z">
          <text:p/>
        </draw:path>
        <draw:path draw:style-name="gr9" draw:text-style-name="P7" draw:layer="layout" svg:width="0.033cm" svg:height="0.034cm" svg:x="3.49cm" svg:y="24.759cm" svg:viewBox="0 0 34 35" svg:d="M34 17c0 8-6 17-15 18-10 1-20-8-19-19 0-9 8-16 17-16s17 7 17 17z">
          <text:p/>
        </draw:path>
        <draw:path draw:style-name="gr9" draw:text-style-name="P7" draw:layer="layout" svg:width="0.033cm" svg:height="0.034cm" svg:x="2.907cm" svg:y="23.59cm" svg:viewBox="0 0 34 35" svg:d="M34 16c1 7-8 18-15 19-12 2-20-8-19-20 1-9 8-16 18-15 7 0 16 10 16 16z">
          <text:p/>
        </draw:path>
        <draw:path draw:style-name="gr9" draw:text-style-name="P7" draw:layer="layout" svg:width="0.034cm" svg:height="0.033cm" svg:x="5.535cm" svg:y="14.833cm" svg:viewBox="0 0 35 34" svg:d="M18 34c-9 1-17-6-18-14-1-10 4-17 12-19 11-3 23 7 23 17 0 7-8 16-17 16z">
          <text:p/>
        </draw:path>
        <draw:path draw:style-name="gr9" draw:text-style-name="P7" draw:layer="layout" svg:width="0.035cm" svg:height="0.034cm" svg:x="14.875cm" svg:y="14.832cm" svg:viewBox="0 0 36 35" svg:d="M21 35c-9 0-18-5-21-13-2-9 9-22 19-22 7 0 16 10 16 17 2 9-6 17-14 18z">
          <text:p/>
        </draw:path>
        <draw:path draw:style-name="gr9" draw:text-style-name="P7" draw:layer="layout" svg:width="0.03cm" svg:height="0.029cm" svg:x="18.089cm" svg:y="22.132cm" svg:viewBox="0 0 31 30" svg:d="M18 30c-9 2-17-5-18-13 0-7 8-16 15-17 9 0 16 9 16 17s-6 10-13 13z">
          <text:p/>
        </draw:path>
        <draw:path draw:style-name="gr9" draw:text-style-name="P7" draw:layer="layout" svg:width="0.034cm" svg:height="0.034cm" svg:x="17.795cm" svg:y="23.006cm" svg:viewBox="0 0 35 35" svg:d="M35 16c0 7-7 17-14 19-9 2-18-3-20-13-3-11 5-23 16-22 8 0 17 8 18 16z">
          <text:p/>
        </draw:path>
        <draw:path draw:style-name="gr9" draw:text-style-name="P7" draw:layer="layout" svg:width="0.034cm" svg:height="0.033cm" svg:x="17.503cm" svg:y="18.044cm" svg:viewBox="0 0 35 34" svg:d="M35 15c1 10-4 17-14 19-11 2-22-6-21-18 0-7 8-15 16-16 8 0 18 7 19 15z">
          <text:p/>
        </draw:path>
        <draw:path draw:style-name="gr9" draw:text-style-name="P7" draw:layer="layout" svg:width="0.029cm" svg:height="0.028cm" svg:x="18.09cm" svg:y="19.506cm" svg:viewBox="0 0 30 29" svg:d="M30 12c0 7-8 17-16 17-7 0-15-10-14-17 0-7 5-11 11-12 9-2 19 4 19 12z">
          <text:p/>
        </draw:path>
        <draw:path draw:style-name="gr9" draw:text-style-name="P7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9" draw:text-style-name="P7" draw:layer="layout" svg:width="0.033cm" svg:height="0.033cm" svg:x="17.212cm" svg:y="17.461cm" svg:viewBox="0 0 34 34" svg:d="M34 15c1 11-9 20-21 19-8-1-13-9-13-19 0-8 8-15 16-15s18 8 18 15z">
          <text:p/>
        </draw:path>
        <draw:path draw:style-name="gr9" draw:text-style-name="P7" draw:layer="layout" svg:width="0.028cm" svg:height="0.029cm" svg:x="4.368cm" svg:y="15.711cm" svg:viewBox="0 0 29 30" svg:d="M29 9c2 12-6 21-16 21-5-1-12-7-13-13-1-10 7-19 16-17 6 1 10 7 13 9z">
          <text:p/>
        </draw:path>
        <draw:path draw:style-name="gr9" draw:text-style-name="P7" draw:layer="layout" svg:width="0.028cm" svg:height="0.027cm" svg:x="16.63cm" svg:y="16.295cm" svg:viewBox="0 0 29 28" svg:d="M20 0c2 3 8 7 9 13 2 8-7 16-17 15-6-2-12-8-12-14 0-9 7-16 20-14z">
          <text:p/>
        </draw:path>
        <draw:path draw:style-name="gr9" draw:text-style-name="P7" draw:layer="layout" svg:width="0.03cm" svg:height="0.03cm" svg:x="16.046cm" svg:y="15.711cm" svg:viewBox="0 0 31 31" svg:d="M31 13c0 6-9 18-15 18-7 0-16-12-16-18 1-7 7-11 13-13 8-2 17 5 18 13z">
          <text:p/>
        </draw:path>
        <draw:path draw:style-name="gr9" draw:text-style-name="P7" draw:layer="layout" svg:width="0.029cm" svg:height="0.029cm" svg:x="17.506cm" svg:y="24.177cm" svg:viewBox="0 0 30 30" svg:d="M12 30c-8-1-15-13-11-19 3-5 9-9 14-11 7-1 16 9 15 16 0 9-10 16-18 14z">
          <text:p/>
        </draw:path>
        <draw:path draw:style-name="gr9" draw:text-style-name="P7" draw:layer="layout" svg:width="0.029cm" svg:height="0.026cm" svg:x="18.09cm" svg:y="20.091cm" svg:viewBox="0 0 30 27" svg:d="M30 13c-3 12-12 16-21 13-6-2-11-10-9-15 4-9 11-14 19-10 5 3 8 8 11 12z">
          <text:p/>
        </draw:path>
        <draw:path draw:style-name="gr9" draw:text-style-name="P7" draw:layer="layout" svg:width="0.03cm" svg:height="0.029cm" svg:x="18.09cm" svg:y="19.797cm" svg:viewBox="0 0 31 30" svg:d="M13 0c7-1 18 8 18 15s-11 16-18 15c-7 0-11-6-13-12-2-8 5-18 13-18z">
          <text:p/>
        </draw:path>
        <draw:path draw:style-name="gr9" draw:text-style-name="P7" draw:layer="layout" svg:width="0.03cm" svg:height="0.03cm" svg:x="11.666cm" svg:y="28.847cm" svg:viewBox="0 0 31 31" svg:d="M31 14c0 7-8 17-15 17s-18-11-16-17c2-5 8-11 13-13 7-3 17 5 18 13z">
          <text:p/>
        </draw:path>
        <draw:path draw:style-name="gr9" draw:text-style-name="P7" draw:layer="layout" svg:width="0.029cm" svg:height="0.03cm" svg:x="11.083cm" svg:y="28.847cm" svg:viewBox="0 0 30 31" svg:d="M30 17c-1 9-10 16-19 13-5-2-9-9-11-14-2-6 8-16 14-16 8 0 16 9 16 17z">
          <text:p/>
        </draw:path>
        <draw:path draw:style-name="gr9" draw:text-style-name="P7" draw:layer="layout" svg:width="0.029cm" svg:height="0.028cm" svg:x="6.996cm" svg:y="28.264cm" svg:viewBox="0 0 30 29" svg:d="M30 12c1 8-7 17-14 17-9 1-16-9-16-17 0-7 6-10 13-12 8-2 17 5 17 12z">
          <text:p/>
        </draw:path>
        <draw:path draw:style-name="gr9" draw:text-style-name="P7" draw:layer="layout" svg:width="0.026cm" svg:height="0.029cm" svg:x="6.706cm" svg:y="13.959cm" svg:viewBox="0 0 27 30" svg:d="M27 15c0 8-11 18-17 14-5-3-10-9-10-14 0-4 5-11 9-14 7-4 18 7 18 14z">
          <text:p/>
        </draw:path>
        <draw:path draw:style-name="gr9" draw:text-style-name="P7" draw:layer="layout" svg:width="0.028cm" svg:height="0.026cm" svg:x="15.462cm" svg:y="27.098cm" svg:viewBox="0 0 29 27" svg:d="M29 13c-1 11-9 16-18 14-7-2-12-6-11-13 0-10 9-16 18-13 5 2 8 9 11 12z">
          <text:p/>
        </draw:path>
        <draw:path draw:style-name="gr9" draw:text-style-name="P7" draw:layer="layout" svg:width="0.028cm" svg:height="0.029cm" svg:x="2.619cm" svg:y="19.214cm" svg:viewBox="0 0 29 30" svg:d="M0 10c4-3 8-9 15-10s15 11 13 19c-2 6-7 10-15 11-8 0-15-9-13-20z">
          <text:p/>
        </draw:path>
        <draw:path draw:style-name="gr9" draw:text-style-name="P7" draw:layer="layout" svg:width="0.027cm" svg:height="0.025cm" svg:x="5.246cm" svg:y="27.099cm" svg:viewBox="0 0 28 26" svg:d="M28 12c0 10-7 15-16 14-8-1-12-5-12-13-1-8 7-14 16-13 7 0 11 5 12 12z">
          <text:p/>
        </draw:path>
        <draw:path draw:style-name="gr9" draw:text-style-name="P7" draw:layer="layout" svg:width="0.028cm" svg:height="0.028cm" svg:x="8.457cm" svg:y="13.376cm" svg:viewBox="0 0 29 29" svg:d="M29 19c-4 2-8 9-13 10-10 2-17-8-16-17 0-6 7-12 14-12 8-1 16 8 15 19z">
          <text:p/>
        </draw:path>
        <draw:path draw:style-name="gr9" draw:text-style-name="P7" draw:layer="layout" svg:width="0.03cm" svg:height="0.028cm" svg:x="3.784cm" svg:y="16.587cm" svg:viewBox="0 0 31 29" svg:d="M30 12c3 8-5 17-13 17-8 1-18-7-17-14 3-5 7-11 12-14 7-4 16 3 18 11z">
          <text:p/>
        </draw:path>
        <draw:path draw:style-name="gr9" draw:text-style-name="P7" draw:layer="layout" svg:width="0.029cm" svg:height="0.028cm" svg:x="16.921cm" svg:y="25.345cm" svg:viewBox="0 0 30 29" svg:d="M30 17c-3 2-6 9-12 11-8 3-19-5-18-14 2-7 6-12 13-14 9-2 17 5 17 17z">
          <text:p/>
        </draw:path>
        <draw:path draw:style-name="gr9" draw:text-style-name="P7" draw:layer="layout" svg:width="0.029cm" svg:height="0.029cm" svg:x="4.368cm" svg:y="26.221cm" svg:viewBox="0 0 30 30" svg:d="M12 0c7-1 17 5 18 14 0 8-9 18-16 16-5-1-10-6-13-10-4-7 2-18 11-20z">
          <text:p/>
        </draw:path>
        <draw:path draw:style-name="gr9" draw:text-style-name="P7" draw:layer="layout" svg:width="0.03cm" svg:height="0.029cm" svg:x="18.089cm" svg:y="22.426cm" svg:viewBox="0 0 31 30" svg:d="M17 30c-8 0-17-8-17-16 0-7 10-16 17-14 6 2 11 7 13 12 3 8-4 17-13 18z">
          <text:p/>
        </draw:path>
        <draw:path draw:style-name="gr9" draw:text-style-name="P7" draw:layer="layout" svg:width="0.029cm" svg:height="0.031cm" svg:x="14.878cm" svg:y="14.544cm" svg:viewBox="0 0 30 32" svg:d="M30 14c1 7-7 18-15 18s-17-11-15-18c2-5 7-10 12-13 8-3 18 5 18 13z">
          <text:p/>
        </draw:path>
        <draw:path draw:style-name="gr9" draw:text-style-name="P7" draw:layer="layout" svg:width="0.028cm" svg:height="0.028cm" svg:x="7.58cm" svg:y="13.668cm" svg:viewBox="0 0 29 29" svg:d="M29 10c1 11-6 19-16 19-6 0-12-6-13-12-1-10 6-18 15-17 5 1 10 7 14 10z">
          <text:p/>
        </draw:path>
        <draw:path draw:style-name="gr9" draw:text-style-name="P7" draw:layer="layout" svg:width="0.026cm" svg:height="0.028cm" svg:x="17.798cm" svg:y="23.593cm" svg:viewBox="0 0 27 29" svg:d="M14 0c9 1 15 8 13 18-3 6-9 12-14 11-7-1-12-6-13-13-1-9 6-17 14-16z">
          <text:p/>
        </draw:path>
        <draw:path draw:style-name="gr9" draw:text-style-name="P7" draw:layer="layout" svg:width="0.029cm" svg:height="0.029cm" svg:x="17.506cm" svg:y="17.754cm" svg:viewBox="0 0 30 30" svg:d="M12 30c-7 0-14-10-12-17s5-13 12-13c8-1 18 7 18 15s-10 16-18 15z">
          <text:p/>
        </draw:path>
        <draw:path draw:style-name="gr9" draw:text-style-name="P7" draw:layer="layout" svg:width="0.028cm" svg:height="0.026cm" svg:x="18.09cm" svg:y="21.844cm" svg:viewBox="0 0 29 27" svg:d="M20 0c2 3 8 7 9 13 2 8-7 15-16 14-8-1-12-6-13-13-1-8 7-15 20-14z">
          <text:p/>
        </draw:path>
        <draw:path draw:style-name="gr9" draw:text-style-name="P7" draw:layer="layout" svg:width="0.029cm" svg:height="0.027cm" svg:x="2.618cm" svg:y="22.718cm" svg:viewBox="0 0 30 28" svg:d="M30 17c-3 3-7 8-12 10-8 4-19-5-18-13 1-7 5-13 13-14 9-2 17 6 17 17z">
          <text:p/>
        </draw:path>
        <draw:path draw:style-name="gr9" draw:text-style-name="P7" draw:layer="layout" svg:width="0.028cm" svg:height="0.026cm" svg:x="3.201cm" svg:y="17.464cm" svg:viewBox="0 0 29 27" svg:d="M29 14c-2 3-5 10-10 12-8 4-17-1-19-11-2-5 4-11 10-14 9-3 16 1 19 13z">
          <text:p/>
        </draw:path>
        <draw:path draw:style-name="gr9" draw:text-style-name="P7" draw:layer="layout" svg:width="0.029cm" svg:height="0.03cm" svg:x="4.953cm" svg:y="26.804cm" svg:viewBox="0 0 30 31" svg:d="M17 30c-7 2-17-5-17-13-1-8 8-19 14-17 6 1 12 6 15 12 4 6-3 16-12 18z">
          <text:p/>
        </draw:path>
        <draw:path draw:style-name="gr9" draw:text-style-name="P7" draw:layer="layout" svg:width="0.026cm" svg:height="0.029cm" svg:x="8.748cm" svg:y="28.848cm" svg:viewBox="0 0 27 30" svg:d="M27 10c1 12-6 21-15 19-6-1-11-5-12-12-1-9 6-19 14-17 6 3 10 8 13 10z">
          <text:p/>
        </draw:path>
        <draw:path draw:style-name="gr9" draw:text-style-name="P7" draw:layer="layout" svg:width="0.028cm" svg:height="0.029cm" svg:x="13.418cm" svg:y="28.264cm" svg:viewBox="0 0 29 30" svg:d="M19 30c-13 0-20-8-19-16 1-6 9-13 14-14 9 0 17 10 15 18-2 5-7 9-10 12z">
          <text:p/>
        </draw:path>
        <draw:path draw:style-name="gr9" draw:text-style-name="P7" draw:layer="layout" svg:width="0.029cm" svg:height="0.03cm" svg:x="5.828cm" svg:y="14.543cm" svg:viewBox="0 0 30 31" svg:d="M30 17c0 9-10 17-19 13-4-2-9-7-11-13-2-7 8-17 15-17s16 10 15 17z">
          <text:p/>
        </draw:path>
        <draw:path draw:style-name="gr9" draw:text-style-name="P7" draw:layer="layout" svg:width="0.029cm" svg:height="0.03cm" svg:x="9.04cm" svg:y="28.847cm" svg:viewBox="0 0 30 31" svg:d="M28 21c-6 9-15 12-21 8-7-5-10-16-4-22 4-6 9-9 15-6 11 4 15 13 10 20z">
          <text:p/>
        </draw:path>
        <draw:path draw:style-name="gr9" draw:text-style-name="P7" draw:layer="layout" svg:width="0.029cm" svg:height="0.028cm" svg:x="2.909cm" svg:y="18.338cm" svg:viewBox="0 0 30 29" svg:d="M30 15c-4 6-8 12-12 14-8 3-18-6-18-14s11-17 18-14c5 3 8 9 12 14z">
          <text:p/>
        </draw:path>
        <draw:path draw:style-name="gr9" draw:text-style-name="P7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9" draw:text-style-name="P7" draw:layer="layout" svg:width="0.028cm" svg:height="0.03cm" svg:x="9.333cm" svg:y="28.848cm" svg:viewBox="0 0 29 31" svg:d="M29 14c-4 6-6 13-11 16-5 4-18-5-18-14 0-8 10-18 16-15 5 3 9 8 13 13z">
          <text:p/>
        </draw:path>
        <draw:path draw:style-name="gr9" draw:text-style-name="P7" draw:layer="layout" svg:width="0.03cm" svg:height="0.028cm" svg:x="3.784cm" svg:y="25.638cm" svg:viewBox="0 0 31 29" svg:d="M17 0c8 0 16 9 13 17-2 6-6 12-13 12-8 1-17-8-17-15s10-15 17-14z">
          <text:p/>
        </draw:path>
        <draw:path draw:style-name="gr9" draw:text-style-name="P7" draw:layer="layout" svg:width="0.029cm" svg:height="0.03cm" svg:x="2.618cm" svg:y="23.009cm" svg:viewBox="0 0 30 31" svg:d="M0 14c0-7 10-16 17-13 6 1 12 6 13 13 0 8-8 17-16 17-7 0-16-9-14-17z">
          <text:p/>
        </draw:path>
        <draw:path draw:style-name="gr9" draw:text-style-name="P7" draw:layer="layout" svg:width="0.029cm" svg:height="0.03cm" svg:x="4.953cm" svg:y="15.127cm" svg:viewBox="0 0 30 31" svg:d="M30 18c-2 9-13 16-20 11-4-4-9-9-10-14-2-7 8-15 16-15s15 10 14 18z">
          <text:p/>
        </draw:path>
        <draw:path draw:style-name="gr9" draw:text-style-name="P7" draw:layer="layout" svg:width="0.028cm" svg:height="0.026cm" svg:x="16.047cm" svg:y="26.513cm" svg:viewBox="0 0 29 27" svg:d="M29 11c-1 13-9 18-19 16-6-2-11-6-10-15 0-8 9-14 18-11 5 2 8 8 11 10z">
          <text:p/>
        </draw:path>
        <draw:path draw:style-name="gr9" draw:text-style-name="P7" draw:layer="layout" svg:width="0.028cm" svg:height="0.027cm" svg:x="3.202cm" svg:y="24.47cm" svg:viewBox="0 0 29 28" svg:d="M29 12c-2 12-10 18-18 15-8-2-11-7-11-14-1-9 9-15 18-12 5 2 8 9 11 11z">
          <text:p/>
        </draw:path>
        <draw:path draw:style-name="gr9" draw:text-style-name="P7" draw:layer="layout" svg:width="0.028cm" svg:height="0.031cm" svg:x="2.618cm" svg:y="18.922cm" svg:viewBox="0 0 29 32" svg:d="M12 0c11 0 19 11 17 19-3 7-8 11-15 13-8 0-17-12-13-19 2-5 8-9 11-13z">
          <text:p/>
        </draw:path>
        <draw:path draw:style-name="gr9" draw:text-style-name="P7" draw:layer="layout" svg:width="0.026cm" svg:height="0.028cm" svg:x="9.918cm" svg:y="13.084cm" svg:viewBox="0 0 27 29" svg:d="M27 15c0 8-11 17-17 14-4-3-10-9-10-14 0-4 6-11 10-14 7-4 17 7 17 14z">
          <text:p/>
        </draw:path>
        <draw:path draw:style-name="gr9" draw:text-style-name="P7" draw:layer="layout" svg:width="0.03cm" svg:height="0.028cm" svg:x="10.206cm" svg:y="13.084cm" svg:viewBox="0 0 31 29" svg:d="M31 18c-4 3-7 9-12 11-9 3-19-5-19-14 1-7 5-13 12-14 8-3 19 7 19 17z">
          <text:p/>
        </draw:path>
        <draw:path draw:style-name="gr9" draw:text-style-name="P7" draw:layer="layout" svg:width="0.03cm" svg:height="0.028cm" svg:x="12.251cm" svg:y="13.376cm" svg:viewBox="0 0 31 29" svg:d="M14 29c-7 0-16-11-13-18 3-5 9-10 14-11 7-2 16 7 16 14 0 9-9 16-17 15z">
          <text:p/>
        </draw:path>
        <draw:path draw:style-name="gr9" draw:text-style-name="P7" draw:layer="layout" svg:width="0.028cm" svg:height="0.028cm" svg:x="10.792cm" svg:y="13.084cm" svg:viewBox="0 0 29 29" svg:d="M29 20c-4 3-8 8-13 9-8 2-17-7-16-16 1-6 8-13 14-13 9 0 16 9 15 20z">
          <text:p/>
        </draw:path>
        <draw:path draw:style-name="gr9" draw:text-style-name="P7" draw:layer="layout" svg:width="0.026cm" svg:height="0.028cm" svg:x="3.494cm" svg:y="25.053cm" svg:viewBox="0 0 27 29" svg:d="M14 0c11 3 15 12 11 21-3 5-7 9-14 8-9-2-14-13-10-20 4-4 10-7 13-9z">
          <text:p/>
        </draw:path>
        <draw:path draw:style-name="gr9" draw:text-style-name="P7" draw:layer="layout" svg:width="0.026cm" svg:height="0.029cm" svg:x="17.214cm" svg:y="24.761cm" svg:viewBox="0 0 27 30" svg:d="M26 21c-2 6-8 10-14 8-10-4-14-12-10-20 3-6 8-10 15-9 8 2 13 14 9 21z">
          <text:p/>
        </draw:path>
        <draw:path draw:style-name="gr9" draw:text-style-name="P7" draw:layer="layout" svg:width="0.026cm" svg:height="0.027cm" svg:x="11.96cm" svg:y="13.376cm" svg:viewBox="0 0 27 28" svg:d="M27 18c-3 3-7 8-12 9-7 4-16-6-15-15 1-6 7-11 13-12 7-2 14 7 14 18z">
          <text:p/>
        </draw:path>
        <draw:path draw:style-name="gr9" draw:text-style-name="P7" draw:layer="layout" svg:width="0.031cm" svg:height="0.03cm" svg:x="15.46cm" svg:y="15.127cm" svg:viewBox="0 0 32 31" svg:d="M18 31c-7 0-18-8-18-15s12-18 18-16c5 2 10 7 13 13 3 7-5 17-13 18z">
          <text:p/>
        </draw:path>
        <draw:path draw:style-name="gr9" draw:text-style-name="P7" draw:layer="layout" svg:width="0.027cm" svg:height="0.025cm" svg:x="14.296cm" svg:y="14.253cm" svg:viewBox="0 0 28 26" svg:d="M28 14c0 7-5 12-11 12-10 1-18-5-17-13 2-7 4-12 12-13 9-1 16 4 16 14z">
          <text:p/>
        </draw:path>
        <draw:path draw:style-name="gr9" draw:text-style-name="P7" draw:layer="layout" svg:width="0.027cm" svg:height="0.028cm" svg:x="8.164cm" svg:y="13.376cm" svg:viewBox="0 0 28 29" svg:d="M17 29c-8 2-19-8-17-15 2-5 7-10 11-13 6-3 13 1 15 8 4 7-1 18-9 20z">
          <text:p/>
        </draw:path>
        <draw:path draw:style-name="gr9" draw:text-style-name="P7" draw:layer="layout" svg:width="0.027cm" svg:height="0.028cm" svg:x="10.501cm" svg:y="13.084cm" svg:viewBox="0 0 28 29" svg:d="M28 16c-1 7-11 16-18 13-5-3-10-9-10-14s6-12 10-14c7-4 18 7 18 15z">
          <text:p/>
        </draw:path>
        <draw:path draw:style-name="gr9" draw:text-style-name="P7" draw:layer="layout" svg:width="0.027cm" svg:height="0.029cm" svg:x="5.537cm" svg:y="27.388cm" svg:viewBox="0 0 28 30" svg:d="M0 16c0-9 8-17 17-16 6 2 11 7 11 14-1 5-5 11-9 15-6 3-18-6-19-13z">
          <text:p/>
        </draw:path>
        <draw:path draw:style-name="gr9" draw:text-style-name="P7" draw:layer="layout" svg:width="0.026cm" svg:height="0.027cm" svg:x="2.326cm" svg:y="21.55cm" svg:viewBox="0 0 27 28" svg:d="M27 8c1 14-5 22-13 20-7-1-13-4-14-11-1-10 5-18 15-17 5 1 9 6 12 8z">
          <text:p/>
        </draw:path>
        <draw:path draw:style-name="gr9" draw:text-style-name="P7" draw:layer="layout" svg:width="0.025cm" svg:height="0.025cm" svg:x="2.91cm" svg:y="23.887cm" svg:viewBox="0 0 26 26" svg:d="M26 12c-1 9-5 14-12 14-8 0-17-9-13-16s9-12 15-9c5 2 8 8 10 11z">
          <text:p/>
        </draw:path>
        <draw:path draw:style-name="gr9" draw:text-style-name="P7" draw:layer="layout" svg:width="0.019cm" svg:height="0.02cm" svg:x="2.914cm" svg:y="24.474cm" svg:viewBox="0 0 20 21" svg:d="M20 9c-2 4-4 10-6 12-5 3-14-3-14-10-1-3 2-8 6-10 7-2 13 2 14 8z">
          <text:p/>
        </draw:path>
        <draw:path draw:style-name="gr9" draw:text-style-name="P7" draw:layer="layout" svg:width="0.026cm" svg:height="0.023cm" svg:x="2.326cm" svg:y="21.262cm" svg:viewBox="0 0 27 24" svg:d="M27 11c-2 10-7 14-13 13-10-1-17-12-13-17 4-4 12-8 17-7 4 0 6 9 9 11z">
          <text:p/>
        </draw:path>
        <draw:path draw:style-name="gr9" draw:text-style-name="P7" draw:layer="layout" svg:width="0.019cm" svg:height="0.019cm" svg:x="18.386cm" svg:y="21.263cm" svg:viewBox="0 0 20 20" svg:d="M20 12c-3 7-11 10-16 6-2-2-4-7-4-12 1-6 8-8 14-5 6 2 7 5 6 11z">
          <text:p/>
        </draw:path>
        <draw:path draw:style-name="gr9" draw:text-style-name="P7" draw:layer="layout" svg:width="0.025cm" svg:height="0.025cm" svg:x="7.875cm" svg:y="28.558cm" svg:viewBox="0 0 26 26" svg:d="M14 26c-10-2-14-5-14-12 0-10 10-17 17-13 6 3 11 9 8 15-2 5-8 7-11 10z">
          <text:p/>
        </draw:path>
        <draw:path draw:style-name="gr9" draw:text-style-name="P7" draw:layer="layout" svg:width="0.02cm" svg:height="0.019cm" svg:x="5.541cm" svg:y="27.686cm" svg:viewBox="0 0 21 20" svg:d="M20 12c-4 8-9 10-15 6-3-2-5-7-5-12 1-5 9-8 15-5 6 1 7 5 5 11z">
          <text:p/>
        </draw:path>
        <draw:path draw:style-name="gr9" draw:text-style-name="P7" draw:layer="layout" svg:width="0.019cm" svg:height="0.018cm" svg:x="17.802cm" svg:y="18.342cm" svg:viewBox="0 0 20 19" svg:d="M7 0c6 3 10 4 12 6 4 6-1 13-9 13-3 0-7-3-10-4 2-5 4-10 7-15z">
          <text:p/>
        </draw:path>
        <draw:path draw:style-name="gr9" draw:text-style-name="P7" draw:layer="layout" svg:width="0.025cm" svg:height="0.023cm" svg:x="14.587cm" svg:y="27.684cm" svg:viewBox="0 0 26 24" svg:d="M26 11c-3 8-5 14-13 13-8 0-17-13-11-18 3-4 10-7 15-6 4 0 7 8 9 11z">
          <text:p/>
        </draw:path>
        <draw:path draw:style-name="gr9" draw:text-style-name="P7" draw:layer="layout" svg:width="0.02cm" svg:height="0.017cm" svg:x="18.385cm" svg:y="21.555cm" svg:viewBox="0 0 21 18" svg:d="M21 14c-5 1-10 4-15 3-6 0-7-5-5-10 3-7 9-9 15-6 3 2 3 8 5 13z">
          <text:p/>
        </draw:path>
        <draw:path draw:style-name="gr9" draw:text-style-name="P7" draw:layer="layout" svg:width="0.021cm" svg:height="0.018cm" svg:x="2.329cm" svg:y="22.723cm" svg:viewBox="0 0 22 19" svg:d="M21 14c-3 2-7 5-10 5-8 0-14-7-9-12 3-3 7-7 11-7 4-1 11 9 8 14z">
          <text:p/>
        </draw:path>
        <draw:path draw:style-name="gr9" draw:text-style-name="P7" draw:layer="layout" svg:width="0.018cm" svg:height="0.02cm" svg:x="17.802cm" svg:y="18.051cm" svg:viewBox="0 0 19 21" svg:d="M0 11c2-4 3-8 6-10 6-4 14 2 13 8 0 4-2 8-5 11-6 4-13-3-14-9z">
          <text:p/>
        </draw:path>
        <draw:path draw:style-name="gr9" draw:text-style-name="P7" draw:layer="layout" svg:width="0.025cm" svg:height="0.024cm" svg:x="2.91cm" svg:y="18.049cm" svg:viewBox="0 0 26 25" svg:d="M26 12c-1 9-5 13-12 13-8 1-16-9-13-17 4-5 9-10 16-7 4 2 7 7 9 11z">
          <text:p/>
        </draw:path>
        <draw:path draw:style-name="gr9" draw:text-style-name="P7" draw:layer="layout" svg:width="0.02cm" svg:height="0.021cm" svg:x="2.33cm" svg:y="21.847cm" svg:viewBox="0 0 21 22" svg:d="M21 10c-3 4-4 8-7 11-4 4-14-4-14-10 0-3 4-9 7-10 6-3 12 1 14 9z">
          <text:p/>
        </draw:path>
        <draw:path draw:style-name="gr9" draw:text-style-name="P7" draw:layer="layout" svg:width="0.021cm" svg:height="0.019cm" svg:x="18.385cm" svg:y="21.847cm" svg:viewBox="0 0 22 20" svg:d="M10 0c4 2 9 3 11 6 3 4-3 14-10 14-3 0-8-3-10-7-3-6 1-12 9-13z">
          <text:p/>
        </draw:path>
        <draw:path draw:style-name="gr9" draw:text-style-name="P7" draw:layer="layout" svg:width="0.019cm" svg:height="0.02cm" svg:x="2.33cm" svg:y="22.137cm" svg:viewBox="0 0 20 21" svg:d="M20 10c-2 4-4 9-7 10-5 3-14-3-13-9 0-4 3-8 6-10 5-4 12 1 14 9z">
          <text:p/>
        </draw:path>
        <draw:path draw:style-name="gr9" draw:text-style-name="P7" draw:layer="layout" svg:width="0.028cm" svg:height="0.025cm" svg:x="7.29cm" svg:y="13.669cm" svg:viewBox="0 0 29 26" svg:d="M29 15c-7 4-11 9-17 10-8 2-14-8-11-17 1-5 9-11 15-7 4 3 7 8 13 14z">
          <text:p/>
        </draw:path>
        <draw:path draw:style-name="gr9" draw:text-style-name="P7" draw:layer="layout" svg:width="0.02cm" svg:height="0.016cm" svg:x="6.125cm" svg:y="27.976cm" svg:viewBox="0 0 21 17" svg:d="M20 17c-5 0-10 1-16 0-2 0-5-8-3-11 1-3 7-5 11-6 5 0 12 9 8 17z">
          <text:p/>
        </draw:path>
        <draw:path draw:style-name="gr9" draw:text-style-name="P7" draw:layer="layout" svg:width="0.024cm" svg:height="0.026cm" svg:x="14.004cm" svg:y="27.972cm" svg:viewBox="0 0 25 27" svg:d="M25 15c-2 8-10 13-15 11-6-2-12-4-10-13 1-8 12-16 17-12 4 4 5 10 8 14z">
          <text:p/>
        </draw:path>
        <draw:path draw:style-name="gr9" draw:text-style-name="P7" draw:layer="layout" svg:width="0.021cm" svg:height="0.019cm" svg:x="14.589cm" svg:y="27.975cm" svg:viewBox="0 0 22 20" svg:d="M9 0c5 4 10 5 12 8 4 6-1 13-9 12-3 0-7-3-12-4 4-5 6-10 9-16z">
          <text:p/>
        </draw:path>
        <draw:path draw:style-name="gr9" draw:text-style-name="P7" draw:layer="layout" svg:width="0.018cm" svg:height="0.02cm" svg:x="9.922cm" svg:y="29.144cm" svg:viewBox="0 0 19 21" svg:d="M4 0c6 2 11 3 13 7 4 5 1 11-6 14-4 1-11 0-11-5-1-4 2-11 4-16z">
          <text:p/>
        </draw:path>
        <draw:path draw:style-name="gr9" draw:text-style-name="P7" draw:layer="layout" svg:width="0.019cm" svg:height="0.021cm" svg:x="15.759cm" svg:y="27.101cm" svg:viewBox="0 0 20 22" svg:d="M20 12c-1 6-10 12-14 9-3-2-5-7-6-11 0-7 8-12 13-9 3 2 4 7 7 11z">
          <text:p/>
        </draw:path>
        <draw:path draw:style-name="gr9" draw:text-style-name="P7" draw:layer="layout" svg:width="0.018cm" svg:height="0.02cm" svg:x="10.212cm" svg:y="29.144cm" svg:viewBox="0 0 19 21" svg:d="M19 13c-1 6-9 11-14 7-3-2-5-6-5-9 0-8 9-13 13-10 3 2 4 8 6 12z">
          <text:p/>
        </draw:path>
        <draw:path draw:style-name="gr9" draw:text-style-name="P7" draw:layer="layout" svg:width="0.02cm" svg:height="0.019cm" svg:x="10.505cm" svg:y="29.145cm" svg:viewBox="0 0 21 20" svg:d="M21 12c-3 7-15 10-18 6-3-3-4-8-3-11 1-4 8-8 9-7 5 3 9 9 12 12z">
          <text:p/>
        </draw:path>
        <draw:path draw:style-name="gr9" draw:text-style-name="P7" draw:layer="layout" svg:width="0.018cm" svg:height="0.021cm" svg:x="10.797cm" svg:y="29.144cm" svg:viewBox="0 0 19 22" svg:d="M19 11c-2 4-3 8-6 10-4 3-14-4-13-9 1-3 3-9 6-11 5-3 12 2 13 10z">
          <text:p/>
        </draw:path>
        <draw:path draw:style-name="gr9" draw:text-style-name="P7" draw:layer="layout" svg:width="0.018cm" svg:height="0.02cm" svg:x="4.958cm" svg:y="27.102cm" svg:viewBox="0 0 19 21" svg:d="M19 8c-1 4-1 9-4 11-4 5-11 0-13-7-3-4-2-8 4-11 7-3 12 0 13 7z">
          <text:p/>
        </draw:path>
        <draw:path draw:style-name="gr9" draw:text-style-name="P7" draw:layer="layout" svg:width="0.02cm" svg:height="0.019cm" svg:x="2.329cm" svg:y="20.095cm" svg:viewBox="0 0 21 20" svg:d="M11 20c-8-2-14-10-9-15 2-2 7-5 10-5 6-1 12 8 8 13-1 3-6 5-9 7z">
          <text:p/>
        </draw:path>
        <draw:path draw:style-name="gr9" draw:text-style-name="P7" draw:layer="layout" svg:width="0.02cm" svg:height="0.018cm" svg:x="11.963cm" svg:y="13.089cm" svg:viewBox="0 0 21 19" svg:d="M7 0c6 2 11 3 13 7 4 5-1 12-9 12-4 0-7-3-11-4 3-5 5-11 7-15z">
          <text:p/>
        </draw:path>
        <draw:path draw:style-name="gr9" draw:text-style-name="P7" draw:layer="layout" svg:width="0.019cm" svg:height="0.02cm" svg:x="18.386cm" svg:y="20.093cm" svg:viewBox="0 0 20 21" svg:d="M6 0c6 3 11 5 13 8 4 5-1 13-9 13-4 0-10-5-10-6 1-5 4-10 6-15z">
          <text:p/>
        </draw:path>
        <draw:path draw:style-name="gr9" draw:text-style-name="P7" draw:layer="layout" svg:width="0.018cm" svg:height="0.02cm" svg:x="11.089cm" svg:y="29.144cm" svg:viewBox="0 0 19 21" svg:d="M19 14c-4 3-9 5-15 7-1-3-4-7-4-10 0-9 7-14 13-10 2 3 3 8 6 13z">
          <text:p/>
        </draw:path>
        <draw:path draw:style-name="gr9" draw:text-style-name="P7" draw:layer="layout" svg:width="0.019cm" svg:height="0.021cm" svg:x="2.33cm" svg:y="19.51cm" svg:viewBox="0 0 20 22" svg:d="M20 11c-2 3-4 8-7 11-5 2-14-5-13-10 0-3 3-7 6-10 5-5 12 1 14 9z">
          <text:p/>
        </draw:path>
        <draw:path draw:style-name="gr9" draw:text-style-name="P7" draw:layer="layout" svg:width="0.02cm" svg:height="0.019cm" svg:x="9.337cm" svg:y="29.144cm" svg:viewBox="0 0 21 20" svg:d="M8 0c5 3 10 4 11 7 5 6-1 14-8 13-3 0-11-4-11-5 1-6 5-10 8-15z">
          <text:p/>
        </draw:path>
        <draw:path draw:style-name="gr9" draw:text-style-name="P7" draw:layer="layout" svg:width="0.028cm" svg:height="0.025cm" svg:x="2.326cm" svg:y="20.676cm" svg:viewBox="0 0 29 26" svg:d="M29 13c-5 5-9 10-13 13-8 2-13-4-15-10-3-7 5-18 14-15 5 2 9 7 14 12z">
          <text:p/>
        </draw:path>
        <draw:path draw:style-name="gr9" draw:text-style-name="P7" draw:layer="layout" svg:width="0.021cm" svg:height="0.019cm" svg:x="18.385cm" svg:y="20.678cm" svg:viewBox="0 0 22 20" svg:d="M10 0c4 2 9 3 11 6 3 5-3 14-9 14-4 0-9-3-11-6-3-6 2-13 9-14z">
          <text:p/>
        </draw:path>
        <draw:path draw:style-name="gr9" draw:text-style-name="P7" draw:layer="layout" svg:width="0.019cm" svg:height="0.019cm" svg:x="15.175cm" svg:y="27.393cm" svg:viewBox="0 0 20 20" svg:d="M20 9c-2 4-3 8-6 10-5 2-14-3-14-9 1-3 3-8 6-9 7-4 13 1 14 8z">
          <text:p/>
        </draw:path>
        <draw:path draw:style-name="gr9" draw:text-style-name="P7" draw:layer="layout" svg:width="0.021cm" svg:height="0.019cm" svg:x="17.801cm" svg:y="23.89cm" svg:viewBox="0 0 22 20" svg:d="M11 0c3 2 8 3 10 7 3 5-3 13-9 13-5-1-9-3-11-6-3-5 2-13 10-14z">
          <text:p/>
        </draw:path>
        <draw:path draw:style-name="gr9" draw:text-style-name="P7" draw:layer="layout" svg:width="0.021cm" svg:height="0.017cm" svg:x="9.336cm" svg:y="13.09cm" svg:viewBox="0 0 22 18" svg:d="M9 18c-7-1-11-8-8-13 3-3 7-5 11-5 6 0 12 10 9 13s-8 4-12 5z">
          <text:p/>
        </draw:path>
        <draw:path draw:style-name="gr9" draw:text-style-name="P7" draw:layer="layout" svg:width="0.02cm" svg:height="0.018cm" svg:x="8.751cm" svg:y="13.089cm" svg:viewBox="0 0 21 19" svg:d="M8 0c5 2 9 3 12 7 4 5-1 12-9 12-3 0-7-3-11-4 3-5 5-11 8-15z">
          <text:p/>
        </draw:path>
        <draw:path draw:style-name="gr9" draw:text-style-name="P7" draw:layer="layout" svg:width="0.018cm" svg:height="0.019cm" svg:x="12.549cm" svg:y="13.381cm" svg:viewBox="0 0 19 20" svg:d="M3 20c-1-5-3-10-3-15 0-1 8-5 11-5 7 3 10 9 6 15-3 2-7 3-14 5z">
          <text:p/>
        </draw:path>
        <draw:path draw:style-name="gr9" draw:text-style-name="P7" draw:layer="layout" svg:width="0.025cm" svg:height="0.025cm" svg:x="17.799cm" svg:y="18.633cm" svg:viewBox="0 0 26 26" svg:d="M26 12c-2 4-4 10-10 13-6 4-16-4-16-13 0-8 5-11 11-12s14 4 15 12z">
          <text:p/>
        </draw:path>
        <draw:path draw:style-name="gr9" draw:text-style-name="P7" draw:layer="layout" svg:width="0.02cm" svg:height="0.02cm" svg:x="7.293cm" svg:y="28.56cm" svg:viewBox="0 0 21 21" svg:d="M21 9c-3 5-6 10-8 11-7 4-14-1-13-7 0-4 3-9 5-13 5 3 10 6 16 9z">
          <text:p/>
        </draw:path>
        <draw:path draw:style-name="gr9" draw:text-style-name="P7" draw:layer="layout" svg:width="0.018cm" svg:height="0.019cm" svg:x="6.71cm" svg:y="28.27cm" svg:viewBox="0 0 19 20" svg:d="M4 20c-2-6-4-11-4-16 0-2 7-4 11-4 8 1 11 8 6 13-2 3-8 5-13 7z">
          <text:p/>
        </draw:path>
        <draw:path draw:style-name="gr9" draw:text-style-name="P7" draw:layer="layout" svg:width="0.02cm" svg:height="0.019cm" svg:x="17.217cm" svg:y="25.349cm" svg:viewBox="0 0 21 20" svg:d="M10 20c-8-1-12-8-8-13 2-4 6-6 10-7 6 0 12 11 9 15-2 3-6 3-11 5z">
          <text:p/>
        </draw:path>
        <draw:path draw:style-name="gr9" draw:text-style-name="P7" draw:layer="layout" svg:width="0.02cm" svg:height="0.02cm" svg:x="3.497cm" svg:y="25.348cm" svg:viewBox="0 0 21 21" svg:d="M7 0c5 3 11 5 13 7 4 7-1 14-10 14-3 0-7-3-10-5 2-5 4-11 7-16z">
          <text:p/>
        </draw:path>
        <draw:path draw:style-name="gr9" draw:text-style-name="P7" draw:layer="layout" svg:width="0.021cm" svg:height="0.018cm" svg:x="14.589cm" svg:y="14.256cm" svg:viewBox="0 0 22 19" svg:d="M22 16c-6 2-12 4-16 3-5 0-8-6-5-11 3-6 10-10 15-6 2 3 3 8 6 14z">
          <text:p/>
        </draw:path>
        <draw:path draw:style-name="gr9" draw:text-style-name="P7" draw:layer="layout" svg:width="0.02cm" svg:height="0.02cm" svg:x="13.131cm" svg:y="28.56cm" svg:viewBox="0 0 21 21" svg:d="M21 9c-4 5-5 10-8 11-7 3-13-1-13-7 0-4 3-9 5-13 5 3 10 6 16 9z">
          <text:p/>
        </draw:path>
        <draw:path draw:style-name="gr9" draw:text-style-name="P7" draw:layer="layout" svg:width="0.02cm" svg:height="0.02cm" svg:x="4.082cm" svg:y="16.009cm" svg:viewBox="0 0 21 21" svg:d="M7 21c-3-6-5-11-7-16 0-1 7-5 11-5 8 0 13 8 9 13-2 3-8 4-13 8z">
          <text:p/>
        </draw:path>
        <draw:path draw:style-name="gr9" draw:text-style-name="P7" draw:layer="layout" svg:width="0.02cm" svg:height="0.02cm" svg:x="16.343cm" svg:y="26.516cm" svg:viewBox="0 0 21 21" svg:d="M21 13c-5 3-10 6-16 8-2-3-5-8-5-12 0-7 8-11 14-8 3 2 4 7 7 12z">
          <text:p/>
        </draw:path>
        <draw:path draw:style-name="gr9" draw:text-style-name="P7" draw:layer="layout" svg:width="0.019cm" svg:height="0.02cm" svg:x="5.25cm" svg:y="14.839cm" svg:viewBox="0 0 20 21" svg:d="M20 14c-6 2-10 5-15 7-2-3-5-7-5-11 0-7 7-12 12-9 4 2 5 7 8 13z">
          <text:p/>
        </draw:path>
        <draw:path draw:style-name="gr9" draw:text-style-name="P7" draw:layer="layout" svg:width="0.024cm" svg:height="0.025cm" svg:x="4.664cm" svg:y="26.514cm" svg:viewBox="0 0 25 26" svg:d="M25 11c-2 11-13 18-18 14s-7-11-7-17c-1-4 10-10 15-7 4 2 8 7 10 10z">
          <text:p/>
        </draw:path>
        <draw:path draw:style-name="gr9" draw:text-style-name="P7" draw:layer="layout" svg:width="0.026cm" svg:height="0.025cm" svg:x="16.34cm" svg:y="16.006cm" svg:viewBox="0 0 27 26" svg:d="M27 11c-3 5-6 11-11 14-6 4-16-3-16-13 0-7 4-11 11-12s11 4 16 11z">
          <text:p/>
        </draw:path>
        <draw:path draw:style-name="gr9" draw:text-style-name="P7" draw:layer="layout" svg:width="0.02cm" svg:height="0.018cm" svg:x="2.623cm" svg:y="23.307cm" svg:viewBox="0 0 21 19" svg:d="M21 13c-5 3-8 6-12 6-7 1-11-6-8-14 1-2 8-6 9-5 4 3 8 8 11 13z">
          <text:p/>
        </draw:path>
        <draw:path draw:style-name="gr9" draw:text-style-name="P7" draw:layer="layout" svg:width="0.019cm" svg:height="0.02cm" svg:x="4.372cm" svg:y="26.516cm" svg:viewBox="0 0 20 21" svg:d="M0 13c3-5 4-10 7-12 6-4 13 1 13 8 0 4-3 8-4 12-6-2-11-6-16-8z">
          <text:p/>
        </draw:path>
        <draw:path draw:style-name="gr9" draw:text-style-name="P7" draw:layer="layout" svg:width="0.028cm" svg:height="0.024cm" svg:x="4.079cm" svg:y="25.93cm" svg:viewBox="0 0 29 25" svg:d="M29 15c-6 5-10 9-15 10-9 3-16-8-13-16 1-5 10-11 15-8 5 4 8 8 13 14z">
          <text:p/>
        </draw:path>
        <draw:path draw:style-name="gr9" draw:text-style-name="P7" draw:layer="layout" svg:width="0.028cm" svg:height="0.024cm" svg:x="15.172cm" svg:y="14.837cm" svg:viewBox="0 0 29 25" svg:d="M29 13c-6 5-9 10-15 12-4 3-12-3-13-8-3-8 5-19 13-16 6 1 9 7 15 12z">
          <text:p/>
        </draw:path>
        <draw:path draw:style-name="gr9" draw:text-style-name="P7" draw:layer="layout" svg:width="0.024cm" svg:height="0.025cm" svg:x="12.545cm" svg:y="28.557cm" svg:viewBox="0 0 25 26" svg:d="M25 17c-3 3-6 7-11 9-4 2-15-3-14-8s4-13 8-17c5-4 16 4 17 16z">
          <text:p/>
        </draw:path>
        <draw:path draw:style-name="gr9" draw:text-style-name="P7" draw:layer="layout" svg:width="0.016cm" svg:height="0.019cm" svg:x="16.635cm" svg:y="25.932cm" svg:viewBox="0 0 17 20" svg:d="M16 0c0 6 2 11 1 18 0 1-8 3-11 2-6-1-8-10-3-15 2-3 7-3 13-5z">
          <text:p/>
        </draw:path>
        <draw:path draw:style-name="gr9" draw:text-style-name="P7" draw:layer="layout" svg:width="0.02cm" svg:height="0.019cm" svg:x="17.217cm" svg:y="16.882cm" svg:viewBox="0 0 21 20" svg:d="M21 13c-2 7-7 9-15 5-5-2-7-5-5-10 4-6 12-11 16-6 3 2 3 7 4 11z">
          <text:p/>
        </draw:path>
        <draw:path draw:style-name="gr9" draw:text-style-name="P7" draw:layer="layout" svg:width="0.025cm" svg:height="0.026cm" svg:x="3.494cm" svg:y="16.879cm" svg:viewBox="0 0 26 27" svg:d="M12 0c8 3 14 6 14 15 0 7-11 14-18 11-5-1-10-11-7-15 3-5 8-8 11-11z">
          <text:p/>
        </draw:path>
        <draw:path draw:style-name="gr9" draw:text-style-name="P7" draw:layer="layout" svg:width="0.02cm" svg:height="0.019cm" svg:x="3.497cm" svg:y="16.592cm" svg:viewBox="0 0 21 20" svg:d="M21 12c-5 4-10 7-15 8-1 0-5-8-6-11 0-6 7-11 14-8 3 2 4 6 7 11z">
          <text:p/>
        </draw:path>
        <draw:path draw:style-name="gr9" draw:text-style-name="P7" draw:layer="layout" svg:width="0.023cm" svg:height="0.016cm" svg:x="13.717cm" svg:y="13.673cm" svg:viewBox="0 0 24 17" svg:d="M24 16c-10 0-15 2-22 1-1 0-3-9-2-12 1-2 8-6 10-5 4 3 8 8 14 16z">
          <text:p/>
        </draw:path>
        <draw:path draw:style-name="gr9" draw:text-style-name="P7" draw:layer="layout" svg:width="0.024cm" svg:height="0.027cm" svg:x="4.664cm" svg:y="15.421cm" svg:viewBox="0 0 25 28" svg:d="M11 28c-4-6-10-10-11-15-2-9 8-15 17-12 5 1 10 10 7 15-2 4-7 7-13 12z">
          <text:p/>
        </draw:path>
        <draw:path draw:style-name="gr9" draw:text-style-name="P7" draw:layer="layout" svg:width="0.027cm" svg:height="0.025cm" svg:x="15.756cm" svg:y="15.421cm" svg:viewBox="0 0 28 26" svg:d="M28 12c-7 6-10 11-15 14-7 3-15-7-13-16 0-5 8-12 13-9 4 2 8 7 15 11z">
          <text:p/>
        </draw:path>
        <draw:path draw:style-name="gr9" draw:text-style-name="P7" draw:layer="layout" svg:width="0.026cm" svg:height="0.024cm" svg:x="17.799cm" svg:y="23.303cm" svg:viewBox="0 0 27 25" svg:d="M27 13c-2 3-5 10-9 11-5 1-12-2-16-6-5-5 2-17 10-18 7-2 13 3 15 13z">
          <text:p/>
        </draw:path>
        <draw:path draw:style-name="gr9" draw:text-style-name="P7" draw:layer="layout" svg:width="0.025cm" svg:height="0.024cm" svg:x="6.122cm" svg:y="14.253cm" svg:viewBox="0 0 26 25" svg:d="M26 12c-1 10-6 14-14 13-8 0-15-11-11-17 3-6 9-10 16-7 4 2 7 8 9 11z">
          <text:p/>
        </draw:path>
        <draw:path draw:style-name="gr9" draw:text-style-name="P7" draw:layer="layout" svg:width="0.024cm" svg:height="0.028cm" svg:x="13.128cm" svg:y="13.666cm" svg:viewBox="0 0 25 29" svg:d="M12 0c5 6 10 9 12 15 3 7-5 15-15 14-6-1-11-8-9-13s6-10 12-16z">
          <text:p/>
        </draw:path>
        <draw:path draw:style-name="gr9" draw:text-style-name="P7" draw:layer="layout" svg:width="0.021cm" svg:height="0.02cm" svg:x="17.511cm" svg:y="17.468cm" svg:viewBox="0 0 22 21" svg:d="M22 13c-6 3-10 6-13 8-6 0-10-8-8-14 2-3 8-7 9-7 4 4 7 9 12 13z">
          <text:p/>
        </draw:path>
        <draw:path draw:style-name="gr9" draw:text-style-name="P7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9" draw:text-style-name="P7" draw:layer="layout" svg:width="0.018cm" svg:height="0.017cm" svg:x="14.301cm" svg:y="13.965cm" svg:viewBox="0 0 19 18" svg:d="M6 18c-2-3-6-6-6-9-2-7 6-11 13-7 4 2 8 6 3 11-2 3-7 3-10 5z">
          <text:p/>
        </draw:path>
        <draw:path draw:style-name="gr9" draw:text-style-name="P7" draw:layer="layout" svg:width="0.018cm" svg:height="0.018cm" svg:x="9.045cm" svg:y="13.089cm" svg:viewBox="0 0 19 19" svg:d="M19 11c-4 3-6 7-9 8-3 0-8-3-9-5-5-7 4-16 10-13 3 2 4 6 8 10z">
          <text:p/>
        </draw:path>
        <draw:path draw:style-name="gr9" draw:text-style-name="P7" draw:layer="layout" svg:width="0.018cm" svg:height="0.018cm" svg:x="14.007cm" svg:y="13.965cm" svg:viewBox="0 0 19 19" svg:d="M19 11c-2 7-7 10-14 6-3-2-6-7-5-10 2-7 9-9 15-5 2 1 3 6 4 9z">
          <text:p/>
        </draw:path>
        <draw:path draw:style-name="gr9" draw:text-style-name="P7" draw:layer="layout" svg:width="0.016cm" svg:height="0.019cm" svg:x="9.629cm" svg:y="29.144cm" svg:viewBox="0 0 17 20" svg:d="M15 0c0 6 2 11 1 17-1 2-8 4-11 3-6-1-7-10-3-15 2-3 6-3 13-5z">
          <text:p/>
        </draw:path>
        <draw:path draw:style-name="gr9" draw:text-style-name="P7" draw:layer="layout" svg:width="0.016cm" svg:height="0.018cm" svg:x="6.42cm" svg:y="13.965cm" svg:viewBox="0 0 17 19" svg:d="M10 0c2 4 6 6 7 9 1 6-8 13-14 8-2-2-4-8-3-11 0-2 7-3 10-6z">
          <text:p/>
        </draw:path>
        <draw:path draw:style-name="gr9" draw:text-style-name="P7" draw:layer="layout" svg:width="0.018cm" svg:height="0.019cm" svg:x="5.834cm" svg:y="27.687cm" svg:viewBox="0 0 19 20" svg:d="M19 5c-3 6-3 11-6 13-4 4-13-1-13-8 0-3 3-11 4-10 6 0 10 3 15 5z">
          <text:p/>
        </draw:path>
        <draw:path draw:style-name="gr9" draw:text-style-name="P7" draw:layer="layout" svg:width="0.017cm" svg:height="0.017cm" svg:x="9.629cm" svg:y="13.089cm" svg:viewBox="0 0 18 18" svg:d="M7 18c-3-3-7-6-7-10 0-6 8-11 14-7 3 2 5 9 4 12s-8 3-11 5z">
          <text:p/>
        </draw:path>
        <draw:path draw:style-name="gr9" draw:text-style-name="P7" draw:layer="layout" svg:width="0.019cm" svg:height="0.017cm" svg:x="16.927cm" svg:y="25.643cm" svg:viewBox="0 0 20 18" svg:d="M17 14c-3 1-8 4-13 4-1 0-4-8-4-11 0-6 7-8 15-6 5 2 7 5 2 13z">
          <text:p/>
        </draw:path>
        <draw:path draw:style-name="gr9" draw:text-style-name="P7" draw:layer="layout" svg:width="0.017cm" svg:height="0.021cm" svg:x="14.884cm" svg:y="27.685cm" svg:viewBox="0 0 18 22" svg:d="M18 11c-2 7-9 13-13 10-3-3-5-7-5-10-2-8 6-13 12-10 2 2 3 7 6 10z">
          <text:p/>
        </draw:path>
        <draw:path draw:style-name="gr9" draw:text-style-name="P7" draw:layer="layout" svg:width="0.019cm" svg:height="0.017cm" svg:x="3.789cm" svg:y="16.299cm" svg:viewBox="0 0 20 18" svg:d="M20 16c-5 1-10 3-15 2-6 0-7-6-3-10 3-7 9-10 13-6 2 2 3 7 5 14z">
          <text:p/>
        </draw:path>
        <draw:path draw:style-name="gr9" draw:text-style-name="P7" draw:layer="layout" svg:width="0.02cm" svg:height="0.018cm" svg:x="16.926cm" svg:y="16.299cm" svg:viewBox="0 0 21 19" svg:d="M21 15c-5 2-10 4-15 4-6-1-7-7-5-11 4-8 9-10 14-6 3 2 4 7 6 13z">
          <text:p/>
        </draw:path>
        <draw:path draw:style-name="gr9" draw:text-style-name="P7" draw:layer="layout" svg:width="0.017cm" svg:height="0.018cm" svg:x="18.095cm" svg:y="23.014cm" svg:viewBox="0 0 18 19" svg:d="M18 10c-3 4-5 8-9 9-5 1-11-7-9-13 3-5 7-7 11-5 3 2 5 6 7 9z">
          <text:p/>
        </draw:path>
        <draw:path draw:style-name="gr9" draw:text-style-name="P7" draw:layer="layout" svg:width="0.019cm" svg:height="0.021cm" svg:x="17.218cm" svg:y="25.057cm" svg:viewBox="0 0 20 22" svg:d="M14 0c2 4 6 7 6 11-1 8-8 13-14 9-2-3-5-8-6-11 0-5 9-10 14-9z">
          <text:p/>
        </draw:path>
        <draw:path draw:style-name="gr9" draw:text-style-name="P7" draw:layer="layout" svg:width="0.016cm" svg:height="0.02cm" svg:x="18.097cm" svg:y="19.218cm" svg:viewBox="0 0 17 21" svg:d="M3 0c7 4 12 5 13 7 3 6-1 11-6 13-6 3-10 0-10-4 0-5 2-10 3-16z">
          <text:p/>
        </draw:path>
        <draw:path draw:style-name="gr9" draw:text-style-name="P7" draw:layer="layout" svg:width="0.02cm" svg:height="0.018cm" svg:x="5.833cm" svg:y="14.257cm" svg:viewBox="0 0 21 19" svg:d="M21 12c-5 3-8 7-13 7-6 0-10-7-7-14 2-2 8-6 10-5 3 3 6 7 10 12z">
          <text:p/>
        </draw:path>
        <draw:path draw:style-name="gr9" draw:text-style-name="P7" draw:layer="layout" svg:width="0.019cm" svg:height="0.019cm" svg:x="16.634cm" svg:y="16.009cm" svg:viewBox="0 0 20 20" svg:d="M20 8c-1 4-2 10-4 11-7 4-11-1-14-7-3-5-2-9 4-11 8-2 13 0 14 7z">
          <text:p/>
        </draw:path>
        <draw:path draw:style-name="gr9" draw:text-style-name="P7" draw:layer="layout" svg:width="0.02cm" svg:height="0.019cm" svg:x="4.372cm" svg:y="15.424cm" svg:viewBox="0 0 21 20" svg:d="M21 7c-2 5-3 10-5 12-6 3-12-1-15-7-2-6-1-10 5-11 8-2 13 0 15 6z">
          <text:p/>
        </draw:path>
        <draw:path draw:style-name="gr9" draw:text-style-name="P7" draw:layer="layout" svg:width="0.018cm" svg:height="0.02cm" svg:x="2.33cm" svg:y="19.801cm" svg:viewBox="0 0 19 21" svg:d="M14 0c2 5 5 9 5 13 0 7-7 10-13 7-3-2-7-8-6-9 3-5 9-7 14-11z">
          <text:p/>
        </draw:path>
        <draw:path draw:style-name="gr9" draw:text-style-name="P7" draw:layer="layout" svg:width="0.022cm" svg:height="0.016cm" svg:x="11.089cm" svg:y="13.09cm" svg:viewBox="0 0 23 17" svg:d="M23 15c-9 1-15 2-20 1-2 0-4-8-3-11 1-2 7-6 8-5 5 3 9 7 15 15z">
          <text:p/>
        </draw:path>
        <draw:path draw:style-name="gr9" draw:text-style-name="P7" draw:layer="layout" svg:width="0.023cm" svg:height="0.018cm" svg:x="11.375cm" svg:y="13.089cm" svg:viewBox="0 0 24 19" svg:d="M0 12c8-5 12-10 17-12 1 0 7 7 7 10s-4 9-5 9c-6-1-10-3-19-7z">
          <text:p/>
        </draw:path>
        <draw:path draw:style-name="gr9" draw:text-style-name="P7" draw:layer="layout" svg:width="0.019cm" svg:height="0.018cm" svg:x="11.672cm" svg:y="13.089cm" svg:viewBox="0 0 20 19" svg:d="M20 13c-5 2-8 5-11 6-7 0-11-7-7-14 3-5 7-7 11-4 3 2 5 8 7 12z">
          <text:p/>
        </draw:path>
        <draw:path draw:style-name="gr9" draw:text-style-name="P7" draw:layer="layout" svg:width="0.018cm" svg:height="0.02cm" svg:x="14.007cm" svg:y="28.269cm" svg:viewBox="0 0 19 21" svg:d="M14 0c2 5 5 8 5 11 0 8-7 13-12 8-4-2-7-6-7-9-1-5 9-11 14-10z">
          <text:p/>
        </draw:path>
        <draw:path draw:style-name="gr9" draw:text-style-name="P7" draw:layer="layout" svg:width="0.018cm" svg:height="0.019cm" svg:x="13.717cm" svg:y="28.27cm" svg:viewBox="0 0 19 20" svg:d="M19 5c1 10-7 17-13 14-3-1-6-5-6-10-1-3 3-9 4-9 6 1 11 3 15 5z">
          <text:p/>
        </draw:path>
        <draw:path draw:style-name="gr9" draw:text-style-name="P7" draw:layer="layout" svg:width="0.019cm" svg:height="0.018cm" svg:x="16.052cm" svg:y="15.424cm" svg:viewBox="0 0 20 19" svg:d="M9 0c3 2 9 3 11 5 2 4-4 15-9 14-3 0-7-3-9-6-4-6 0-12 7-13z">
          <text:p/>
        </draw:path>
        <draw:path draw:style-name="gr9" draw:text-style-name="P7" draw:layer="layout" svg:width="0.02cm" svg:height="0.019cm" svg:x="16.343cm" svg:y="15.716cm" svg:viewBox="0 0 21 20" svg:d="M5 0c10-1 18 8 15 12-2 3-6 6-9 8-3 0-11-5-11-6 1-5 4-9 5-14z">
          <text:p/>
        </draw:path>
        <draw:path draw:style-name="gr9" draw:text-style-name="P7" draw:layer="layout" svg:width="0.019cm" svg:height="0.017cm" svg:x="4.083cm" svg:y="26.227cm" svg:viewBox="0 0 20 18" svg:d="M18 14c-3 1-9 4-14 4-2-2-5-8-4-11 2-7 8-8 15-5 5 2 6 5 3 12z">
          <text:p/>
        </draw:path>
        <draw:path draw:style-name="gr9" draw:text-style-name="P7" draw:layer="layout" svg:width="0.02cm" svg:height="0.017cm" svg:x="2.329cm" svg:y="20.389cm" svg:viewBox="0 0 21 18" svg:d="M11 18c-7-2-14-9-9-12 2-4 6-6 10-6 6-1 12 7 8 12-1 3-6 4-9 6z">
          <text:p/>
        </draw:path>
        <draw:path draw:style-name="gr9" draw:text-style-name="P7" draw:layer="layout" svg:width="0.021cm" svg:height="0.017cm" svg:x="18.385cm" svg:y="20.388cm" svg:viewBox="0 0 22 18" svg:d="M11 0c3 2 8 3 10 7 3 4-3 11-10 11-3 0-8-2-10-5-3-5 2-12 10-13z">
          <text:p/>
        </draw:path>
        <draw:path draw:style-name="gr9" draw:text-style-name="P7" draw:layer="layout" svg:width="0.02cm" svg:height="0.018cm" svg:x="13.422cm" svg:y="28.561cm" svg:viewBox="0 0 21 19" svg:d="M21 13c-2 6-7 8-15 6-6-2-7-6-5-11 5-6 9-10 15-6 3 1 3 7 5 11z">
          <text:p/>
        </draw:path>
        <draw:path draw:style-name="gr9" draw:text-style-name="P7" draw:layer="layout" svg:width="0.018cm" svg:height="0.019cm" svg:x="5.25cm" svg:y="27.392cm" svg:viewBox="0 0 19 20" svg:d="M6 20c-6-3-7-9-5-15 2-5 5-6 10-4 6 3 10 8 6 15-1 2-7 3-11 4z">
          <text:p/>
        </draw:path>
        <draw:path draw:style-name="gr9" draw:text-style-name="P7" draw:layer="layout" svg:width="0.017cm" svg:height="0.018cm" svg:x="8.462cm" svg:y="28.853cm" svg:viewBox="0 0 18 19" svg:d="M8 0c3 3 9 5 10 8 1 7-10 14-15 10-2-2-4-7-3-12 0-2 5-4 8-6z">
          <text:p/>
        </draw:path>
        <draw:path draw:style-name="gr9" draw:text-style-name="P7" draw:layer="layout" svg:width="0.019cm" svg:height="0.02cm" svg:x="2.624cm" svg:y="18.635cm" svg:viewBox="0 0 20 21" svg:d="M20 12c-5 4-10 6-15 9-2-4-5-8-5-12-1-7 5-11 13-8 3 1 4 6 7 11z">
          <text:p/>
        </draw:path>
        <draw:path draw:style-name="gr9" draw:text-style-name="P7" draw:layer="layout" svg:width="0.016cm" svg:height="0.021cm" svg:x="3.791cm" svg:y="25.932cm" svg:viewBox="0 0 17 22" svg:d="M17 10c-1 3-2 9-4 11-5 3-14-4-13-10 0-3 2-7 5-10 5-3 11 2 12 9z">
          <text:p/>
        </draw:path>
        <draw:path draw:style-name="gr9" draw:text-style-name="P7" draw:layer="layout" svg:width="0.019cm" svg:height="0.019cm" svg:x="17.512cm" svg:y="24.474cm" svg:viewBox="0 0 20 20" svg:d="M5 20c-1-4-4-10-5-15 0-1 6-5 9-5 5 1 9 4 10 7 3 5-4 14-14 13z">
          <text:p/>
        </draw:path>
        <draw:path draw:style-name="gr9" draw:text-style-name="P7" draw:layer="layout" svg:width="0.019cm" svg:height="0.02cm" svg:x="7.584cm" svg:y="28.56cm" svg:viewBox="0 0 20 21" svg:d="M20 13c-1 7-6 10-13 7-6-1-8-5-6-9 3-7 11-13 14-10s4 7 5 12z">
          <text:p/>
        </draw:path>
        <draw:path draw:style-name="gr9" draw:text-style-name="P7" draw:layer="layout" svg:width="0.017cm" svg:height="0.016cm" svg:x="16.052cm" svg:y="26.81cm" svg:viewBox="0 0 18 17" svg:d="M18 9c-2 2-5 7-8 8-7 1-12-8-9-13 2-3 9-5 12-4 2 0 3 6 5 9z">
          <text:p/>
        </draw:path>
        <draw:path draw:style-name="gr9" draw:text-style-name="P7" draw:layer="layout" svg:width="0.017cm" svg:height="0.018cm" svg:x="3.208cm" svg:y="17.177cm" svg:viewBox="0 0 18 19" svg:d="M10 0c2 3 6 5 8 8 2 6-8 14-13 9-3-2-6-7-4-10 0-3 6-4 9-7z">
          <text:p/>
        </draw:path>
        <draw:path draw:style-name="gr9" draw:text-style-name="P7" draw:layer="layout" svg:width="0.02cm" svg:height="0.015cm" svg:x="11.963cm" svg:y="28.855cm" svg:viewBox="0 0 21 16" svg:d="M21 3c-2 5-3 11-5 12-6 3-13 1-15-6-2-5-1-9 4-9 6 0 11 2 16 3z">
          <text:p/>
        </draw:path>
        <draw:path draw:style-name="gr9" draw:text-style-name="P7" draw:layer="layout" svg:width="0.018cm" svg:height="0.02cm" svg:x="2.624cm" svg:y="18.341cm" svg:viewBox="0 0 19 21" svg:d="M5 0c5 3 9 5 12 8 5 5 1 10-6 12-4 2-10 1-11-3 0-5 4-10 5-17z">
          <text:p/>
        </draw:path>
        <draw:path draw:style-name="gr9" draw:text-style-name="P7" draw:layer="layout" svg:width="0.02cm" svg:height="0.017cm" svg:x="4.666cm" svg:y="26.811cm" svg:viewBox="0 0 21 18" svg:d="M9 18c-7-1-11-8-8-14 2-3 7-5 10-4 7 0 12 9 9 13-3 2-7 3-11 5z">
          <text:p/>
        </draw:path>
        <draw:path draw:style-name="gr9" draw:text-style-name="P7" draw:layer="layout" svg:width="0.015cm" svg:height="0.017cm" svg:x="12.258cm" svg:y="28.853cm" svg:viewBox="0 0 16 18" svg:d="M5 18c-2-4-5-7-5-10 0-8 9-11 14-6 2 3 3 9 2 11-2 2-7 3-11 5z">
          <text:p/>
        </draw:path>
        <draw:path draw:style-name="gr9" draw:text-style-name="P7" draw:layer="layout" svg:width="0.02cm" svg:height="0.017cm" svg:x="12.548cm" svg:y="28.854cm" svg:viewBox="0 0 21 18" svg:d="M21 7c-4 4-5 9-8 10-6 3-13-1-13-8 0-3 5-9 6-9 5 0 9 3 15 7z">
          <text:p/>
        </draw:path>
        <draw:path draw:style-name="gr9" draw:text-style-name="P7" draw:layer="layout" svg:width="0.018cm" svg:height="0.018cm" svg:x="15.176cm" svg:y="14.549cm" svg:viewBox="0 0 19 19" svg:d="M19 10c-1 6-7 11-13 8-3-2-6-6-6-9-1-5 8-11 13-9 3 1 4 7 6 10z">
          <text:p/>
        </draw:path>
        <draw:path draw:style-name="gr9" draw:text-style-name="P7" draw:layer="layout" svg:width="0.017cm" svg:height="0.019cm" svg:x="2.624cm" svg:y="23.598cm" svg:viewBox="0 0 18 20" svg:d="M9 0c3 3 7 5 9 9 2 5-7 13-12 10-4-2-6-8-6-11s6-5 9-8z">
          <text:p/>
        </draw:path>
        <draw:path draw:style-name="gr9" draw:text-style-name="P7" draw:layer="layout" svg:width="0.02cm" svg:height="0.02cm" svg:x="2.33cm" svg:y="22.43cm" svg:viewBox="0 0 21 21" svg:d="M21 11c-3 8-9 13-14 8-3-2-5-6-7-10-1-4 10-12 14-8 3 2 4 7 7 10z">
          <text:p/>
        </draw:path>
        <draw:path draw:style-name="gr9" draw:text-style-name="P7" draw:layer="layout" svg:width="0.018cm" svg:height="0.018cm" svg:x="5.542cm" svg:y="14.55cm" svg:viewBox="0 0 19 19" svg:d="M19 12c-2 6-7 9-14 5-3-2-6-8-5-10 2-6 8-9 15-6 2 1 3 6 4 11z">
          <text:p/>
        </draw:path>
        <draw:path draw:style-name="gr9" draw:text-style-name="P7" draw:layer="layout" svg:width="0.018cm" svg:height="0.019cm" svg:x="7.002cm" svg:y="13.672cm" svg:viewBox="0 0 19 20" svg:d="M7 20c-7-3-9-7-6-14 2-5 5-7 11-5s8 8 6 14c-1 2-8 4-11 5z">
          <text:p/>
        </draw:path>
        <draw:path draw:style-name="gr9" draw:text-style-name="P7" draw:layer="layout" svg:width="0.021cm" svg:height="0.019cm" svg:x="14.299cm" svg:y="27.976cm" svg:viewBox="0 0 22 20" svg:d="M22 15c-6 2-12 5-17 5-5-1-6-7-4-12 3-7 9-11 14-5 3 2 4 7 7 12z">
          <text:p/>
        </draw:path>
        <draw:path draw:style-name="gr9" draw:text-style-name="P7" draw:layer="layout" svg:width="0.017cm" svg:height="0.021cm" svg:x="18.096cm" svg:y="23.306cm" svg:viewBox="0 0 18 22" svg:d="M18 11c-2 4-3 8-5 10-6 3-13-2-13-8 0-4 2-9 5-12 4-3 12 3 13 10z">
          <text:p/>
        </draw:path>
        <draw:path draw:style-name="gr9" draw:text-style-name="P7" draw:layer="layout" svg:width="0.019cm" svg:height="0.017cm" svg:x="3.207cm" svg:y="24.767cm" svg:viewBox="0 0 20 18" svg:d="M13 18c-4-1-10-1-12-4-4-5 1-15 8-14 3 0 7 3 9 7 3 5 0 9-5 11z">
          <text:p/>
        </draw:path>
        <draw:path draw:style-name="gr9" draw:text-style-name="P7" draw:layer="layout" svg:width="0.02cm" svg:height="0.019cm" svg:x="13.422cm" svg:y="13.673cm" svg:viewBox="0 0 21 20" svg:d="M21 13c-2 7-7 8-15 6-6-3-7-6-5-11 5-6 9-11 16-6 2 1 2 7 4 11z">
          <text:p/>
        </draw:path>
        <draw:path draw:style-name="gr9" draw:text-style-name="P7" draw:layer="layout" svg:width="0.019cm" svg:height="0.019cm" svg:x="17.512cm" svg:y="24.766cm" svg:viewBox="0 0 20 20" svg:d="M20 7c-3 6-4 10-7 12-7 2-13-1-13-9 0-3 3-7 5-10 4 2 10 5 15 7z">
          <text:p/>
        </draw:path>
        <draw:path draw:style-name="gr9" draw:text-style-name="P7" draw:layer="layout" svg:width="0.017cm" svg:height="0.02cm" svg:x="3.208cm" svg:y="25.057cm" svg:viewBox="0 0 18 21" svg:d="M4 0c5 2 11 3 13 6 2 5-2 11-8 14-4 2-8 0-9-5 0-5 2-10 4-15z">
          <text:p/>
        </draw:path>
        <draw:path draw:style-name="gr9" draw:text-style-name="P7" draw:layer="layout" svg:width="0.018cm" svg:height="0.018cm" svg:x="12.84cm" svg:y="13.381cm" svg:viewBox="0 0 19 19" svg:d="M8 0c3 2 9 2 10 4 2 7 0 13-6 15-2 1-7-2-10-5-4-6-1-12 6-14z">
          <text:p/>
        </draw:path>
        <draw:path draw:style-name="gr9" draw:text-style-name="P7" draw:layer="layout" svg:width="0.02cm" svg:height="0.02cm" svg:x="7.878cm" svg:y="13.38cm" svg:viewBox="0 0 21 21" svg:d="M21 13c-6 3-11 6-16 8-2-3-5-7-5-11 0-7 6-12 13-9 2 2 5 7 8 12z">
          <text:p/>
        </draw:path>
        <draw:path draw:style-name="gr9" draw:text-style-name="P7" draw:layer="layout" svg:width="0.018cm" svg:height="0.02cm" svg:x="7.585cm" svg:y="13.38cm" svg:viewBox="0 0 19 21" svg:d="M19 12c-1 7-8 12-12 8-3-3-6-7-7-10-1-6 10-12 14-9 3 2 3 7 5 11z">
          <text:p/>
        </draw:path>
        <draw:path draw:style-name="gr9" draw:text-style-name="P7" draw:layer="layout" svg:width="0.018cm" svg:height="0.017cm" svg:x="18.096cm" svg:y="18.928cm" svg:viewBox="0 0 19 18" svg:d="M0 7c3-2 6-6 9-7 6-1 13 10 8 14-2 3-8 5-11 4s-4-6-6-11z">
          <text:p/>
        </draw:path>
        <draw:path draw:style-name="gr9" draw:text-style-name="P7" draw:layer="layout" svg:width="0.019cm" svg:height="0.019cm" svg:x="8.168cm" svg:y="28.853cm" svg:viewBox="0 0 20 20" svg:d="M20 8c-2 5-3 9-6 11-4 3-14-4-14-10 1-3 4-7 6-8 6-3 13 1 14 7z">
          <text:p/>
        </draw:path>
        <draw:path draw:style-name="gr9" draw:text-style-name="P7" draw:layer="layout" svg:width="0.019cm" svg:height="0.018cm" svg:x="16.927cm" svg:y="16.593cm" svg:viewBox="0 0 20 19" svg:d="M6 19c-2-4-5-8-6-14 0-1 7-5 10-5s7 3 9 6c4 6-5 14-13 13z">
          <text:p/>
        </draw:path>
        <draw:path draw:style-name="gr9" draw:text-style-name="P7" draw:layer="layout" svg:width="0.02cm" svg:height="0.018cm" svg:x="18.095cm" svg:y="22.723cm" svg:viewBox="0 0 21 19" svg:d="M21 12c-5 4-9 7-12 7-7 0-11-7-8-13 1-3 7-6 8-6 4 3 8 8 12 12z">
          <text:p/>
        </draw:path>
        <draw:polygon draw:style-name="gr9" draw:text-style-name="P7" draw:layer="layout" svg:width="0.004cm" svg:height="0.004cm" svg:x="4.67cm" svg:y="14.847cm" svg:viewBox="0 0 5 5" draw:points="0,0 5,0 2,5">
          <text:p/>
        </draw:polygon>
        <draw:path draw:style-name="gr9" draw:text-style-name="P7" draw:layer="layout" svg:width="0.006cm" svg:height="0.007cm" svg:x="15.473cm" svg:y="27.689cm" svg:viewBox="0 0 7 8" svg:d="M7 7c-1 0-5 1-5 1-4-6-3-9 4-8 1 1 1 5 1 7z">
          <text:p/>
        </draw:path>
        <draw:path draw:style-name="gr9" draw:text-style-name="P7" draw:layer="layout" svg:width="0.006cm" svg:height="0.009cm" svg:x="18.686cm" svg:y="21.268cm" svg:viewBox="0 0 7 10" svg:d="M7 5c-1 1-3 4-4 5-4-4-4-7 1-10 0 2 2 3 3 5z">
          <text:p/>
        </draw:path>
        <draw:path draw:style-name="gr9" draw:text-style-name="P7" draw:layer="layout" svg:width="0.007cm" svg:height="0.007cm" svg:x="11.676cm" svg:y="12.801cm" svg:viewBox="0 0 8 8" svg:d="M8 6c-2 2-4 3-6 2-3-6-2-9 5-7 0 0 0 3 1 5z">
          <text:p/>
        </draw:path>
        <draw:polygon draw:style-name="gr9" draw:text-style-name="P7" draw:layer="layout" svg:width="0.004cm" svg:height="0.003cm" svg:x="18.391cm" svg:y="22.149cm" svg:viewBox="0 0 5 4" draw:points="0,1 5,0 5,4">
          <text:p/>
        </draw:polygon>
        <draw:polygon draw:style-name="gr9" draw:text-style-name="P7" draw:layer="layout" svg:width="0.004cm" svg:height="0.007cm" svg:x="16.06cm" svg:y="14.847cm" svg:viewBox="0 0 5 8" draw:points="1,8 0,0 5,2">
          <text:p/>
        </draw:polygon>
        <draw:path draw:style-name="gr9" draw:text-style-name="P7" draw:layer="layout" svg:width="0.015cm" svg:height="0.017cm" svg:x="15.468cm" svg:y="14.84cm" svg:viewBox="0 0 16 18" svg:d="M6 18c-5-1-7-5-5-10 2-3 4-7 7-8 5-1 10 9 8 14-2 3-6 3-10 4z">
          <text:p/>
        </draw:path>
        <draw:path draw:style-name="gr9" draw:text-style-name="P7" draw:layer="layout" svg:width="0.006cm" svg:height="0.008cm" svg:x="9.05cm" svg:y="12.8cm" svg:viewBox="0 0 7 9" svg:d="M5 0c1 1 4 3 2 5 0 2-2 3-4 4-4-4-4-8 2-9z">
          <text:p/>
        </draw:path>
        <draw:polygon draw:style-name="gr9" draw:text-style-name="P7" draw:layer="layout" svg:width="0.005cm" svg:height="0.003cm" svg:x="9.925cm" svg:y="12.801cm" svg:viewBox="0 0 6 4" draw:points="6,4 0,1 6,0">
          <text:p/>
        </draw:polygon>
        <draw:polygon draw:style-name="gr9" draw:text-style-name="P7" draw:layer="layout" svg:width="0.004cm" svg:height="0.003cm" svg:x="11.972cm" svg:y="12.801cm" svg:viewBox="0 0 5 4" draw:points="0,1 5,0 4,4">
          <text:p/>
        </draw:polygon>
        <draw:polygon draw:style-name="gr9" draw:text-style-name="P7" draw:layer="layout" svg:width="0.006cm" svg:height="0.003cm" svg:x="9.345cm" svg:y="12.801cm" svg:viewBox="0 0 7 4" draw:points="0,1 7,0 5,4">
          <text:p/>
        </draw:polygon>
        <draw:path draw:style-name="gr9" draw:text-style-name="P7" draw:layer="layout" svg:width="0.006cm" svg:height="0.007cm" svg:x="9.635cm" svg:y="12.8cm" svg:viewBox="0 0 7 8" svg:d="M2 8c-1-2-2-4-2-6 1-1 3-1 6-2 0 2 1 4 1 6 0 0-4 2-5 2z">
          <text:p/>
        </draw:path>
        <draw:path draw:style-name="gr9" draw:text-style-name="P7" draw:layer="layout" svg:width="0.005cm" svg:height="0.006cm" svg:x="16.931cm" svg:y="25.942cm" svg:viewBox="0 0 6 7" svg:d="M5 7c-3-1-5-1-5-3 0-1 1-3 2-4 2 0 4 1 4 2s-1 2-1 5z">
          <text:p/>
        </draw:path>
        <draw:path draw:style-name="gr9" draw:text-style-name="P7" draw:layer="layout" svg:width="0.004cm" svg:height="0.006cm" svg:x="2.043cm" svg:y="21.269cm" svg:viewBox="0 0 5 7" svg:d="M5 6c-1 0-3 1-4 1-1-1-2-5-1-5 4-3 5-2 5 4z">
          <text:p/>
        </draw:path>
        <draw:path draw:style-name="gr9" draw:text-style-name="P7" draw:layer="layout" svg:width="0.005cm" svg:height="0.006cm" svg:x="14.889cm" svg:y="14.264cm" svg:viewBox="0 0 6 7" svg:d="M2 0c1 0 4 2 4 2 0 2-1 4-1 5-2 0-5-1-5-1 0-2 1-4 2-6z">
          <text:p/>
        </draw:path>
        <draw:path draw:style-name="gr9" draw:text-style-name="P7" draw:layer="layout" svg:width="0.006cm" svg:height="0.01cm" svg:x="18.685cm" svg:y="21.849cm" svg:viewBox="0 0 7 11" svg:d="M7 5c-1 2-2 4-3 6-1-2-4-4-4-6s3-3 4-5c1 2 2 3 3 5z">
          <text:p/>
        </draw:path>
        <draw:polygon draw:style-name="gr9" draw:text-style-name="P7" draw:layer="layout" svg:width="0.007cm" svg:height="0.005cm" svg:x="6.132cm" svg:y="28.274cm" svg:viewBox="0 0 8 6" draw:points="0,1 8,0 6,6">
          <text:p/>
        </draw:polygon>
        <draw:path draw:style-name="gr9" draw:text-style-name="P7" draw:layer="layout" svg:width="0.006cm" svg:height="0.007cm" svg:x="12.262cm" svg:y="29.152cm" svg:viewBox="0 0 7 8" svg:d="M3 0c1 1 3 1 3 2 2 2 0 4-1 6-1 0-5-1-5-1 0-3 2-5 3-7z">
          <text:p/>
        </draw:path>
        <draw:path draw:style-name="gr9" draw:text-style-name="P7" draw:layer="layout" svg:width="0.017cm" svg:height="0.014cm" svg:x="18.386cm" svg:y="20.974cm" svg:viewBox="0 0 18 15" svg:d="M18 5c-2 3-3 8-5 9-4 4-15-3-13-7 1-3 5-7 8-7 3-1 6 4 10 5z">
          <text:p/>
        </draw:path>
        <draw:path draw:style-name="gr9" draw:text-style-name="P7" draw:layer="layout" svg:width="0.005cm" svg:height="0.007cm" svg:x="11.677cm" svg:y="29.152cm" svg:viewBox="0 0 6 8" svg:d="M3 0c1 1 3 1 3 2 0 2 0 4-1 6-1 0-5-1-5-1 0-3 2-5 3-7z">
          <text:p/>
        </draw:path>
        <draw:polygon draw:style-name="gr9" draw:text-style-name="P7" draw:layer="layout" svg:width="0.005cm" svg:height="0.005cm" svg:x="4.967cm" svg:y="14.845cm" svg:viewBox="0 0 6 6" draw:points="4,0 6,6 0,6">
          <text:p/>
        </draw:polygon>
        <draw:path draw:style-name="gr9" draw:text-style-name="P7" draw:layer="layout" svg:width="0.009cm" svg:height="0.005cm" svg:x="9.343cm" svg:y="29.443cm" svg:viewBox="0 0 10 6" svg:d="M10 4c-1 1-3 2-5 2s-3-2-5-4c2-1 5-2 6-2 2 1 3 2 4 4z">
          <text:p/>
        </draw:path>
        <draw:polygon draw:style-name="gr9" draw:text-style-name="P7" draw:layer="layout" svg:width="0.005cm" svg:height="0.005cm" svg:x="3.502cm" svg:y="25.647cm" svg:viewBox="0 0 6 6" draw:points="6,0 6,6 0,4">
          <text:p/>
        </draw:polygon>
        <draw:polygon draw:style-name="gr9" draw:text-style-name="P7" draw:layer="layout" svg:width="0.005cm" svg:height="0.004cm" svg:x="6.714cm" svg:y="28.572cm" svg:viewBox="0 0 6 5" draw:points="0,3 6,0 5,5">
          <text:p/>
        </draw:polygon>
        <draw:polygon draw:style-name="gr9" draw:text-style-name="P7" draw:layer="layout" svg:width="0.003cm" svg:height="0.005cm" svg:x="2.341cm" svg:y="23.895cm" svg:viewBox="0 0 4 6" draw:points="0,5 3,0 4,6">
          <text:p/>
        </draw:polygon>
        <draw:polygon draw:style-name="gr9" draw:text-style-name="P7" draw:layer="layout" svg:width="0.005cm" svg:height="0.005cm" svg:x="18.39cm" svg:y="22.435cm" svg:viewBox="0 0 6 6" draw:points="6,0 6,6 0,4">
          <text:p/>
        </draw:polygon>
        <draw:path draw:style-name="gr9" draw:text-style-name="P7" draw:layer="layout" svg:width="0.004cm" svg:height="0.006cm" svg:x="2.628cm" svg:y="23.896cm" svg:viewBox="0 0 5 7" svg:d="M1 0c2 1 4 1 4 3 0 1-1 3-1 4-1-1-4-1-4-2s1-2 1-5z">
          <text:p/>
        </draw:path>
        <draw:path draw:style-name="gr9" draw:text-style-name="P7" draw:layer="layout" svg:width="0.017cm" svg:height="0.014cm" svg:x="15.759cm" svg:y="15.135cm" svg:viewBox="0 0 18 15" svg:d="M8 15c-3-3-7-5-8-7-1-5 11-10 15-8 2 2 4 9 3 10-2 3-6 3-10 5z">
          <text:p/>
        </draw:path>
        <draw:path draw:style-name="gr9" draw:text-style-name="P7" draw:layer="layout" svg:width="0.008cm" svg:height="0.005cm" svg:x="9.926cm" svg:y="29.443cm" svg:viewBox="0 0 9 6" svg:d="M0 4c0-1 2-4 3-4s3 1 6 2c-2 1-3 4-3 4-2 0-4 0-6-2z">
          <text:p/>
        </draw:path>
        <draw:polygon draw:style-name="gr9" draw:text-style-name="P7" draw:layer="layout" svg:width="0.005cm" svg:height="0.005cm" svg:x="4.382cm" svg:y="27.107cm" svg:viewBox="0 0 6 6" draw:points="3,0 6,6 0,6">
          <text:p/>
        </draw:polygon>
        <draw:polygon draw:style-name="gr9" draw:text-style-name="P7" draw:layer="layout" svg:width="0.005cm" svg:height="0.004cm" svg:x="18.39cm" svg:y="19.224cm" svg:viewBox="0 0 6 5" draw:points="0,3 6,0 6,5">
          <text:p/>
        </draw:polygon>
        <draw:polygon draw:style-name="gr9" draw:text-style-name="P7" draw:layer="layout" svg:width="0.006cm" svg:height="0.005cm" svg:x="2.92cm" svg:y="25.062cm" svg:viewBox="0 0 7 6" draw:points="0,2 7,0 6,6">
          <text:p/>
        </draw:polygon>
        <draw:path draw:style-name="gr9" draw:text-style-name="P7" draw:layer="layout" svg:width="0.006cm" svg:height="0.004cm" svg:x="18.391cm" svg:y="18.937cm" svg:viewBox="0 0 7 5" svg:d="M0 4c1-1 1-4 3-4 1 0 3 0 4 2 0 1-1 3-1 3-2 0-3-1-6-1z">
          <text:p/>
        </draw:path>
        <draw:path draw:style-name="gr9" draw:text-style-name="P7" draw:layer="layout" svg:width="0.005cm" svg:height="0.007cm" svg:x="9.051cm" svg:y="29.152cm" svg:viewBox="0 0 6 8" svg:d="M1 0c2 1 5 1 5 2 0 2-1 4-1 6-2-1-5-1-5-2 0-2 1-4 1-6z">
          <text:p/>
        </draw:path>
        <draw:polygon draw:style-name="gr9" draw:text-style-name="P7" draw:layer="layout" svg:width="0.006cm" svg:height="0.006cm" svg:x="6.713cm" svg:y="13.385cm" svg:viewBox="0 0 7 7" draw:points="7,0 7,7 0,4">
          <text:p/>
        </draw:polygon>
        <draw:path draw:style-name="gr9" draw:text-style-name="P7" draw:layer="layout" svg:width="0.007cm" svg:height="0.009cm" svg:x="3.212cm" svg:y="16.889cm" svg:viewBox="0 0 8 10" svg:d="M4 0c1 2 4 3 4 5-2 1-3 3-4 5-1-2-4-4-4-6 2-1 3-2 4-4z">
          <text:p/>
        </draw:path>
        <draw:polygon draw:style-name="gr9" draw:text-style-name="P7" draw:layer="layout" svg:width="0.003cm" svg:height="0.004cm" svg:x="18.391cm" svg:y="18.639cm" svg:viewBox="0 0 4 5" draw:points="4,0 4,5 0,3">
          <text:p/>
        </draw:polygon>
        <draw:path draw:style-name="gr9" draw:text-style-name="P7" draw:layer="layout" svg:width="0.007cm" svg:height="0.009cm" svg:x="18.1cm" svg:y="18.638cm" svg:viewBox="0 0 8 10" svg:d="M8 5c-2 2-4 4-5 5-1-1-3-3-3-6 0-1 2-3 4-4 2 1 3 3 4 5z">
          <text:p/>
        </draw:path>
        <draw:path draw:style-name="gr9" draw:text-style-name="P7" draw:layer="layout" svg:width="0.005cm" svg:height="0.008cm" svg:x="17.516cm" svg:y="16.891cm" svg:viewBox="0 0 6 9" svg:d="M6 5c-1 2-2 3-3 4-2-2-3-3-3-6 1-1 3-2 4-3 1 1 2 3 2 5z">
          <text:p/>
        </draw:path>
        <draw:path draw:style-name="gr9" draw:text-style-name="P7" draw:layer="layout" svg:width="0.005cm" svg:height="0.006cm" svg:x="8.466cm" svg:y="29.154cm" svg:viewBox="0 0 6 7" svg:d="M5 7c-3-1-5-1-5-2s1-4 2-5c1 0 4 1 4 1 0 3-1 4-1 6z">
          <text:p/>
        </draw:path>
        <draw:polygon draw:style-name="gr9" draw:text-style-name="P7" draw:layer="layout" svg:width="0.005cm" svg:height="0.004cm" svg:x="8.179cm" svg:y="29.155cm" svg:viewBox="0 0 6 5" draw:points="3,5 0,0 6,0">
          <text:p/>
        </draw:polygon>
        <draw:path draw:style-name="gr9" draw:text-style-name="P7" draw:layer="layout" svg:width="0.007cm" svg:height="0.005cm" svg:x="2.92cm" svg:y="17.182cm" svg:viewBox="0 0 8 6" svg:d="M8 1c0 1-1 5-2 5-2 0-4-1-6-3 1-1 2-3 2-3 2 0 4 1 6 1z">
          <text:p/>
        </draw:path>
        <draw:polygon draw:style-name="gr9" draw:text-style-name="P7" draw:layer="layout" svg:width="0.004cm" svg:height="0.003cm" svg:x="17.81cm" svg:y="24.478cm" svg:viewBox="0 0 5 4" draw:points="0,2 5,0 5,4">
          <text:p/>
        </draw:polygon>
        <draw:polygon draw:style-name="gr9" draw:text-style-name="P7" draw:layer="layout" svg:width="0.005cm" svg:height="0.005cm" svg:x="7.882cm" svg:y="29.155cm" svg:viewBox="0 0 6 6" draw:points="2,6 0,0 6,0">
          <text:p/>
        </draw:polygon>
        <draw:polygon draw:style-name="gr9" draw:text-style-name="P7" draw:layer="layout" svg:width="0.005cm" svg:height="0.005cm" svg:x="16.644cm" svg:y="26.523cm" svg:viewBox="0 0 6 6" draw:points="3,6 0,0 6,1">
          <text:p/>
        </draw:polygon>
        <draw:path draw:style-name="gr9" draw:text-style-name="P7" draw:layer="layout" svg:width="0.006cm" svg:height="0.006cm" svg:x="4.088cm" svg:y="26.817cm" svg:viewBox="0 0 7 7" svg:d="M0 4c0-1 2-4 2-4 2 0 4 2 5 2 0 1-1 5-1 5-2 0-4-2-6-3z">
          <text:p/>
        </draw:path>
        <draw:path draw:style-name="gr9" draw:text-style-name="P7" draw:layer="layout" svg:width="0.009cm" svg:height="0.005cm" svg:x="17.808cm" svg:y="17.181cm" svg:viewBox="0 0 10 6" svg:d="M10 4c-3 0-4 2-6 1-1 0-3-2-4-3 4-4 7-3 10 2z">
          <text:p/>
        </draw:path>
        <draw:path draw:style-name="gr9" draw:text-style-name="P7" draw:layer="layout" svg:width="0.005cm" svg:height="0.008cm" svg:x="2.628cm" svg:y="17.476cm" svg:viewBox="0 0 6 9" svg:d="M6 5c-1 1-2 3-3 4-2-3-3-4-3-5 0-2 3-3 4-4 1 2 1 3 2 5z">
          <text:p/>
        </draw:path>
        <draw:path draw:style-name="gr9" draw:text-style-name="P7" draw:layer="layout" svg:width="0.006cm" svg:height="0.007cm" svg:x="18.101cm" svg:y="18.057cm" svg:viewBox="0 0 7 8" svg:d="M2 0c2 1 5 2 5 2 0 2-2 3-3 6-1-1-4-1-4-3 0-1 2-3 2-5z">
          <text:p/>
        </draw:path>
        <draw:path draw:style-name="gr9" draw:text-style-name="P7" draw:layer="layout" svg:width="0.004cm" svg:height="0.006cm" svg:x="2.628cm" svg:y="18.057cm" svg:viewBox="0 0 5 7" svg:d="M5 5c-1 2-2 2-4 2 0-2-2-4-1-5 4-4 5-3 5 3z">
          <text:p/>
        </draw:path>
        <draw:path draw:style-name="gr9" draw:text-style-name="P7" draw:layer="layout" svg:width="0.006cm" svg:height="0.005cm" svg:x="17.81cm" svg:y="24.775cm" svg:viewBox="0 0 7 6" svg:d="M0 4c0-2 1-4 1-4 3 0 4 1 6 1-1 1-1 5-2 5s-4-1-5-2z">
          <text:p/>
        </draw:path>
        <draw:path draw:style-name="gr9" draw:text-style-name="P7" draw:layer="layout" svg:width="0.009cm" svg:height="0.005cm" svg:x="17.808cm" svg:y="17.766cm" svg:viewBox="0 0 10 6" svg:d="M4 6c-2-1-3-2-4-3 1 0 3-3 5-3 1 1 2 3 5 4-3 1-4 2-6 2z">
          <text:p/>
        </draw:path>
        <draw:path draw:style-name="gr9" draw:text-style-name="P7" draw:layer="layout" svg:width="0.017cm" svg:height="0.015cm" svg:x="2.913cm" svg:y="17.761cm" svg:viewBox="0 0 18 16" svg:d="M18 6c-1 4-2 8-4 9-4 3-16-3-14-7 1-4 6-6 9-7 5-2 8 0 9 5z">
          <text:p/>
        </draw:path>
        <draw:polygon draw:style-name="gr9" draw:text-style-name="P7" draw:layer="layout" svg:width="0.005cm" svg:height="0.003cm" svg:x="6.714cm" svg:y="13.684cm" svg:viewBox="0 0 6 4" draw:points="0,2 6,0 5,4">
          <text:p/>
        </draw:polygon>
        <draw:path draw:style-name="gr9" draw:text-style-name="P7" draw:layer="layout" svg:width="0.006cm" svg:height="0.005cm" svg:x="2.921cm" svg:y="24.775cm" svg:viewBox="0 0 7 6" svg:d="M0 4c1-2 1-4 3-4 1 0 3 1 4 1 0 1-1 5-1 5-2 0-3-1-6-2z">
          <text:p/>
        </draw:path>
        <draw:polygon draw:style-name="gr9" draw:text-style-name="P7" draw:layer="layout" svg:width="0.004cm" svg:height="0.004cm" svg:x="6.135cm" svg:y="13.683cm" svg:viewBox="0 0 5 5" draw:points="5,4 0,5 0,0">
          <text:p/>
        </draw:polygon>
        <draw:polygon draw:style-name="gr9" draw:text-style-name="P7" draw:layer="layout" svg:width="0.004cm" svg:height="0.004cm" svg:x="5.553cm" svg:y="14.266cm" svg:viewBox="0 0 5 5" draw:points="1,5 0,0 5,0">
          <text:p/>
        </draw:polygon>
        <draw:path draw:style-name="gr9" draw:text-style-name="P7" draw:layer="layout" svg:width="0.005cm" svg:height="0.006cm" svg:x="5.254cm" svg:y="14.265cm" svg:viewBox="0 0 6 7" svg:d="M5 7c-2 0-5-2-5-3s1-3 2-4c1 0 4 1 4 2s-1 3-1 5z">
          <text:p/>
        </draw:path>
        <draw:polygon draw:style-name="gr9" draw:text-style-name="P7" draw:layer="layout" svg:width="0.004cm" svg:height="0.003cm" svg:x="4.089cm" svg:y="15.428cm" svg:viewBox="0 0 5 4" draw:points="0,4 0,0 5,1">
          <text:p/>
        </draw:polygon>
        <draw:path draw:style-name="gr9" draw:text-style-name="P7" draw:layer="layout" svg:width="0.006cm" svg:height="0.009cm" svg:x="18.101cm" svg:y="23.895cm" svg:viewBox="0 0 7 10" svg:d="M7 6c-2 1-3 2-4 4-4-4-4-8 1-10 1 2 1 3 3 6z">
          <text:p/>
        </draw:path>
        <draw:path draw:style-name="gr9" draw:text-style-name="P7" draw:layer="layout" svg:width="0.01cm" svg:height="0.004cm" svg:x="15.763cm" svg:y="27.402cm" svg:viewBox="0 0 11 5" svg:d="M5 5c-1-2-3-3-5-4 3 0 4-1 6-1 1 0 2 2 5 3-3 0-5 2-6 2z">
          <text:p/>
        </draw:path>
        <draw:polygon draw:style-name="gr9" draw:text-style-name="P7" draw:layer="layout" svg:width="0.004cm" svg:height="0.003cm" svg:x="18.391cm" svg:y="22.734cm" svg:viewBox="0 0 5 4" draw:points="0,1 5,0 5,4">
          <text:p/>
        </draw:polygon>
        <draw:path draw:style-name="gr9" draw:text-style-name="P7" draw:layer="layout" svg:width="0.005cm" svg:height="0.008cm" svg:x="18.686cm" svg:y="20.684cm" svg:viewBox="0 0 6 9" svg:d="M1 0c1 0 5 2 5 3s-1 3-3 6c-1-2-3-3-3-3 0-2 1-3 1-6z">
          <text:p/>
        </draw:path>
        <draw:path draw:style-name="gr9" draw:text-style-name="P7" draw:layer="layout" svg:width="0.006cm" svg:height="0.004cm" svg:x="4.088cm" svg:y="15.725cm" svg:viewBox="0 0 7 5" svg:d="M0 4c0-1 2-4 2-4 2 0 3 2 5 2-1 1-1 3-2 3s-3 0-5-1z">
          <text:p/>
        </draw:path>
        <draw:path draw:style-name="gr9" draw:text-style-name="P7" draw:layer="layout" svg:width="0.004cm" svg:height="0.006cm" svg:x="2.043cm" svg:y="20.684cm" svg:viewBox="0 0 5 7" svg:d="M5 6c-1 0-3 1-4 1-1-1-2-5-1-5 4-3 5-2 5 4z">
          <text:p/>
        </draw:path>
        <draw:polygon draw:style-name="gr9" draw:text-style-name="P7" draw:layer="layout" svg:width="0.004cm" svg:height="0.006cm" svg:x="11.391cm" svg:y="29.153cm" svg:viewBox="0 0 5 7" draw:points="0,7 2,0 5,7">
          <text:p/>
        </draw:polygon>
        <draw:path draw:style-name="gr9" draw:text-style-name="P7" draw:layer="layout" svg:width="0.005cm" svg:height="0.01cm" svg:x="18.686cm" svg:y="20.1cm" svg:viewBox="0 0 6 11" svg:d="M3 0c0 3 3 5 3 6 0 2-3 3-4 5-1-2-2-4-2-5 0-2 2-3 3-6z">
          <text:p/>
        </draw:path>
        <draw:polygon draw:style-name="gr9" draw:text-style-name="P7" draw:layer="layout" svg:width="0.003cm" svg:height="0.003cm" svg:x="3.504cm" svg:y="16.013cm" svg:viewBox="0 0 4 4" draw:points="0,4 0,0 4,2">
          <text:p/>
        </draw:polygon>
        <draw:polygon draw:style-name="gr9" draw:text-style-name="P7" draw:layer="layout" svg:width="0.006cm" svg:height="0.004cm" svg:x="14.599cm" svg:y="28.274cm" svg:viewBox="0 0 7 5" draw:points="0,0 7,3 0,5">
          <text:p/>
        </draw:polygon>
        <draw:polygon draw:style-name="gr9" draw:text-style-name="P7" draw:layer="layout" svg:width="0.003cm" svg:height="0.005cm" svg:x="4.67cm" svg:y="27.108cm" svg:viewBox="0 0 4 6" draw:points="2,0 4,6 0,5">
          <text:p/>
        </draw:polygon>
        <draw:path draw:style-name="gr9" draw:text-style-name="P7" draw:layer="layout" svg:width="0.009cm" svg:height="0.005cm" svg:x="18.389cm" svg:y="23.02cm" svg:viewBox="0 0 10 6" svg:d="M4 6c-1-1-3-2-4-4 2-1 3-2 5-2 1 0 4 2 5 4-2 1-4 2-6 2z">
          <text:p/>
        </draw:path>
        <draw:polygon draw:style-name="gr9" draw:text-style-name="P7" draw:layer="layout" svg:width="0.004cm" svg:height="0.004cm" svg:x="3.502cm" svg:y="16.31cm" svg:viewBox="0 0 5 5" draw:points="5,0 5,5 0,2">
          <text:p/>
        </draw:polygon>
        <draw:path draw:style-name="gr9" draw:text-style-name="P7" draw:layer="layout" svg:width="0.005cm" svg:height="0.01cm" svg:x="16.059cm" svg:y="27.107cm" svg:viewBox="0 0 6 11" svg:d="M6 5l-4 6c-3-5-3-8 2-11z">
          <text:p/>
        </draw:path>
        <draw:polygon draw:style-name="gr9" draw:text-style-name="P7" draw:layer="layout" svg:width="0.004cm" svg:height="0.004cm" svg:x="2.341cm" svg:y="23.317cm" svg:viewBox="0 0 5 5" draw:points="0,0 5,0 3,5">
          <text:p/>
        </draw:polygon>
        <draw:polygon draw:style-name="gr9" draw:text-style-name="P7" draw:layer="layout" svg:width="0.005cm" svg:height="0.005cm" svg:x="18.392cm" svg:y="19.522cm" svg:viewBox="0 0 6 6" draw:points="0,0 6,3 0,6">
          <text:p/>
        </draw:polygon>
        <draw:path draw:style-name="gr9" draw:text-style-name="P7" draw:layer="layout" svg:width="0.007cm" svg:height="0.005cm" svg:x="6.132cm" svg:y="13.97cm" svg:viewBox="0 0 8 6" svg:d="M6 0c1 1 1 2 2 5-2 0-3 1-6 1-1 0-1-4-2-5 2 0 5-1 6-1z">
          <text:p/>
        </draw:path>
        <draw:path draw:style-name="gr9" draw:text-style-name="P7" draw:layer="layout" svg:width="0.017cm" svg:height="0.015cm" svg:x="17.802cm" svg:y="24.185cm" svg:viewBox="0 0 18 16" svg:d="M18 9c-1 5-4 8-9 6-4-3-7-5-9-8 4-2 10-5 15-7 1 3 2 6 3 9z">
          <text:p/>
        </draw:path>
        <draw:path draw:style-name="gr9" draw:text-style-name="P7" draw:layer="layout" svg:width="0.017cm" svg:height="0.014cm" svg:x="2.915cm" svg:y="24.185cm" svg:viewBox="0 0 18 15" svg:d="M10 0c3 2 7 4 8 7 2 4-9 10-13 8-2-3-6-8-5-10 3-2 7-3 10-5z">
          <text:p/>
        </draw:path>
        <draw:path draw:style-name="gr9" draw:text-style-name="P7" draw:layer="layout" svg:width="0.007cm" svg:height="0.005cm" svg:x="14.597cm" svg:y="13.97cm" svg:viewBox="0 0 8 6" svg:d="M8 1c-1 1-1 5-2 5-3 0-4-1-6-3 1-1 1-3 2-3 3 0 4 1 6 1z">
          <text:p/>
        </draw:path>
        <draw:path draw:style-name="gr9" draw:text-style-name="P7" draw:layer="layout" svg:width="0.007cm" svg:height="0.005cm" svg:x="18.391cm" svg:y="19.808cm" svg:viewBox="0 0 8 6" svg:d="M8 3c-1 1-1 3-2 3-2 0-3-1-6-1 0-1 1-5 1-5 3 0 5 1 7 3z">
          <text:p/>
        </draw:path>
        <draw:path draw:style-name="gr9" draw:text-style-name="P7" draw:layer="layout" svg:width="0.007cm" svg:height="0.005cm" svg:x="12.552cm" svg:y="13.098cm" svg:viewBox="0 0 8 6" svg:d="M8 3c-2 2-4 3-5 3s-1-4-3-5c3 0 4-1 6-1 0 0 2 2 2 3z">
          <text:p/>
        </draw:path>
        <draw:path draw:style-name="gr9" draw:text-style-name="P7" draw:layer="layout" svg:width="0.004cm" svg:height="0.008cm" svg:x="2.043cm" svg:y="20.102cm" svg:viewBox="0 0 5 9" svg:d="M2 0c2 1 3 3 3 4 0 3-1 4-3 5-1-1-2-4-2-5s1-3 2-4z">
          <text:p/>
        </draw:path>
        <draw:path draw:style-name="gr9" draw:text-style-name="P7" draw:layer="layout" svg:width="0.006cm" svg:height="0.01cm" svg:x="3.797cm" svg:y="16.011cm" svg:viewBox="0 0 7 11" svg:d="M5 0c0 3 2 5 2 6-1 1-4 3-5 5-4-5-3-8 3-11z">
          <text:p/>
        </draw:path>
        <draw:path draw:style-name="gr9" draw:text-style-name="P7" draw:layer="layout" svg:width="0.009cm" svg:height="0.007cm" svg:x="10.804cm" svg:y="29.442cm" svg:viewBox="0 0 10 8" svg:d="M10 5c-3 1-4 3-5 3-2 0-3-2-5-4 2-2 4-4 5-4s2 4 5 5z">
          <text:p/>
        </draw:path>
        <draw:path draw:style-name="gr9" draw:text-style-name="P7" draw:layer="layout" svg:width="0.009cm" svg:height="0.006cm" svg:x="11.091cm" svg:y="29.443cm" svg:viewBox="0 0 10 7" svg:d="M10 4c-2 1-4 3-5 3s-2-2-5-3c3-1 4-4 6-4 1 0 2 3 4 4z">
          <text:p/>
        </draw:path>
        <draw:polygon draw:style-name="gr9" draw:text-style-name="P7" draw:layer="layout" svg:width="0.006cm" svg:height="0.004cm" svg:x="11.389cm" svg:y="29.444cm" svg:viewBox="0 0 7 5" draw:points="0,1 7,0 5,5">
          <text:p/>
        </draw:polygon>
        <draw:polygon draw:style-name="gr9" draw:text-style-name="P7" draw:layer="layout" svg:width="0.003cm" svg:height="0.003cm" svg:x="13.721cm" svg:y="28.573cm" svg:viewBox="0 0 4 4" draw:points="1,4 0,0 4,0">
          <text:p/>
        </draw:polygon>
        <draw:polygon draw:style-name="gr9" draw:text-style-name="P7" draw:layer="layout" svg:width="0.004cm" svg:height="0.005cm" svg:x="7.01cm" svg:y="28.572cm" svg:viewBox="0 0 5 6" draw:points="1,6 0,0 5,1">
          <text:p/>
        </draw:polygon>
        <draw:polygon draw:style-name="gr9" draw:text-style-name="P7" draw:layer="layout" svg:width="0.005cm" svg:height="0.003cm" svg:x="14.017cm" svg:y="28.572cm" svg:viewBox="0 0 6 4" draw:points="0,1 6,0 4,4">
          <text:p/>
        </draw:polygon>
        <draw:polygon draw:style-name="gr9" draw:text-style-name="P7" draw:layer="layout" svg:width="0.004cm" svg:height="0.004cm" svg:x="6.425cm" svg:y="28.571cm" svg:viewBox="0 0 5 5" draw:points="3,0 5,5 0,5">
          <text:p/>
        </draw:polygon>
        <draw:path draw:style-name="gr9" draw:text-style-name="P7" draw:layer="layout" svg:width="0.008cm" svg:height="0.009cm" svg:x="7.007cm" svg:y="28.857cm" svg:viewBox="0 0 9 10" svg:d="M9 5c-1 1-3 5-5 5-1 0-3-4-4-5 2-1 3-5 4-5 3 0 4 4 5 5z">
          <text:p/>
        </draw:path>
        <draw:polygon draw:style-name="gr9" draw:text-style-name="P7" draw:layer="layout" svg:width="0.004cm" svg:height="0.004cm" svg:x="7.297cm" svg:y="28.86cm" svg:viewBox="0 0 5 5" draw:points="3,5 0,0 5,0">
          <text:p/>
        </draw:polygon>
        <draw:path draw:style-name="gr9" draw:text-style-name="P7" draw:layer="layout" svg:width="0.008cm" svg:height="0.007cm" svg:x="7.592cm" svg:y="28.857cm" svg:viewBox="0 0 9 8" svg:d="M4 0c1 2 4 3 5 4-3 1-4 4-5 4-2 0-3-3-4-5 2-1 3-2 4-3z">
          <text:p/>
        </draw:path>
        <draw:polygon draw:style-name="gr9" draw:text-style-name="P7" draw:layer="layout" svg:width="0.004cm" svg:height="0.005cm" svg:x="7.882cm" svg:y="28.858cm" svg:viewBox="0 0 5 6" draw:points="2,0 5,6 0,5">
          <text:p/>
        </draw:polygon>
        <draw:path draw:style-name="gr9" draw:text-style-name="P7" draw:layer="layout" svg:width="0.008cm" svg:height="0.009cm" svg:x="12.846cm" svg:y="28.857cm" svg:viewBox="0 0 9 10" svg:d="M9 5c-2 1-3 5-5 5s-5-5-4-5c2-7 6-7 9 0z">
          <text:p/>
        </draw:path>
        <draw:polygon draw:style-name="gr9" draw:text-style-name="P7" draw:layer="layout" svg:width="0.004cm" svg:height="0.005cm" svg:x="13.135cm" svg:y="28.858cm" svg:viewBox="0 0 5 6" draw:points="4,0 5,6 0,5">
          <text:p/>
        </draw:polygon>
        <draw:path draw:style-name="gr9" draw:text-style-name="P7" draw:layer="layout" svg:width="0.008cm" svg:height="0.006cm" svg:x="13.431cm" svg:y="28.858cm" svg:viewBox="0 0 9 7" svg:d="M9 3c-1 1-4 5-5 4-6-3-6-6 1-7 0-1 3 2 4 3z">
          <text:p/>
        </draw:path>
        <draw:polygon draw:style-name="gr9" draw:text-style-name="P7" draw:layer="layout" svg:width="0.004cm" svg:height="0.006cm" svg:x="14.305cm" svg:y="28.273cm" svg:viewBox="0 0 5 7" draw:points="3,0 5,7 0,5">
          <text:p/>
        </draw:polygon>
        <draw:path draw:style-name="gr9" draw:text-style-name="P7" draw:layer="layout" svg:width="0.008cm" svg:height="0.007cm" svg:x="6.423cm" svg:y="28.273cm" svg:viewBox="0 0 9 8" svg:d="M5 0c1 1 4 4 4 5s-4 3-5 3c-5-2-5-5 1-8z">
          <text:p/>
        </draw:path>
        <draw:path draw:style-name="gr9" draw:text-style-name="P7" draw:layer="layout" svg:width="0.008cm" svg:height="0.007cm" svg:x="9.634cm" svg:y="29.442cm" svg:viewBox="0 0 9 8" svg:d="M9 5c-1 1-3 4-4 3-1 0-4-2-5-5 1-1 4-3 5-3 2 0 3 2 4 5z">
          <text:p/>
        </draw:path>
        <draw:path draw:style-name="gr9" draw:text-style-name="P7" draw:layer="layout" svg:width="0.008cm" svg:height="0.007cm" svg:x="10.219cm" svg:y="29.442cm" svg:viewBox="0 0 9 8" svg:d="M4 0c2 1 3 3 5 5-2 1-3 3-6 3-1 0-2-3-3-5 1-1 3-2 4-3z">
          <text:p/>
        </draw:path>
        <draw:polygon draw:style-name="gr9" draw:text-style-name="P7" draw:layer="layout" svg:width="0.006cm" svg:height="0.004cm" svg:x="10.509cm" svg:y="29.444cm" svg:viewBox="0 0 7 5" draw:points="7,2 0,5 2,0">
          <text:p/>
        </draw:polygon>
        <draw:polygon draw:style-name="gr9" draw:text-style-name="P7" draw:layer="layout" svg:width="0.003cm" svg:height="0.003cm" svg:x="2.341cm" svg:y="18.64cm" svg:viewBox="0 0 4 4" draw:points="2,4 0,0 4,2">
          <text:p/>
        </draw:polygon>
        <draw:polygon draw:style-name="gr9" draw:text-style-name="P7" draw:layer="layout" svg:width="0.004cm" svg:height="0.004cm" svg:x="2.628cm" svg:y="24.479cm" svg:viewBox="0 0 5 5" draw:points="3,5 0,0 5,0">
          <text:p/>
        </draw:polygon>
        <draw:path draw:style-name="gr9" draw:text-style-name="P7" draw:layer="layout" svg:width="0.007cm" svg:height="0.007cm" svg:x="18.1cm" svg:y="18.35cm" svg:viewBox="0 0 8 8" svg:d="M8 5c-1 1-3 2-5 3-1-1-3-2-3-4 0-1 3-2 4-4 1 2 3 4 4 5z">
          <text:p/>
        </draw:path>
        <draw:polygon draw:style-name="gr9" draw:text-style-name="P7" draw:layer="layout" svg:width="0.004cm" svg:height="0.005cm" svg:x="2.34cm" svg:y="18.352cm" svg:viewBox="0 0 5 6" draw:points="0,2 5,0 4,6">
          <text:p/>
        </draw:polygon>
        <draw:path draw:style-name="gr9" draw:text-style-name="P7" draw:layer="layout" svg:width="0.008cm" svg:height="0.008cm" svg:x="18.099cm" svg:y="17.765cm" svg:viewBox="0 0 9 9" svg:d="M9 4c-1 2-3 5-5 5-1 0-2-3-4-5 2-2 3-4 5-4 1 0 3 3 4 4z">
          <text:p/>
        </draw:path>
        <draw:path draw:style-name="gr9" draw:text-style-name="P7" draw:layer="layout" svg:width="0.007cm" svg:height="0.006cm" svg:x="2.627cm" svg:y="17.766cm" svg:viewBox="0 0 8 7" svg:d="M8 5c-1 1-3 3-4 2-1 0-3-2-4-3 1-2 3-4 5-4 1 0 2 2 3 5z">
          <text:p/>
        </draw:path>
        <draw:path draw:style-name="gr9" draw:text-style-name="P7" draw:layer="layout" svg:width="0.007cm" svg:height="0.007cm" svg:x="17.515cm" svg:y="17.181cm" svg:viewBox="0 0 8 8" svg:d="M4 8c-2-1-3-4-4-5 1-1 4-3 5-3s2 2 3 4c-1 1-2 3-4 4z">
          <text:p/>
        </draw:path>
        <draw:polygon draw:style-name="gr9" draw:text-style-name="P7" draw:layer="layout" svg:width="0.004cm" svg:height="0.003cm" svg:x="17.229cm" svg:y="16.597cm" svg:viewBox="0 0 5 4" draw:points="3,0 5,4 0,4">
          <text:p/>
        </draw:polygon>
        <draw:polygon draw:style-name="gr9" draw:text-style-name="P7" draw:layer="layout" svg:width="0.005cm" svg:height="0.004cm" svg:x="17.515cm" svg:y="25.063cm" svg:viewBox="0 0 6 5" draw:points="0,1 6,0 6,5">
          <text:p/>
        </draw:polygon>
        <draw:path draw:style-name="gr9" draw:text-style-name="P7" draw:layer="layout" svg:width="0.006cm" svg:height="0.007cm" svg:x="3.212cm" svg:y="16.596cm" svg:viewBox="0 0 7 8" svg:d="M7 4c-1 2-2 3-4 4-1-1-3-4-3-5s3-2 4-3c1 1 2 3 3 4z">
          <text:p/>
        </draw:path>
        <draw:polygon draw:style-name="gr9" draw:text-style-name="P7" draw:layer="layout" svg:width="0.005cm" svg:height="0.003cm" svg:x="17.23cm" svg:y="16.31cm" svg:viewBox="0 0 6 4" draw:points="6,2 0,4 2,0">
          <text:p/>
        </draw:polygon>
        <draw:polygon draw:style-name="gr9" draw:text-style-name="P7" draw:layer="layout" svg:width="0.003cm" svg:height="0.004cm" svg:x="16.931cm" svg:y="16.013cm" svg:viewBox="0 0 4 5" draw:points="0,2 4,0 4,5">
          <text:p/>
        </draw:polygon>
        <draw:path draw:style-name="gr9" draw:text-style-name="P7" draw:layer="layout" svg:width="0.007cm" svg:height="0.006cm" svg:x="16.643cm" svg:y="15.724cm" svg:viewBox="0 0 8 7" svg:d="M8 3c-1 1-3 4-5 4-1 0-2-3-3-4 1-2 2-4 3-3 3 0 4 2 5 3z">
          <text:p/>
        </draw:path>
        <draw:path draw:style-name="gr9" draw:text-style-name="P7" draw:layer="layout" svg:width="0.007cm" svg:height="0.007cm" svg:x="3.796cm" svg:y="15.723cm" svg:viewBox="0 0 8 8" svg:d="M4 0c2 1 4 4 4 5s-4 4-4 3c-5-2-5-6 0-8z">
          <text:p/>
        </draw:path>
        <draw:polygon draw:style-name="gr9" draw:text-style-name="P7" draw:layer="layout" svg:width="0.004cm" svg:height="0.004cm" svg:x="3.213cm" svg:y="25.359cm" svg:viewBox="0 0 5 5" draw:points="3,0 5,5 0,5">
          <text:p/>
        </draw:polygon>
        <draw:polygon draw:style-name="gr9" draw:text-style-name="P7" draw:layer="layout" svg:width="0.004cm" svg:height="0.004cm" svg:x="17.517cm" svg:y="25.359cm" svg:viewBox="0 0 5 5" draw:points="3,0 5,5 0,5">
          <text:p/>
        </draw:polygon>
        <draw:polygon draw:style-name="gr9" draw:text-style-name="P7" draw:layer="layout" svg:width="0.004cm" svg:height="0.005cm" svg:x="16.347cm" svg:y="15.139cm" svg:viewBox="0 0 5 6" draw:points="2,0 5,6 0,5">
          <text:p/>
        </draw:polygon>
        <draw:path draw:style-name="gr9" draw:text-style-name="P7" draw:layer="layout" svg:width="0.008cm" svg:height="0.009cm" svg:x="16.058cm" svg:y="15.138cm" svg:viewBox="0 0 9 10" svg:d="M9 5c-2 2-3 5-6 5-1 0-3-4-3-5 3-7 6-7 9 0z">
          <text:p/>
        </draw:path>
        <draw:polygon draw:style-name="gr9" draw:text-style-name="P7" draw:layer="layout" svg:width="0.004cm" svg:height="0.004cm" svg:x="2.34cm" svg:y="23.02cm" svg:viewBox="0 0 5 5" draw:points="3,0 5,5 0,4">
          <text:p/>
        </draw:polygon>
        <draw:polygon draw:style-name="gr9" draw:text-style-name="P7" draw:layer="layout" svg:width="0.004cm" svg:height="0.004cm" svg:x="2.043cm" svg:y="22.734cm" svg:viewBox="0 0 5 5" draw:points="3,5 0,0 5,1">
          <text:p/>
        </draw:polygon>
        <draw:polygon draw:style-name="gr9" draw:text-style-name="P7" draw:layer="layout" svg:width="0.004cm" svg:height="0.005cm" svg:x="2.043cm" svg:y="22.435cm" svg:viewBox="0 0 5 6" draw:points="2,0 5,6 0,5">
          <text:p/>
        </draw:polygon>
        <draw:polygon draw:style-name="gr9" draw:text-style-name="P7" draw:layer="layout" svg:width="0.004cm" svg:height="0.004cm" svg:x="18.687cm" svg:y="22.149cm" svg:viewBox="0 0 5 5" draw:points="1,5 0,0 5,0">
          <text:p/>
        </draw:polygon>
        <draw:polygon draw:style-name="gr9" draw:text-style-name="P7" draw:layer="layout" svg:width="0.004cm" svg:height="0.005cm" svg:x="2.341cm" svg:y="23.605cm" svg:viewBox="0 0 5 6" draw:points="5,4 0,6 2,0">
          <text:p/>
        </draw:polygon>
        <draw:path draw:style-name="gr9" draw:text-style-name="P7" draw:layer="layout" svg:width="0.009cm" svg:height="0.008cm" svg:x="18.099cm" svg:y="23.603cm" svg:viewBox="0 0 10 9" svg:d="M5 0c1 2 2 3 5 6-3 1-5 4-6 3-6-2-6-6 1-9z">
          <text:p/>
        </draw:path>
        <draw:polygon draw:style-name="gr9" draw:text-style-name="P7" draw:layer="layout" svg:width="0.004cm" svg:height="0.004cm" svg:x="2.043cm" svg:y="22.147cm" svg:viewBox="0 0 5 5" draw:points="4,0 5,5 0,5">
          <text:p/>
        </draw:polygon>
        <draw:polygon draw:style-name="gr9" draw:text-style-name="P7" draw:layer="layout" svg:width="0.004cm" svg:height="0.004cm" svg:x="2.043cm" svg:y="21.852cm" svg:viewBox="0 0 5 5" draw:points="3,5 0,0 5,1">
          <text:p/>
        </draw:polygon>
        <draw:path draw:style-name="gr9" draw:text-style-name="P7" draw:layer="layout" svg:width="0.007cm" svg:height="0.007cm" svg:x="18.685cm" svg:y="21.562cm" svg:viewBox="0 0 8 8" svg:d="M8 5c-1 1-3 2-4 3-1-1-4-3-4-4s3-3 5-4c1 1 2 3 3 5z">
          <text:p/>
        </draw:path>
        <draw:polygon draw:style-name="gr9" draw:text-style-name="P7" draw:layer="layout" svg:width="0.005cm" svg:height="0.004cm" svg:x="2.042cm" svg:y="21.564cm" svg:viewBox="0 0 6 5" draw:points="0,1 6,0 5,5">
          <text:p/>
        </draw:polygon>
        <draw:path draw:style-name="gr9" draw:text-style-name="P7" draw:layer="layout" svg:width="0.008cm" svg:height="0.007cm" svg:x="18.684cm" svg:y="20.977cm" svg:viewBox="0 0 9 8" svg:d="M9 4c-2 1-4 4-5 4s-3-3-4-5c2-1 3-3 5-3 1 0 2 2 4 4z">
          <text:p/>
        </draw:path>
        <draw:path draw:style-name="gr9" draw:text-style-name="P7" draw:layer="layout" svg:width="0.008cm" svg:height="0.006cm" svg:x="2.041cm" svg:y="20.978cm" svg:viewBox="0 0 9 7" svg:d="M9 4c-1 1-4 3-5 3s-2-2-4-3c2-2 3-5 5-4 1 0 3 3 4 4z">
          <text:p/>
        </draw:path>
        <draw:path draw:style-name="gr9" draw:text-style-name="P7" draw:layer="layout" svg:width="0.008cm" svg:height="0.007cm" svg:x="18.684cm" svg:y="20.392cm" svg:viewBox="0 0 9 8" svg:d="M9 5c-2 1-4 4-5 3-2 0-3-2-4-3 1-3 3-5 4-5 2 0 3 4 5 5z">
          <text:p/>
        </draw:path>
        <draw:path draw:style-name="gr9" draw:text-style-name="P7" draw:layer="layout" svg:width="0.008cm" svg:height="0.007cm" svg:x="2.041cm" svg:y="20.393cm" svg:viewBox="0 0 9 8" svg:d="M9 5c-3 1-4 3-5 3-2 0-3-3-4-5 2-1 3-3 4-3 2 0 4 2 5 5z">
          <text:p/>
        </draw:path>
        <draw:path draw:style-name="gr9" draw:text-style-name="P7" draw:layer="layout" svg:width="0.009cm" svg:height="0.007cm" svg:x="2.041cm" svg:y="19.807cm" svg:viewBox="0 0 10 8" svg:d="M5 0l5 4c-1 1-4 5-5 4-7-3-7-5 0-8z">
          <text:p/>
        </draw:path>
        <draw:path draw:style-name="gr9" draw:text-style-name="P7" draw:layer="layout" svg:width="0.007cm" svg:height="0.007cm" svg:x="2.627cm" svg:y="24.189cm" svg:viewBox="0 0 8 8" svg:d="M8 4c-1 1-3 4-4 4-6-3-5-6 1-8 0 0 2 3 3 4z">
          <text:p/>
        </draw:path>
        <draw:path draw:style-name="gr9" draw:text-style-name="P7" draw:layer="layout" svg:width="0.009cm" svg:height="0.007cm" svg:x="18.099cm" svg:y="24.189cm" svg:viewBox="0 0 10 8" svg:d="M5 0c1 1 2 2 5 4-3 1-5 5-6 4-6-3-6-6 1-8z">
          <text:p/>
        </draw:path>
        <draw:polygon draw:style-name="gr9" draw:text-style-name="P7" draw:layer="layout" svg:width="0.005cm" svg:height="0.004cm" svg:x="2.042cm" svg:y="19.522cm" svg:viewBox="0 0 6 5" draw:points="0,1 6,0 5,5">
          <text:p/>
        </draw:polygon>
        <draw:polygon draw:style-name="gr9" draw:text-style-name="P7" draw:layer="layout" svg:width="0.003cm" svg:height="0.003cm" svg:x="2.341cm" svg:y="19.225cm" svg:viewBox="0 0 4 4" draw:points="2,4 0,0 4,0">
          <text:p/>
        </draw:polygon>
        <draw:polygon draw:style-name="gr9" draw:text-style-name="P7" draw:layer="layout" svg:width="0.004cm" svg:height="0.005cm" svg:x="2.042cm" svg:y="19.224cm" svg:viewBox="0 0 5 6" draw:points="0,3 5,0 5,6">
          <text:p/>
        </draw:polygon>
        <draw:polygon draw:style-name="gr9" draw:text-style-name="P7" draw:layer="layout" svg:width="0.004cm" svg:height="0.004cm" svg:x="2.34cm" svg:y="18.936cm" svg:viewBox="0 0 5 5" draw:points="4,0 5,5 0,5">
          <text:p/>
        </draw:polygon>
        <draw:polygon draw:style-name="gr9" draw:text-style-name="P7" draw:layer="layout" svg:width="0.004cm" svg:height="0.004cm" svg:x="13.134cm" svg:y="13.386cm" svg:viewBox="0 0 5 5" draw:points="0,1 5,0 5,5">
          <text:p/>
        </draw:polygon>
        <draw:polygon draw:style-name="gr9" draw:text-style-name="P7" draw:layer="layout" svg:width="0.004cm" svg:height="0.004cm" svg:x="7.296cm" svg:y="13.386cm" svg:viewBox="0 0 5 5" draw:points="0,1 5,0 4,5">
          <text:p/>
        </draw:polygon>
        <draw:path draw:style-name="gr9" draw:text-style-name="P7" draw:layer="layout" svg:width="0.007cm" svg:height="0.007cm" svg:x="7.008cm" svg:y="13.384cm" svg:viewBox="0 0 8 8" svg:d="M5 0c1 1 3 3 3 5-1 1-3 3-4 3-5-2-5-6 1-8z">
          <text:p/>
        </draw:path>
        <draw:polygon draw:style-name="gr9" draw:text-style-name="P7" draw:layer="layout" svg:width="0.005cm" svg:height="0.004cm" svg:x="13.135cm" svg:y="13.098cm" svg:viewBox="0 0 6 5" draw:points="4,0 6,5 0,4">
          <text:p/>
        </draw:polygon>
        <draw:path draw:style-name="gr9" draw:text-style-name="P7" draw:layer="layout" svg:width="0.007cm" svg:height="0.008cm" svg:x="12.847cm" svg:y="13.096cm" svg:viewBox="0 0 8 9" svg:d="M8 4c-2 3-3 4-4 5-1-1-5-3-4-5 0-1 3-2 4-4 1 2 2 3 4 4z">
          <text:p/>
        </draw:path>
        <draw:path draw:style-name="gr9" draw:text-style-name="P7" draw:layer="layout" svg:width="0.007cm" svg:height="0.007cm" svg:x="12.262cm" svg:y="13.097cm" svg:viewBox="0 0 8 8" svg:d="M4 0c2 1 4 3 4 5-4 5-7 4-8-2 0-1 2-2 4-3z">
          <text:p/>
        </draw:path>
        <draw:polygon draw:style-name="gr9" draw:text-style-name="P7" draw:layer="layout" svg:width="0.004cm" svg:height="0.005cm" svg:x="8.467cm" svg:y="13.099cm" svg:viewBox="0 0 5 6" draw:points="2,6 0,0 5,0">
          <text:p/>
        </draw:polygon>
        <draw:polygon draw:style-name="gr9" draw:text-style-name="P7" draw:layer="layout" svg:width="0.004cm" svg:height="0.004cm" svg:x="8.18cm" svg:y="13.098cm" svg:viewBox="0 0 5 5" draw:points="5,4 0,5 0,0">
          <text:p/>
        </draw:polygon>
        <draw:polygon draw:style-name="gr9" draw:text-style-name="P7" draw:layer="layout" svg:width="0.005cm" svg:height="0.004cm" svg:x="7.882cm" svg:y="13.098cm" svg:viewBox="0 0 6 5" draw:points="4,0 6,5 0,4">
          <text:p/>
        </draw:polygon>
        <draw:path draw:style-name="gr9" draw:text-style-name="P7" draw:layer="layout" svg:width="0.006cm" svg:height="0.007cm" svg:x="7.593cm" svg:y="13.097cm" svg:viewBox="0 0 7 8" svg:d="M3 8c-1-2-3-3-3-5 0-1 2-2 4-3 1 1 4 2 3 3 0 3-3 3-4 5z">
          <text:p/>
        </draw:path>
        <draw:path draw:style-name="gr9" draw:text-style-name="P7" draw:layer="layout" svg:width="0.007cm" svg:height="0.006cm" svg:x="4.966cm" svg:y="27.401cm" svg:viewBox="0 0 8 7" svg:d="M8 3c-1 2-2 4-5 4-1 0-2-2-3-4 1-2 3-4 4-3 2 0 3 2 4 3z">
          <text:p/>
        </draw:path>
        <draw:path draw:style-name="gr9" draw:text-style-name="P7" draw:layer="layout" svg:width="0.007cm" svg:height="0.007cm" svg:x="15.473cm" svg:y="27.4cm" svg:viewBox="0 0 8 8" svg:d="M5 0c1 1 3 4 3 5s-3 4-5 3c-4-2-4-5 2-8z">
          <text:p/>
        </draw:path>
        <draw:polygon draw:style-name="gr9" draw:text-style-name="P7" draw:layer="layout" svg:width="0.003cm" svg:height="0.003cm" svg:x="11.391cm" svg:y="12.802cm" svg:viewBox="0 0 4 4" draw:points="1,4 0,0 4,0">
          <text:p/>
        </draw:polygon>
        <draw:polygon draw:style-name="gr9" draw:text-style-name="P7" draw:layer="layout" svg:width="0.003cm" svg:height="0.004cm" svg:x="11.093cm" svg:y="12.801cm" svg:viewBox="0 0 4 5" draw:points="4,0 4,5 0,4">
          <text:p/>
        </draw:polygon>
        <draw:polygon draw:style-name="gr9" draw:text-style-name="P7" draw:layer="layout" svg:width="0.003cm" svg:height="0.004cm" svg:x="10.806cm" svg:y="12.8cm" svg:viewBox="0 0 4 5" draw:points="3,0 4,5 0,5">
          <text:p/>
        </draw:polygon>
        <draw:polygon draw:style-name="gr9" draw:text-style-name="P7" draw:layer="layout" svg:width="0.004cm" svg:height="0.004cm" svg:x="5.255cm" svg:y="27.69cm" svg:viewBox="0 0 5 5" draw:points="5,3 0,5 1,0">
          <text:p/>
        </draw:polygon>
        <draw:polygon draw:style-name="gr9" draw:text-style-name="P7" draw:layer="layout" svg:width="0.003cm" svg:height="0.004cm" svg:x="10.221cm" svg:y="12.8cm" svg:viewBox="0 0 4 5" draw:points="3,0 4,5 0,5">
          <text:p/>
        </draw:polygon>
        <draw:polygon draw:style-name="gr9" draw:text-style-name="P7" draw:layer="layout" svg:width="0.003cm" svg:height="0.004cm" svg:x="8.467cm" svg:y="12.801cm" svg:viewBox="0 0 4 5" draw:points="3,0 4,5 0,4">
          <text:p/>
        </draw:polygon>
        <draw:polygon draw:style-name="gr9" draw:text-style-name="P7" draw:layer="layout" svg:width="0.004cm" svg:height="0.003cm" svg:x="5.553cm" svg:y="27.987cm" svg:viewBox="0 0 5 4" draw:points="5,3 0,4 1,0">
          <text:p/>
        </draw:polygon>
        <draw:polygon draw:style-name="gr9" draw:text-style-name="P7" draw:layer="layout" svg:width="0.004cm" svg:height="0.006cm" svg:x="5.84cm" svg:y="27.985cm" svg:viewBox="0 0 5 7" draw:points="3,0 5,7 0,7">
          <text:p/>
        </draw:polygon>
        <draw:polygon draw:style-name="gr9" draw:text-style-name="P7" draw:layer="layout" svg:width="0.004cm" svg:height="0.006cm" svg:x="14.89cm" svg:y="27.985cm" svg:viewBox="0 0 5 7" draw:points="2,0 5,7 0,5">
          <text:p/>
        </draw:polygon>
        <draw:path draw:style-name="gr9" draw:text-style-name="P7" draw:layer="layout" svg:width="0.007cm" svg:height="0.008cm" svg:x="4.381cm" svg:y="15.138cm" svg:viewBox="0 0 8 9" svg:d="M8 5c-1 2-4 5-5 4-1 0-3-4-3-4 2-7 6-7 8 0z">
          <text:p/>
        </draw:path>
        <draw:path draw:style-name="gr9" draw:text-style-name="P7" draw:layer="layout" svg:width="0.006cm" svg:height="0.007cm" svg:x="3.212cm" svg:y="25.646cm" svg:viewBox="0 0 7 8" svg:d="M7 4c-1 1-2 3-3 4-1-1-4-3-4-4s3-3 4-4z">
          <text:p/>
        </draw:path>
        <draw:polygon draw:style-name="gr9" draw:text-style-name="P7" draw:layer="layout" svg:width="0.004cm" svg:height="0.003cm" svg:x="17.228cm" svg:y="25.648cm" svg:viewBox="0 0 5 4" draw:points="0,2 5,0 5,4">
          <text:p/>
        </draw:polygon>
        <draw:path draw:style-name="gr9" draw:text-style-name="P7" draw:layer="layout" svg:width="0.008cm" svg:height="0.007cm" svg:x="15.472cm" svg:y="14.554cm" svg:viewBox="0 0 9 8" svg:d="M9 5c-1 1-3 3-4 3-2 0-4-2-5-4 2-2 3-4 5-4s3 2 4 5z">
          <text:p/>
        </draw:path>
        <draw:path draw:style-name="gr9" draw:text-style-name="P7" draw:layer="layout" svg:width="0.009cm" svg:height="0.007cm" svg:x="5.253cm" svg:y="14.554cm" svg:viewBox="0 0 10 8" svg:d="M5 0c1 1 2 3 5 4-3 2-4 4-5 4s-3-2-5-5c2-1 4-2 5-3z">
          <text:p/>
        </draw:path>
        <draw:path draw:style-name="gr9" draw:text-style-name="P7" draw:layer="layout" svg:width="0.007cm" svg:height="0.007cm" svg:x="4.966cm" svg:y="14.554cm" svg:viewBox="0 0 8 8" svg:d="M8 4c-1 2-3 4-4 4s-2-4-4-5c2-1 3-3 5-3 1 0 2 2 3 4z">
          <text:p/>
        </draw:path>
        <draw:path draw:style-name="gr9" draw:text-style-name="P7" draw:layer="layout" svg:width="0.008cm" svg:height="0.007cm" svg:x="3.795cm" svg:y="26.231cm" svg:viewBox="0 0 9 8" svg:d="M9 5c-1 1-2 3-4 3-1 0-2-3-5-4 3-1 4-4 6-4 1 0 2 3 3 5z">
          <text:p/>
        </draw:path>
        <draw:path draw:style-name="gr9" draw:text-style-name="P7" draw:layer="layout" svg:width="0.009cm" svg:height="0.007cm" svg:x="16.642cm" svg:y="26.231cm" svg:viewBox="0 0 10 8" svg:d="M10 5c-3 1-4 3-5 3-1-1-2-3-5-5 3-1 4-3 5-3s3 2 5 5z">
          <text:p/>
        </draw:path>
        <draw:path draw:style-name="gr9" draw:text-style-name="P7" draw:layer="layout" svg:width="0.007cm" svg:height="0.007cm" svg:x="16.93cm" svg:y="26.231cm" svg:viewBox="0 0 8 8" svg:d="M4 0c1 1 2 2 4 5-2 1-3 3-5 3-1 0-2-2-3-5 1-1 3-2 4-3z">
          <text:p/>
        </draw:path>
        <draw:path draw:style-name="gr9" draw:text-style-name="P7" draw:layer="layout" svg:width="0.008cm" svg:height="0.009cm" svg:x="14.888cm" svg:y="13.968cm" svg:viewBox="0 0 9 10" svg:d="M5 0c2 3 4 4 4 6 0 1-4 5-4 4-7-3-7-6 0-10z">
          <text:p/>
        </draw:path>
        <draw:path draw:style-name="gr9" draw:text-style-name="P7" draw:layer="layout" svg:width="0.007cm" svg:height="0.009cm" svg:x="5.838cm" svg:y="13.968cm" svg:viewBox="0 0 8 10" svg:d="M5 0c1 2 4 5 3 6-2 5-6 5-8-1 0-2 2-3 5-5z">
          <text:p/>
        </draw:path>
        <draw:polygon draw:style-name="gr9" draw:text-style-name="P7" draw:layer="layout" svg:width="0.004cm" svg:height="0.004cm" svg:x="14.306cm" svg:y="13.683cm" svg:viewBox="0 0 5 5" draw:points="5,2 0,5 0,0">
          <text:p/>
        </draw:polygon>
        <draw:polygon draw:style-name="gr9" draw:text-style-name="P7" draw:layer="layout" svg:width="0.003cm" svg:height="0.003cm" svg:x="14.018cm" svg:y="13.684cm" svg:viewBox="0 0 4 4" draw:points="1,4 0,0 4,0">
          <text:p/>
        </draw:polygon>
        <draw:polygon draw:style-name="gr9" draw:text-style-name="P7" draw:layer="layout" svg:width="0.004cm" svg:height="0.004cm" svg:x="6.425cm" svg:y="13.682cm" svg:viewBox="0 0 5 5" draw:points="3,0 5,5 0,5">
          <text:p/>
        </draw:polygon>
        <draw:path draw:style-name="gr9" draw:text-style-name="P7" draw:layer="layout" svg:width="0.007cm" svg:height="0.006cm" svg:x="4.381cm" svg:y="26.816cm" svg:viewBox="0 0 8 7" svg:d="M8 4c-1 1-4 3-5 3s-2-2-3-3c1-1 2-4 3-4 3 0 4 3 5 4z">
          <text:p/>
        </draw:path>
        <draw:polygon draw:style-name="gr9" draw:text-style-name="P7" draw:layer="layout" svg:width="0.004cm" svg:height="0.005cm" svg:x="16.347cm" svg:y="26.816cm" svg:viewBox="0 0 5 6" draw:points="2,0 5,6 0,5">
          <text:p/>
        </draw:polygon>
        <draw:polygon draw:style-name="gr9" draw:text-style-name="P7" draw:layer="layout" svg:width="0.005cm" svg:height="0.004cm" svg:x="13.72cm" svg:y="13.385cm" svg:viewBox="0 0 6 5" draw:points="4,0 6,5 0,4">
          <text:p/>
        </draw:polygon>
        <draw:polygon draw:style-name="gr9" draw:text-style-name="P7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6-24T15:26:49.319360170</dc:date>
    <meta:editing-duration>PT2H4M17S</meta:editing-duration>
    <meta:editing-cycles>12</meta:editing-cycles>
    <meta:generator>LibreOffice/7.3.7.2$Linux_X86_64 LibreOffice_project/30$Build-2</meta:generator>
    <meta:document-statistic meta:object-count="2561"/>
  </office:meta>
</office:document-meta>
</file>